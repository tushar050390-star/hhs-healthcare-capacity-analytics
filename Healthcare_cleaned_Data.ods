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3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4" style:family="table-cell" style:parent-style-name="Default" style:data-style-name="N0">
      <style:table-cell-properties fo:border-top="none" fo:border-bottom="none" fo:border-left="thin solid #999999" fo:border-right="none"/>
    </style:style>
    <style:style style:name="ce5" style:family="table-cell" style:parent-style-name="Default" style:data-style-name="N0">
      <style:table-cell-properties fo:border-top="none" fo:border-bottom="none" fo:border-left="thin solid #999999" fo:border-right="thin solid #999999"/>
    </style:style>
    <style:style style:name="ce6" style:family="table-cell" style:parent-style-name="Default" style:data-style-name="N0">
      <style:table-cell-properties style:vertical-align="automatic" fo:wrap-option="wrap"/>
    </style:style>
    <style:style style:name="ce7" style:family="table-cell" style:parent-style-name="Default" style:data-style-name="N0">
      <style:table-cell-properties fo:border-top="thin solid #999999" fo:border-bottom="thin solid #999999" fo:border-left="thin solid #999999" fo:border-right="none"/>
    </style:style>
    <style:style style:name="ce8" style:family="table-cell" style:parent-style-name="Default" style:data-style-name="N0">
      <style:table-cell-properties fo:border="thin solid #999999"/>
    </style:style>
    <style:style style:name="ce9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999999" fo:border-bottom="none" fo:border-left="none" fo:border-right="thin solid #999999"/>
    </style:style>
    <style:style style:name="ce11" style:family="table-cell" style:parent-style-name="Default" style:data-style-name="N0">
      <style:table-cell-properties fo:border-top="none" fo:border-bottom="none" fo:border-left="none" fo:border-right="thin solid #999999"/>
    </style:style>
    <style:style style:name="ce12" style:family="table-cell" style:parent-style-name="Default" style:data-style-name="N0">
      <style:table-cell-properties fo:border-top="thin solid #999999" fo:border-bottom="thin solid #999999" fo:border-left="none" fo:border-right="thin solid #999999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center"/>
    </style:style>
    <style:style style:name="ce14" style:family="table-cell" style:parent-style-name="Default" style:data-style-name="N36">
      <style:table-cell-properties fo:border="thin solid #000000" style:vertical-align="automatic" fo:wrap-option="wrap" style:repeat-content="false"/>
      <style:paragraph-properties fo:text-align="center"/>
    </style:style>
    <style:style style:name="ce15" style:family="table-cell" style:parent-style-name="Default" style:data-style-name="N1">
      <style:table-cell-properties fo:border="thin solid #000000" style:vertical-align="automatic" style:repeat-content="false"/>
      <style:paragraph-properties fo:text-align="center"/>
    </style:style>
    <style:style style:name="ce16" style:family="table-cell" style:parent-style-name="Percent" style:data-style-name="N13">
      <style:table-cell-properties fo:border="thin solid #000000" style:vertical-align="automatic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19" style:family="table-cell" style:parent-style-name="Default" style:data-style-name="N36"/>
    <style:style style:name="ce20" style:family="table-cell" style:parent-style-name="Default" style:data-style-name="N1"/>
    <style:style style:name="ce2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22" style:family="table-cell" style:parent-style-name="Default" style:data-style-name="N1">
      <style:table-cell-properties fo:border="thin solid #000000" style:vertical-align="middle" fo:wrap-option="wrap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 style:vertical-align="automatic" fo:background-color="#8EA9DB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4765cm" style:use-optimal-column-width="true"/>
    </style:style>
    <style:style style:name="co2" style:family="table-column">
      <style:table-column-properties fo:break-before="auto" style:column-width="4.7625cm" style:use-optimal-column-width="true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8.08566666666667cm"/>
    </style:style>
    <style:style style:name="co5" style:family="table-column">
      <style:table-column-properties fo:break-before="auto" style:column-width="2.89983333333333cm" style:use-optimal-column-width="true"/>
    </style:style>
    <style:style style:name="co6" style:family="table-column">
      <style:table-column-properties fo:break-before="auto" style:column-width="3.70416666666667cm" style:use-optimal-column-width="true"/>
    </style:style>
    <style:style style:name="co7" style:family="table-column">
      <style:table-column-properties fo:break-before="auto" style:column-width="4.27566666666667cm" style:use-optimal-column-width="true"/>
    </style:style>
    <style:style style:name="co8" style:family="table-column">
      <style:table-column-properties fo:break-before="auto" style:column-width="5.05883333333333cm" style:use-optimal-column-width="true"/>
    </style:style>
    <style:style style:name="co9" style:family="table-column">
      <style:table-column-properties fo:break-before="auto" style:column-width="1.98966666666667cm" style:use-optimal-column-width="true"/>
    </style:style>
    <style:style style:name="co10" style:family="table-column">
      <style:table-column-properties fo:break-before="auto" style:column-width="2.159cm" style:use-optimal-column-width="true"/>
    </style:style>
    <style:style style:name="co11" style:family="table-column">
      <style:table-column-properties fo:break-before="auto" style:column-width="2.96333333333333cm" style:use-optimal-column-width="true"/>
    </style:style>
    <style:style style:name="co12" style:family="table-column">
      <style:table-column-properties fo:break-before="auto" style:column-width="3.28083333333333cm"/>
    </style:style>
    <style:style style:name="co13" style:family="table-column">
      <style:table-column-properties fo:break-before="auto" style:column-width="2.4765cm"/>
    </style:style>
    <style:style style:name="co14" style:family="table-column">
      <style:table-column-properties fo:break-before="auto" style:column-width="3.85233333333333cm"/>
    </style:style>
    <style:style style:name="co15" style:family="table-column">
      <style:table-column-properties fo:break-before="auto" style:column-width="3.57716666666667cm"/>
    </style:style>
    <style:style style:name="co16" style:family="table-column">
      <style:table-column-properties fo:break-before="auto" style:column-width="2.24366666666667cm"/>
    </style:style>
    <style:style style:name="co17" style:family="table-column">
      <style:table-column-properties fo:break-before="auto" style:column-width="2.05316666666667cm"/>
    </style:style>
    <style:style style:name="co18" style:family="table-column">
      <style:table-column-properties fo:break-before="auto" style:column-width="2.20133333333333cm"/>
    </style:style>
    <style:style style:name="co19" style:family="table-column">
      <style:table-column-properties fo:break-before="auto" style:column-width="2.032cm"/>
    </style:style>
    <style:style style:name="co20" style:family="table-column">
      <style:table-column-properties fo:break-before="auto" style:column-width="1.94733333333333cm"/>
    </style:style>
    <style:style style:name="co21" style:family="table-column">
      <style:table-column-properties fo:break-before="auto" style:column-width="3.21733333333333cm"/>
    </style:style>
    <style:style style:name="co22" style:family="table-column">
      <style:table-column-properties fo:break-before="auto" style:column-width="2.18016666666667cm"/>
    </style:style>
    <style:style style:name="co23" style:family="table-column">
      <style:table-column-properties fo:break-before="auto" style:column-width="2.9845cm"/>
    </style:style>
    <style:style style:name="co24" style:family="table-column">
      <style:table-column-properties fo:break-before="auto" style:column-width="5.60916666666667cm"/>
    </style:style>
    <style:style style:name="co25" style:family="table-column">
      <style:table-column-properties fo:break-before="auto" style:column-width="2.32833333333333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57.6pt" style:use-optimal-row-height="true" fo:break-before="auto"/>
    </style:style>
    <style:style style:name="ro3" style:family="table-row">
      <style:table-row-properties style:row-height="43.2pt" style:use-optimal-row-height="true" fo:break-before="auto"/>
    </style:style>
    <style:style style:name="ro4" style:family="table-row">
      <style:table-row-properties style:row-height="55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>
      <style:graphic-properties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ystem_load_trend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3" table:number-columns-repeated="16378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Month-Year</text:p>
          </table:table-cell>
          <table:table-cell office:value-type="string" table:style-name="ce3">
            <text:p>Average of Total System loa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023-01</text:p>
          </table:table-cell>
          <table:table-cell office:value-type="float" office:value="7413.5" table:style-name="ce3">
            <text:p>7413.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2023-02</text:p>
          </table:table-cell>
          <table:table-cell office:value-type="float" office:value="7967.105263157895" table:style-name="ce5">
            <text:p>7967.10526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2023-03</text:p>
          </table:table-cell>
          <table:table-cell office:value-type="float" office:value="8190.4736842105267" table:style-name="ce5">
            <text:p>8190.47368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2023-04</text:p>
          </table:table-cell>
          <table:table-cell office:value-type="float" office:value="8092.8571428571431" table:style-name="ce5">
            <text:p>8092.85714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2023-05</text:p>
          </table:table-cell>
          <table:table-cell office:value-type="float" office:value="8404.0909090909099" table:style-name="ce5">
            <text:p>8404.09090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2023-06</text:p>
          </table:table-cell>
          <table:table-cell office:value-type="float" office:value="6282.1" table:style-name="ce5">
            <text:p>6282.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2023-07</text:p>
          </table:table-cell>
          <table:table-cell office:value-type="float" office:value="7073.3809523809523" table:style-name="ce5">
            <text:p>7073.38095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2023-08</text:p>
          </table:table-cell>
          <table:table-cell office:value-type="float" office:value="9585.1" table:style-name="ce5">
            <text:p>9585.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2023-09</text:p>
          </table:table-cell>
          <table:table-cell office:value-type="float" office:value="10992.368421052632" table:style-name="ce5">
            <text:p>10992.3684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2023-10</text:p>
          </table:table-cell>
          <table:table-cell office:value-type="float" office:value="10308.227272727272" table:style-name="ce5">
            <text:p>10308.2272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2023-11</text:p>
          </table:table-cell>
          <table:table-cell office:value-type="float" office:value="9909.6" table:style-name="ce5">
            <text:p>9909.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2023-12</text:p>
          </table:table-cell>
          <table:table-cell office:value-type="float" office:value="11255.263157894737" table:style-name="ce5">
            <text:p>11255.26316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4">
            <text:p>2024-01</text:p>
          </table:table-cell>
          <table:table-cell office:value-type="float" office:value="9021.636363636364" table:style-name="ce5">
            <text:p>9021.636364</text:p>
          </table:table-cell>
          <table:table-cell table:number-columns-repeated="3" table:style-name="ce1"/>
          <table:table-cell office:value-type="string" table:style-name="ce6">
            <text:p>The system demonstrated sustained growth in operational care burden across multiple reporting periods, suggesting increasing strain on healthcare and shelter infrastructure.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2024-02</text:p>
          </table:table-cell>
          <table:table-cell office:value-type="float" office:value="8766.7999999999993" table:style-name="ce5">
            <text:p>8766.8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2024-03</text:p>
          </table:table-cell>
          <table:table-cell office:value-type="float" office:value="8703.8571428571431" table:style-name="ce5">
            <text:p>8703.857143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2024-04</text:p>
          </table:table-cell>
          <table:table-cell office:value-type="float" office:value="7336.318181818182" table:style-name="ce5">
            <text:p>7336.318182</text:p>
          </table:table-cell>
          <table:table-cell table:style-name="ce1">
            <draw:frame draw:z-index="1" draw:id="id0" draw:style-name="a0" draw:name="Chart 1" svg:x="0.575in" svg:y="0.15417in" svg:width="7.51667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1">
          <table:table-cell office:value-type="string" table:style-name="ce4">
            <text:p>2024-05</text:p>
          </table:table-cell>
          <table:table-cell office:value-type="float" office:value="7836.0476190476193" table:style-name="ce5">
            <text:p>7836.047619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2024-06</text:p>
          </table:table-cell>
          <table:table-cell office:value-type="float" office:value="7691.4761904761908" table:style-name="ce5">
            <text:p>7691.47619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2024-07</text:p>
          </table:table-cell>
          <table:table-cell office:value-type="float" office:value="6498.7619047619046" table:style-name="ce5">
            <text:p>6498.761905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2024-08</text:p>
          </table:table-cell>
          <table:table-cell office:value-type="float" office:value="6258.7368421052633" table:style-name="ce5">
            <text:p>6258.736842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2024-09</text:p>
          </table:table-cell>
          <table:table-cell office:value-type="float" office:value="6452.636363636364" table:style-name="ce5">
            <text:p>6452.636364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2024-10</text:p>
          </table:table-cell>
          <table:table-cell office:value-type="float" office:value="6276.2857142857147" table:style-name="ce5">
            <text:p>6276.285714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2024-11</text:p>
          </table:table-cell>
          <table:table-cell office:value-type="float" office:value="6151.4210526315792" table:style-name="ce5">
            <text:p>6151.421053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2024-12</text:p>
          </table:table-cell>
          <table:table-cell office:value-type="float" office:value="6690.409090909091" table:style-name="ce5">
            <text:p>6690.409091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2025-01</text:p>
          </table:table-cell>
          <table:table-cell office:value-type="float" office:value="5080.045454545455" table:style-name="ce5">
            <text:p>5080.045455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2025-02</text:p>
          </table:table-cell>
          <table:table-cell office:value-type="float" office:value="2804.2105263157896" table:style-name="ce5">
            <text:p>2804.210526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2025-03</text:p>
          </table:table-cell>
          <table:table-cell office:value-type="float" office:value="2185.909090909091" table:style-name="ce5">
            <text:p>2185.909091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2025-04</text:p>
          </table:table-cell>
          <table:table-cell office:value-type="float" office:value="2298" table:style-name="ce5">
            <text:p>2298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2025-05</text:p>
          </table:table-cell>
          <table:table-cell office:value-type="float" office:value="2439.7777777777778" table:style-name="ce5">
            <text:p>2439.777778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2025-06</text:p>
          </table:table-cell>
          <table:table-cell office:value-type="float" office:value="2511.4705882352941" table:style-name="ce5">
            <text:p>2511.470588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2025-07</text:p>
          </table:table-cell>
          <table:table-cell office:value-type="float" office:value="2201.1428571428573" table:style-name="ce5">
            <text:p>2201.142857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2025-08</text:p>
          </table:table-cell>
          <table:table-cell office:value-type="float" office:value="2026.9" table:style-name="ce5">
            <text:p>2026.9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2025-09</text:p>
          </table:table-cell>
          <table:table-cell office:value-type="float" office:value="2118.0454545454545" table:style-name="ce5">
            <text:p>2118.045455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2025-10</text:p>
          </table:table-cell>
          <table:table-cell office:value-type="float" office:value="2265.3809523809523" table:style-name="ce5">
            <text:p>2265.380952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2025-11</text:p>
          </table:table-cell>
          <table:table-cell office:value-type="float" office:value="2360.6842105263158" table:style-name="ce5">
            <text:p>2360.684211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2025-12</text:p>
          </table:table-cell>
          <table:table-cell office:value-type="float" office:value="2481.4666666666667" table:style-name="ce5">
            <text:p>2481.466667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Grand Total</text:p>
          </table:table-cell>
          <table:table-cell office:value-type="float" office:value="6232.7694444444442" table:style-name="ce8">
            <text:p>6232.769444</text:p>
          </table:table-cell>
          <table:table-cell table:number-columns-repeated="16382"/>
        </table:table-row>
        <table:table-row table:number-rows-repeated="1048536" table:style-name="ro1">
          <table:table-cell table:number-columns-repeated="16384"/>
        </table:table-row>
      </table:table>
      <table:table table:name="Inflow_vs_Outflow_Analysis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number-columns-repeated="16381" table:default-cell-style-name="ce1"/>
        <table:table-row table:number-rows-repeated="2" table:style-name="ro1">
          <table:table-cell table:number-columns-repeated="16384"/>
        </table:table-row>
        <table:table-row table:style-name="ro3">
          <table:table-cell office:value-type="string" table:style-name="ce9">
            <text:p>Month-Year</text:p>
          </table:table-cell>
          <table:table-cell office:value-type="string" table:style-name="ce9">
            <text:p>Average of Children transferred out of CBP custody</text:p>
          </table:table-cell>
          <table:table-cell office:value-type="string" table:style-name="ce9">
            <text:p>Average of Children discharged from HHS Care</text:p>
          </table:table-cell>
          <table:table-cell table:style-name="ce1">
            <draw:frame draw:z-index="1" draw:id="id1" draw:style-name="a1" draw:name="Chart 1" svg:x="0.24167in" svg:y="0.5375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office:value-type="string" table:style-name="ce2">
            <text:p>2023-01</text:p>
          </table:table-cell>
          <table:table-cell office:value-type="float" office:value="34.5" table:style-name="ce2">
            <text:p>34.5</text:p>
          </table:table-cell>
          <table:table-cell office:value-type="float" office:value="232" table:style-name="ce10">
            <text:p>232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2023-02</text:p>
          </table:table-cell>
          <table:table-cell office:value-type="float" office:value="138.78947368421052" table:style-name="ce4">
            <text:p>138.7894737</text:p>
          </table:table-cell>
          <table:table-cell office:value-type="float" office:value="272.78947368421052" table:style-name="ce11">
            <text:p>272.7894737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2023-03</text:p>
          </table:table-cell>
          <table:table-cell office:value-type="float" office:value="178.89473684210526" table:style-name="ce4">
            <text:p>178.8947368</text:p>
          </table:table-cell>
          <table:table-cell office:value-type="float" office:value="282.89473684210526" table:style-name="ce11">
            <text:p>282.8947368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2023-04</text:p>
          </table:table-cell>
          <table:table-cell office:value-type="float" office:value="188.9047619047619" table:style-name="ce4">
            <text:p>188.9047619</text:p>
          </table:table-cell>
          <table:table-cell office:value-type="float" office:value="269.90476190476193" table:style-name="ce11">
            <text:p>269.9047619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2023-05</text:p>
          </table:table-cell>
          <table:table-cell office:value-type="float" office:value="164.63636363636363" table:style-name="ce4">
            <text:p>164.6363636</text:p>
          </table:table-cell>
          <table:table-cell office:value-type="float" office:value="284.36363636363637" table:style-name="ce11">
            <text:p>284.3636364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2023-06</text:p>
          </table:table-cell>
          <table:table-cell office:value-type="float" office:value="120.8" table:style-name="ce4">
            <text:p>120.8</text:p>
          </table:table-cell>
          <table:table-cell office:value-type="float" office:value="201.45" table:style-name="ce11">
            <text:p>201.45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2023-07</text:p>
          </table:table-cell>
          <table:table-cell office:value-type="float" office:value="185.57142857142858" table:style-name="ce4">
            <text:p>185.5714286</text:p>
          </table:table-cell>
          <table:table-cell office:value-type="float" office:value="209.85714285714286" table:style-name="ce11">
            <text:p>209.8571429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2023-08</text:p>
          </table:table-cell>
          <table:table-cell office:value-type="float" office:value="179.35" table:style-name="ce4">
            <text:p>179.35</text:p>
          </table:table-cell>
          <table:table-cell office:value-type="float" office:value="323.5" table:style-name="ce11">
            <text:p>323.5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2023-09</text:p>
          </table:table-cell>
          <table:table-cell office:value-type="float" office:value="209" table:style-name="ce4">
            <text:p>209</text:p>
          </table:table-cell>
          <table:table-cell office:value-type="float" office:value="344.5263157894737" table:style-name="ce11">
            <text:p>344.5263158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2023-10</text:p>
          </table:table-cell>
          <table:table-cell office:value-type="float" office:value="93.13636363636364" table:style-name="ce4">
            <text:p>93.13636364</text:p>
          </table:table-cell>
          <table:table-cell office:value-type="float" office:value="348.09090909090907" table:style-name="ce11">
            <text:p>348.0909091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2023-11</text:p>
          </table:table-cell>
          <table:table-cell office:value-type="float" office:value="159.9" table:style-name="ce4">
            <text:p>159.9</text:p>
          </table:table-cell>
          <table:table-cell office:value-type="float" office:value="299.60000000000002" table:style-name="ce11">
            <text:p>299.6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2023-12</text:p>
          </table:table-cell>
          <table:table-cell office:value-type="float" office:value="163.42105263157896" table:style-name="ce4">
            <text:p>163.4210526</text:p>
          </table:table-cell>
          <table:table-cell office:value-type="float" office:value="358.10526315789474" table:style-name="ce11">
            <text:p>358.1052632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2024-01</text:p>
          </table:table-cell>
          <table:table-cell office:value-type="float" office:value="129.54545454545453" table:style-name="ce4">
            <text:p>129.5454545</text:p>
          </table:table-cell>
          <table:table-cell office:value-type="float" office:value="295.27272727272725" table:style-name="ce11">
            <text:p>295.2727273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2024-02</text:p>
          </table:table-cell>
          <table:table-cell office:value-type="float" office:value="316.60000000000002" table:style-name="ce4">
            <text:p>316.6</text:p>
          </table:table-cell>
          <table:table-cell office:value-type="float" office:value="263.64999999999998" table:style-name="ce11">
            <text:p>263.65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2024-03</text:p>
          </table:table-cell>
          <table:table-cell office:value-type="float" office:value="248.04761904761904" table:style-name="ce4">
            <text:p>248.047619</text:p>
          </table:table-cell>
          <table:table-cell office:value-type="float" office:value="270.38095238095241" table:style-name="ce11">
            <text:p>270.3809524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2024-04</text:p>
          </table:table-cell>
          <table:table-cell office:value-type="float" office:value="235.36363636363637" table:style-name="ce4">
            <text:p>235.3636364</text:p>
          </table:table-cell>
          <table:table-cell office:value-type="float" office:value="203.36363636363637" table:style-name="ce11">
            <text:p>203.3636364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2024-05</text:p>
          </table:table-cell>
          <table:table-cell office:value-type="float" office:value="247.33333333333334" table:style-name="ce4">
            <text:p>247.3333333</text:p>
          </table:table-cell>
          <table:table-cell office:value-type="float" office:value="206.47619047619048" table:style-name="ce11">
            <text:p>206.4761905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2024-06</text:p>
          </table:table-cell>
          <table:table-cell office:value-type="float" office:value="232.47619047619048" table:style-name="ce4">
            <text:p>232.4761905</text:p>
          </table:table-cell>
          <table:table-cell office:value-type="float" office:value="233.85714285714286" table:style-name="ce11">
            <text:p>233.8571429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2024-07</text:p>
          </table:table-cell>
          <table:table-cell office:value-type="float" office:value="175.1904761904762" table:style-name="ce4">
            <text:p>175.1904762</text:p>
          </table:table-cell>
          <table:table-cell office:value-type="float" office:value="185.66666666666666" table:style-name="ce11">
            <text:p>185.6666667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2024-08</text:p>
          </table:table-cell>
          <table:table-cell office:value-type="float" office:value="186.63157894736841" table:style-name="ce4">
            <text:p>186.6315789</text:p>
          </table:table-cell>
          <table:table-cell office:value-type="float" office:value="161.73684210526315" table:style-name="ce11">
            <text:p>161.7368421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2024-09</text:p>
          </table:table-cell>
          <table:table-cell office:value-type="float" office:value="181.22727272727272" table:style-name="ce4">
            <text:p>181.2272727</text:p>
          </table:table-cell>
          <table:table-cell office:value-type="float" office:value="167.81818181818181" table:style-name="ce11">
            <text:p>167.8181818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2024-10</text:p>
          </table:table-cell>
          <table:table-cell office:value-type="float" office:value="185.04761904761904" table:style-name="ce4">
            <text:p>185.047619</text:p>
          </table:table-cell>
          <table:table-cell office:value-type="float" office:value="152.0952380952381" table:style-name="ce11">
            <text:p>152.0952381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2024-11</text:p>
          </table:table-cell>
          <table:table-cell office:value-type="float" office:value="179.68421052631578" table:style-name="ce4">
            <text:p>179.6842105</text:p>
          </table:table-cell>
          <table:table-cell office:value-type="float" office:value="157.94736842105263" table:style-name="ce11">
            <text:p>157.9473684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2024-12</text:p>
          </table:table-cell>
          <table:table-cell office:value-type="float" office:value="199.77272727272728" table:style-name="ce4">
            <text:p>199.7727273</text:p>
          </table:table-cell>
          <table:table-cell office:value-type="float" office:value="166.45454545454547" table:style-name="ce11">
            <text:p>166.4545455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2025-01</text:p>
          </table:table-cell>
          <table:table-cell office:value-type="float" office:value="79.545454545454547" table:style-name="ce4">
            <text:p>79.54545455</text:p>
          </table:table-cell>
          <table:table-cell office:value-type="float" office:value="151.36363636363637" table:style-name="ce11">
            <text:p>151.3636364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2025-02</text:p>
          </table:table-cell>
          <table:table-cell office:value-type="float" office:value="17.94736842105263" table:style-name="ce4">
            <text:p>17.94736842</text:p>
          </table:table-cell>
          <table:table-cell office:value-type="float" office:value="61.05263157894737" table:style-name="ce11">
            <text:p>61.05263158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2025-03</text:p>
          </table:table-cell>
          <table:table-cell office:value-type="float" office:value="8.6363636363636367" table:style-name="ce4">
            <text:p>8.636363636</text:p>
          </table:table-cell>
          <table:table-cell office:value-type="float" office:value="14.045454545454545" table:style-name="ce11">
            <text:p>14.04545455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2025-04</text:p>
          </table:table-cell>
          <table:table-cell office:value-type="float" office:value="10" table:style-name="ce4">
            <text:p>10</text:p>
          </table:table-cell>
          <table:table-cell office:value-type="float" office:value="8.8260869565217384" table:style-name="ce11">
            <text:p>8.826086957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2025-05</text:p>
          </table:table-cell>
          <table:table-cell office:value-type="float" office:value="14" table:style-name="ce4">
            <text:p>14</text:p>
          </table:table-cell>
          <table:table-cell office:value-type="float" office:value="11.388888888888889" table:style-name="ce11">
            <text:p>11.38888889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2025-06</text:p>
          </table:table-cell>
          <table:table-cell office:value-type="float" office:value="8.117647058823529" table:style-name="ce4">
            <text:p>8.117647059</text:p>
          </table:table-cell>
          <table:table-cell office:value-type="float" office:value="16.529411764705884" table:style-name="ce11">
            <text:p>16.52941176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2025-07</text:p>
          </table:table-cell>
          <table:table-cell office:value-type="float" office:value="4.1904761904761907" table:style-name="ce4">
            <text:p>4.19047619</text:p>
          </table:table-cell>
          <table:table-cell office:value-type="float" office:value="18.857142857142858" table:style-name="ce11">
            <text:p>18.85714286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2025-08</text:p>
          </table:table-cell>
          <table:table-cell office:value-type="float" office:value="7.35" table:style-name="ce4">
            <text:p>7.35</text:p>
          </table:table-cell>
          <table:table-cell office:value-type="float" office:value="12.7" table:style-name="ce11">
            <text:p>12.7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2025-09</text:p>
          </table:table-cell>
          <table:table-cell office:value-type="float" office:value="11.818181818181818" table:style-name="ce4">
            <text:p>11.81818182</text:p>
          </table:table-cell>
          <table:table-cell office:value-type="float" office:value="10.772727272727273" table:style-name="ce11">
            <text:p>10.77272727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2025-10</text:p>
          </table:table-cell>
          <table:table-cell office:value-type="float" office:value="12.523809523809524" table:style-name="ce4">
            <text:p>12.52380952</text:p>
          </table:table-cell>
          <table:table-cell office:value-type="float" office:value="11.523809523809524" table:style-name="ce11">
            <text:p>11.52380952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2025-11</text:p>
          </table:table-cell>
          <table:table-cell office:value-type="float" office:value="9.5789473684210531" table:style-name="ce4">
            <text:p>9.578947368</text:p>
          </table:table-cell>
          <table:table-cell office:value-type="float" office:value="8.3684210526315788" table:style-name="ce11">
            <text:p>8.368421053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2025-12</text:p>
          </table:table-cell>
          <table:table-cell office:value-type="float" office:value="8.2666666666666675" table:style-name="ce4">
            <text:p>8.266666667</text:p>
          </table:table-cell>
          <table:table-cell office:value-type="float" office:value="9.6" table:style-name="ce11">
            <text:p>9.6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Grand Total</text:p>
          </table:table-cell>
          <table:table-cell office:value-type="float" office:value="128.66805555555555" table:style-name="ce7">
            <text:p>128.6680556</text:p>
          </table:table-cell>
          <table:table-cell office:value-type="float" office:value="173.40694444444443" table:style-name="ce12">
            <text:p>173.4069444</text:p>
          </table:table-cell>
          <table:table-cell table:number-columns-repeated="16381"/>
        </table:table-row>
        <table:table-row table:number-rows-repeated="1048536" table:style-name="ro1">
          <table:table-cell table:number-columns-repeated="16384"/>
        </table:table-row>
      </table:table>
      <table:table table:name="Backlog_Accumulation_Trend" table:style-name="ta1">
        <table:table-column table:style-name="co1" table:default-cell-style-name="ce1"/>
        <table:table-column table:style-name="co8" table:default-cell-style-name="ce1"/>
        <table:table-column table:style-name="co3" table:number-columns-repeated="16382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Month-Year</text:p>
          </table:table-cell>
          <table:table-cell office:value-type="string" table:style-name="ce3">
            <text:p>Average of Net Intake Pressur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023-01</text:p>
          </table:table-cell>
          <table:table-cell office:value-type="float" office:value="-197.5" table:style-name="ce3">
            <text:p>-197.5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2023-02</text:p>
          </table:table-cell>
          <table:table-cell office:value-type="float" office:value="-134" table:style-name="ce5">
            <text:p>-134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2023-03</text:p>
          </table:table-cell>
          <table:table-cell office:value-type="float" office:value="-104" table:style-name="ce5">
            <text:p>-104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2023-04</text:p>
          </table:table-cell>
          <table:table-cell office:value-type="float" office:value="-81" table:style-name="ce5">
            <text:p>-81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2023-05</text:p>
          </table:table-cell>
          <table:table-cell office:value-type="float" office:value="-119.72727272727273" table:style-name="ce5">
            <text:p>-119.7272727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2023-06</text:p>
          </table:table-cell>
          <table:table-cell office:value-type="float" office:value="-80.650000000000006" table:style-name="ce5">
            <text:p>-80.65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2023-07</text:p>
          </table:table-cell>
          <table:table-cell office:value-type="float" office:value="-24.285714285714285" table:style-name="ce5">
            <text:p>-24.28571429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2023-08</text:p>
          </table:table-cell>
          <table:table-cell office:value-type="float" office:value="-144.15" table:style-name="ce5">
            <text:p>-144.15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2023-09</text:p>
          </table:table-cell>
          <table:table-cell office:value-type="float" office:value="-135.52631578947367" table:style-name="ce5">
            <text:p>-135.5263158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2023-10</text:p>
          </table:table-cell>
          <table:table-cell office:value-type="float" office:value="-254.95454545454547" table:style-name="ce5">
            <text:p>-254.9545455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2023-11</text:p>
          </table:table-cell>
          <table:table-cell office:value-type="float" office:value="-139.69999999999999" table:style-name="ce5">
            <text:p>-139.7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2023-12</text:p>
          </table:table-cell>
          <table:table-cell office:value-type="float" office:value="-194.68421052631578" table:style-name="ce5">
            <text:p>-194.6842105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2024-01</text:p>
          </table:table-cell>
          <table:table-cell office:value-type="float" office:value="-165.72727272727272" table:style-name="ce5">
            <text:p>-165.7272727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2024-02</text:p>
          </table:table-cell>
          <table:table-cell office:value-type="float" office:value="52.95" table:style-name="ce5">
            <text:p>52.95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2024-03</text:p>
          </table:table-cell>
          <table:table-cell office:value-type="float" office:value="-22.333333333333332" table:style-name="ce5">
            <text:p>-22.33333333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2024-04</text:p>
          </table:table-cell>
          <table:table-cell office:value-type="float" office:value="32" table:style-name="ce5">
            <text:p>32</text:p>
          </table:table-cell>
          <table:table-cell table:style-name="ce1">
            <draw:frame draw:z-index="1" draw:id="id2" draw:style-name="a2" draw:name="Chart 1" svg:x="0.45833in" svg:y="0.15417in" svg:width="6.925in" svg:height="4.0375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1">
          <table:table-cell office:value-type="string" table:style-name="ce4">
            <text:p>2024-05</text:p>
          </table:table-cell>
          <table:table-cell office:value-type="float" office:value="40.857142857142854" table:style-name="ce5">
            <text:p>40.85714286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2024-06</text:p>
          </table:table-cell>
          <table:table-cell office:value-type="float" office:value="-1.3809523809523809" table:style-name="ce5">
            <text:p>-1.380952381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2024-07</text:p>
          </table:table-cell>
          <table:table-cell office:value-type="float" office:value="-10.476190476190476" table:style-name="ce5">
            <text:p>-10.47619048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2024-08</text:p>
          </table:table-cell>
          <table:table-cell office:value-type="float" office:value="24.894736842105264" table:style-name="ce5">
            <text:p>24.89473684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2024-09</text:p>
          </table:table-cell>
          <table:table-cell office:value-type="float" office:value="13.409090909090908" table:style-name="ce5">
            <text:p>13.40909091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2024-10</text:p>
          </table:table-cell>
          <table:table-cell office:value-type="float" office:value="32.952380952380949" table:style-name="ce5">
            <text:p>32.95238095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2024-11</text:p>
          </table:table-cell>
          <table:table-cell office:value-type="float" office:value="21.736842105263158" table:style-name="ce5">
            <text:p>21.73684211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2024-12</text:p>
          </table:table-cell>
          <table:table-cell office:value-type="float" office:value="33.31818181818182" table:style-name="ce5">
            <text:p>33.31818182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2025-01</text:p>
          </table:table-cell>
          <table:table-cell office:value-type="float" office:value="-71.818181818181813" table:style-name="ce5">
            <text:p>-71.81818182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2025-02</text:p>
          </table:table-cell>
          <table:table-cell office:value-type="float" office:value="-43.10526315789474" table:style-name="ce5">
            <text:p>-43.10526316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2025-03</text:p>
          </table:table-cell>
          <table:table-cell office:value-type="float" office:value="-5.4090909090909092" table:style-name="ce5">
            <text:p>-5.409090909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2025-04</text:p>
          </table:table-cell>
          <table:table-cell office:value-type="float" office:value="1.173913043478261" table:style-name="ce5">
            <text:p>1.173913043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2025-05</text:p>
          </table:table-cell>
          <table:table-cell office:value-type="float" office:value="2.6111111111111112" table:style-name="ce5">
            <text:p>2.611111111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2025-06</text:p>
          </table:table-cell>
          <table:table-cell office:value-type="float" office:value="-8.4117647058823533" table:style-name="ce5">
            <text:p>-8.411764706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2025-07</text:p>
          </table:table-cell>
          <table:table-cell office:value-type="float" office:value="-14.666666666666666" table:style-name="ce5">
            <text:p>-14.66666667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2025-08</text:p>
          </table:table-cell>
          <table:table-cell office:value-type="float" office:value="-5.35" table:style-name="ce5">
            <text:p>-5.35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2025-09</text:p>
          </table:table-cell>
          <table:table-cell office:value-type="float" office:value="1.0454545454545454" table:style-name="ce5">
            <text:p>1.045454545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2025-10</text:p>
          </table:table-cell>
          <table:table-cell office:value-type="float" office:value="1" table:style-name="ce5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2025-11</text:p>
          </table:table-cell>
          <table:table-cell office:value-type="float" office:value="1.2105263157894737" table:style-name="ce5">
            <text:p>1.210526316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2025-12</text:p>
          </table:table-cell>
          <table:table-cell office:value-type="float" office:value="-1.3333333333333333" table:style-name="ce5">
            <text:p>-1.333333333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Grand Total</text:p>
          </table:table-cell>
          <table:table-cell office:value-type="float" office:value="-44.738888888888887" table:style-name="ce8">
            <text:p>-44.73888889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>
            <draw:frame draw:z-index="2" draw:id="id3" draw:style-name="a3" draw:name="Chart 2" svg:x="0.45in" svg:y="0.14167in" svg:width="6.85833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number-rows-repeated="1048534" table:style-name="ro1">
          <table:table-cell table:number-columns-repeated="16384"/>
        </table:table-row>
      </table:table>
      <table:table table:name="HHS_Unaccompanied_Alien_Childre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6" table:default-cell-style-name="ce17"/>
        <table:table-column table:style-name="co22" table:default-cell-style-name="ce1"/>
        <table:table-column table:style-name="co23" table:default-cell-style-name="ce1"/>
        <table:table-column table:style-name="co3" table:number-columns-repeated="16367" table:default-cell-style-name="ce1"/>
        <table:table-row table:style-name="ro4">
          <table:table-cell office:value-type="string" table:style-name="ce9">
            <text:p>Date</text:p>
          </table:table-cell>
          <table:table-cell office:value-type="string" table:style-name="ce9">
            <text:p>Month</text:p>
          </table:table-cell>
          <table:table-cell office:value-type="string" table:style-name="ce9">
            <text:p>Month-Year</text:p>
          </table:table-cell>
          <table:table-cell office:value-type="string" table:style-name="ce9">
            <text:p>Children apprehended and placed in CBP custody*</text:p>
          </table:table-cell>
          <table:table-cell office:value-type="string" table:style-name="ce9">
            <text:p>Children in CBP custody</text:p>
          </table:table-cell>
          <table:table-cell office:value-type="string" table:style-name="ce9">
            <text:p>Children transferred out of CBP custody</text:p>
          </table:table-cell>
          <table:table-cell office:value-type="string" table:style-name="ce9">
            <text:p>Children in HHS Care</text:p>
          </table:table-cell>
          <table:table-cell office:value-type="string" table:style-name="ce9">
            <text:p>Children discharged from HHS Care</text:p>
          </table:table-cell>
          <table:table-cell office:value-type="string" table:style-name="ce9">
            <office:annotation draw:style-name="a4" svg:x="8.15in" svg:y="0in" svg:width="1.125in" svg:height="0.35in">
              <dc:creator>Tushar Mehta</dc:creator>
              <text:p><text:span text:style-name="T1">Tushar Mehta:</text:span><text:span text:style-name="T2"/></text:p>
              <text:p><text:span text:style-name="T2">Total children currently under government care responsibility.</text:span></text:p>
            </office:annotation>
            <text:p>Total System load</text:p>
          </table:table-cell>
          <table:table-cell office:value-type="string" table:style-name="ce9">
            <office:annotation draw:style-name="a5" svg:x="8.68333333333333in" svg:y="0in" svg:width="1.125in" svg:height="0.35in">
              <dc:creator>Tushar Mehta</dc:creator>
              <text:p><text:span text:style-name="T1">Tushar Mehta:</text:span><text:span text:style-name="T2"/></text:p>
              <text:p><text:span text:style-name="T2">Whether more children are entering than leaving.</text:span></text:p>
            </office:annotation>
            <text:p>Net Intake Pressure</text:p>
          </table:table-cell>
          <table:table-cell office:value-type="string" table:style-name="ce9">
            <office:annotation draw:style-name="a6" svg:x="9.175in" svg:y="0in" svg:width="1.53333333333333in" svg:height="0.35in">
              <dc:creator>Tushar Mehta</dc:creator>
              <text:p><text:span text:style-name="T1">Tushar Mehta:</text:span><text:span text:style-name="T2"/></text:p>
              <text:p><text:span text:style-name="T2">Daily percentage growth in total care load.</text:span></text:p>
            </office:annotation>
            <text:p>Care load Growth Rate</text:p>
          </table:table-cell>
          <table:table-cell office:value-type="string" table:style-name="ce9">
            <text:p>Transfer Validation</text:p>
          </table:table-cell>
          <table:table-cell office:value-type="string" table:style-name="ce9">
            <text:p>Discharge Validation</text:p>
          </table:table-cell>
          <table:table-cell office:value-type="string" table:style-name="ce13">
            <office:annotation draw:style-name="a7" svg:x="10.275in" svg:y="0in" svg:width="0.658333333333333in" svg:height="0.35in">
              <dc:creator>Tushar Mehta</dc:creator>
              <text:p><text:span text:style-name="T1">Tushar Mehta:</text:span><text:span text:style-name="T2"/></text:p>
              <text:p><text:span text:style-name="T2">shows:whether healthcare burden is accumulating.</text:span></text:p>
            </office:annotation>
            <text:p>Backlog Trend Indicator</text:p>
          </table:table-cell>
          <table:table-cell office:value-type="string" table:style-name="ce9">
            <text:p>Discharge Offset ratio</text:p>
          </table:table-cell>
          <table:table-cell office:value-type="string" table:style-name="ce9">
            <text:p>7 Days Rolling Avg.</text:p>
          </table:table-cell>
          <table:table-cell office:value-type="string" table:style-name="ce9">
            <text:p>Volatality Metrics (Standard Diviation)</text:p>
          </table:table-cell>
          <table:table-cell table:number-columns-repeated="16367"/>
        </table:table-row>
        <table:table-row table:style-name="ro1">
          <table:table-cell office:value-type="date" office:date-value="2023-01-12T00:00:00" table:style-name="ce14">
            <text:p>12-01-2023</text:p>
          </table:table-cell>
          <table:table-cell office:value-type="string" office:string-value="January" table:formula="of:=TEXT([.A2]; &quot;mmmm&quot;)" table:style-name="ce14">
            <text:p>January</text:p>
          </table:table-cell>
          <table:table-cell office:value-type="string" office:string-value="2023-01" table:formula="of:=TEXT([.A2]; &quot;yyyy-mm&quot;)" table:style-name="ce14">
            <text:p>2023-01</text:p>
          </table:table-cell>
          <table:table-cell office:value-type="float" office:value="33" table:style-name="ce9">
            <text:p>33</text:p>
          </table:table-cell>
          <table:table-cell office:value-type="float" office:value="53" table:style-name="ce9">
            <text:p>53</text:p>
          </table:table-cell>
          <table:table-cell office:value-type="float" office:value="34" table:style-name="ce9">
            <text:p>34</text:p>
          </table:table-cell>
          <table:table-cell office:value-type="float" office:value="6566" table:style-name="ce9">
            <text:p>6566</text:p>
          </table:table-cell>
          <table:table-cell office:value-type="float" office:value="436" table:style-name="ce9">
            <text:p>436</text:p>
          </table:table-cell>
          <table:table-cell office:value-type="float" office:value="6619" table:formula="of:=SUM([.G2]+[.E2])" table:style-name="ce15">
            <text:p>6619</text:p>
          </table:table-cell>
          <table:table-cell office:value-type="float" office:value="-402" table:formula="of:=[.F2]-[.H2]" table:style-name="ce15">
            <text:p>-402</text:p>
          </table:table-cell>
          <table:table-cell office:value-type="percentage" office:value="8.3396283426499476E-2" table:formula="of:=([.I3]-[.I2])/[.I2]" table:style-name="ce16">
            <text:p>8%</text:p>
          </table:table-cell>
          <table:table-cell office:value-type="string" office:string-value="Valid" table:formula="of:=IF([.F2]&lt;=[.E2]; &quot;Valid&quot;; &quot;Invalid&quot;)" table:style-name="ce17">
            <text:p>Valid</text:p>
          </table:table-cell>
          <table:table-cell office:value-type="string" office:string-value="Valid" table:formula="of:=IF([.H2]&lt;=[.G2]; &quot;Valid&quot;; &quot;Invalid&quot;)" table:style-name="ce17">
            <text:p>Valid</text:p>
          </table:table-cell>
          <table:table-cell office:value-type="string" office:string-value="Stable/Reducing" table:formula="of:=IF([.J2]&gt;0; &quot;Increasing Pressure&quot;; &quot;Stable/Reducing&quot;)" table:style-name="ce18">
            <text:p>Stable/Reducing</text:p>
          </table:table-cell>
          <table:table-cell office:value-type="float" office:value="12.823529411764707" table:formula="of:=IFERROR([.H2]/[.F2]; 0)" table:style-name="ce17">
            <text:p>12.82352941</text:p>
          </table:table-cell>
          <table:table-cell office:value-type="float" office:value="7527" table:formula="of:=[.P3]" table:style-name="ce15">
            <text:p>7527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1-22T00:00:00" table:style-name="ce14">
            <text:p>22-01-2023</text:p>
          </table:table-cell>
          <table:table-cell office:value-type="string" office:string-value="January" table:formula="of:=TEXT([.A3]; &quot;mmmm&quot;)" table:style-name="ce14">
            <text:p>January</text:p>
          </table:table-cell>
          <table:table-cell office:value-type="string" office:string-value="2023-01" table:formula="of:=TEXT([.A3]; &quot;yyyy-mm&quot;)" table:style-name="ce14">
            <text:p>2023-01</text:p>
          </table:table-cell>
          <table:table-cell office:value-type="float" office:value="32" table:style-name="ce9">
            <text:p>32</text:p>
          </table:table-cell>
          <table:table-cell office:value-type="float" office:value="49" table:style-name="ce9">
            <text:p>49</text:p>
          </table:table-cell>
          <table:table-cell office:value-type="float" office:value="39" table:style-name="ce9">
            <text:p>39</text:p>
          </table:table-cell>
          <table:table-cell office:value-type="float" office:value="7122" table:style-name="ce9">
            <text:p>7122</text:p>
          </table:table-cell>
          <table:table-cell office:value-type="float" office:value="227" table:style-name="ce9">
            <text:p>227</text:p>
          </table:table-cell>
          <table:table-cell office:value-type="float" office:value="7171" table:formula="of:=SUM([.G3]+[.E3])" table:style-name="ce15">
            <text:p>7171</text:p>
          </table:table-cell>
          <table:table-cell office:value-type="float" office:value="-188" table:formula="of:=[.F3]-[.H3]" table:style-name="ce15">
            <text:p>-188</text:p>
          </table:table-cell>
          <table:table-cell office:value-type="percentage" office:value="2.2172639799191186E-2" table:formula="of:=([.I4]-[.I3])/[.I3]" table:style-name="ce16">
            <text:p>2%</text:p>
          </table:table-cell>
          <table:table-cell office:value-type="string" office:string-value="Valid" table:formula="of:=IF([.F3]&lt;=[.E3]; &quot;Valid&quot;; &quot;Invalid&quot;)" table:style-name="ce17">
            <text:p>Valid</text:p>
          </table:table-cell>
          <table:table-cell office:value-type="string" office:string-value="Valid" table:formula="of:=IF([.H3]&lt;=[.G3]; &quot;Valid&quot;; &quot;Invalid&quot;)" table:style-name="ce17">
            <text:p>Valid</text:p>
          </table:table-cell>
          <table:table-cell office:value-type="string" office:string-value="Stable/Reducing" table:formula="of:=IF([.J3]&gt;0; &quot;Increasing Pressure&quot;; &quot;Stable/Reducing&quot;)" table:style-name="ce18">
            <text:p>Stable/Reducing</text:p>
          </table:table-cell>
          <table:table-cell office:value-type="float" office:value="5.8205128205128203" table:formula="of:=IFERROR([.H3]/[.F3]; 0)" table:style-name="ce17">
            <text:p>5.820512821</text:p>
          </table:table-cell>
          <table:table-cell office:value-type="float" office:value="7527" table:formula="of:=AVERAGE([.I3:.I9])" table:style-name="ce15">
            <text:p>7527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1-23T00:00:00" table:style-name="ce14">
            <text:p>23-01-2023</text:p>
          </table:table-cell>
          <table:table-cell office:value-type="string" office:string-value="January" table:formula="of:=TEXT([.A4]; &quot;mmmm&quot;)" table:style-name="ce14">
            <text:p>January</text:p>
          </table:table-cell>
          <table:table-cell office:value-type="string" office:string-value="2023-01" table:formula="of:=TEXT([.A4]; &quot;yyyy-mm&quot;)" table:style-name="ce14">
            <text:p>2023-01</text:p>
          </table:table-cell>
          <table:table-cell office:value-type="float" office:value="32" table:style-name="ce9">
            <text:p>32</text:p>
          </table:table-cell>
          <table:table-cell office:value-type="float" office:value="50" table:style-name="ce9">
            <text:p>50</text:p>
          </table:table-cell>
          <table:table-cell office:value-type="float" office:value="39" table:style-name="ce9">
            <text:p>39</text:p>
          </table:table-cell>
          <table:table-cell office:value-type="float" office:value="7280" table:style-name="ce9">
            <text:p>7280</text:p>
          </table:table-cell>
          <table:table-cell office:value-type="float" office:value="181" table:style-name="ce9">
            <text:p>181</text:p>
          </table:table-cell>
          <table:table-cell office:value-type="float" office:value="7330" table:formula="of:=SUM([.G4]+[.E4])" table:style-name="ce15">
            <text:p>7330</text:p>
          </table:table-cell>
          <table:table-cell office:value-type="float" office:value="-142" table:formula="of:=[.F4]-[.H4]" table:style-name="ce15">
            <text:p>-142</text:p>
          </table:table-cell>
          <table:table-cell office:value-type="percentage" office:value="1.9781718963165076E-2" table:formula="of:=([.I5]-[.I4])/[.I4]" table:style-name="ce16">
            <text:p>2%</text:p>
          </table:table-cell>
          <table:table-cell office:value-type="string" office:string-value="Valid" table:formula="of:=IF([.F4]&lt;=[.E4]; &quot;Valid&quot;; &quot;Invalid&quot;)" table:style-name="ce17">
            <text:p>Valid</text:p>
          </table:table-cell>
          <table:table-cell office:value-type="string" office:string-value="Valid" table:formula="of:=IF([.H4]&lt;=[.G4]; &quot;Valid&quot;; &quot;Invalid&quot;)" table:style-name="ce17">
            <text:p>Valid</text:p>
          </table:table-cell>
          <table:table-cell office:value-type="string" office:string-value="Stable/Reducing" table:formula="of:=IF([.J4]&gt;0; &quot;Increasing Pressure&quot;; &quot;Stable/Reducing&quot;)" table:style-name="ce18">
            <text:p>Stable/Reducing</text:p>
          </table:table-cell>
          <table:table-cell office:value-type="float" office:value="4.6410256410256414" table:formula="of:=IFERROR([.H4]/[.F4]; 0)" table:style-name="ce17">
            <text:p>4.641025641</text:p>
          </table:table-cell>
          <table:table-cell office:value-type="float" office:value="7636.1428571428569" table:formula="of:=AVERAGE([.I4:.I10])" table:style-name="ce15">
            <text:p>7636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1-24T00:00:00" table:style-name="ce14">
            <text:p>24-01-2023</text:p>
          </table:table-cell>
          <table:table-cell office:value-type="string" office:string-value="January" table:formula="of:=TEXT([.A5]; &quot;mmmm&quot;)" table:style-name="ce14">
            <text:p>January</text:p>
          </table:table-cell>
          <table:table-cell office:value-type="string" office:string-value="2023-01" table:formula="of:=TEXT([.A5]; &quot;yyyy-mm&quot;)" table:style-name="ce14">
            <text:p>2023-01</text:p>
          </table:table-cell>
          <table:table-cell office:value-type="float" office:value="47" table:style-name="ce9">
            <text:p>47</text:p>
          </table:table-cell>
          <table:table-cell office:value-type="float" office:value="42" table:style-name="ce9">
            <text:p>42</text:p>
          </table:table-cell>
          <table:table-cell office:value-type="float" office:value="47" table:style-name="ce9">
            <text:p>47</text:p>
          </table:table-cell>
          <table:table-cell office:value-type="float" office:value="7433" table:style-name="ce9">
            <text:p>7433</text:p>
          </table:table-cell>
          <table:table-cell office:value-type="float" office:value="175" table:style-name="ce9">
            <text:p>175</text:p>
          </table:table-cell>
          <table:table-cell office:value-type="float" office:value="7475" table:formula="of:=SUM([.G5]+[.E5])" table:style-name="ce15">
            <text:p>7475</text:p>
          </table:table-cell>
          <table:table-cell office:value-type="float" office:value="-128" table:formula="of:=[.F5]-[.H5]" table:style-name="ce15">
            <text:p>-128</text:p>
          </table:table-cell>
          <table:table-cell office:value-type="percentage" office:value="1.137123745819398E-2" table:formula="of:=([.I6]-[.I5])/[.I5]" table:style-name="ce16">
            <text:p>1%</text:p>
          </table:table-cell>
          <table:table-cell office:value-type="string" office:string-value="Invalid" table:formula="of:=IF([.F5]&lt;=[.E5]; &quot;Valid&quot;; &quot;Invalid&quot;)" table:style-name="ce17">
            <text:p>Invalid</text:p>
          </table:table-cell>
          <table:table-cell office:value-type="string" office:string-value="Valid" table:formula="of:=IF([.H5]&lt;=[.G5]; &quot;Valid&quot;; &quot;Invalid&quot;)" table:style-name="ce17">
            <text:p>Valid</text:p>
          </table:table-cell>
          <table:table-cell office:value-type="string" office:string-value="Stable/Reducing" table:formula="of:=IF([.J5]&gt;0; &quot;Increasing Pressure&quot;; &quot;Stable/Reducing&quot;)" table:style-name="ce18">
            <text:p>Stable/Reducing</text:p>
          </table:table-cell>
          <table:table-cell office:value-type="float" office:value="3.7234042553191489" table:formula="of:=IFERROR([.H5]/[.F5]; 0)" table:style-name="ce17">
            <text:p>3.723404255</text:p>
          </table:table-cell>
          <table:table-cell office:value-type="float" office:value="7716.4285714285716" table:formula="of:=AVERAGE([.I5:.I11])" table:style-name="ce15">
            <text:p>7716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1-25T00:00:00" table:style-name="ce14">
            <text:p>25-01-2023</text:p>
          </table:table-cell>
          <table:table-cell office:value-type="string" office:string-value="January" table:formula="of:=TEXT([.A6]; &quot;mmmm&quot;)" table:style-name="ce14">
            <text:p>January</text:p>
          </table:table-cell>
          <table:table-cell office:value-type="string" office:string-value="2023-01" table:formula="of:=TEXT([.A6]; &quot;yyyy-mm&quot;)" table:style-name="ce14">
            <text:p>2023-01</text:p>
          </table:table-cell>
          <table:table-cell office:value-type="float" office:value="20" table:style-name="ce9">
            <text:p>20</text:p>
          </table:table-cell>
          <table:table-cell office:value-type="float" office:value="22" table:style-name="ce9">
            <text:p>22</text:p>
          </table:table-cell>
          <table:table-cell office:value-type="float" office:value="41" table:style-name="ce9">
            <text:p>41</text:p>
          </table:table-cell>
          <table:table-cell office:value-type="float" office:value="7538" table:style-name="ce9">
            <text:p>7538</text:p>
          </table:table-cell>
          <table:table-cell office:value-type="float" office:value="180" table:style-name="ce9">
            <text:p>180</text:p>
          </table:table-cell>
          <table:table-cell office:value-type="float" office:value="7560" table:formula="of:=SUM([.G6]+[.E6])" table:style-name="ce15">
            <text:p>7560</text:p>
          </table:table-cell>
          <table:table-cell office:value-type="float" office:value="-139" table:formula="of:=[.F6]-[.H6]" table:style-name="ce15">
            <text:p>-139</text:p>
          </table:table-cell>
          <table:table-cell office:value-type="percentage" office:value="-5.6878306878306879E-3" table:formula="of:=([.I7]-[.I6])/[.I6]" table:style-name="ce16">
            <text:p>-1%</text:p>
          </table:table-cell>
          <table:table-cell office:value-type="string" office:string-value="Invalid" table:formula="of:=IF([.F6]&lt;=[.E6]; &quot;Valid&quot;; &quot;Invalid&quot;)" table:style-name="ce17">
            <text:p>Invalid</text:p>
          </table:table-cell>
          <table:table-cell office:value-type="string" office:string-value="Valid" table:formula="of:=IF([.H6]&lt;=[.G6]; &quot;Valid&quot;; &quot;Invalid&quot;)" table:style-name="ce17">
            <text:p>Valid</text:p>
          </table:table-cell>
          <table:table-cell office:value-type="string" office:string-value="Stable/Reducing" table:formula="of:=IF([.J6]&gt;0; &quot;Increasing Pressure&quot;; &quot;Stable/Reducing&quot;)" table:style-name="ce18">
            <text:p>Stable/Reducing</text:p>
          </table:table-cell>
          <table:table-cell office:value-type="float" office:value="4.3902439024390247" table:formula="of:=IFERROR([.H6]/[.F6]; 0)" table:style-name="ce17">
            <text:p>4.390243902</text:p>
          </table:table-cell>
          <table:table-cell office:value-type="float" office:value="7734.8571428571431" table:formula="of:=AVERAGE([.I6:.I12])" table:style-name="ce15">
            <text:p>7735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1-29T00:00:00" table:style-name="ce14">
            <text:p>29-01-2023</text:p>
          </table:table-cell>
          <table:table-cell office:value-type="string" office:string-value="January" table:formula="of:=TEXT([.A7]; &quot;mmmm&quot;)" table:style-name="ce14">
            <text:p>January</text:p>
          </table:table-cell>
          <table:table-cell office:value-type="string" office:string-value="2023-01" table:formula="of:=TEXT([.A7]; &quot;yyyy-mm&quot;)" table:style-name="ce14">
            <text:p>2023-01</text:p>
          </table:table-cell>
          <table:table-cell office:value-type="float" office:value="23" table:style-name="ce9">
            <text:p>23</text:p>
          </table:table-cell>
          <table:table-cell office:value-type="float" office:value="45" table:style-name="ce9">
            <text:p>45</text:p>
          </table:table-cell>
          <table:table-cell office:value-type="float" office:value="11" table:style-name="ce9">
            <text:p>11</text:p>
          </table:table-cell>
          <table:table-cell office:value-type="float" office:value="7472" table:style-name="ce9">
            <text:p>7472</text:p>
          </table:table-cell>
          <table:table-cell office:value-type="float" office:value="303" table:style-name="ce9">
            <text:p>303</text:p>
          </table:table-cell>
          <table:table-cell office:value-type="float" office:value="7517" table:formula="of:=SUM([.G7]+[.E7])" table:style-name="ce15">
            <text:p>7517</text:p>
          </table:table-cell>
          <table:table-cell office:value-type="float" office:value="-292" table:formula="of:=[.F7]-[.H7]" table:style-name="ce15">
            <text:p>-292</text:p>
          </table:table-cell>
          <table:table-cell office:value-type="percentage" office:value="3.7248902487694559E-2" table:formula="of:=([.I8]-[.I7])/[.I7]" table:style-name="ce16">
            <text:p>4%</text:p>
          </table:table-cell>
          <table:table-cell office:value-type="string" office:string-value="Valid" table:formula="of:=IF([.F7]&lt;=[.E7]; &quot;Valid&quot;; &quot;Invalid&quot;)" table:style-name="ce17">
            <text:p>Valid</text:p>
          </table:table-cell>
          <table:table-cell office:value-type="string" office:string-value="Valid" table:formula="of:=IF([.H7]&lt;=[.G7]; &quot;Valid&quot;; &quot;Invalid&quot;)" table:style-name="ce17">
            <text:p>Valid</text:p>
          </table:table-cell>
          <table:table-cell office:value-type="string" office:string-value="Stable/Reducing" table:formula="of:=IF([.J7]&gt;0; &quot;Increasing Pressure&quot;; &quot;Stable/Reducing&quot;)" table:style-name="ce18">
            <text:p>Stable/Reducing</text:p>
          </table:table-cell>
          <table:table-cell office:value-type="float" office:value="27.545454545454547" table:formula="of:=IFERROR([.H7]/[.F7]; 0)" table:style-name="ce17">
            <text:p>27.54545455</text:p>
          </table:table-cell>
          <table:table-cell office:value-type="float" office:value="7760.8571428571431" table:formula="of:=AVERAGE([.I7:.I13])" table:style-name="ce15">
            <text:p>7761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1-30T00:00:00" table:style-name="ce14">
            <text:p>30-01-2023</text:p>
          </table:table-cell>
          <table:table-cell office:value-type="string" office:string-value="January" table:formula="of:=TEXT([.A8]; &quot;mmmm&quot;)" table:style-name="ce14">
            <text:p>January</text:p>
          </table:table-cell>
          <table:table-cell office:value-type="string" office:string-value="2023-01" table:formula="of:=TEXT([.A8]; &quot;yyyy-mm&quot;)" table:style-name="ce14">
            <text:p>2023-01</text:p>
          </table:table-cell>
          <table:table-cell office:value-type="float" office:value="34" table:style-name="ce9">
            <text:p>34</text:p>
          </table:table-cell>
          <table:table-cell office:value-type="float" office:value="54" table:style-name="ce9">
            <text:p>54</text:p>
          </table:table-cell>
          <table:table-cell office:value-type="float" office:value="29" table:style-name="ce9">
            <text:p>29</text:p>
          </table:table-cell>
          <table:table-cell office:value-type="float" office:value="7743" table:style-name="ce9">
            <text:p>7743</text:p>
          </table:table-cell>
          <table:table-cell office:value-type="float" office:value="196" table:style-name="ce9">
            <text:p>196</text:p>
          </table:table-cell>
          <table:table-cell office:value-type="float" office:value="7797" table:formula="of:=SUM([.G8]+[.E8])" table:style-name="ce15">
            <text:p>7797</text:p>
          </table:table-cell>
          <table:table-cell office:value-type="float" office:value="-167" table:formula="of:=[.F8]-[.H8]" table:style-name="ce15">
            <text:p>-167</text:p>
          </table:table-cell>
          <table:table-cell office:value-type="percentage" office:value="5.3866871873797613E-3" table:formula="of:=([.I9]-[.I8])/[.I8]" table:style-name="ce16">
            <text:p>1%</text:p>
          </table:table-cell>
          <table:table-cell office:value-type="string" office:string-value="Valid" table:formula="of:=IF([.F8]&lt;=[.E8]; &quot;Valid&quot;; &quot;Invalid&quot;)" table:style-name="ce17">
            <text:p>Valid</text:p>
          </table:table-cell>
          <table:table-cell office:value-type="string" office:string-value="Valid" table:formula="of:=IF([.H8]&lt;=[.G8]; &quot;Valid&quot;; &quot;Invalid&quot;)" table:style-name="ce17">
            <text:p>Valid</text:p>
          </table:table-cell>
          <table:table-cell office:value-type="string" office:string-value="Stable/Reducing" table:formula="of:=IF([.J8]&gt;0; &quot;Increasing Pressure&quot;; &quot;Stable/Reducing&quot;)" table:style-name="ce18">
            <text:p>Stable/Reducing</text:p>
          </table:table-cell>
          <table:table-cell office:value-type="float" office:value="6.7586206896551726" table:formula="of:=IFERROR([.H8]/[.F8]; 0)" table:style-name="ce17">
            <text:p>6.75862069</text:p>
          </table:table-cell>
          <table:table-cell office:value-type="float" office:value="7812" table:formula="of:=AVERAGE([.I8:.I14])" table:style-name="ce15">
            <text:p>7812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1-31T00:00:00" table:style-name="ce14">
            <text:p>31-01-2023</text:p>
          </table:table-cell>
          <table:table-cell office:value-type="string" office:string-value="January" table:formula="of:=TEXT([.A9]; &quot;mmmm&quot;)" table:style-name="ce14">
            <text:p>January</text:p>
          </table:table-cell>
          <table:table-cell office:value-type="string" office:string-value="2023-01" table:formula="of:=TEXT([.A9]; &quot;yyyy-mm&quot;)" table:style-name="ce14">
            <text:p>2023-01</text:p>
          </table:table-cell>
          <table:table-cell office:value-type="float" office:value="26" table:style-name="ce9">
            <text:p>26</text:p>
          </table:table-cell>
          <table:table-cell office:value-type="float" office:value="36" table:style-name="ce9">
            <text:p>36</text:p>
          </table:table-cell>
          <table:table-cell office:value-type="float" office:value="36" table:style-name="ce9">
            <text:p>36</text:p>
          </table:table-cell>
          <table:table-cell office:value-type="float" office:value="7803" table:style-name="ce9">
            <text:p>7803</text:p>
          </table:table-cell>
          <table:table-cell office:value-type="float" office:value="158" table:style-name="ce9">
            <text:p>158</text:p>
          </table:table-cell>
          <table:table-cell office:value-type="float" office:value="7839" table:formula="of:=SUM([.G9]+[.E9])" table:style-name="ce15">
            <text:p>7839</text:p>
          </table:table-cell>
          <table:table-cell office:value-type="float" office:value="-122" table:formula="of:=[.F9]-[.H9]" table:style-name="ce15">
            <text:p>-122</text:p>
          </table:table-cell>
          <table:table-cell office:value-type="percentage" office:value="1.2246460007654038E-2" table:formula="of:=([.I10]-[.I9])/[.I9]" table:style-name="ce16">
            <text:p>1%</text:p>
          </table:table-cell>
          <table:table-cell office:value-type="string" office:string-value="Valid" table:formula="of:=IF([.F9]&lt;=[.E9]; &quot;Valid&quot;; &quot;Invalid&quot;)" table:style-name="ce17">
            <text:p>Valid</text:p>
          </table:table-cell>
          <table:table-cell office:value-type="string" office:string-value="Valid" table:formula="of:=IF([.H9]&lt;=[.G9]; &quot;Valid&quot;; &quot;Invalid&quot;)" table:style-name="ce17">
            <text:p>Valid</text:p>
          </table:table-cell>
          <table:table-cell office:value-type="string" office:string-value="Stable/Reducing" table:formula="of:=IF([.J9]&gt;0; &quot;Increasing Pressure&quot;; &quot;Stable/Reducing&quot;)" table:style-name="ce18">
            <text:p>Stable/Reducing</text:p>
          </table:table-cell>
          <table:table-cell office:value-type="float" office:value="4.3888888888888893" table:formula="of:=IFERROR([.H9]/[.F9]; 0)" table:style-name="ce17">
            <text:p>4.388888889</text:p>
          </table:table-cell>
          <table:table-cell office:value-type="float" office:value="7856.8571428571431" table:formula="of:=AVERAGE([.I9:.I15])" table:style-name="ce15">
            <text:p>7857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2-01T00:00:00" table:style-name="ce14">
            <text:p>01-02-2023</text:p>
          </table:table-cell>
          <table:table-cell office:value-type="string" office:string-value="February" table:formula="of:=TEXT([.A10]; &quot;mmmm&quot;)" table:style-name="ce14">
            <text:p>February</text:p>
          </table:table-cell>
          <table:table-cell office:value-type="string" office:string-value="2023-02" table:formula="of:=TEXT([.A10]; &quot;yyyy-mm&quot;)" table:style-name="ce14">
            <text:p>2023-02</text:p>
          </table:table-cell>
          <table:table-cell office:value-type="float" office:value="25" table:style-name="ce9">
            <text:p>25</text:p>
          </table:table-cell>
          <table:table-cell office:value-type="float" office:value="32" table:style-name="ce9">
            <text:p>32</text:p>
          </table:table-cell>
          <table:table-cell office:value-type="float" office:value="27" table:style-name="ce9">
            <text:p>27</text:p>
          </table:table-cell>
          <table:table-cell office:value-type="float" office:value="7903" table:style-name="ce9">
            <text:p>7903</text:p>
          </table:table-cell>
          <table:table-cell office:value-type="float" office:value="231" table:style-name="ce9">
            <text:p>231</text:p>
          </table:table-cell>
          <table:table-cell office:value-type="float" office:value="7935" table:formula="of:=SUM([.G10]+[.E10])" table:style-name="ce15">
            <text:p>7935</text:p>
          </table:table-cell>
          <table:table-cell office:value-type="float" office:value="-204" table:formula="of:=[.F10]-[.H10]" table:style-name="ce15">
            <text:p>-204</text:p>
          </table:table-cell>
          <table:table-cell office:value-type="percentage" office:value="-5.4190296156269692E-3" table:formula="of:=([.I11]-[.I10])/[.I10]" table:style-name="ce16">
            <text:p>-1%</text:p>
          </table:table-cell>
          <table:table-cell office:value-type="string" office:string-value="Valid" table:formula="of:=IF([.F10]&lt;=[.E10]; &quot;Valid&quot;; &quot;Invalid&quot;)" table:style-name="ce17">
            <text:p>Valid</text:p>
          </table:table-cell>
          <table:table-cell office:value-type="string" office:string-value="Valid" table:formula="of:=IF([.H10]&lt;=[.G10]; &quot;Valid&quot;; &quot;Invalid&quot;)" table:style-name="ce17">
            <text:p>Valid</text:p>
          </table:table-cell>
          <table:table-cell office:value-type="string" office:string-value="Stable/Reducing" table:formula="of:=IF([.J10]&gt;0; &quot;Increasing Pressure&quot;; &quot;Stable/Reducing&quot;)" table:style-name="ce18">
            <text:p>Stable/Reducing</text:p>
          </table:table-cell>
          <table:table-cell office:value-type="float" office:value="8.5555555555555554" table:formula="of:=IFERROR([.H10]/[.F10]; 0)" table:style-name="ce17">
            <text:p>8.555555556</text:p>
          </table:table-cell>
          <table:table-cell office:value-type="float" office:value="7900.1428571428569" table:formula="of:=AVERAGE([.I10:.I16])" table:style-name="ce15">
            <text:p>7900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2-02T00:00:00" table:style-name="ce14">
            <text:p>02-02-2023</text:p>
          </table:table-cell>
          <table:table-cell office:value-type="string" office:string-value="February" table:formula="of:=TEXT([.A11]; &quot;mmmm&quot;)" table:style-name="ce14">
            <text:p>February</text:p>
          </table:table-cell>
          <table:table-cell office:value-type="string" office:string-value="2023-02" table:formula="of:=TEXT([.A11]; &quot;yyyy-mm&quot;)" table:style-name="ce14">
            <text:p>2023-02</text:p>
          </table:table-cell>
          <table:table-cell office:value-type="float" office:value="15" table:style-name="ce9">
            <text:p>15</text:p>
          </table:table-cell>
          <table:table-cell office:value-type="float" office:value="13" table:style-name="ce9">
            <text:p>13</text:p>
          </table:table-cell>
          <table:table-cell office:value-type="float" office:value="23" table:style-name="ce9">
            <text:p>23</text:p>
          </table:table-cell>
          <table:table-cell office:value-type="float" office:value="7879" table:style-name="ce9">
            <text:p>7879</text:p>
          </table:table-cell>
          <table:table-cell office:value-type="float" office:value="298" table:style-name="ce9">
            <text:p>298</text:p>
          </table:table-cell>
          <table:table-cell office:value-type="float" office:value="7892" table:formula="of:=SUM([.G11]+[.E11])" table:style-name="ce15">
            <text:p>7892</text:p>
          </table:table-cell>
          <table:table-cell office:value-type="float" office:value="-275" table:formula="of:=[.F11]-[.H11]" table:style-name="ce15">
            <text:p>-275</text:p>
          </table:table-cell>
          <table:table-cell office:value-type="percentage" office:value="-3.6492650785605679E-2" table:formula="of:=([.I12]-[.I11])/[.I11]" table:style-name="ce16">
            <text:p>-4%</text:p>
          </table:table-cell>
          <table:table-cell office:value-type="string" office:string-value="Invalid" table:formula="of:=IF([.F11]&lt;=[.E11]; &quot;Valid&quot;; &quot;Invalid&quot;)" table:style-name="ce17">
            <text:p>Invalid</text:p>
          </table:table-cell>
          <table:table-cell office:value-type="string" office:string-value="Valid" table:formula="of:=IF([.H11]&lt;=[.G11]; &quot;Valid&quot;; &quot;Invalid&quot;)" table:style-name="ce17">
            <text:p>Valid</text:p>
          </table:table-cell>
          <table:table-cell office:value-type="string" office:string-value="Stable/Reducing" table:formula="of:=IF([.J11]&gt;0; &quot;Increasing Pressure&quot;; &quot;Stable/Reducing&quot;)" table:style-name="ce18">
            <text:p>Stable/Reducing</text:p>
          </table:table-cell>
          <table:table-cell office:value-type="float" office:value="12.956521739130435" table:formula="of:=IFERROR([.H11]/[.F11]; 0)" table:style-name="ce17">
            <text:p>12.95652174</text:p>
          </table:table-cell>
          <table:table-cell office:value-type="float" office:value="7857.5714285714284" table:formula="of:=AVERAGE([.I11:.I17])" table:style-name="ce15">
            <text:p>7858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2-05T00:00:00" table:style-name="ce14">
            <text:p>05-02-2023</text:p>
          </table:table-cell>
          <table:table-cell office:value-type="string" office:string-value="February" table:formula="of:=TEXT([.A12]; &quot;mmmm&quot;)" table:style-name="ce14">
            <text:p>February</text:p>
          </table:table-cell>
          <table:table-cell office:value-type="string" office:string-value="2023-02" table:formula="of:=TEXT([.A12]; &quot;yyyy-mm&quot;)" table:style-name="ce14">
            <text:p>2023-02</text:p>
          </table:table-cell>
          <table:table-cell office:value-type="float" office:value="16" table:style-name="ce9">
            <text:p>16</text:p>
          </table:table-cell>
          <table:table-cell office:value-type="float" office:value="18" table:style-name="ce9">
            <text:p>18</text:p>
          </table:table-cell>
          <table:table-cell office:value-type="float" office:value="15" table:style-name="ce9">
            <text:p>15</text:p>
          </table:table-cell>
          <table:table-cell office:value-type="float" office:value="7586" table:style-name="ce9">
            <text:p>7586</text:p>
          </table:table-cell>
          <table:table-cell office:value-type="float" office:value="342" table:style-name="ce9">
            <text:p>342</text:p>
          </table:table-cell>
          <table:table-cell office:value-type="float" office:value="7604" table:formula="of:=SUM([.G12]+[.E12])" table:style-name="ce15">
            <text:p>7604</text:p>
          </table:table-cell>
          <table:table-cell office:value-type="float" office:value="-327" table:formula="of:=[.F12]-[.H12]" table:style-name="ce15">
            <text:p>-327</text:p>
          </table:table-cell>
          <table:table-cell office:value-type="percentage" office:value="1.8148342977380327E-2" table:formula="of:=([.I13]-[.I12])/[.I12]" table:style-name="ce16">
            <text:p>2%</text:p>
          </table:table-cell>
          <table:table-cell office:value-type="string" office:string-value="Valid" table:formula="of:=IF([.F12]&lt;=[.E12]; &quot;Valid&quot;; &quot;Invalid&quot;)" table:style-name="ce17">
            <text:p>Valid</text:p>
          </table:table-cell>
          <table:table-cell office:value-type="string" office:string-value="Valid" table:formula="of:=IF([.H12]&lt;=[.G12]; &quot;Valid&quot;; &quot;Invalid&quot;)" table:style-name="ce17">
            <text:p>Valid</text:p>
          </table:table-cell>
          <table:table-cell office:value-type="string" office:string-value="Stable/Reducing" table:formula="of:=IF([.J12]&gt;0; &quot;Increasing Pressure&quot;; &quot;Stable/Reducing&quot;)" table:style-name="ce18">
            <text:p>Stable/Reducing</text:p>
          </table:table-cell>
          <table:table-cell office:value-type="float" office:value="22.8" table:formula="of:=IFERROR([.H12]/[.F12]; 0)" table:style-name="ce17">
            <text:p>22.8</text:p>
          </table:table-cell>
          <table:table-cell office:value-type="float" office:value="7836.1428571428569" table:formula="of:=AVERAGE([.I12:.I18])" table:style-name="ce15">
            <text:p>7836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2-06T00:00:00" table:style-name="ce14">
            <text:p>06-02-2023</text:p>
          </table:table-cell>
          <table:table-cell office:value-type="string" office:string-value="February" table:formula="of:=TEXT([.A13]; &quot;mmmm&quot;)" table:style-name="ce14">
            <text:p>February</text:p>
          </table:table-cell>
          <table:table-cell office:value-type="string" office:string-value="2023-02" table:formula="of:=TEXT([.A13]; &quot;yyyy-mm&quot;)" table:style-name="ce14">
            <text:p>2023-02</text:p>
          </table:table-cell>
          <table:table-cell office:value-type="float" office:value="11" table:style-name="ce9">
            <text:p>11</text:p>
          </table:table-cell>
          <table:table-cell office:value-type="float" office:value="22" table:style-name="ce9">
            <text:p>22</text:p>
          </table:table-cell>
          <table:table-cell office:value-type="float" office:value="12" table:style-name="ce9">
            <text:p>12</text:p>
          </table:table-cell>
          <table:table-cell office:value-type="float" office:value="7720" table:style-name="ce9">
            <text:p>7720</text:p>
          </table:table-cell>
          <table:table-cell office:value-type="float" office:value="196" table:style-name="ce9">
            <text:p>196</text:p>
          </table:table-cell>
          <table:table-cell office:value-type="float" office:value="7742" table:formula="of:=SUM([.G13]+[.E13])" table:style-name="ce15">
            <text:p>7742</text:p>
          </table:table-cell>
          <table:table-cell office:value-type="float" office:value="-184" table:formula="of:=[.F13]-[.H13]" table:style-name="ce15">
            <text:p>-184</text:p>
          </table:table-cell>
          <table:table-cell office:value-type="percentage" office:value="1.7179023508137433E-2" table:formula="of:=([.I14]-[.I13])/[.I13]" table:style-name="ce16">
            <text:p>2%</text:p>
          </table:table-cell>
          <table:table-cell office:value-type="string" office:string-value="Valid" table:formula="of:=IF([.F13]&lt;=[.E13]; &quot;Valid&quot;; &quot;Invalid&quot;)" table:style-name="ce17">
            <text:p>Valid</text:p>
          </table:table-cell>
          <table:table-cell office:value-type="string" office:string-value="Valid" table:formula="of:=IF([.H13]&lt;=[.G13]; &quot;Valid&quot;; &quot;Invalid&quot;)" table:style-name="ce17">
            <text:p>Valid</text:p>
          </table:table-cell>
          <table:table-cell office:value-type="string" office:string-value="Stable/Reducing" table:formula="of:=IF([.J13]&gt;0; &quot;Increasing Pressure&quot;; &quot;Stable/Reducing&quot;)" table:style-name="ce18">
            <text:p>Stable/Reducing</text:p>
          </table:table-cell>
          <table:table-cell office:value-type="float" office:value="16.333333333333332" table:formula="of:=IFERROR([.H13]/[.F13]; 0)" table:style-name="ce17">
            <text:p>16.33333333</text:p>
          </table:table-cell>
          <table:table-cell office:value-type="float" office:value="7895.4285714285716" table:formula="of:=AVERAGE([.I13:.I19])" table:style-name="ce15">
            <text:p>7895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2-07T00:00:00" table:style-name="ce14">
            <text:p>07-02-2023</text:p>
          </table:table-cell>
          <table:table-cell office:value-type="string" office:string-value="February" table:formula="of:=TEXT([.A14]; &quot;mmmm&quot;)" table:style-name="ce14">
            <text:p>February</text:p>
          </table:table-cell>
          <table:table-cell office:value-type="string" office:string-value="2023-02" table:formula="of:=TEXT([.A14]; &quot;yyyy-mm&quot;)" table:style-name="ce14">
            <text:p>2023-02</text:p>
          </table:table-cell>
          <table:table-cell office:value-type="float" office:value="16" table:style-name="ce9">
            <text:p>16</text:p>
          </table:table-cell>
          <table:table-cell office:value-type="float" office:value="20" table:style-name="ce9">
            <text:p>20</text:p>
          </table:table-cell>
          <table:table-cell office:value-type="float" office:value="20" table:style-name="ce9">
            <text:p>20</text:p>
          </table:table-cell>
          <table:table-cell office:value-type="float" office:value="7855" table:style-name="ce9">
            <text:p>7855</text:p>
          </table:table-cell>
          <table:table-cell office:value-type="float" office:value="200" table:style-name="ce9">
            <text:p>200</text:p>
          </table:table-cell>
          <table:table-cell office:value-type="float" office:value="7875" table:formula="of:=SUM([.G14]+[.E14])" table:style-name="ce15">
            <text:p>7875</text:p>
          </table:table-cell>
          <table:table-cell office:value-type="float" office:value="-180" table:formula="of:=[.F14]-[.H14]" table:style-name="ce15">
            <text:p>-180</text:p>
          </table:table-cell>
          <table:table-cell office:value-type="percentage" office:value="2.9968253968253967E-2" table:formula="of:=([.I15]-[.I14])/[.I14]" table:style-name="ce16">
            <text:p>3%</text:p>
          </table:table-cell>
          <table:table-cell office:value-type="string" office:string-value="Valid" table:formula="of:=IF([.F14]&lt;=[.E14]; &quot;Valid&quot;; &quot;Invalid&quot;)" table:style-name="ce17">
            <text:p>Valid</text:p>
          </table:table-cell>
          <table:table-cell office:value-type="string" office:string-value="Valid" table:formula="of:=IF([.H14]&lt;=[.G14]; &quot;Valid&quot;; &quot;Invalid&quot;)" table:style-name="ce17">
            <text:p>Valid</text:p>
          </table:table-cell>
          <table:table-cell office:value-type="string" office:string-value="Stable/Reducing" table:formula="of:=IF([.J14]&gt;0; &quot;Increasing Pressure&quot;; &quot;Stable/Reducing&quot;)" table:style-name="ce18">
            <text:p>Stable/Reducing</text:p>
          </table:table-cell>
          <table:table-cell office:value-type="float" office:value="10" table:formula="of:=IFERROR([.H14]/[.F14]; 0)" table:style-name="ce17">
            <text:p>10</text:p>
          </table:table-cell>
          <table:table-cell office:value-type="float" office:value="7942" table:formula="of:=AVERAGE([.I14:.I20])" table:style-name="ce15">
            <text:p>7942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2-08T00:00:00" table:style-name="ce14">
            <text:p>08-02-2023</text:p>
          </table:table-cell>
          <table:table-cell office:value-type="string" office:string-value="February" table:formula="of:=TEXT([.A15]; &quot;mmmm&quot;)" table:style-name="ce14">
            <text:p>February</text:p>
          </table:table-cell>
          <table:table-cell office:value-type="string" office:string-value="2023-02" table:formula="of:=TEXT([.A15]; &quot;yyyy-mm&quot;)" table:style-name="ce14">
            <text:p>2023-02</text:p>
          </table:table-cell>
          <table:table-cell office:value-type="float" office:value="93" table:style-name="ce9">
            <text:p>93</text:p>
          </table:table-cell>
          <table:table-cell office:value-type="float" office:value="196" table:style-name="ce9">
            <text:p>196</text:p>
          </table:table-cell>
          <table:table-cell office:value-type="float" office:value="169" table:style-name="ce9">
            <text:p>169</text:p>
          </table:table-cell>
          <table:table-cell office:value-type="float" office:value="7915" table:style-name="ce9">
            <text:p>7915</text:p>
          </table:table-cell>
          <table:table-cell office:value-type="float" office:value="317" table:style-name="ce9">
            <text:p>317</text:p>
          </table:table-cell>
          <table:table-cell office:value-type="float" office:value="8111" table:formula="of:=SUM([.G15]+[.E15])" table:style-name="ce15">
            <text:p>8111</text:p>
          </table:table-cell>
          <table:table-cell office:value-type="float" office:value="-148" table:formula="of:=[.F15]-[.H15]" table:style-name="ce15">
            <text:p>-148</text:p>
          </table:table-cell>
          <table:table-cell office:value-type="percentage" office:value="3.8219701639748489E-3" table:formula="of:=([.I16]-[.I15])/[.I15]" table:style-name="ce16">
            <text:p>0%</text:p>
          </table:table-cell>
          <table:table-cell office:value-type="string" office:string-value="Valid" table:formula="of:=IF([.F15]&lt;=[.E15]; &quot;Valid&quot;; &quot;Invalid&quot;)" table:style-name="ce17">
            <text:p>Valid</text:p>
          </table:table-cell>
          <table:table-cell office:value-type="string" office:string-value="Valid" table:formula="of:=IF([.H15]&lt;=[.G15]; &quot;Valid&quot;; &quot;Invalid&quot;)" table:style-name="ce17">
            <text:p>Valid</text:p>
          </table:table-cell>
          <table:table-cell office:value-type="string" office:string-value="Stable/Reducing" table:formula="of:=IF([.J15]&gt;0; &quot;Increasing Pressure&quot;; &quot;Stable/Reducing&quot;)" table:style-name="ce18">
            <text:p>Stable/Reducing</text:p>
          </table:table-cell>
          <table:table-cell office:value-type="float" office:value="1.8757396449704142" table:formula="of:=IFERROR([.H15]/[.F15]; 0)" table:style-name="ce17">
            <text:p>1.875739645</text:p>
          </table:table-cell>
          <table:table-cell office:value-type="float" office:value="7960.7142857142853" table:formula="of:=AVERAGE([.I15:.I21])" table:style-name="ce15">
            <text:p>7961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2-09T00:00:00" table:style-name="ce14">
            <text:p>09-02-2023</text:p>
          </table:table-cell>
          <table:table-cell office:value-type="string" office:string-value="February" table:formula="of:=TEXT([.A16]; &quot;mmmm&quot;)" table:style-name="ce14">
            <text:p>February</text:p>
          </table:table-cell>
          <table:table-cell office:value-type="string" office:string-value="2023-02" table:formula="of:=TEXT([.A16]; &quot;yyyy-mm&quot;)" table:style-name="ce14">
            <text:p>2023-02</text:p>
          </table:table-cell>
          <table:table-cell office:value-type="float" office:value="124" table:style-name="ce9">
            <text:p>124</text:p>
          </table:table-cell>
          <table:table-cell office:value-type="float" office:value="234" table:style-name="ce9">
            <text:p>234</text:p>
          </table:table-cell>
          <table:table-cell office:value-type="float" office:value="161" table:style-name="ce9">
            <text:p>161</text:p>
          </table:table-cell>
          <table:table-cell office:value-type="float" office:value="7908" table:style-name="ce9">
            <text:p>7908</text:p>
          </table:table-cell>
          <table:table-cell office:value-type="float" office:value="353" table:style-name="ce9">
            <text:p>353</text:p>
          </table:table-cell>
          <table:table-cell office:value-type="float" office:value="8142" table:formula="of:=SUM([.G16]+[.E16])" table:style-name="ce15">
            <text:p>8142</text:p>
          </table:table-cell>
          <table:table-cell office:value-type="float" office:value="-192" table:formula="of:=[.F16]-[.H16]" table:style-name="ce15">
            <text:p>-192</text:p>
          </table:table-cell>
          <table:table-cell office:value-type="percentage" office:value="-6.2024072709408011E-2" table:formula="of:=([.I17]-[.I16])/[.I16]" table:style-name="ce16">
            <text:p>-6%</text:p>
          </table:table-cell>
          <table:table-cell office:value-type="string" office:string-value="Valid" table:formula="of:=IF([.F16]&lt;=[.E16]; &quot;Valid&quot;; &quot;Invalid&quot;)" table:style-name="ce17">
            <text:p>Valid</text:p>
          </table:table-cell>
          <table:table-cell office:value-type="string" office:string-value="Valid" table:formula="of:=IF([.H16]&lt;=[.G16]; &quot;Valid&quot;; &quot;Invalid&quot;)" table:style-name="ce17">
            <text:p>Valid</text:p>
          </table:table-cell>
          <table:table-cell office:value-type="string" office:string-value="Stable/Reducing" table:formula="of:=IF([.J16]&gt;0; &quot;Increasing Pressure&quot;; &quot;Stable/Reducing&quot;)" table:style-name="ce18">
            <text:p>Stable/Reducing</text:p>
          </table:table-cell>
          <table:table-cell office:value-type="float" office:value="2.1925465838509317" table:formula="of:=IFERROR([.H16]/[.F16]; 0)" table:style-name="ce17">
            <text:p>2.192546584</text:p>
          </table:table-cell>
          <table:table-cell office:value-type="float" office:value="7959.4285714285716" table:formula="of:=AVERAGE([.I16:.I22])" table:style-name="ce15">
            <text:p>7959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2-12T00:00:00" table:style-name="ce14">
            <text:p>12-02-2023</text:p>
          </table:table-cell>
          <table:table-cell office:value-type="string" office:string-value="February" table:formula="of:=TEXT([.A17]; &quot;mmmm&quot;)" table:style-name="ce14">
            <text:p>February</text:p>
          </table:table-cell>
          <table:table-cell office:value-type="string" office:string-value="2023-02" table:formula="of:=TEXT([.A17]; &quot;yyyy-mm&quot;)" table:style-name="ce14">
            <text:p>2023-02</text:p>
          </table:table-cell>
          <table:table-cell office:value-type="float" office:value="92" table:style-name="ce9">
            <text:p>92</text:p>
          </table:table-cell>
          <table:table-cell office:value-type="float" office:value="203" table:style-name="ce9">
            <text:p>203</text:p>
          </table:table-cell>
          <table:table-cell office:value-type="float" office:value="173" table:style-name="ce9">
            <text:p>173</text:p>
          </table:table-cell>
          <table:table-cell office:value-type="float" office:value="7434" table:style-name="ce9">
            <text:p>7434</text:p>
          </table:table-cell>
          <table:table-cell office:value-type="float" office:value="317" table:style-name="ce9">
            <text:p>317</text:p>
          </table:table-cell>
          <table:table-cell office:value-type="float" office:value="7637" table:formula="of:=SUM([.G17]+[.E17])" table:style-name="ce15">
            <text:p>7637</text:p>
          </table:table-cell>
          <table:table-cell office:value-type="float" office:value="-144" table:formula="of:=[.F17]-[.H17]" table:style-name="ce15">
            <text:p>-144</text:p>
          </table:table-cell>
          <table:table-cell office:value-type="percentage" office:value="1.3748854262144821E-2" table:formula="of:=([.I18]-[.I17])/[.I17]" table:style-name="ce16">
            <text:p>1%</text:p>
          </table:table-cell>
          <table:table-cell office:value-type="string" office:string-value="Valid" table:formula="of:=IF([.F17]&lt;=[.E17]; &quot;Valid&quot;; &quot;Invalid&quot;)" table:style-name="ce17">
            <text:p>Valid</text:p>
          </table:table-cell>
          <table:table-cell office:value-type="string" office:string-value="Valid" table:formula="of:=IF([.H17]&lt;=[.G17]; &quot;Valid&quot;; &quot;Invalid&quot;)" table:style-name="ce17">
            <text:p>Valid</text:p>
          </table:table-cell>
          <table:table-cell office:value-type="string" office:string-value="Stable/Reducing" table:formula="of:=IF([.J17]&gt;0; &quot;Increasing Pressure&quot;; &quot;Stable/Reducing&quot;)" table:style-name="ce18">
            <text:p>Stable/Reducing</text:p>
          </table:table-cell>
          <table:table-cell office:value-type="float" office:value="1.8323699421965318" table:formula="of:=IFERROR([.H17]/[.F17]; 0)" table:style-name="ce17">
            <text:p>1.832369942</text:p>
          </table:table-cell>
          <table:table-cell office:value-type="float" office:value="7979.2857142857147" table:formula="of:=AVERAGE([.I17:.I23])" table:style-name="ce15">
            <text:p>7979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2-13T00:00:00" table:style-name="ce14">
            <text:p>13-02-2023</text:p>
          </table:table-cell>
          <table:table-cell office:value-type="string" office:string-value="February" table:formula="of:=TEXT([.A18]; &quot;mmmm&quot;)" table:style-name="ce14">
            <text:p>February</text:p>
          </table:table-cell>
          <table:table-cell office:value-type="string" office:string-value="2023-02" table:formula="of:=TEXT([.A18]; &quot;yyyy-mm&quot;)" table:style-name="ce14">
            <text:p>2023-02</text:p>
          </table:table-cell>
          <table:table-cell office:value-type="float" office:value="186" table:style-name="ce9">
            <text:p>186</text:p>
          </table:table-cell>
          <table:table-cell office:value-type="float" office:value="259" table:style-name="ce9">
            <text:p>259</text:p>
          </table:table-cell>
          <table:table-cell office:value-type="float" office:value="172" table:style-name="ce9">
            <text:p>172</text:p>
          </table:table-cell>
          <table:table-cell office:value-type="float" office:value="7483" table:style-name="ce9">
            <text:p>7483</text:p>
          </table:table-cell>
          <table:table-cell office:value-type="float" office:value="244" table:style-name="ce9">
            <text:p>244</text:p>
          </table:table-cell>
          <table:table-cell office:value-type="float" office:value="7742" table:formula="of:=SUM([.G18]+[.E18])" table:style-name="ce15">
            <text:p>7742</text:p>
          </table:table-cell>
          <table:table-cell office:value-type="float" office:value="-72" table:formula="of:=[.F18]-[.H18]" table:style-name="ce15">
            <text:p>-72</text:p>
          </table:table-cell>
          <table:table-cell office:value-type="percentage" office:value="3.5778868509429088E-2" table:formula="of:=([.I19]-[.I18])/[.I18]" table:style-name="ce16">
            <text:p>4%</text:p>
          </table:table-cell>
          <table:table-cell office:value-type="string" office:string-value="Valid" table:formula="of:=IF([.F18]&lt;=[.E18]; &quot;Valid&quot;; &quot;Invalid&quot;)" table:style-name="ce17">
            <text:p>Valid</text:p>
          </table:table-cell>
          <table:table-cell office:value-type="string" office:string-value="Valid" table:formula="of:=IF([.H18]&lt;=[.G18]; &quot;Valid&quot;; &quot;Invalid&quot;)" table:style-name="ce17">
            <text:p>Valid</text:p>
          </table:table-cell>
          <table:table-cell office:value-type="string" office:string-value="Stable/Reducing" table:formula="of:=IF([.J18]&gt;0; &quot;Increasing Pressure&quot;; &quot;Stable/Reducing&quot;)" table:style-name="ce18">
            <text:p>Stable/Reducing</text:p>
          </table:table-cell>
          <table:table-cell office:value-type="float" office:value="1.4186046511627908" table:formula="of:=IFERROR([.H18]/[.F18]; 0)" table:style-name="ce17">
            <text:p>1.418604651</text:p>
          </table:table-cell>
          <table:table-cell office:value-type="float" office:value="8058.7142857142853" table:formula="of:=AVERAGE([.I18:.I24])" table:style-name="ce15">
            <text:p>8059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2-14T00:00:00" table:style-name="ce14">
            <text:p>14-02-2023</text:p>
          </table:table-cell>
          <table:table-cell office:value-type="string" office:string-value="February" table:formula="of:=TEXT([.A19]; &quot;mmmm&quot;)" table:style-name="ce14">
            <text:p>February</text:p>
          </table:table-cell>
          <table:table-cell office:value-type="string" office:string-value="2023-02" table:formula="of:=TEXT([.A19]; &quot;yyyy-mm&quot;)" table:style-name="ce14">
            <text:p>2023-02</text:p>
          </table:table-cell>
          <table:table-cell office:value-type="float" office:value="154" table:style-name="ce9">
            <text:p>154</text:p>
          </table:table-cell>
          <table:table-cell office:value-type="float" office:value="225" table:style-name="ce9">
            <text:p>225</text:p>
          </table:table-cell>
          <table:table-cell office:value-type="float" office:value="220" table:style-name="ce9">
            <text:p>220</text:p>
          </table:table-cell>
          <table:table-cell office:value-type="float" office:value="7794" table:style-name="ce9">
            <text:p>7794</text:p>
          </table:table-cell>
          <table:table-cell office:value-type="float" office:value="223" table:style-name="ce9">
            <text:p>223</text:p>
          </table:table-cell>
          <table:table-cell office:value-type="float" office:value="8019" table:formula="of:=SUM([.G19]+[.E19])" table:style-name="ce15">
            <text:p>8019</text:p>
          </table:table-cell>
          <table:table-cell office:value-type="float" office:value="-3" table:formula="of:=[.F19]-[.H19]" table:style-name="ce15">
            <text:p>-3</text:p>
          </table:table-cell>
          <table:table-cell office:value-type="percentage" office:value="6.1104875919690731E-3" table:formula="of:=([.I20]-[.I19])/[.I19]" table:style-name="ce16">
            <text:p>1%</text:p>
          </table:table-cell>
          <table:table-cell office:value-type="string" office:string-value="Valid" table:formula="of:=IF([.F19]&lt;=[.E19]; &quot;Valid&quot;; &quot;Invalid&quot;)" table:style-name="ce17">
            <text:p>Valid</text:p>
          </table:table-cell>
          <table:table-cell office:value-type="string" office:string-value="Valid" table:formula="of:=IF([.H19]&lt;=[.G19]; &quot;Valid&quot;; &quot;Invalid&quot;)" table:style-name="ce17">
            <text:p>Valid</text:p>
          </table:table-cell>
          <table:table-cell office:value-type="string" office:string-value="Stable/Reducing" table:formula="of:=IF([.J19]&gt;0; &quot;Increasing Pressure&quot;; &quot;Stable/Reducing&quot;)" table:style-name="ce18">
            <text:p>Stable/Reducing</text:p>
          </table:table-cell>
          <table:table-cell office:value-type="float" office:value="1.0136363636363637" table:formula="of:=IFERROR([.H19]/[.F19]; 0)" table:style-name="ce17">
            <text:p>1.013636364</text:p>
          </table:table-cell>
          <table:table-cell office:value-type="float" office:value="8106.4285714285716" table:formula="of:=AVERAGE([.I19:.I25])" table:style-name="ce15">
            <text:p>8106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2-15T00:00:00" table:style-name="ce14">
            <text:p>15-02-2023</text:p>
          </table:table-cell>
          <table:table-cell office:value-type="string" office:string-value="February" table:formula="of:=TEXT([.A20]; &quot;mmmm&quot;)" table:style-name="ce14">
            <text:p>February</text:p>
          </table:table-cell>
          <table:table-cell office:value-type="string" office:string-value="2023-02" table:formula="of:=TEXT([.A20]; &quot;yyyy-mm&quot;)" table:style-name="ce14">
            <text:p>2023-02</text:p>
          </table:table-cell>
          <table:table-cell office:value-type="float" office:value="91" table:style-name="ce9">
            <text:p>91</text:p>
          </table:table-cell>
          <table:table-cell office:value-type="float" office:value="199" table:style-name="ce9">
            <text:p>199</text:p>
          </table:table-cell>
          <table:table-cell office:value-type="float" office:value="172" table:style-name="ce9">
            <text:p>172</text:p>
          </table:table-cell>
          <table:table-cell office:value-type="float" office:value="7869" table:style-name="ce9">
            <text:p>7869</text:p>
          </table:table-cell>
          <table:table-cell office:value-type="float" office:value="290" table:style-name="ce9">
            <text:p>290</text:p>
          </table:table-cell>
          <table:table-cell office:value-type="float" office:value="8068" table:formula="of:=SUM([.G20]+[.E20])" table:style-name="ce15">
            <text:p>8068</text:p>
          </table:table-cell>
          <table:table-cell office:value-type="float" office:value="-118" table:formula="of:=[.F20]-[.H20]" table:style-name="ce15">
            <text:p>-118</text:p>
          </table:table-cell>
          <table:table-cell office:value-type="percentage" office:value="-7.6846802181457612E-3" table:formula="of:=([.I21]-[.I20])/[.I20]" table:style-name="ce16">
            <text:p>-1%</text:p>
          </table:table-cell>
          <table:table-cell office:value-type="string" office:string-value="Valid" table:formula="of:=IF([.F20]&lt;=[.E20]; &quot;Valid&quot;; &quot;Invalid&quot;)" table:style-name="ce17">
            <text:p>Valid</text:p>
          </table:table-cell>
          <table:table-cell office:value-type="string" office:string-value="Valid" table:formula="of:=IF([.H20]&lt;=[.G20]; &quot;Valid&quot;; &quot;Invalid&quot;)" table:style-name="ce17">
            <text:p>Valid</text:p>
          </table:table-cell>
          <table:table-cell office:value-type="string" office:string-value="Stable/Reducing" table:formula="of:=IF([.J20]&gt;0; &quot;Increasing Pressure&quot;; &quot;Stable/Reducing&quot;)" table:style-name="ce18">
            <text:p>Stable/Reducing</text:p>
          </table:table-cell>
          <table:table-cell office:value-type="float" office:value="1.6860465116279071" table:formula="of:=IFERROR([.H20]/[.F20]; 0)" table:style-name="ce17">
            <text:p>1.686046512</text:p>
          </table:table-cell>
          <table:table-cell office:value-type="float" office:value="8075" table:formula="of:=AVERAGE([.I20:.I26])" table:style-name="ce15">
            <text:p>8075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2-16T00:00:00" table:style-name="ce14">
            <text:p>16-02-2023</text:p>
          </table:table-cell>
          <table:table-cell office:value-type="string" office:string-value="February" table:formula="of:=TEXT([.A21]; &quot;mmmm&quot;)" table:style-name="ce14">
            <text:p>February</text:p>
          </table:table-cell>
          <table:table-cell office:value-type="string" office:string-value="2023-02" table:formula="of:=TEXT([.A21]; &quot;yyyy-mm&quot;)" table:style-name="ce14">
            <text:p>2023-02</text:p>
          </table:table-cell>
          <table:table-cell office:value-type="float" office:value="81" table:style-name="ce9">
            <text:p>81</text:p>
          </table:table-cell>
          <table:table-cell office:value-type="float" office:value="213" table:style-name="ce9">
            <text:p>213</text:p>
          </table:table-cell>
          <table:table-cell office:value-type="float" office:value="153" table:style-name="ce9">
            <text:p>153</text:p>
          </table:table-cell>
          <table:table-cell office:value-type="float" office:value="7793" table:style-name="ce9">
            <text:p>7793</text:p>
          </table:table-cell>
          <table:table-cell office:value-type="float" office:value="361" table:style-name="ce9">
            <text:p>361</text:p>
          </table:table-cell>
          <table:table-cell office:value-type="float" office:value="8006" table:formula="of:=SUM([.G21]+[.E21])" table:style-name="ce15">
            <text:p>8006</text:p>
          </table:table-cell>
          <table:table-cell office:value-type="float" office:value="-208" table:formula="of:=[.F21]-[.H21]" table:style-name="ce15">
            <text:p>-208</text:p>
          </table:table-cell>
          <table:table-cell office:value-type="percentage" office:value="1.1991006744941295E-2" table:formula="of:=([.I22]-[.I21])/[.I21]" table:style-name="ce16">
            <text:p>1%</text:p>
          </table:table-cell>
          <table:table-cell office:value-type="string" office:string-value="Valid" table:formula="of:=IF([.F21]&lt;=[.E21]; &quot;Valid&quot;; &quot;Invalid&quot;)" table:style-name="ce17">
            <text:p>Valid</text:p>
          </table:table-cell>
          <table:table-cell office:value-type="string" office:string-value="Valid" table:formula="of:=IF([.H21]&lt;=[.G21]; &quot;Valid&quot;; &quot;Invalid&quot;)" table:style-name="ce17">
            <text:p>Valid</text:p>
          </table:table-cell>
          <table:table-cell office:value-type="string" office:string-value="Stable/Reducing" table:formula="of:=IF([.J21]&gt;0; &quot;Increasing Pressure&quot;; &quot;Stable/Reducing&quot;)" table:style-name="ce18">
            <text:p>Stable/Reducing</text:p>
          </table:table-cell>
          <table:table-cell office:value-type="float" office:value="2.3594771241830066" table:formula="of:=IFERROR([.H21]/[.F21]; 0)" table:style-name="ce17">
            <text:p>2.359477124</text:p>
          </table:table-cell>
          <table:table-cell office:value-type="float" office:value="8070.8571428571431" table:formula="of:=AVERAGE([.I21:.I27])" table:style-name="ce15">
            <text:p>8071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2-20T00:00:00" table:style-name="ce14">
            <text:p>20-02-2023</text:p>
          </table:table-cell>
          <table:table-cell office:value-type="string" office:string-value="February" table:formula="of:=TEXT([.A22]; &quot;mmmm&quot;)" table:style-name="ce14">
            <text:p>February</text:p>
          </table:table-cell>
          <table:table-cell office:value-type="string" office:string-value="2023-02" table:formula="of:=TEXT([.A22]; &quot;yyyy-mm&quot;)" table:style-name="ce14">
            <text:p>2023-02</text:p>
          </table:table-cell>
          <table:table-cell office:value-type="float" office:value="209" table:style-name="ce9">
            <text:p>209</text:p>
          </table:table-cell>
          <table:table-cell office:value-type="float" office:value="285" table:style-name="ce9">
            <text:p>285</text:p>
          </table:table-cell>
          <table:table-cell office:value-type="float" office:value="184" table:style-name="ce9">
            <text:p>184</text:p>
          </table:table-cell>
          <table:table-cell office:value-type="float" office:value="7817" table:style-name="ce9">
            <text:p>7817</text:p>
          </table:table-cell>
          <table:table-cell office:value-type="float" office:value="209" table:style-name="ce9">
            <text:p>209</text:p>
          </table:table-cell>
          <table:table-cell office:value-type="float" office:value="8102" table:formula="of:=SUM([.G22]+[.E22])" table:style-name="ce15">
            <text:p>8102</text:p>
          </table:table-cell>
          <table:table-cell office:value-type="float" office:value="-25" table:formula="of:=[.F22]-[.H22]" table:style-name="ce15">
            <text:p>-25</text:p>
          </table:table-cell>
          <table:table-cell office:value-type="percentage" office:value="2.209331029375463E-2" table:formula="of:=([.I23]-[.I22])/[.I22]" table:style-name="ce16">
            <text:p>2%</text:p>
          </table:table-cell>
          <table:table-cell office:value-type="string" office:string-value="Valid" table:formula="of:=IF([.F22]&lt;=[.E22]; &quot;Valid&quot;; &quot;Invalid&quot;)" table:style-name="ce17">
            <text:p>Valid</text:p>
          </table:table-cell>
          <table:table-cell office:value-type="string" office:string-value="Valid" table:formula="of:=IF([.H22]&lt;=[.G22]; &quot;Valid&quot;; &quot;Invalid&quot;)" table:style-name="ce17">
            <text:p>Valid</text:p>
          </table:table-cell>
          <table:table-cell office:value-type="string" office:string-value="Stable/Reducing" table:formula="of:=IF([.J22]&gt;0; &quot;Increasing Pressure&quot;; &quot;Stable/Reducing&quot;)" table:style-name="ce18">
            <text:p>Stable/Reducing</text:p>
          </table:table-cell>
          <table:table-cell office:value-type="float" office:value="1.1358695652173914" table:formula="of:=IFERROR([.H22]/[.F22]; 0)" table:style-name="ce17">
            <text:p>1.135869565</text:p>
          </table:table-cell>
          <table:table-cell office:value-type="float" office:value="8086" table:formula="of:=AVERAGE([.I22:.I28])" table:style-name="ce15">
            <text:p>8086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2-21T00:00:00" table:style-name="ce14">
            <text:p>21-02-2023</text:p>
          </table:table-cell>
          <table:table-cell office:value-type="string" office:string-value="February" table:formula="of:=TEXT([.A23]; &quot;mmmm&quot;)" table:style-name="ce14">
            <text:p>February</text:p>
          </table:table-cell>
          <table:table-cell office:value-type="string" office:string-value="2023-02" table:formula="of:=TEXT([.A23]; &quot;yyyy-mm&quot;)" table:style-name="ce14">
            <text:p>2023-02</text:p>
          </table:table-cell>
          <table:table-cell office:value-type="float" office:value="184" table:style-name="ce9">
            <text:p>184</text:p>
          </table:table-cell>
          <table:table-cell office:value-type="float" office:value="314" table:style-name="ce9">
            <text:p>314</text:p>
          </table:table-cell>
          <table:table-cell office:value-type="float" office:value="217" table:style-name="ce9">
            <text:p>217</text:p>
          </table:table-cell>
          <table:table-cell office:value-type="float" office:value="7967" table:style-name="ce9">
            <text:p>7967</text:p>
          </table:table-cell>
          <table:table-cell office:value-type="float" office:value="213" table:style-name="ce9">
            <text:p>213</text:p>
          </table:table-cell>
          <table:table-cell office:value-type="float" office:value="8281" table:formula="of:=SUM([.G23]+[.E23])" table:style-name="ce15">
            <text:p>8281</text:p>
          </table:table-cell>
          <table:table-cell office:value-type="float" office:value="4" table:formula="of:=[.F23]-[.H23]" table:style-name="ce15">
            <text:p>4</text:p>
          </table:table-cell>
          <table:table-cell office:value-type="percentage" office:value="-1.0626735901461177E-2" table:formula="of:=([.I24]-[.I23])/[.I23]" table:style-name="ce16">
            <text:p>-1%</text:p>
          </table:table-cell>
          <table:table-cell office:value-type="string" office:string-value="Valid" table:formula="of:=IF([.F23]&lt;=[.E23]; &quot;Valid&quot;; &quot;Invalid&quot;)" table:style-name="ce17">
            <text:p>Valid</text:p>
          </table:table-cell>
          <table:table-cell office:value-type="string" office:string-value="Valid" table:formula="of:=IF([.H23]&lt;=[.G23]; &quot;Valid&quot;; &quot;Invalid&quot;)" table:style-name="ce17">
            <text:p>Valid</text:p>
          </table:table-cell>
          <table:table-cell office:value-type="string" office:string-value="Increasing Pressure" table:formula="of:=IF([.J23]&gt;0; &quot;Increasing Pressure&quot;; &quot;Stable/Reducing&quot;)" table:style-name="ce18">
            <text:p>Increasing Pressure</text:p>
          </table:table-cell>
          <table:table-cell office:value-type="float" office:value="0.98156682027649766" table:formula="of:=IFERROR([.H23]/[.F23]; 0)" table:style-name="ce17">
            <text:p>0.98156682</text:p>
          </table:table-cell>
          <table:table-cell office:value-type="float" office:value="8084" table:formula="of:=AVERAGE([.I23:.I29])" table:style-name="ce15">
            <text:p>8084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2-22T00:00:00" table:style-name="ce14">
            <text:p>22-02-2023</text:p>
          </table:table-cell>
          <table:table-cell office:value-type="string" office:string-value="February" table:formula="of:=TEXT([.A24]; &quot;mmmm&quot;)" table:style-name="ce14">
            <text:p>February</text:p>
          </table:table-cell>
          <table:table-cell office:value-type="string" office:string-value="2023-02" table:formula="of:=TEXT([.A24]; &quot;yyyy-mm&quot;)" table:style-name="ce14">
            <text:p>2023-02</text:p>
          </table:table-cell>
          <table:table-cell office:value-type="float" office:value="107" table:style-name="ce9">
            <text:p>107</text:p>
          </table:table-cell>
          <table:table-cell office:value-type="float" office:value="215" table:style-name="ce9">
            <text:p>215</text:p>
          </table:table-cell>
          <table:table-cell office:value-type="float" office:value="230" table:style-name="ce9">
            <text:p>230</text:p>
          </table:table-cell>
          <table:table-cell office:value-type="float" office:value="7978" table:style-name="ce9">
            <text:p>7978</text:p>
          </table:table-cell>
          <table:table-cell office:value-type="float" office:value="232" table:style-name="ce9">
            <text:p>232</text:p>
          </table:table-cell>
          <table:table-cell office:value-type="float" office:value="8193" table:formula="of:=SUM([.G24]+[.E24])" table:style-name="ce15">
            <text:p>8193</text:p>
          </table:table-cell>
          <table:table-cell office:value-type="float" office:value="-2" table:formula="of:=[.F24]-[.H24]" table:style-name="ce15">
            <text:p>-2</text:p>
          </table:table-cell>
          <table:table-cell office:value-type="percentage" office:value="-1.4280483339436104E-2" table:formula="of:=([.I25]-[.I24])/[.I24]" table:style-name="ce16">
            <text:p>-1%</text:p>
          </table:table-cell>
          <table:table-cell office:value-type="string" office:string-value="Invalid" table:formula="of:=IF([.F24]&lt;=[.E24]; &quot;Valid&quot;; &quot;Invalid&quot;)" table:style-name="ce17">
            <text:p>Invalid</text:p>
          </table:table-cell>
          <table:table-cell office:value-type="string" office:string-value="Valid" table:formula="of:=IF([.H24]&lt;=[.G24]; &quot;Valid&quot;; &quot;Invalid&quot;)" table:style-name="ce17">
            <text:p>Valid</text:p>
          </table:table-cell>
          <table:table-cell office:value-type="string" office:string-value="Stable/Reducing" table:formula="of:=IF([.J24]&gt;0; &quot;Increasing Pressure&quot;; &quot;Stable/Reducing&quot;)" table:style-name="ce18">
            <text:p>Stable/Reducing</text:p>
          </table:table-cell>
          <table:table-cell office:value-type="float" office:value="1.008695652173913" table:formula="of:=IFERROR([.H24]/[.F24]; 0)" table:style-name="ce17">
            <text:p>1.008695652</text:p>
          </table:table-cell>
          <table:table-cell office:value-type="float" office:value="8057.7142857142853" table:formula="of:=AVERAGE([.I24:.I30])" table:style-name="ce15">
            <text:p>8058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2-23T00:00:00" table:style-name="ce14">
            <text:p>23-02-2023</text:p>
          </table:table-cell>
          <table:table-cell office:value-type="string" office:string-value="February" table:formula="of:=TEXT([.A25]; &quot;mmmm&quot;)" table:style-name="ce14">
            <text:p>February</text:p>
          </table:table-cell>
          <table:table-cell office:value-type="string" office:string-value="2023-02" table:formula="of:=TEXT([.A25]; &quot;yyyy-mm&quot;)" table:style-name="ce14">
            <text:p>2023-02</text:p>
          </table:table-cell>
          <table:table-cell office:value-type="float" office:value="101" table:style-name="ce9">
            <text:p>101</text:p>
          </table:table-cell>
          <table:table-cell office:value-type="float" office:value="162" table:style-name="ce9">
            <text:p>162</text:p>
          </table:table-cell>
          <table:table-cell office:value-type="float" office:value="178" table:style-name="ce9">
            <text:p>178</text:p>
          </table:table-cell>
          <table:table-cell office:value-type="float" office:value="7914" table:style-name="ce9">
            <text:p>7914</text:p>
          </table:table-cell>
          <table:table-cell office:value-type="float" office:value="386" table:style-name="ce9">
            <text:p>386</text:p>
          </table:table-cell>
          <table:table-cell office:value-type="float" office:value="8076" table:formula="of:=SUM([.G25]+[.E25])" table:style-name="ce15">
            <text:p>8076</text:p>
          </table:table-cell>
          <table:table-cell office:value-type="float" office:value="-208" table:formula="of:=[.F25]-[.H25]" table:style-name="ce15">
            <text:p>-208</text:p>
          </table:table-cell>
          <table:table-cell office:value-type="percentage" office:value="-3.4299157999009414E-2" table:formula="of:=([.I26]-[.I25])/[.I25]" table:style-name="ce16">
            <text:p>-3%</text:p>
          </table:table-cell>
          <table:table-cell office:value-type="string" office:string-value="Invalid" table:formula="of:=IF([.F25]&lt;=[.E25]; &quot;Valid&quot;; &quot;Invalid&quot;)" table:style-name="ce17">
            <text:p>Invalid</text:p>
          </table:table-cell>
          <table:table-cell office:value-type="string" office:string-value="Valid" table:formula="of:=IF([.H25]&lt;=[.G25]; &quot;Valid&quot;; &quot;Invalid&quot;)" table:style-name="ce17">
            <text:p>Valid</text:p>
          </table:table-cell>
          <table:table-cell office:value-type="string" office:string-value="Stable/Reducing" table:formula="of:=IF([.J25]&gt;0; &quot;Increasing Pressure&quot;; &quot;Stable/Reducing&quot;)" table:style-name="ce18">
            <text:p>Stable/Reducing</text:p>
          </table:table-cell>
          <table:table-cell office:value-type="float" office:value="2.1685393258426968" table:formula="of:=IFERROR([.H25]/[.F25]; 0)" table:style-name="ce17">
            <text:p>2.168539326</text:p>
          </table:table-cell>
          <table:table-cell office:value-type="float" office:value="8040.5714285714284" table:formula="of:=AVERAGE([.I25:.I31])" table:style-name="ce15">
            <text:p>8041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2-26T00:00:00" table:style-name="ce14">
            <text:p>26-02-2023</text:p>
          </table:table-cell>
          <table:table-cell office:value-type="string" office:string-value="February" table:formula="of:=TEXT([.A26]; &quot;mmmm&quot;)" table:style-name="ce14">
            <text:p>February</text:p>
          </table:table-cell>
          <table:table-cell office:value-type="string" office:string-value="2023-02" table:formula="of:=TEXT([.A26]; &quot;yyyy-mm&quot;)" table:style-name="ce14">
            <text:p>2023-02</text:p>
          </table:table-cell>
          <table:table-cell office:value-type="float" office:value="99" table:style-name="ce9">
            <text:p>99</text:p>
          </table:table-cell>
          <table:table-cell office:value-type="float" office:value="190" table:style-name="ce9">
            <text:p>190</text:p>
          </table:table-cell>
          <table:table-cell office:value-type="float" office:value="176" table:style-name="ce9">
            <text:p>176</text:p>
          </table:table-cell>
          <table:table-cell office:value-type="float" office:value="7609" table:style-name="ce9">
            <text:p>7609</text:p>
          </table:table-cell>
          <table:table-cell office:value-type="float" office:value="323" table:style-name="ce9">
            <text:p>323</text:p>
          </table:table-cell>
          <table:table-cell office:value-type="float" office:value="7799" table:formula="of:=SUM([.G26]+[.E26])" table:style-name="ce15">
            <text:p>7799</text:p>
          </table:table-cell>
          <table:table-cell office:value-type="float" office:value="-147" table:formula="of:=[.F26]-[.H26]" table:style-name="ce15">
            <text:p>-147</text:p>
          </table:table-cell>
          <table:table-cell office:value-type="percentage" office:value="3.0773176048211309E-2" table:formula="of:=([.I27]-[.I26])/[.I26]" table:style-name="ce16">
            <text:p>3%</text:p>
          </table:table-cell>
          <table:table-cell office:value-type="string" office:string-value="Valid" table:formula="of:=IF([.F26]&lt;=[.E26]; &quot;Valid&quot;; &quot;Invalid&quot;)" table:style-name="ce17">
            <text:p>Valid</text:p>
          </table:table-cell>
          <table:table-cell office:value-type="string" office:string-value="Valid" table:formula="of:=IF([.H26]&lt;=[.G26]; &quot;Valid&quot;; &quot;Invalid&quot;)" table:style-name="ce17">
            <text:p>Valid</text:p>
          </table:table-cell>
          <table:table-cell office:value-type="string" office:string-value="Stable/Reducing" table:formula="of:=IF([.J26]&gt;0; &quot;Increasing Pressure&quot;; &quot;Stable/Reducing&quot;)" table:style-name="ce18">
            <text:p>Stable/Reducing</text:p>
          </table:table-cell>
          <table:table-cell office:value-type="float" office:value="1.8352272727272727" table:formula="of:=IFERROR([.H26]/[.F26]; 0)" table:style-name="ce17">
            <text:p>1.835227273</text:p>
          </table:table-cell>
          <table:table-cell office:value-type="float" office:value="8043" table:formula="of:=AVERAGE([.I26:.I32])" table:style-name="ce15">
            <text:p>8043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2-27T00:00:00" table:style-name="ce14">
            <text:p>27-02-2023</text:p>
          </table:table-cell>
          <table:table-cell office:value-type="string" office:string-value="February" table:formula="of:=TEXT([.A27]; &quot;mmmm&quot;)" table:style-name="ce14">
            <text:p>February</text:p>
          </table:table-cell>
          <table:table-cell office:value-type="string" office:string-value="2023-02" table:formula="of:=TEXT([.A27]; &quot;yyyy-mm&quot;)" table:style-name="ce14">
            <text:p>2023-02</text:p>
          </table:table-cell>
          <table:table-cell office:value-type="float" office:value="167" table:style-name="ce9">
            <text:p>167</text:p>
          </table:table-cell>
          <table:table-cell office:value-type="float" office:value="239" table:style-name="ce9">
            <text:p>239</text:p>
          </table:table-cell>
          <table:table-cell office:value-type="float" office:value="166" table:style-name="ce9">
            <text:p>166</text:p>
          </table:table-cell>
          <table:table-cell office:value-type="float" office:value="7800" table:style-name="ce9">
            <text:p>7800</text:p>
          </table:table-cell>
          <table:table-cell office:value-type="float" office:value="248" table:style-name="ce9">
            <text:p>248</text:p>
          </table:table-cell>
          <table:table-cell office:value-type="float" office:value="8039" table:formula="of:=SUM([.G27]+[.E27])" table:style-name="ce15">
            <text:p>8039</text:p>
          </table:table-cell>
          <table:table-cell office:value-type="float" office:value="-82" table:formula="of:=[.F27]-[.H27]" table:style-name="ce15">
            <text:p>-82</text:p>
          </table:table-cell>
          <table:table-cell office:value-type="percentage" office:value="9.0807314342579923E-3" table:formula="of:=([.I28]-[.I27])/[.I27]" table:style-name="ce16">
            <text:p>1%</text:p>
          </table:table-cell>
          <table:table-cell office:value-type="string" office:string-value="Valid" table:formula="of:=IF([.F27]&lt;=[.E27]; &quot;Valid&quot;; &quot;Invalid&quot;)" table:style-name="ce17">
            <text:p>Valid</text:p>
          </table:table-cell>
          <table:table-cell office:value-type="string" office:string-value="Valid" table:formula="of:=IF([.H27]&lt;=[.G27]; &quot;Valid&quot;; &quot;Invalid&quot;)" table:style-name="ce17">
            <text:p>Valid</text:p>
          </table:table-cell>
          <table:table-cell office:value-type="string" office:string-value="Stable/Reducing" table:formula="of:=IF([.J27]&gt;0; &quot;Increasing Pressure&quot;; &quot;Stable/Reducing&quot;)" table:style-name="ce18">
            <text:p>Stable/Reducing</text:p>
          </table:table-cell>
          <table:table-cell office:value-type="float" office:value="1.4939759036144578" table:formula="of:=IFERROR([.H27]/[.F27]; 0)" table:style-name="ce17">
            <text:p>1.493975904</text:p>
          </table:table-cell>
          <table:table-cell office:value-type="float" office:value="8081.8571428571431" table:formula="of:=AVERAGE([.I27:.I33])" table:style-name="ce15">
            <text:p>8082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2-28T00:00:00" table:style-name="ce14">
            <text:p>28-02-2023</text:p>
          </table:table-cell>
          <table:table-cell office:value-type="string" office:string-value="February" table:formula="of:=TEXT([.A28]; &quot;mmmm&quot;)" table:style-name="ce14">
            <text:p>February</text:p>
          </table:table-cell>
          <table:table-cell office:value-type="string" office:string-value="2023-02" table:formula="of:=TEXT([.A28]; &quot;yyyy-mm&quot;)" table:style-name="ce14">
            <text:p>2023-02</text:p>
          </table:table-cell>
          <table:table-cell office:value-type="float" office:value="115" table:style-name="ce9">
            <text:p>115</text:p>
          </table:table-cell>
          <table:table-cell office:value-type="float" office:value="216" table:style-name="ce9">
            <text:p>216</text:p>
          </table:table-cell>
          <table:table-cell office:value-type="float" office:value="169" table:style-name="ce9">
            <text:p>169</text:p>
          </table:table-cell>
          <table:table-cell office:value-type="float" office:value="7896" table:style-name="ce9">
            <text:p>7896</text:p>
          </table:table-cell>
          <table:table-cell office:value-type="float" office:value="200" table:style-name="ce9">
            <text:p>200</text:p>
          </table:table-cell>
          <table:table-cell office:value-type="float" office:value="8112" table:formula="of:=SUM([.G28]+[.E28])" table:style-name="ce15">
            <text:p>8112</text:p>
          </table:table-cell>
          <table:table-cell office:value-type="float" office:value="-31" table:formula="of:=[.F28]-[.H28]" table:style-name="ce15">
            <text:p>-31</text:p>
          </table:table-cell>
          <table:table-cell office:value-type="percentage" office:value="-2.9585798816568047E-3" table:formula="of:=([.I29]-[.I28])/[.I28]" table:style-name="ce16">
            <text:p>0%</text:p>
          </table:table-cell>
          <table:table-cell office:value-type="string" office:string-value="Valid" table:formula="of:=IF([.F28]&lt;=[.E28]; &quot;Valid&quot;; &quot;Invalid&quot;)" table:style-name="ce17">
            <text:p>Valid</text:p>
          </table:table-cell>
          <table:table-cell office:value-type="string" office:string-value="Valid" table:formula="of:=IF([.H28]&lt;=[.G28]; &quot;Valid&quot;; &quot;Invalid&quot;)" table:style-name="ce17">
            <text:p>Valid</text:p>
          </table:table-cell>
          <table:table-cell office:value-type="string" office:string-value="Stable/Reducing" table:formula="of:=IF([.J28]&gt;0; &quot;Increasing Pressure&quot;; &quot;Stable/Reducing&quot;)" table:style-name="ce18">
            <text:p>Stable/Reducing</text:p>
          </table:table-cell>
          <table:table-cell office:value-type="float" office:value="1.1834319526627219" table:formula="of:=IFERROR([.H28]/[.F28]; 0)" table:style-name="ce17">
            <text:p>1.183431953</text:p>
          </table:table-cell>
          <table:table-cell office:value-type="float" office:value="8047.2857142857147" table:formula="of:=AVERAGE([.I28:.I34])" table:style-name="ce15">
            <text:p>8047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3-01T00:00:00" table:style-name="ce14">
            <text:p>01-03-2023</text:p>
          </table:table-cell>
          <table:table-cell office:value-type="string" office:string-value="March" table:formula="of:=TEXT([.A29]; &quot;mmmm&quot;)" table:style-name="ce14">
            <text:p>March</text:p>
          </table:table-cell>
          <table:table-cell office:value-type="string" office:string-value="2023-03" table:formula="of:=TEXT([.A29]; &quot;yyyy-mm&quot;)" table:style-name="ce14">
            <text:p>2023-03</text:p>
          </table:table-cell>
          <table:table-cell office:value-type="float" office:value="84" table:style-name="ce9">
            <text:p>84</text:p>
          </table:table-cell>
          <table:table-cell office:value-type="float" office:value="158" table:style-name="ce9">
            <text:p>158</text:p>
          </table:table-cell>
          <table:table-cell office:value-type="float" office:value="193" table:style-name="ce9">
            <text:p>193</text:p>
          </table:table-cell>
          <table:table-cell office:value-type="float" office:value="7930" table:style-name="ce9">
            <text:p>7930</text:p>
          </table:table-cell>
          <table:table-cell office:value-type="float" office:value="307" table:style-name="ce9">
            <text:p>307</text:p>
          </table:table-cell>
          <table:table-cell office:value-type="float" office:value="8088" table:formula="of:=SUM([.G29]+[.E29])" table:style-name="ce15">
            <text:p>8088</text:p>
          </table:table-cell>
          <table:table-cell office:value-type="float" office:value="-114" table:formula="of:=[.F29]-[.H29]" table:style-name="ce15">
            <text:p>-114</text:p>
          </table:table-cell>
          <table:table-cell office:value-type="percentage" office:value="1.112759643916914E-3" table:formula="of:=([.I30]-[.I29])/[.I29]" table:style-name="ce16">
            <text:p>0%</text:p>
          </table:table-cell>
          <table:table-cell office:value-type="string" office:string-value="Invalid" table:formula="of:=IF([.F29]&lt;=[.E29]; &quot;Valid&quot;; &quot;Invalid&quot;)" table:style-name="ce17">
            <text:p>Invalid</text:p>
          </table:table-cell>
          <table:table-cell office:value-type="string" office:string-value="Valid" table:formula="of:=IF([.H29]&lt;=[.G29]; &quot;Valid&quot;; &quot;Invalid&quot;)" table:style-name="ce17">
            <text:p>Valid</text:p>
          </table:table-cell>
          <table:table-cell office:value-type="string" office:string-value="Stable/Reducing" table:formula="of:=IF([.J29]&gt;0; &quot;Increasing Pressure&quot;; &quot;Stable/Reducing&quot;)" table:style-name="ce18">
            <text:p>Stable/Reducing</text:p>
          </table:table-cell>
          <table:table-cell office:value-type="float" office:value="1.5906735751295338" table:formula="of:=IFERROR([.H29]/[.F29]; 0)" table:style-name="ce17">
            <text:p>1.590673575</text:p>
          </table:table-cell>
          <table:table-cell office:value-type="float" office:value="8043.5714285714284" table:formula="of:=AVERAGE([.I29:.I35])" table:style-name="ce15">
            <text:p>8044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3-02T00:00:00" table:style-name="ce14">
            <text:p>02-03-2023</text:p>
          </table:table-cell>
          <table:table-cell office:value-type="string" office:string-value="March" table:formula="of:=TEXT([.A30]; &quot;mmmm&quot;)" table:style-name="ce14">
            <text:p>March</text:p>
          </table:table-cell>
          <table:table-cell office:value-type="string" office:string-value="2023-03" table:formula="of:=TEXT([.A30]; &quot;yyyy-mm&quot;)" table:style-name="ce14">
            <text:p>2023-03</text:p>
          </table:table-cell>
          <table:table-cell office:value-type="float" office:value="130" table:style-name="ce9">
            <text:p>130</text:p>
          </table:table-cell>
          <table:table-cell office:value-type="float" office:value="227" table:style-name="ce9">
            <text:p>227</text:p>
          </table:table-cell>
          <table:table-cell office:value-type="float" office:value="192" table:style-name="ce9">
            <text:p>192</text:p>
          </table:table-cell>
          <table:table-cell office:value-type="float" office:value="7870" table:style-name="ce9">
            <text:p>7870</text:p>
          </table:table-cell>
          <table:table-cell office:value-type="float" office:value="335" table:style-name="ce9">
            <text:p>335</text:p>
          </table:table-cell>
          <table:table-cell office:value-type="float" office:value="8097" table:formula="of:=SUM([.G30]+[.E30])" table:style-name="ce15">
            <text:p>8097</text:p>
          </table:table-cell>
          <table:table-cell office:value-type="float" office:value="-143" table:formula="of:=[.F30]-[.H30]" table:style-name="ce15">
            <text:p>-143</text:p>
          </table:table-cell>
          <table:table-cell office:value-type="percentage" office:value="-2.9640607632456465E-3" table:formula="of:=([.I31]-[.I30])/[.I30]" table:style-name="ce16">
            <text:p>0%</text:p>
          </table:table-cell>
          <table:table-cell office:value-type="string" office:string-value="Valid" table:formula="of:=IF([.F30]&lt;=[.E30]; &quot;Valid&quot;; &quot;Invalid&quot;)" table:style-name="ce17">
            <text:p>Valid</text:p>
          </table:table-cell>
          <table:table-cell office:value-type="string" office:string-value="Valid" table:formula="of:=IF([.H30]&lt;=[.G30]; &quot;Valid&quot;; &quot;Invalid&quot;)" table:style-name="ce17">
            <text:p>Valid</text:p>
          </table:table-cell>
          <table:table-cell office:value-type="string" office:string-value="Stable/Reducing" table:formula="of:=IF([.J30]&gt;0; &quot;Increasing Pressure&quot;; &quot;Stable/Reducing&quot;)" table:style-name="ce18">
            <text:p>Stable/Reducing</text:p>
          </table:table-cell>
          <table:table-cell office:value-type="float" office:value="1.7447916666666667" table:formula="of:=IFERROR([.H30]/[.F30]; 0)" table:style-name="ce17">
            <text:p>1.744791667</text:p>
          </table:table-cell>
          <table:table-cell office:value-type="float" office:value="8050.2857142857147" table:formula="of:=AVERAGE([.I30:.I36])" table:style-name="ce15">
            <text:p>8050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3-07T00:00:00" table:style-name="ce14">
            <text:p>07-03-2023</text:p>
          </table:table-cell>
          <table:table-cell office:value-type="string" office:string-value="March" table:formula="of:=TEXT([.A31]; &quot;mmmm&quot;)" table:style-name="ce14">
            <text:p>March</text:p>
          </table:table-cell>
          <table:table-cell office:value-type="string" office:string-value="2023-03" table:formula="of:=TEXT([.A31]; &quot;yyyy-mm&quot;)" table:style-name="ce14">
            <text:p>2023-03</text:p>
          </table:table-cell>
          <table:table-cell office:value-type="float" office:value="88" table:style-name="ce9">
            <text:p>88</text:p>
          </table:table-cell>
          <table:table-cell office:value-type="float" office:value="214" table:style-name="ce9">
            <text:p>214</text:p>
          </table:table-cell>
          <table:table-cell office:value-type="float" office:value="160" table:style-name="ce9">
            <text:p>160</text:p>
          </table:table-cell>
          <table:table-cell office:value-type="float" office:value="7859" table:style-name="ce9">
            <text:p>7859</text:p>
          </table:table-cell>
          <table:table-cell office:value-type="float" office:value="259" table:style-name="ce9">
            <text:p>259</text:p>
          </table:table-cell>
          <table:table-cell office:value-type="float" office:value="8073" table:formula="of:=SUM([.G31]+[.E31])" table:style-name="ce15">
            <text:p>8073</text:p>
          </table:table-cell>
          <table:table-cell office:value-type="float" office:value="-99" table:formula="of:=[.F31]-[.H31]" table:style-name="ce15">
            <text:p>-99</text:p>
          </table:table-cell>
          <table:table-cell office:value-type="percentage" office:value="2.4773937817416077E-3" table:formula="of:=([.I32]-[.I31])/[.I31]" table:style-name="ce16">
            <text:p>0%</text:p>
          </table:table-cell>
          <table:table-cell office:value-type="string" office:string-value="Valid" table:formula="of:=IF([.F31]&lt;=[.E31]; &quot;Valid&quot;; &quot;Invalid&quot;)" table:style-name="ce17">
            <text:p>Valid</text:p>
          </table:table-cell>
          <table:table-cell office:value-type="string" office:string-value="Valid" table:formula="of:=IF([.H31]&lt;=[.G31]; &quot;Valid&quot;; &quot;Invalid&quot;)" table:style-name="ce17">
            <text:p>Valid</text:p>
          </table:table-cell>
          <table:table-cell office:value-type="string" office:string-value="Stable/Reducing" table:formula="of:=IF([.J31]&gt;0; &quot;Increasing Pressure&quot;; &quot;Stable/Reducing&quot;)" table:style-name="ce18">
            <text:p>Stable/Reducing</text:p>
          </table:table-cell>
          <table:table-cell office:value-type="float" office:value="1.6187499999999999" table:formula="of:=IFERROR([.H31]/[.F31]; 0)" table:style-name="ce17">
            <text:p>1.61875</text:p>
          </table:table-cell>
          <table:table-cell office:value-type="float" office:value="8074.8571428571431" table:formula="of:=AVERAGE([.I31:.I37])" table:style-name="ce15">
            <text:p>8075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3-08T00:00:00" table:style-name="ce14">
            <text:p>08-03-2023</text:p>
          </table:table-cell>
          <table:table-cell office:value-type="string" office:string-value="March" table:formula="of:=TEXT([.A32]; &quot;mmmm&quot;)" table:style-name="ce14">
            <text:p>March</text:p>
          </table:table-cell>
          <table:table-cell office:value-type="string" office:string-value="2023-03" table:formula="of:=TEXT([.A32]; &quot;yyyy-mm&quot;)" table:style-name="ce14">
            <text:p>2023-03</text:p>
          </table:table-cell>
          <table:table-cell office:value-type="float" office:value="113" table:style-name="ce9">
            <text:p>113</text:p>
          </table:table-cell>
          <table:table-cell office:value-type="float" office:value="208" table:style-name="ce9">
            <text:p>208</text:p>
          </table:table-cell>
          <table:table-cell office:value-type="float" office:value="159" table:style-name="ce9">
            <text:p>159</text:p>
          </table:table-cell>
          <table:table-cell office:value-type="float" office:value="7885" table:style-name="ce9">
            <text:p>7885</text:p>
          </table:table-cell>
          <table:table-cell office:value-type="float" office:value="291" table:style-name="ce9">
            <text:p>291</text:p>
          </table:table-cell>
          <table:table-cell office:value-type="float" office:value="8093" table:formula="of:=SUM([.G32]+[.E32])" table:style-name="ce15">
            <text:p>8093</text:p>
          </table:table-cell>
          <table:table-cell office:value-type="float" office:value="-132" table:formula="of:=[.F32]-[.H32]" table:style-name="ce15">
            <text:p>-132</text:p>
          </table:table-cell>
          <table:table-cell office:value-type="percentage" office:value="-2.7183986160879774E-3" table:formula="of:=([.I33]-[.I32])/[.I32]" table:style-name="ce16">
            <text:p>0%</text:p>
          </table:table-cell>
          <table:table-cell office:value-type="string" office:string-value="Valid" table:formula="of:=IF([.F32]&lt;=[.E32]; &quot;Valid&quot;; &quot;Invalid&quot;)" table:style-name="ce17">
            <text:p>Valid</text:p>
          </table:table-cell>
          <table:table-cell office:value-type="string" office:string-value="Valid" table:formula="of:=IF([.H32]&lt;=[.G32]; &quot;Valid&quot;; &quot;Invalid&quot;)" table:style-name="ce17">
            <text:p>Valid</text:p>
          </table:table-cell>
          <table:table-cell office:value-type="string" office:string-value="Stable/Reducing" table:formula="of:=IF([.J32]&gt;0; &quot;Increasing Pressure&quot;; &quot;Stable/Reducing&quot;)" table:style-name="ce18">
            <text:p>Stable/Reducing</text:p>
          </table:table-cell>
          <table:table-cell office:value-type="float" office:value="1.8301886792452831" table:formula="of:=IFERROR([.H32]/[.F32]; 0)" table:style-name="ce17">
            <text:p>1.830188679</text:p>
          </table:table-cell>
          <table:table-cell office:value-type="float" office:value="8090" table:formula="of:=AVERAGE([.I32:.I38])" table:style-name="ce15">
            <text:p>8090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3-09T00:00:00" table:style-name="ce14">
            <text:p>09-03-2023</text:p>
          </table:table-cell>
          <table:table-cell office:value-type="string" office:string-value="March" table:formula="of:=TEXT([.A33]; &quot;mmmm&quot;)" table:style-name="ce14">
            <text:p>March</text:p>
          </table:table-cell>
          <table:table-cell office:value-type="string" office:string-value="2023-03" table:formula="of:=TEXT([.A33]; &quot;yyyy-mm&quot;)" table:style-name="ce14">
            <text:p>2023-03</text:p>
          </table:table-cell>
          <table:table-cell office:value-type="float" office:value="174" table:style-name="ce9">
            <text:p>174</text:p>
          </table:table-cell>
          <table:table-cell office:value-type="float" office:value="285" table:style-name="ce9">
            <text:p>285</text:p>
          </table:table-cell>
          <table:table-cell office:value-type="float" office:value="150" table:style-name="ce9">
            <text:p>150</text:p>
          </table:table-cell>
          <table:table-cell office:value-type="float" office:value="7786" table:style-name="ce9">
            <text:p>7786</text:p>
          </table:table-cell>
          <table:table-cell office:value-type="float" office:value="340" table:style-name="ce9">
            <text:p>340</text:p>
          </table:table-cell>
          <table:table-cell office:value-type="float" office:value="8071" table:formula="of:=SUM([.G33]+[.E33])" table:style-name="ce15">
            <text:p>8071</text:p>
          </table:table-cell>
          <table:table-cell office:value-type="float" office:value="-190" table:formula="of:=[.F33]-[.H33]" table:style-name="ce15">
            <text:p>-190</text:p>
          </table:table-cell>
          <table:table-cell office:value-type="percentage" office:value="-3.3948705240986247E-2" table:formula="of:=([.I34]-[.I33])/[.I33]" table:style-name="ce16">
            <text:p>-3%</text:p>
          </table:table-cell>
          <table:table-cell office:value-type="string" office:string-value="Valid" table:formula="of:=IF([.F33]&lt;=[.E33]; &quot;Valid&quot;; &quot;Invalid&quot;)" table:style-name="ce17">
            <text:p>Valid</text:p>
          </table:table-cell>
          <table:table-cell office:value-type="string" office:string-value="Valid" table:formula="of:=IF([.H33]&lt;=[.G33]; &quot;Valid&quot;; &quot;Invalid&quot;)" table:style-name="ce17">
            <text:p>Valid</text:p>
          </table:table-cell>
          <table:table-cell office:value-type="string" office:string-value="Stable/Reducing" table:formula="of:=IF([.J33]&gt;0; &quot;Increasing Pressure&quot;; &quot;Stable/Reducing&quot;)" table:style-name="ce18">
            <text:p>Stable/Reducing</text:p>
          </table:table-cell>
          <table:table-cell office:value-type="float" office:value="2.2666666666666666" table:formula="of:=IFERROR([.H33]/[.F33]; 0)" table:style-name="ce17">
            <text:p>2.266666667</text:p>
          </table:table-cell>
          <table:table-cell office:value-type="float" office:value="8111.5714285714284" table:formula="of:=AVERAGE([.I33:.I39])" table:style-name="ce15">
            <text:p>8112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3-13T00:00:00" table:style-name="ce14">
            <text:p>13-03-2023</text:p>
          </table:table-cell>
          <table:table-cell office:value-type="string" office:string-value="March" table:formula="of:=TEXT([.A34]; &quot;mmmm&quot;)" table:style-name="ce14">
            <text:p>March</text:p>
          </table:table-cell>
          <table:table-cell office:value-type="string" office:string-value="2023-03" table:formula="of:=TEXT([.A34]; &quot;yyyy-mm&quot;)" table:style-name="ce14">
            <text:p>2023-03</text:p>
          </table:table-cell>
          <table:table-cell office:value-type="float" office:value="104" table:style-name="ce9">
            <text:p>104</text:p>
          </table:table-cell>
          <table:table-cell office:value-type="float" office:value="230" table:style-name="ce9">
            <text:p>230</text:p>
          </table:table-cell>
          <table:table-cell office:value-type="float" office:value="206" table:style-name="ce9">
            <text:p>206</text:p>
          </table:table-cell>
          <table:table-cell office:value-type="float" office:value="7567" table:style-name="ce9">
            <text:p>7567</text:p>
          </table:table-cell>
          <table:table-cell office:value-type="float" office:value="249" table:style-name="ce9">
            <text:p>249</text:p>
          </table:table-cell>
          <table:table-cell office:value-type="float" office:value="7797" table:formula="of:=SUM([.G34]+[.E34])" table:style-name="ce15">
            <text:p>7797</text:p>
          </table:table-cell>
          <table:table-cell office:value-type="float" office:value="-43" table:formula="of:=[.F34]-[.H34]" table:style-name="ce15">
            <text:p>-43</text:p>
          </table:table-cell>
          <table:table-cell office:value-type="percentage" office:value="3.7065538027446457E-2" table:formula="of:=([.I35]-[.I34])/[.I34]" table:style-name="ce16">
            <text:p>4%</text:p>
          </table:table-cell>
          <table:table-cell office:value-type="string" office:string-value="Valid" table:formula="of:=IF([.F34]&lt;=[.E34]; &quot;Valid&quot;; &quot;Invalid&quot;)" table:style-name="ce17">
            <text:p>Valid</text:p>
          </table:table-cell>
          <table:table-cell office:value-type="string" office:string-value="Valid" table:formula="of:=IF([.H34]&lt;=[.G34]; &quot;Valid&quot;; &quot;Invalid&quot;)" table:style-name="ce17">
            <text:p>Valid</text:p>
          </table:table-cell>
          <table:table-cell office:value-type="string" office:string-value="Stable/Reducing" table:formula="of:=IF([.J34]&gt;0; &quot;Increasing Pressure&quot;; &quot;Stable/Reducing&quot;)" table:style-name="ce18">
            <text:p>Stable/Reducing</text:p>
          </table:table-cell>
          <table:table-cell office:value-type="float" office:value="1.2087378640776698" table:formula="of:=IFERROR([.H34]/[.F34]; 0)" table:style-name="ce17">
            <text:p>1.208737864</text:p>
          </table:table-cell>
          <table:table-cell office:value-type="float" office:value="8147.4285714285716" table:formula="of:=AVERAGE([.I34:.I40])" table:style-name="ce15">
            <text:p>8147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3-14T00:00:00" table:style-name="ce14">
            <text:p>14-03-2023</text:p>
          </table:table-cell>
          <table:table-cell office:value-type="string" office:string-value="March" table:formula="of:=TEXT([.A35]; &quot;mmmm&quot;)" table:style-name="ce14">
            <text:p>March</text:p>
          </table:table-cell>
          <table:table-cell office:value-type="string" office:string-value="2023-03" table:formula="of:=TEXT([.A35]; &quot;yyyy-mm&quot;)" table:style-name="ce14">
            <text:p>2023-03</text:p>
          </table:table-cell>
          <table:table-cell office:value-type="float" office:value="147" table:style-name="ce9">
            <text:p>147</text:p>
          </table:table-cell>
          <table:table-cell office:value-type="float" office:value="276" table:style-name="ce9">
            <text:p>276</text:p>
          </table:table-cell>
          <table:table-cell office:value-type="float" office:value="214" table:style-name="ce9">
            <text:p>214</text:p>
          </table:table-cell>
          <table:table-cell office:value-type="float" office:value="7810" table:style-name="ce9">
            <text:p>7810</text:p>
          </table:table-cell>
          <table:table-cell office:value-type="float" office:value="181" table:style-name="ce9">
            <text:p>181</text:p>
          </table:table-cell>
          <table:table-cell office:value-type="float" office:value="8086" table:formula="of:=SUM([.G35]+[.E35])" table:style-name="ce15">
            <text:p>8086</text:p>
          </table:table-cell>
          <table:table-cell office:value-type="float" office:value="33" table:formula="of:=[.F35]-[.H35]" table:style-name="ce15">
            <text:p>33</text:p>
          </table:table-cell>
          <table:table-cell office:value-type="percentage" office:value="6.0598565421716545E-3" table:formula="of:=([.I36]-[.I35])/[.I35]" table:style-name="ce16">
            <text:p>1%</text:p>
          </table:table-cell>
          <table:table-cell office:value-type="string" office:string-value="Valid" table:formula="of:=IF([.F35]&lt;=[.E35]; &quot;Valid&quot;; &quot;Invalid&quot;)" table:style-name="ce17">
            <text:p>Valid</text:p>
          </table:table-cell>
          <table:table-cell office:value-type="string" office:string-value="Valid" table:formula="of:=IF([.H35]&lt;=[.G35]; &quot;Valid&quot;; &quot;Invalid&quot;)" table:style-name="ce17">
            <text:p>Valid</text:p>
          </table:table-cell>
          <table:table-cell office:value-type="string" office:string-value="Increasing Pressure" table:formula="of:=IF([.J35]&gt;0; &quot;Increasing Pressure&quot;; &quot;Stable/Reducing&quot;)" table:style-name="ce18">
            <text:p>Increasing Pressure</text:p>
          </table:table-cell>
          <table:table-cell office:value-type="float" office:value="0.84579439252336452" table:formula="of:=IFERROR([.H35]/[.F35]; 0)" table:style-name="ce17">
            <text:p>0.845794393</text:p>
          </table:table-cell>
          <table:table-cell office:value-type="float" office:value="8229.8571428571431" table:formula="of:=AVERAGE([.I35:.I41])" table:style-name="ce15">
            <text:p>8230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3-15T00:00:00" table:style-name="ce14">
            <text:p>15-03-2023</text:p>
          </table:table-cell>
          <table:table-cell office:value-type="string" office:string-value="March" table:formula="of:=TEXT([.A36]; &quot;mmmm&quot;)" table:style-name="ce14">
            <text:p>March</text:p>
          </table:table-cell>
          <table:table-cell office:value-type="string" office:string-value="2023-03" table:formula="of:=TEXT([.A36]; &quot;yyyy-mm&quot;)" table:style-name="ce14">
            <text:p>2023-03</text:p>
          </table:table-cell>
          <table:table-cell office:value-type="float" office:value="108" table:style-name="ce9">
            <text:p>108</text:p>
          </table:table-cell>
          <table:table-cell office:value-type="float" office:value="220" table:style-name="ce9">
            <text:p>220</text:p>
          </table:table-cell>
          <table:table-cell office:value-type="float" office:value="213" table:style-name="ce9">
            <text:p>213</text:p>
          </table:table-cell>
          <table:table-cell office:value-type="float" office:value="7915" table:style-name="ce9">
            <text:p>7915</text:p>
          </table:table-cell>
          <table:table-cell office:value-type="float" office:value="286" table:style-name="ce9">
            <text:p>286</text:p>
          </table:table-cell>
          <table:table-cell office:value-type="float" office:value="8135" table:formula="of:=SUM([.G36]+[.E36])" table:style-name="ce15">
            <text:p>8135</text:p>
          </table:table-cell>
          <table:table-cell office:value-type="float" office:value="-73" table:formula="of:=[.F36]-[.H36]" table:style-name="ce15">
            <text:p>-73</text:p>
          </table:table-cell>
          <table:table-cell office:value-type="percentage" office:value="1.6472034419176398E-2" table:formula="of:=([.I37]-[.I36])/[.I36]" table:style-name="ce16">
            <text:p>2%</text:p>
          </table:table-cell>
          <table:table-cell office:value-type="string" office:string-value="Valid" table:formula="of:=IF([.F36]&lt;=[.E36]; &quot;Valid&quot;; &quot;Invalid&quot;)" table:style-name="ce17">
            <text:p>Valid</text:p>
          </table:table-cell>
          <table:table-cell office:value-type="string" office:string-value="Valid" table:formula="of:=IF([.H36]&lt;=[.G36]; &quot;Valid&quot;; &quot;Invalid&quot;)" table:style-name="ce17">
            <text:p>Valid</text:p>
          </table:table-cell>
          <table:table-cell office:value-type="string" office:string-value="Stable/Reducing" table:formula="of:=IF([.J36]&gt;0; &quot;Increasing Pressure&quot;; &quot;Stable/Reducing&quot;)" table:style-name="ce18">
            <text:p>Stable/Reducing</text:p>
          </table:table-cell>
          <table:table-cell office:value-type="float" office:value="1.3427230046948357" table:formula="of:=IFERROR([.H36]/[.F36]; 0)" table:style-name="ce17">
            <text:p>1.342723005</text:p>
          </table:table-cell>
          <table:table-cell office:value-type="float" office:value="8271.5714285714294" table:formula="of:=AVERAGE([.I36:.I42])" table:style-name="ce15">
            <text:p>8272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3-16T00:00:00" table:style-name="ce14">
            <text:p>16-03-2023</text:p>
          </table:table-cell>
          <table:table-cell office:value-type="string" office:string-value="March" table:formula="of:=TEXT([.A37]; &quot;mmmm&quot;)" table:style-name="ce14">
            <text:p>March</text:p>
          </table:table-cell>
          <table:table-cell office:value-type="string" office:string-value="2023-03" table:formula="of:=TEXT([.A37]; &quot;yyyy-mm&quot;)" table:style-name="ce14">
            <text:p>2023-03</text:p>
          </table:table-cell>
          <table:table-cell office:value-type="float" office:value="180" table:style-name="ce9">
            <text:p>180</text:p>
          </table:table-cell>
          <table:table-cell office:value-type="float" office:value="280" table:style-name="ce9">
            <text:p>280</text:p>
          </table:table-cell>
          <table:table-cell office:value-type="float" office:value="146" table:style-name="ce9">
            <text:p>146</text:p>
          </table:table-cell>
          <table:table-cell office:value-type="float" office:value="7989" table:style-name="ce9">
            <text:p>7989</text:p>
          </table:table-cell>
          <table:table-cell office:value-type="float" office:value="308" table:style-name="ce9">
            <text:p>308</text:p>
          </table:table-cell>
          <table:table-cell office:value-type="float" office:value="8269" table:formula="of:=SUM([.G37]+[.E37])" table:style-name="ce15">
            <text:p>8269</text:p>
          </table:table-cell>
          <table:table-cell office:value-type="float" office:value="-162" table:formula="of:=[.F37]-[.H37]" table:style-name="ce15">
            <text:p>-162</text:p>
          </table:table-cell>
          <table:table-cell office:value-type="percentage" office:value="-1.0884024670455919E-2" table:formula="of:=([.I38]-[.I37])/[.I37]" table:style-name="ce16">
            <text:p>-1%</text:p>
          </table:table-cell>
          <table:table-cell office:value-type="string" office:string-value="Valid" table:formula="of:=IF([.F37]&lt;=[.E37]; &quot;Valid&quot;; &quot;Invalid&quot;)" table:style-name="ce17">
            <text:p>Valid</text:p>
          </table:table-cell>
          <table:table-cell office:value-type="string" office:string-value="Valid" table:formula="of:=IF([.H37]&lt;=[.G37]; &quot;Valid&quot;; &quot;Invalid&quot;)" table:style-name="ce17">
            <text:p>Valid</text:p>
          </table:table-cell>
          <table:table-cell office:value-type="string" office:string-value="Stable/Reducing" table:formula="of:=IF([.J37]&gt;0; &quot;Increasing Pressure&quot;; &quot;Stable/Reducing&quot;)" table:style-name="ce18">
            <text:p>Stable/Reducing</text:p>
          </table:table-cell>
          <table:table-cell office:value-type="float" office:value="2.1095890410958904" table:formula="of:=IFERROR([.H37]/[.F37]; 0)" table:style-name="ce17">
            <text:p>2.109589041</text:p>
          </table:table-cell>
          <table:table-cell office:value-type="float" office:value="8265.5714285714294" table:formula="of:=AVERAGE([.I37:.I43])" table:style-name="ce15">
            <text:p>8266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3-19T00:00:00" table:style-name="ce14">
            <text:p>19-03-2023</text:p>
          </table:table-cell>
          <table:table-cell office:value-type="string" office:string-value="March" table:formula="of:=TEXT([.A38]; &quot;mmmm&quot;)" table:style-name="ce14">
            <text:p>March</text:p>
          </table:table-cell>
          <table:table-cell office:value-type="string" office:string-value="2023-03" table:formula="of:=TEXT([.A38]; &quot;yyyy-mm&quot;)" table:style-name="ce14">
            <text:p>2023-03</text:p>
          </table:table-cell>
          <table:table-cell office:value-type="float" office:value="134" table:style-name="ce9">
            <text:p>134</text:p>
          </table:table-cell>
          <table:table-cell office:value-type="float" office:value="294" table:style-name="ce9">
            <text:p>294</text:p>
          </table:table-cell>
          <table:table-cell office:value-type="float" office:value="186" table:style-name="ce9">
            <text:p>186</text:p>
          </table:table-cell>
          <table:table-cell office:value-type="float" office:value="7885" table:style-name="ce9">
            <text:p>7885</text:p>
          </table:table-cell>
          <table:table-cell office:value-type="float" office:value="306" table:style-name="ce9">
            <text:p>306</text:p>
          </table:table-cell>
          <table:table-cell office:value-type="float" office:value="8179" table:formula="of:=SUM([.G38]+[.E38])" table:style-name="ce15">
            <text:p>8179</text:p>
          </table:table-cell>
          <table:table-cell office:value-type="float" office:value="-120" table:formula="of:=[.F38]-[.H38]" table:style-name="ce15">
            <text:p>-120</text:p>
          </table:table-cell>
          <table:table-cell office:value-type="percentage" office:value="7.9471818070668779E-3" table:formula="of:=([.I39]-[.I38])/[.I38]" table:style-name="ce16">
            <text:p>1%</text:p>
          </table:table-cell>
          <table:table-cell office:value-type="string" office:string-value="Valid" table:formula="of:=IF([.F38]&lt;=[.E38]; &quot;Valid&quot;; &quot;Invalid&quot;)" table:style-name="ce17">
            <text:p>Valid</text:p>
          </table:table-cell>
          <table:table-cell office:value-type="string" office:string-value="Valid" table:formula="of:=IF([.H38]&lt;=[.G38]; &quot;Valid&quot;; &quot;Invalid&quot;)" table:style-name="ce17">
            <text:p>Valid</text:p>
          </table:table-cell>
          <table:table-cell office:value-type="string" office:string-value="Stable/Reducing" table:formula="of:=IF([.J38]&gt;0; &quot;Increasing Pressure&quot;; &quot;Stable/Reducing&quot;)" table:style-name="ce18">
            <text:p>Stable/Reducing</text:p>
          </table:table-cell>
          <table:table-cell office:value-type="float" office:value="1.6451612903225807" table:formula="of:=IFERROR([.H38]/[.F38]; 0)" table:style-name="ce17">
            <text:p>1.64516129</text:p>
          </table:table-cell>
          <table:table-cell office:value-type="float" office:value="8250.7142857142862" table:formula="of:=AVERAGE([.I38:.I44])" table:style-name="ce15">
            <text:p>8251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3-20T00:00:00" table:style-name="ce14">
            <text:p>20-03-2023</text:p>
          </table:table-cell>
          <table:table-cell office:value-type="string" office:string-value="March" table:formula="of:=TEXT([.A39]; &quot;mmmm&quot;)" table:style-name="ce14">
            <text:p>March</text:p>
          </table:table-cell>
          <table:table-cell office:value-type="string" office:string-value="2023-03" table:formula="of:=TEXT([.A39]; &quot;yyyy-mm&quot;)" table:style-name="ce14">
            <text:p>2023-03</text:p>
          </table:table-cell>
          <table:table-cell office:value-type="float" office:value="202" table:style-name="ce9">
            <text:p>202</text:p>
          </table:table-cell>
          <table:table-cell office:value-type="float" office:value="313" table:style-name="ce9">
            <text:p>313</text:p>
          </table:table-cell>
          <table:table-cell office:value-type="float" office:value="158" table:style-name="ce9">
            <text:p>158</text:p>
          </table:table-cell>
          <table:table-cell office:value-type="float" office:value="7931" table:style-name="ce9">
            <text:p>7931</text:p>
          </table:table-cell>
          <table:table-cell office:value-type="float" office:value="279" table:style-name="ce9">
            <text:p>279</text:p>
          </table:table-cell>
          <table:table-cell office:value-type="float" office:value="8244" table:formula="of:=SUM([.G39]+[.E39])" table:style-name="ce15">
            <text:p>8244</text:p>
          </table:table-cell>
          <table:table-cell office:value-type="float" office:value="-121" table:formula="of:=[.F39]-[.H39]" table:style-name="ce15">
            <text:p>-121</text:p>
          </table:table-cell>
          <table:table-cell office:value-type="percentage" office:value="9.4614264919941782E-3" table:formula="of:=([.I40]-[.I39])/[.I39]" table:style-name="ce16">
            <text:p>1%</text:p>
          </table:table-cell>
          <table:table-cell office:value-type="string" office:string-value="Valid" table:formula="of:=IF([.F39]&lt;=[.E39]; &quot;Valid&quot;; &quot;Invalid&quot;)" table:style-name="ce17">
            <text:p>Valid</text:p>
          </table:table-cell>
          <table:table-cell office:value-type="string" office:string-value="Valid" table:formula="of:=IF([.H39]&lt;=[.G39]; &quot;Valid&quot;; &quot;Invalid&quot;)" table:style-name="ce17">
            <text:p>Valid</text:p>
          </table:table-cell>
          <table:table-cell office:value-type="string" office:string-value="Stable/Reducing" table:formula="of:=IF([.J39]&gt;0; &quot;Increasing Pressure&quot;; &quot;Stable/Reducing&quot;)" table:style-name="ce18">
            <text:p>Stable/Reducing</text:p>
          </table:table-cell>
          <table:table-cell office:value-type="float" office:value="1.7658227848101267" table:formula="of:=IFERROR([.H39]/[.F39]; 0)" table:style-name="ce17">
            <text:p>1.765822785</text:p>
          </table:table-cell>
          <table:table-cell office:value-type="float" office:value="8266.2857142857138" table:formula="of:=AVERAGE([.I39:.I45])" table:style-name="ce15">
            <text:p>8266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3-21T00:00:00" table:style-name="ce14">
            <text:p>21-03-2023</text:p>
          </table:table-cell>
          <table:table-cell office:value-type="string" office:string-value="March" table:formula="of:=TEXT([.A40]; &quot;mmmm&quot;)" table:style-name="ce14">
            <text:p>March</text:p>
          </table:table-cell>
          <table:table-cell office:value-type="string" office:string-value="2023-03" table:formula="of:=TEXT([.A40]; &quot;yyyy-mm&quot;)" table:style-name="ce14">
            <text:p>2023-03</text:p>
          </table:table-cell>
          <table:table-cell office:value-type="float" office:value="110" table:style-name="ce9">
            <text:p>110</text:p>
          </table:table-cell>
          <table:table-cell office:value-type="float" office:value="272" table:style-name="ce9">
            <text:p>272</text:p>
          </table:table-cell>
          <table:table-cell office:value-type="float" office:value="193" table:style-name="ce9">
            <text:p>193</text:p>
          </table:table-cell>
          <table:table-cell office:value-type="float" office:value="8050" table:style-name="ce9">
            <text:p>8050</text:p>
          </table:table-cell>
          <table:table-cell office:value-type="float" office:value="221" table:style-name="ce9">
            <text:p>221</text:p>
          </table:table-cell>
          <table:table-cell office:value-type="float" office:value="8322" table:formula="of:=SUM([.G40]+[.E40])" table:style-name="ce15">
            <text:p>8322</text:p>
          </table:table-cell>
          <table:table-cell office:value-type="float" office:value="-28" table:formula="of:=[.F40]-[.H40]" table:style-name="ce15">
            <text:p>-28</text:p>
          </table:table-cell>
          <table:table-cell office:value-type="percentage" office:value="6.2484979572218213E-3" table:formula="of:=([.I41]-[.I40])/[.I40]" table:style-name="ce16">
            <text:p>1%</text:p>
          </table:table-cell>
          <table:table-cell office:value-type="string" office:string-value="Valid" table:formula="of:=IF([.F40]&lt;=[.E40]; &quot;Valid&quot;; &quot;Invalid&quot;)" table:style-name="ce17">
            <text:p>Valid</text:p>
          </table:table-cell>
          <table:table-cell office:value-type="string" office:string-value="Valid" table:formula="of:=IF([.H40]&lt;=[.G40]; &quot;Valid&quot;; &quot;Invalid&quot;)" table:style-name="ce17">
            <text:p>Valid</text:p>
          </table:table-cell>
          <table:table-cell office:value-type="string" office:string-value="Stable/Reducing" table:formula="of:=IF([.J40]&gt;0; &quot;Increasing Pressure&quot;; &quot;Stable/Reducing&quot;)" table:style-name="ce18">
            <text:p>Stable/Reducing</text:p>
          </table:table-cell>
          <table:table-cell office:value-type="float" office:value="1.145077720207254" table:formula="of:=IFERROR([.H40]/[.F40]; 0)" table:style-name="ce17">
            <text:p>1.14507772</text:p>
          </table:table-cell>
          <table:table-cell office:value-type="float" office:value="8296.1428571428569" table:formula="of:=AVERAGE([.I40:.I46])" table:style-name="ce15">
            <text:p>8296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3-22T00:00:00" table:style-name="ce14">
            <text:p>22-03-2023</text:p>
          </table:table-cell>
          <table:table-cell office:value-type="string" office:string-value="March" table:formula="of:=TEXT([.A41]; &quot;mmmm&quot;)" table:style-name="ce14">
            <text:p>March</text:p>
          </table:table-cell>
          <table:table-cell office:value-type="string" office:string-value="2023-03" table:formula="of:=TEXT([.A41]; &quot;yyyy-mm&quot;)" table:style-name="ce14">
            <text:p>2023-03</text:p>
          </table:table-cell>
          <table:table-cell office:value-type="float" office:value="166" table:style-name="ce9">
            <text:p>166</text:p>
          </table:table-cell>
          <table:table-cell office:value-type="float" office:value="277" table:style-name="ce9">
            <text:p>277</text:p>
          </table:table-cell>
          <table:table-cell office:value-type="float" office:value="229" table:style-name="ce9">
            <text:p>229</text:p>
          </table:table-cell>
          <table:table-cell office:value-type="float" office:value="8097" table:style-name="ce9">
            <text:p>8097</text:p>
          </table:table-cell>
          <table:table-cell office:value-type="float" office:value="246" table:style-name="ce9">
            <text:p>246</text:p>
          </table:table-cell>
          <table:table-cell office:value-type="float" office:value="8374" table:formula="of:=SUM([.G41]+[.E41])" table:style-name="ce15">
            <text:p>8374</text:p>
          </table:table-cell>
          <table:table-cell office:value-type="float" office:value="-17" table:formula="of:=[.F41]-[.H41]" table:style-name="ce15">
            <text:p>-17</text:p>
          </table:table-cell>
          <table:table-cell office:value-type="percentage" office:value="4.7766897540004778E-4" table:formula="of:=([.I42]-[.I41])/[.I41]" table:style-name="ce16">
            <text:p>0%</text:p>
          </table:table-cell>
          <table:table-cell office:value-type="string" office:string-value="Valid" table:formula="of:=IF([.F41]&lt;=[.E41]; &quot;Valid&quot;; &quot;Invalid&quot;)" table:style-name="ce17">
            <text:p>Valid</text:p>
          </table:table-cell>
          <table:table-cell office:value-type="string" office:string-value="Valid" table:formula="of:=IF([.H41]&lt;=[.G41]; &quot;Valid&quot;; &quot;Invalid&quot;)" table:style-name="ce17">
            <text:p>Valid</text:p>
          </table:table-cell>
          <table:table-cell office:value-type="string" office:string-value="Stable/Reducing" table:formula="of:=IF([.J41]&gt;0; &quot;Increasing Pressure&quot;; &quot;Stable/Reducing&quot;)" table:style-name="ce18">
            <text:p>Stable/Reducing</text:p>
          </table:table-cell>
          <table:table-cell office:value-type="float" office:value="1.0742358078602621" table:formula="of:=IFERROR([.H41]/[.F41]; 0)" table:style-name="ce17">
            <text:p>1.074235808</text:p>
          </table:table-cell>
          <table:table-cell office:value-type="float" office:value="8309.2857142857138" table:formula="of:=AVERAGE([.I41:.I47])" table:style-name="ce15">
            <text:p>8309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3-23T00:00:00" table:style-name="ce14">
            <text:p>23-03-2023</text:p>
          </table:table-cell>
          <table:table-cell office:value-type="string" office:string-value="March" table:formula="of:=TEXT([.A42]; &quot;mmmm&quot;)" table:style-name="ce14">
            <text:p>March</text:p>
          </table:table-cell>
          <table:table-cell office:value-type="string" office:string-value="2023-03" table:formula="of:=TEXT([.A42]; &quot;yyyy-mm&quot;)" table:style-name="ce14">
            <text:p>2023-03</text:p>
          </table:table-cell>
          <table:table-cell office:value-type="float" office:value="136" table:style-name="ce9">
            <text:p>136</text:p>
          </table:table-cell>
          <table:table-cell office:value-type="float" office:value="276" table:style-name="ce9">
            <text:p>276</text:p>
          </table:table-cell>
          <table:table-cell office:value-type="float" office:value="178" table:style-name="ce9">
            <text:p>178</text:p>
          </table:table-cell>
          <table:table-cell office:value-type="float" office:value="8102" table:style-name="ce9">
            <text:p>8102</text:p>
          </table:table-cell>
          <table:table-cell office:value-type="float" office:value="331" table:style-name="ce9">
            <text:p>331</text:p>
          </table:table-cell>
          <table:table-cell office:value-type="float" office:value="8378" table:formula="of:=SUM([.G42]+[.E42])" table:style-name="ce15">
            <text:p>8378</text:p>
          </table:table-cell>
          <table:table-cell office:value-type="float" office:value="-153" table:formula="of:=[.F42]-[.H42]" table:style-name="ce15">
            <text:p>-153</text:p>
          </table:table-cell>
          <table:table-cell office:value-type="percentage" office:value="-3.4017665313917402E-2" table:formula="of:=([.I43]-[.I42])/[.I42]" table:style-name="ce16">
            <text:p>-3%</text:p>
          </table:table-cell>
          <table:table-cell office:value-type="string" office:string-value="Valid" table:formula="of:=IF([.F42]&lt;=[.E42]; &quot;Valid&quot;; &quot;Invalid&quot;)" table:style-name="ce17">
            <text:p>Valid</text:p>
          </table:table-cell>
          <table:table-cell office:value-type="string" office:string-value="Valid" table:formula="of:=IF([.H42]&lt;=[.G42]; &quot;Valid&quot;; &quot;Invalid&quot;)" table:style-name="ce17">
            <text:p>Valid</text:p>
          </table:table-cell>
          <table:table-cell office:value-type="string" office:string-value="Stable/Reducing" table:formula="of:=IF([.J42]&gt;0; &quot;Increasing Pressure&quot;; &quot;Stable/Reducing&quot;)" table:style-name="ce18">
            <text:p>Stable/Reducing</text:p>
          </table:table-cell>
          <table:table-cell office:value-type="float" office:value="1.8595505617977528" table:formula="of:=IFERROR([.H42]/[.F42]; 0)" table:style-name="ce17">
            <text:p>1.859550562</text:p>
          </table:table-cell>
          <table:table-cell office:value-type="float" office:value="8286.2857142857138" table:formula="of:=AVERAGE([.I42:.I48])" table:style-name="ce15">
            <text:p>8286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3-26T00:00:00" table:style-name="ce14">
            <text:p>26-03-2023</text:p>
          </table:table-cell>
          <table:table-cell office:value-type="string" office:string-value="March" table:formula="of:=TEXT([.A43]; &quot;mmmm&quot;)" table:style-name="ce14">
            <text:p>March</text:p>
          </table:table-cell>
          <table:table-cell office:value-type="string" office:string-value="2023-03" table:formula="of:=TEXT([.A43]; &quot;yyyy-mm&quot;)" table:style-name="ce14">
            <text:p>2023-03</text:p>
          </table:table-cell>
          <table:table-cell office:value-type="float" office:value="87" table:style-name="ce9">
            <text:p>87</text:p>
          </table:table-cell>
          <table:table-cell office:value-type="float" office:value="246" table:style-name="ce9">
            <text:p>246</text:p>
          </table:table-cell>
          <table:table-cell office:value-type="float" office:value="173" table:style-name="ce9">
            <text:p>173</text:p>
          </table:table-cell>
          <table:table-cell office:value-type="float" office:value="7847" table:style-name="ce9">
            <text:p>7847</text:p>
          </table:table-cell>
          <table:table-cell office:value-type="float" office:value="352" table:style-name="ce9">
            <text:p>352</text:p>
          </table:table-cell>
          <table:table-cell office:value-type="float" office:value="8093" table:formula="of:=SUM([.G43]+[.E43])" table:style-name="ce15">
            <text:p>8093</text:p>
          </table:table-cell>
          <table:table-cell office:value-type="float" office:value="-179" table:formula="of:=[.F43]-[.H43]" table:style-name="ce15">
            <text:p>-179</text:p>
          </table:table-cell>
          <table:table-cell office:value-type="percentage" office:value="8.8965772890151982E-3" table:formula="of:=([.I44]-[.I43])/[.I43]" table:style-name="ce16">
            <text:p>1%</text:p>
          </table:table-cell>
          <table:table-cell office:value-type="string" office:string-value="Valid" table:formula="of:=IF([.F43]&lt;=[.E43]; &quot;Valid&quot;; &quot;Invalid&quot;)" table:style-name="ce17">
            <text:p>Valid</text:p>
          </table:table-cell>
          <table:table-cell office:value-type="string" office:string-value="Valid" table:formula="of:=IF([.H43]&lt;=[.G43]; &quot;Valid&quot;; &quot;Invalid&quot;)" table:style-name="ce17">
            <text:p>Valid</text:p>
          </table:table-cell>
          <table:table-cell office:value-type="string" office:string-value="Stable/Reducing" table:formula="of:=IF([.J43]&gt;0; &quot;Increasing Pressure&quot;; &quot;Stable/Reducing&quot;)" table:style-name="ce18">
            <text:p>Stable/Reducing</text:p>
          </table:table-cell>
          <table:table-cell office:value-type="float" office:value="2.0346820809248554" table:formula="of:=IFERROR([.H43]/[.F43]; 0)" table:style-name="ce17">
            <text:p>2.034682081</text:p>
          </table:table-cell>
          <table:table-cell office:value-type="float" office:value="8259.8571428571431" table:formula="of:=AVERAGE([.I43:.I49])" table:style-name="ce15">
            <text:p>8260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3-27T00:00:00" table:style-name="ce14">
            <text:p>27-03-2023</text:p>
          </table:table-cell>
          <table:table-cell office:value-type="string" office:string-value="March" table:formula="of:=TEXT([.A44]; &quot;mmmm&quot;)" table:style-name="ce14">
            <text:p>March</text:p>
          </table:table-cell>
          <table:table-cell office:value-type="string" office:string-value="2023-03" table:formula="of:=TEXT([.A44]; &quot;yyyy-mm&quot;)" table:style-name="ce14">
            <text:p>2023-03</text:p>
          </table:table-cell>
          <table:table-cell office:value-type="float" office:value="84" table:style-name="ce9">
            <text:p>84</text:p>
          </table:table-cell>
          <table:table-cell office:value-type="float" office:value="171" table:style-name="ce9">
            <text:p>171</text:p>
          </table:table-cell>
          <table:table-cell office:value-type="float" office:value="157" table:style-name="ce9">
            <text:p>157</text:p>
          </table:table-cell>
          <table:table-cell office:value-type="float" office:value="7994" table:style-name="ce9">
            <text:p>7994</text:p>
          </table:table-cell>
          <table:table-cell office:value-type="float" office:value="235" table:style-name="ce9">
            <text:p>235</text:p>
          </table:table-cell>
          <table:table-cell office:value-type="float" office:value="8165" table:formula="of:=SUM([.G44]+[.E44])" table:style-name="ce15">
            <text:p>8165</text:p>
          </table:table-cell>
          <table:table-cell office:value-type="float" office:value="-78" table:formula="of:=[.F44]-[.H44]" table:style-name="ce15">
            <text:p>-78</text:p>
          </table:table-cell>
          <table:table-cell office:value-type="percentage" office:value="1.5064298836497245E-2" table:formula="of:=([.I45]-[.I44])/[.I44]" table:style-name="ce16">
            <text:p>2%</text:p>
          </table:table-cell>
          <table:table-cell office:value-type="string" office:string-value="Valid" table:formula="of:=IF([.F44]&lt;=[.E44]; &quot;Valid&quot;; &quot;Invalid&quot;)" table:style-name="ce17">
            <text:p>Valid</text:p>
          </table:table-cell>
          <table:table-cell office:value-type="string" office:string-value="Valid" table:formula="of:=IF([.H44]&lt;=[.G44]; &quot;Valid&quot;; &quot;Invalid&quot;)" table:style-name="ce17">
            <text:p>Valid</text:p>
          </table:table-cell>
          <table:table-cell office:value-type="string" office:string-value="Stable/Reducing" table:formula="of:=IF([.J44]&gt;0; &quot;Increasing Pressure&quot;; &quot;Stable/Reducing&quot;)" table:style-name="ce18">
            <text:p>Stable/Reducing</text:p>
          </table:table-cell>
          <table:table-cell office:value-type="float" office:value="1.4968152866242037" table:formula="of:=IFERROR([.H44]/[.F44]; 0)" table:style-name="ce17">
            <text:p>1.496815287</text:p>
          </table:table-cell>
          <table:table-cell office:value-type="float" office:value="8289.8571428571431" table:formula="of:=AVERAGE([.I44:.I50])" table:style-name="ce15">
            <text:p>8290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3-28T00:00:00" table:style-name="ce14">
            <text:p>28-03-2023</text:p>
          </table:table-cell>
          <table:table-cell office:value-type="string" office:string-value="March" table:formula="of:=TEXT([.A45]; &quot;mmmm&quot;)" table:style-name="ce14">
            <text:p>March</text:p>
          </table:table-cell>
          <table:table-cell office:value-type="string" office:string-value="2023-03" table:formula="of:=TEXT([.A45]; &quot;yyyy-mm&quot;)" table:style-name="ce14">
            <text:p>2023-03</text:p>
          </table:table-cell>
          <table:table-cell office:value-type="float" office:value="167" table:style-name="ce9">
            <text:p>167</text:p>
          </table:table-cell>
          <table:table-cell office:value-type="float" office:value="209" table:style-name="ce9">
            <text:p>209</text:p>
          </table:table-cell>
          <table:table-cell office:value-type="float" office:value="157" table:style-name="ce9">
            <text:p>157</text:p>
          </table:table-cell>
          <table:table-cell office:value-type="float" office:value="8079" table:style-name="ce9">
            <text:p>8079</text:p>
          </table:table-cell>
          <table:table-cell office:value-type="float" office:value="223" table:style-name="ce9">
            <text:p>223</text:p>
          </table:table-cell>
          <table:table-cell office:value-type="float" office:value="8288" table:formula="of:=SUM([.G45]+[.E45])" table:style-name="ce15">
            <text:p>8288</text:p>
          </table:table-cell>
          <table:table-cell office:value-type="float" office:value="-66" table:formula="of:=[.F45]-[.H45]" table:style-name="ce15">
            <text:p>-66</text:p>
          </table:table-cell>
          <table:table-cell office:value-type="percentage" office:value="1.9908301158301157E-2" table:formula="of:=([.I46]-[.I45])/[.I45]" table:style-name="ce16">
            <text:p>2%</text:p>
          </table:table-cell>
          <table:table-cell office:value-type="string" office:string-value="Valid" table:formula="of:=IF([.F45]&lt;=[.E45]; &quot;Valid&quot;; &quot;Invalid&quot;)" table:style-name="ce17">
            <text:p>Valid</text:p>
          </table:table-cell>
          <table:table-cell office:value-type="string" office:string-value="Valid" table:formula="of:=IF([.H45]&lt;=[.G45]; &quot;Valid&quot;; &quot;Invalid&quot;)" table:style-name="ce17">
            <text:p>Valid</text:p>
          </table:table-cell>
          <table:table-cell office:value-type="string" office:string-value="Stable/Reducing" table:formula="of:=IF([.J45]&gt;0; &quot;Increasing Pressure&quot;; &quot;Stable/Reducing&quot;)" table:style-name="ce18">
            <text:p>Stable/Reducing</text:p>
          </table:table-cell>
          <table:table-cell office:value-type="float" office:value="1.4203821656050954" table:formula="of:=IFERROR([.H45]/[.F45]; 0)" table:style-name="ce17">
            <text:p>1.420382166</text:p>
          </table:table-cell>
          <table:table-cell office:value-type="float" office:value="8326.2857142857138" table:formula="of:=AVERAGE([.I45:.I51])" table:style-name="ce15">
            <text:p>8326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3-29T00:00:00" table:style-name="ce14">
            <text:p>29-03-2023</text:p>
          </table:table-cell>
          <table:table-cell office:value-type="string" office:string-value="March" table:formula="of:=TEXT([.A46]; &quot;mmmm&quot;)" table:style-name="ce14">
            <text:p>March</text:p>
          </table:table-cell>
          <table:table-cell office:value-type="string" office:string-value="2023-03" table:formula="of:=TEXT([.A46]; &quot;yyyy-mm&quot;)" table:style-name="ce14">
            <text:p>2023-03</text:p>
          </table:table-cell>
          <table:table-cell office:value-type="float" office:value="109" table:style-name="ce9">
            <text:p>109</text:p>
          </table:table-cell>
          <table:table-cell office:value-type="float" office:value="245" table:style-name="ce9">
            <text:p>245</text:p>
          </table:table-cell>
          <table:table-cell office:value-type="float" office:value="159" table:style-name="ce9">
            <text:p>159</text:p>
          </table:table-cell>
          <table:table-cell office:value-type="float" office:value="8208" table:style-name="ce9">
            <text:p>8208</text:p>
          </table:table-cell>
          <table:table-cell office:value-type="float" office:value="267" table:style-name="ce9">
            <text:p>267</text:p>
          </table:table-cell>
          <table:table-cell office:value-type="float" office:value="8453" table:formula="of:=SUM([.G46]+[.E46])" table:style-name="ce15">
            <text:p>8453</text:p>
          </table:table-cell>
          <table:table-cell office:value-type="float" office:value="-108" table:formula="of:=[.F46]-[.H46]" table:style-name="ce15">
            <text:p>-108</text:p>
          </table:table-cell>
          <table:table-cell office:value-type="percentage" office:value="-4.6137465988406482E-3" table:formula="of:=([.I47]-[.I46])/[.I46]" table:style-name="ce16">
            <text:p>0%</text:p>
          </table:table-cell>
          <table:table-cell office:value-type="string" office:string-value="Valid" table:formula="of:=IF([.F46]&lt;=[.E46]; &quot;Valid&quot;; &quot;Invalid&quot;)" table:style-name="ce17">
            <text:p>Valid</text:p>
          </table:table-cell>
          <table:table-cell office:value-type="string" office:string-value="Valid" table:formula="of:=IF([.H46]&lt;=[.G46]; &quot;Valid&quot;; &quot;Invalid&quot;)" table:style-name="ce17">
            <text:p>Valid</text:p>
          </table:table-cell>
          <table:table-cell office:value-type="string" office:string-value="Stable/Reducing" table:formula="of:=IF([.J46]&gt;0; &quot;Increasing Pressure&quot;; &quot;Stable/Reducing&quot;)" table:style-name="ce18">
            <text:p>Stable/Reducing</text:p>
          </table:table-cell>
          <table:table-cell office:value-type="float" office:value="1.679245283018868" table:formula="of:=IFERROR([.H46]/[.F46]; 0)" table:style-name="ce17">
            <text:p>1.679245283</text:p>
          </table:table-cell>
          <table:table-cell office:value-type="float" office:value="8341.8571428571431" table:formula="of:=AVERAGE([.I46:.I52])" table:style-name="ce15">
            <text:p>8342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3-30T00:00:00" table:style-name="ce14">
            <text:p>30-03-2023</text:p>
          </table:table-cell>
          <table:table-cell office:value-type="string" office:string-value="March" table:formula="of:=TEXT([.A47]; &quot;mmmm&quot;)" table:style-name="ce14">
            <text:p>March</text:p>
          </table:table-cell>
          <table:table-cell office:value-type="string" office:string-value="2023-03" table:formula="of:=TEXT([.A47]; &quot;yyyy-mm&quot;)" table:style-name="ce14">
            <text:p>2023-03</text:p>
          </table:table-cell>
          <table:table-cell office:value-type="float" office:value="156" table:style-name="ce9">
            <text:p>156</text:p>
          </table:table-cell>
          <table:table-cell office:value-type="float" office:value="256" table:style-name="ce9">
            <text:p>256</text:p>
          </table:table-cell>
          <table:table-cell office:value-type="float" office:value="176" table:style-name="ce9">
            <text:p>176</text:p>
          </table:table-cell>
          <table:table-cell office:value-type="float" office:value="8158" table:style-name="ce9">
            <text:p>8158</text:p>
          </table:table-cell>
          <table:table-cell office:value-type="float" office:value="359" table:style-name="ce9">
            <text:p>359</text:p>
          </table:table-cell>
          <table:table-cell office:value-type="float" office:value="8414" table:formula="of:=SUM([.G47]+[.E47])" table:style-name="ce15">
            <text:p>8414</text:p>
          </table:table-cell>
          <table:table-cell office:value-type="float" office:value="-183" table:formula="of:=[.F47]-[.H47]" table:style-name="ce15">
            <text:p>-183</text:p>
          </table:table-cell>
          <table:table-cell office:value-type="percentage" office:value="-2.3888756833848349E-2" table:formula="of:=([.I48]-[.I47])/[.I47]" table:style-name="ce16">
            <text:p>-2%</text:p>
          </table:table-cell>
          <table:table-cell office:value-type="string" office:string-value="Valid" table:formula="of:=IF([.F47]&lt;=[.E47]; &quot;Valid&quot;; &quot;Invalid&quot;)" table:style-name="ce17">
            <text:p>Valid</text:p>
          </table:table-cell>
          <table:table-cell office:value-type="string" office:string-value="Valid" table:formula="of:=IF([.H47]&lt;=[.G47]; &quot;Valid&quot;; &quot;Invalid&quot;)" table:style-name="ce17">
            <text:p>Valid</text:p>
          </table:table-cell>
          <table:table-cell office:value-type="string" office:string-value="Stable/Reducing" table:formula="of:=IF([.J47]&gt;0; &quot;Increasing Pressure&quot;; &quot;Stable/Reducing&quot;)" table:style-name="ce18">
            <text:p>Stable/Reducing</text:p>
          </table:table-cell>
          <table:table-cell office:value-type="float" office:value="2.0397727272727271" table:formula="of:=IFERROR([.H47]/[.F47]; 0)" table:style-name="ce17">
            <text:p>2.039772727</text:p>
          </table:table-cell>
          <table:table-cell office:value-type="float" office:value="8292.8571428571431" table:formula="of:=AVERAGE([.I47:.I53])" table:style-name="ce15">
            <text:p>8293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4-02T00:00:00" table:style-name="ce14">
            <text:p>02-04-2023</text:p>
          </table:table-cell>
          <table:table-cell office:value-type="string" office:string-value="April" table:formula="of:=TEXT([.A48]; &quot;mmmm&quot;)" table:style-name="ce14">
            <text:p>April</text:p>
          </table:table-cell>
          <table:table-cell office:value-type="string" office:string-value="2023-04" table:formula="of:=TEXT([.A48]; &quot;yyyy-mm&quot;)" table:style-name="ce14">
            <text:p>2023-04</text:p>
          </table:table-cell>
          <table:table-cell office:value-type="float" office:value="125" table:style-name="ce9">
            <text:p>125</text:p>
          </table:table-cell>
          <table:table-cell office:value-type="float" office:value="232" table:style-name="ce9">
            <text:p>232</text:p>
          </table:table-cell>
          <table:table-cell office:value-type="float" office:value="192" table:style-name="ce9">
            <text:p>192</text:p>
          </table:table-cell>
          <table:table-cell office:value-type="float" office:value="7981" table:style-name="ce9">
            <text:p>7981</text:p>
          </table:table-cell>
          <table:table-cell office:value-type="float" office:value="304" table:style-name="ce9">
            <text:p>304</text:p>
          </table:table-cell>
          <table:table-cell office:value-type="float" office:value="8213" table:formula="of:=SUM([.G48]+[.E48])" table:style-name="ce15">
            <text:p>8213</text:p>
          </table:table-cell>
          <table:table-cell office:value-type="float" office:value="-112" table:formula="of:=[.F48]-[.H48]" table:style-name="ce15">
            <text:p>-112</text:p>
          </table:table-cell>
          <table:table-cell office:value-type="percentage" office:value="-2.4351637647631805E-3" table:formula="of:=([.I49]-[.I48])/[.I48]" table:style-name="ce16">
            <text:p>0%</text:p>
          </table:table-cell>
          <table:table-cell office:value-type="string" office:string-value="Valid" table:formula="of:=IF([.F48]&lt;=[.E48]; &quot;Valid&quot;; &quot;Invalid&quot;)" table:style-name="ce17">
            <text:p>Valid</text:p>
          </table:table-cell>
          <table:table-cell office:value-type="string" office:string-value="Valid" table:formula="of:=IF([.H48]&lt;=[.G48]; &quot;Valid&quot;; &quot;Invalid&quot;)" table:style-name="ce17">
            <text:p>Valid</text:p>
          </table:table-cell>
          <table:table-cell office:value-type="string" office:string-value="Stable/Reducing" table:formula="of:=IF([.J48]&gt;0; &quot;Increasing Pressure&quot;; &quot;Stable/Reducing&quot;)" table:style-name="ce18">
            <text:p>Stable/Reducing</text:p>
          </table:table-cell>
          <table:table-cell office:value-type="float" office:value="1.5833333333333333" table:formula="of:=IFERROR([.H48]/[.F48]; 0)" table:style-name="ce17">
            <text:p>1.583333333</text:p>
          </table:table-cell>
          <table:table-cell office:value-type="float" office:value="8237.8571428571431" table:formula="of:=AVERAGE([.I48:.I54])" table:style-name="ce15">
            <text:p>8238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4-03T00:00:00" table:style-name="ce14">
            <text:p>03-04-2023</text:p>
          </table:table-cell>
          <table:table-cell office:value-type="string" office:string-value="April" table:formula="of:=TEXT([.A49]; &quot;mmmm&quot;)" table:style-name="ce14">
            <text:p>April</text:p>
          </table:table-cell>
          <table:table-cell office:value-type="string" office:string-value="2023-04" table:formula="of:=TEXT([.A49]; &quot;yyyy-mm&quot;)" table:style-name="ce14">
            <text:p>2023-04</text:p>
          </table:table-cell>
          <table:table-cell office:value-type="float" office:value="118" table:style-name="ce9">
            <text:p>118</text:p>
          </table:table-cell>
          <table:table-cell office:value-type="float" office:value="139" table:style-name="ce9">
            <text:p>139</text:p>
          </table:table-cell>
          <table:table-cell office:value-type="float" office:value="168" table:style-name="ce9">
            <text:p>168</text:p>
          </table:table-cell>
          <table:table-cell office:value-type="float" office:value="8054" table:style-name="ce9">
            <text:p>8054</text:p>
          </table:table-cell>
          <table:table-cell office:value-type="float" office:value="284" table:style-name="ce9">
            <text:p>284</text:p>
          </table:table-cell>
          <table:table-cell office:value-type="float" office:value="8193" table:formula="of:=SUM([.G49]+[.E49])" table:style-name="ce15">
            <text:p>8193</text:p>
          </table:table-cell>
          <table:table-cell office:value-type="float" office:value="-116" table:formula="of:=[.F49]-[.H49]" table:style-name="ce15">
            <text:p>-116</text:p>
          </table:table-cell>
          <table:table-cell office:value-type="percentage" office:value="1.342609544733309E-2" table:formula="of:=([.I50]-[.I49])/[.I49]" table:style-name="ce16">
            <text:p>1%</text:p>
          </table:table-cell>
          <table:table-cell office:value-type="string" office:string-value="Invalid" table:formula="of:=IF([.F49]&lt;=[.E49]; &quot;Valid&quot;; &quot;Invalid&quot;)" table:style-name="ce17">
            <text:p>Invalid</text:p>
          </table:table-cell>
          <table:table-cell office:value-type="string" office:string-value="Valid" table:formula="of:=IF([.H49]&lt;=[.G49]; &quot;Valid&quot;; &quot;Invalid&quot;)" table:style-name="ce17">
            <text:p>Valid</text:p>
          </table:table-cell>
          <table:table-cell office:value-type="string" office:string-value="Stable/Reducing" table:formula="of:=IF([.J49]&gt;0; &quot;Increasing Pressure&quot;; &quot;Stable/Reducing&quot;)" table:style-name="ce18">
            <text:p>Stable/Reducing</text:p>
          </table:table-cell>
          <table:table-cell office:value-type="float" office:value="1.6904761904761905" table:formula="of:=IFERROR([.H49]/[.F49]; 0)" table:style-name="ce17">
            <text:p>1.69047619</text:p>
          </table:table-cell>
          <table:table-cell office:value-type="float" office:value="8226.1428571428569" table:formula="of:=AVERAGE([.I49:.I55])" table:style-name="ce15">
            <text:p>8226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4-04T00:00:00" table:style-name="ce14">
            <text:p>04-04-2023</text:p>
          </table:table-cell>
          <table:table-cell office:value-type="string" office:string-value="April" table:formula="of:=TEXT([.A50]; &quot;mmmm&quot;)" table:style-name="ce14">
            <text:p>April</text:p>
          </table:table-cell>
          <table:table-cell office:value-type="string" office:string-value="2023-04" table:formula="of:=TEXT([.A50]; &quot;yyyy-mm&quot;)" table:style-name="ce14">
            <text:p>2023-04</text:p>
          </table:table-cell>
          <table:table-cell office:value-type="float" office:value="142" table:style-name="ce9">
            <text:p>142</text:p>
          </table:table-cell>
          <table:table-cell office:value-type="float" office:value="235" table:style-name="ce9">
            <text:p>235</text:p>
          </table:table-cell>
          <table:table-cell office:value-type="float" office:value="139" table:style-name="ce9">
            <text:p>139</text:p>
          </table:table-cell>
          <table:table-cell office:value-type="float" office:value="8068" table:style-name="ce9">
            <text:p>8068</text:p>
          </table:table-cell>
          <table:table-cell office:value-type="float" office:value="259" table:style-name="ce9">
            <text:p>259</text:p>
          </table:table-cell>
          <table:table-cell office:value-type="float" office:value="8303" table:formula="of:=SUM([.G50]+[.E50])" table:style-name="ce15">
            <text:p>8303</text:p>
          </table:table-cell>
          <table:table-cell office:value-type="float" office:value="-120" table:formula="of:=[.F50]-[.H50]" table:style-name="ce15">
            <text:p>-120</text:p>
          </table:table-cell>
          <table:table-cell office:value-type="percentage" office:value="1.4091292303986511E-2" table:formula="of:=([.I51]-[.I50])/[.I50]" table:style-name="ce16">
            <text:p>1%</text:p>
          </table:table-cell>
          <table:table-cell office:value-type="string" office:string-value="Valid" table:formula="of:=IF([.F50]&lt;=[.E50]; &quot;Valid&quot;; &quot;Invalid&quot;)" table:style-name="ce17">
            <text:p>Valid</text:p>
          </table:table-cell>
          <table:table-cell office:value-type="string" office:string-value="Valid" table:formula="of:=IF([.H50]&lt;=[.G50]; &quot;Valid&quot;; &quot;Invalid&quot;)" table:style-name="ce17">
            <text:p>Valid</text:p>
          </table:table-cell>
          <table:table-cell office:value-type="string" office:string-value="Stable/Reducing" table:formula="of:=IF([.J50]&gt;0; &quot;Increasing Pressure&quot;; &quot;Stable/Reducing&quot;)" table:style-name="ce18">
            <text:p>Stable/Reducing</text:p>
          </table:table-cell>
          <table:table-cell office:value-type="float" office:value="1.8633093525179856" table:formula="of:=IFERROR([.H50]/[.F50]; 0)" table:style-name="ce17">
            <text:p>1.863309353</text:p>
          </table:table-cell>
          <table:table-cell office:value-type="float" office:value="8211.1428571428569" table:formula="of:=AVERAGE([.I50:.I56])" table:style-name="ce15">
            <text:p>8211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4-05T00:00:00" table:style-name="ce14">
            <text:p>05-04-2023</text:p>
          </table:table-cell>
          <table:table-cell office:value-type="string" office:string-value="April" table:formula="of:=TEXT([.A51]; &quot;mmmm&quot;)" table:style-name="ce14">
            <text:p>April</text:p>
          </table:table-cell>
          <table:table-cell office:value-type="string" office:string-value="2023-04" table:formula="of:=TEXT([.A51]; &quot;yyyy-mm&quot;)" table:style-name="ce14">
            <text:p>2023-04</text:p>
          </table:table-cell>
          <table:table-cell office:value-type="float" office:value="148" table:style-name="ce9">
            <text:p>148</text:p>
          </table:table-cell>
          <table:table-cell office:value-type="float" office:value="245" table:style-name="ce9">
            <text:p>245</text:p>
          </table:table-cell>
          <table:table-cell office:value-type="float" office:value="175" table:style-name="ce9">
            <text:p>175</text:p>
          </table:table-cell>
          <table:table-cell office:value-type="float" office:value="8175" table:style-name="ce9">
            <text:p>8175</text:p>
          </table:table-cell>
          <table:table-cell office:value-type="float" office:value="260" table:style-name="ce9">
            <text:p>260</text:p>
          </table:table-cell>
          <table:table-cell office:value-type="float" office:value="8420" table:formula="of:=SUM([.G51]+[.E51])" table:style-name="ce15">
            <text:p>8420</text:p>
          </table:table-cell>
          <table:table-cell office:value-type="float" office:value="-85" table:formula="of:=[.F51]-[.H51]" table:style-name="ce15">
            <text:p>-85</text:p>
          </table:table-cell>
          <table:table-cell office:value-type="percentage" office:value="-2.7315914489311165E-3" table:formula="of:=([.I52]-[.I51])/[.I51]" table:style-name="ce16">
            <text:p>0%</text:p>
          </table:table-cell>
          <table:table-cell office:value-type="string" office:string-value="Valid" table:formula="of:=IF([.F51]&lt;=[.E51]; &quot;Valid&quot;; &quot;Invalid&quot;)" table:style-name="ce17">
            <text:p>Valid</text:p>
          </table:table-cell>
          <table:table-cell office:value-type="string" office:string-value="Valid" table:formula="of:=IF([.H51]&lt;=[.G51]; &quot;Valid&quot;; &quot;Invalid&quot;)" table:style-name="ce17">
            <text:p>Valid</text:p>
          </table:table-cell>
          <table:table-cell office:value-type="string" office:string-value="Stable/Reducing" table:formula="of:=IF([.J51]&gt;0; &quot;Increasing Pressure&quot;; &quot;Stable/Reducing&quot;)" table:style-name="ce18">
            <text:p>Stable/Reducing</text:p>
          </table:table-cell>
          <table:table-cell office:value-type="float" office:value="1.4857142857142858" table:formula="of:=IFERROR([.H51]/[.F51]; 0)" table:style-name="ce17">
            <text:p>1.485714286</text:p>
          </table:table-cell>
          <table:table-cell office:value-type="float" office:value="8169.1428571428569" table:formula="of:=AVERAGE([.I51:.I57])" table:style-name="ce15">
            <text:p>8169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4-06T00:00:00" table:style-name="ce14">
            <text:p>06-04-2023</text:p>
          </table:table-cell>
          <table:table-cell office:value-type="string" office:string-value="April" table:formula="of:=TEXT([.A52]; &quot;mmmm&quot;)" table:style-name="ce14">
            <text:p>April</text:p>
          </table:table-cell>
          <table:table-cell office:value-type="string" office:string-value="2023-04" table:formula="of:=TEXT([.A52]; &quot;yyyy-mm&quot;)" table:style-name="ce14">
            <text:p>2023-04</text:p>
          </table:table-cell>
          <table:table-cell office:value-type="float" office:value="119" table:style-name="ce9">
            <text:p>119</text:p>
          </table:table-cell>
          <table:table-cell office:value-type="float" office:value="219" table:style-name="ce9">
            <text:p>219</text:p>
          </table:table-cell>
          <table:table-cell office:value-type="float" office:value="210" table:style-name="ce9">
            <text:p>210</text:p>
          </table:table-cell>
          <table:table-cell office:value-type="float" office:value="8178" table:style-name="ce9">
            <text:p>8178</text:p>
          </table:table-cell>
          <table:table-cell office:value-type="float" office:value="284" table:style-name="ce9">
            <text:p>284</text:p>
          </table:table-cell>
          <table:table-cell office:value-type="float" office:value="8397" table:formula="of:=SUM([.G52]+[.E52])" table:style-name="ce15">
            <text:p>8397</text:p>
          </table:table-cell>
          <table:table-cell office:value-type="float" office:value="-74" table:formula="of:=[.F52]-[.H52]" table:style-name="ce15">
            <text:p>-74</text:p>
          </table:table-cell>
          <table:table-cell office:value-type="percentage" office:value="-3.4178873407169227E-2" table:formula="of:=([.I53]-[.I52])/[.I52]" table:style-name="ce16">
            <text:p>-3%</text:p>
          </table:table-cell>
          <table:table-cell office:value-type="string" office:string-value="Valid" table:formula="of:=IF([.F52]&lt;=[.E52]; &quot;Valid&quot;; &quot;Invalid&quot;)" table:style-name="ce17">
            <text:p>Valid</text:p>
          </table:table-cell>
          <table:table-cell office:value-type="string" office:string-value="Valid" table:formula="of:=IF([.H52]&lt;=[.G52]; &quot;Valid&quot;; &quot;Invalid&quot;)" table:style-name="ce17">
            <text:p>Valid</text:p>
          </table:table-cell>
          <table:table-cell office:value-type="string" office:string-value="Stable/Reducing" table:formula="of:=IF([.J52]&gt;0; &quot;Increasing Pressure&quot;; &quot;Stable/Reducing&quot;)" table:style-name="ce18">
            <text:p>Stable/Reducing</text:p>
          </table:table-cell>
          <table:table-cell office:value-type="float" office:value="1.3523809523809525" table:formula="of:=IFERROR([.H52]/[.F52]; 0)" table:style-name="ce17">
            <text:p>1.352380952</text:p>
          </table:table-cell>
          <table:table-cell office:value-type="float" office:value="8061" table:formula="of:=AVERAGE([.I52:.I58])" table:style-name="ce15">
            <text:p>8061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4-09T00:00:00" table:style-name="ce14">
            <text:p>09-04-2023</text:p>
          </table:table-cell>
          <table:table-cell office:value-type="string" office:string-value="April" table:formula="of:=TEXT([.A53]; &quot;mmmm&quot;)" table:style-name="ce14">
            <text:p>April</text:p>
          </table:table-cell>
          <table:table-cell office:value-type="string" office:string-value="2023-04" table:formula="of:=TEXT([.A53]; &quot;yyyy-mm&quot;)" table:style-name="ce14">
            <text:p>2023-04</text:p>
          </table:table-cell>
          <table:table-cell office:value-type="float" office:value="105" table:style-name="ce9">
            <text:p>105</text:p>
          </table:table-cell>
          <table:table-cell office:value-type="float" office:value="210" table:style-name="ce9">
            <text:p>210</text:p>
          </table:table-cell>
          <table:table-cell office:value-type="float" office:value="149" table:style-name="ce9">
            <text:p>149</text:p>
          </table:table-cell>
          <table:table-cell office:value-type="float" office:value="7900" table:style-name="ce9">
            <text:p>7900</text:p>
          </table:table-cell>
          <table:table-cell office:value-type="float" office:value="329" table:style-name="ce9">
            <text:p>329</text:p>
          </table:table-cell>
          <table:table-cell office:value-type="float" office:value="8110" table:formula="of:=SUM([.G53]+[.E53])" table:style-name="ce15">
            <text:p>8110</text:p>
          </table:table-cell>
          <table:table-cell office:value-type="float" office:value="-180" table:formula="of:=[.F53]-[.H53]" table:style-name="ce15">
            <text:p>-180</text:p>
          </table:table-cell>
          <table:table-cell office:value-type="percentage" office:value="-9.9876695437731196E-3" table:formula="of:=([.I54]-[.I53])/[.I53]" table:style-name="ce16">
            <text:p>-1%</text:p>
          </table:table-cell>
          <table:table-cell office:value-type="string" office:string-value="Valid" table:formula="of:=IF([.F53]&lt;=[.E53]; &quot;Valid&quot;; &quot;Invalid&quot;)" table:style-name="ce17">
            <text:p>Valid</text:p>
          </table:table-cell>
          <table:table-cell office:value-type="string" office:string-value="Valid" table:formula="of:=IF([.H53]&lt;=[.G53]; &quot;Valid&quot;; &quot;Invalid&quot;)" table:style-name="ce17">
            <text:p>Valid</text:p>
          </table:table-cell>
          <table:table-cell office:value-type="string" office:string-value="Stable/Reducing" table:formula="of:=IF([.J53]&gt;0; &quot;Increasing Pressure&quot;; &quot;Stable/Reducing&quot;)" table:style-name="ce18">
            <text:p>Stable/Reducing</text:p>
          </table:table-cell>
          <table:table-cell office:value-type="float" office:value="2.2080536912751678" table:formula="of:=IFERROR([.H53]/[.F53]; 0)" table:style-name="ce17">
            <text:p>2.208053691</text:p>
          </table:table-cell>
          <table:table-cell office:value-type="float" office:value="7953" table:formula="of:=AVERAGE([.I53:.I59])" table:style-name="ce15">
            <text:p>7953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4-10T00:00:00" table:style-name="ce14">
            <text:p>10-04-2023</text:p>
          </table:table-cell>
          <table:table-cell office:value-type="string" office:string-value="April" table:formula="of:=TEXT([.A54]; &quot;mmmm&quot;)" table:style-name="ce14">
            <text:p>April</text:p>
          </table:table-cell>
          <table:table-cell office:value-type="string" office:string-value="2023-04" table:formula="of:=TEXT([.A54]; &quot;yyyy-mm&quot;)" table:style-name="ce14">
            <text:p>2023-04</text:p>
          </table:table-cell>
          <table:table-cell office:value-type="float" office:value="143" table:style-name="ce9">
            <text:p>143</text:p>
          </table:table-cell>
          <table:table-cell office:value-type="float" office:value="203" table:style-name="ce9">
            <text:p>203</text:p>
          </table:table-cell>
          <table:table-cell office:value-type="float" office:value="163" table:style-name="ce9">
            <text:p>163</text:p>
          </table:table-cell>
          <table:table-cell office:value-type="float" office:value="7826" table:style-name="ce9">
            <text:p>7826</text:p>
          </table:table-cell>
          <table:table-cell office:value-type="float" office:value="265" table:style-name="ce9">
            <text:p>265</text:p>
          </table:table-cell>
          <table:table-cell office:value-type="float" office:value="8029" table:formula="of:=SUM([.G54]+[.E54])" table:style-name="ce15">
            <text:p>8029</text:p>
          </table:table-cell>
          <table:table-cell office:value-type="float" office:value="-102" table:formula="of:=[.F54]-[.H54]" table:style-name="ce15">
            <text:p>-102</text:p>
          </table:table-cell>
          <table:table-cell office:value-type="percentage" office:value="1.2703948187819156E-2" table:formula="of:=([.I55]-[.I54])/[.I54]" table:style-name="ce16">
            <text:p>1%</text:p>
          </table:table-cell>
          <table:table-cell office:value-type="string" office:string-value="Valid" table:formula="of:=IF([.F54]&lt;=[.E54]; &quot;Valid&quot;; &quot;Invalid&quot;)" table:style-name="ce17">
            <text:p>Valid</text:p>
          </table:table-cell>
          <table:table-cell office:value-type="string" office:string-value="Valid" table:formula="of:=IF([.H54]&lt;=[.G54]; &quot;Valid&quot;; &quot;Invalid&quot;)" table:style-name="ce17">
            <text:p>Valid</text:p>
          </table:table-cell>
          <table:table-cell office:value-type="string" office:string-value="Stable/Reducing" table:formula="of:=IF([.J54]&gt;0; &quot;Increasing Pressure&quot;; &quot;Stable/Reducing&quot;)" table:style-name="ce18">
            <text:p>Stable/Reducing</text:p>
          </table:table-cell>
          <table:table-cell office:value-type="float" office:value="1.6257668711656441" table:formula="of:=IFERROR([.H54]/[.F54]; 0)" table:style-name="ce17">
            <text:p>1.625766871</text:p>
          </table:table-cell>
          <table:table-cell office:value-type="float" office:value="7887" table:formula="of:=AVERAGE([.I54:.I60])" table:style-name="ce15">
            <text:p>7887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4-11T00:00:00" table:style-name="ce14">
            <text:p>11-04-2023</text:p>
          </table:table-cell>
          <table:table-cell office:value-type="string" office:string-value="April" table:formula="of:=TEXT([.A55]; &quot;mmmm&quot;)" table:style-name="ce14">
            <text:p>April</text:p>
          </table:table-cell>
          <table:table-cell office:value-type="string" office:string-value="2023-04" table:formula="of:=TEXT([.A55]; &quot;yyyy-mm&quot;)" table:style-name="ce14">
            <text:p>2023-04</text:p>
          </table:table-cell>
          <table:table-cell office:value-type="float" office:value="119" table:style-name="ce9">
            <text:p>119</text:p>
          </table:table-cell>
          <table:table-cell office:value-type="float" office:value="209" table:style-name="ce9">
            <text:p>209</text:p>
          </table:table-cell>
          <table:table-cell office:value-type="float" office:value="152" table:style-name="ce9">
            <text:p>152</text:p>
          </table:table-cell>
          <table:table-cell office:value-type="float" office:value="7922" table:style-name="ce9">
            <text:p>7922</text:p>
          </table:table-cell>
          <table:table-cell office:value-type="float" office:value="187" table:style-name="ce9">
            <text:p>187</text:p>
          </table:table-cell>
          <table:table-cell office:value-type="float" office:value="8131" table:formula="of:=SUM([.G55]+[.E55])" table:style-name="ce15">
            <text:p>8131</text:p>
          </table:table-cell>
          <table:table-cell office:value-type="float" office:value="-35" table:formula="of:=[.F55]-[.H55]" table:style-name="ce15">
            <text:p>-35</text:p>
          </table:table-cell>
          <table:table-cell office:value-type="percentage" office:value="-5.2884024105276104E-3" table:formula="of:=([.I56]-[.I55])/[.I55]" table:style-name="ce16">
            <text:p>-1%</text:p>
          </table:table-cell>
          <table:table-cell office:value-type="string" office:string-value="Valid" table:formula="of:=IF([.F55]&lt;=[.E55]; &quot;Valid&quot;; &quot;Invalid&quot;)" table:style-name="ce17">
            <text:p>Valid</text:p>
          </table:table-cell>
          <table:table-cell office:value-type="string" office:string-value="Valid" table:formula="of:=IF([.H55]&lt;=[.G55]; &quot;Valid&quot;; &quot;Invalid&quot;)" table:style-name="ce17">
            <text:p>Valid</text:p>
          </table:table-cell>
          <table:table-cell office:value-type="string" office:string-value="Stable/Reducing" table:formula="of:=IF([.J55]&gt;0; &quot;Increasing Pressure&quot;; &quot;Stable/Reducing&quot;)" table:style-name="ce18">
            <text:p>Stable/Reducing</text:p>
          </table:table-cell>
          <table:table-cell office:value-type="float" office:value="1.2302631578947369" table:formula="of:=IFERROR([.H55]/[.F55]; 0)" table:style-name="ce17">
            <text:p>1.230263158</text:p>
          </table:table-cell>
          <table:table-cell office:value-type="float" office:value="7843.2857142857147" table:formula="of:=AVERAGE([.I55:.I61])" table:style-name="ce15">
            <text:p>7843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4-12T00:00:00" table:style-name="ce14">
            <text:p>12-04-2023</text:p>
          </table:table-cell>
          <table:table-cell office:value-type="string" office:string-value="April" table:formula="of:=TEXT([.A56]; &quot;mmmm&quot;)" table:style-name="ce14">
            <text:p>April</text:p>
          </table:table-cell>
          <table:table-cell office:value-type="string" office:string-value="2023-04" table:formula="of:=TEXT([.A56]; &quot;yyyy-mm&quot;)" table:style-name="ce14">
            <text:p>2023-04</text:p>
          </table:table-cell>
          <table:table-cell office:value-type="float" office:value="155" table:style-name="ce9">
            <text:p>155</text:p>
          </table:table-cell>
          <table:table-cell office:value-type="float" office:value="212" table:style-name="ce9">
            <text:p>212</text:p>
          </table:table-cell>
          <table:table-cell office:value-type="float" office:value="181" table:style-name="ce9">
            <text:p>181</text:p>
          </table:table-cell>
          <table:table-cell office:value-type="float" office:value="7876" table:style-name="ce9">
            <text:p>7876</text:p>
          </table:table-cell>
          <table:table-cell office:value-type="float" office:value="283" table:style-name="ce9">
            <text:p>283</text:p>
          </table:table-cell>
          <table:table-cell office:value-type="float" office:value="8088" table:formula="of:=SUM([.G56]+[.E56])" table:style-name="ce15">
            <text:p>8088</text:p>
          </table:table-cell>
          <table:table-cell office:value-type="float" office:value="-102" table:formula="of:=[.F56]-[.H56]" table:style-name="ce15">
            <text:p>-102</text:p>
          </table:table-cell>
          <table:table-cell office:value-type="percentage" office:value="-9.7675568743817998E-3" table:formula="of:=([.I57]-[.I56])/[.I56]" table:style-name="ce16">
            <text:p>-1%</text:p>
          </table:table-cell>
          <table:table-cell office:value-type="string" office:string-value="Valid" table:formula="of:=IF([.F56]&lt;=[.E56]; &quot;Valid&quot;; &quot;Invalid&quot;)" table:style-name="ce17">
            <text:p>Valid</text:p>
          </table:table-cell>
          <table:table-cell office:value-type="string" office:string-value="Valid" table:formula="of:=IF([.H56]&lt;=[.G56]; &quot;Valid&quot;; &quot;Invalid&quot;)" table:style-name="ce17">
            <text:p>Valid</text:p>
          </table:table-cell>
          <table:table-cell office:value-type="string" office:string-value="Stable/Reducing" table:formula="of:=IF([.J56]&gt;0; &quot;Increasing Pressure&quot;; &quot;Stable/Reducing&quot;)" table:style-name="ce18">
            <text:p>Stable/Reducing</text:p>
          </table:table-cell>
          <table:table-cell office:value-type="float" office:value="1.5635359116022098" table:formula="of:=IFERROR([.H56]/[.F56]; 0)" table:style-name="ce17">
            <text:p>1.563535912</text:p>
          </table:table-cell>
          <table:table-cell office:value-type="float" office:value="7791.7142857142853" table:formula="of:=AVERAGE([.I56:.I62])" table:style-name="ce15">
            <text:p>7792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4-13T00:00:00" table:style-name="ce14">
            <text:p>13-04-2023</text:p>
          </table:table-cell>
          <table:table-cell office:value-type="string" office:string-value="April" table:formula="of:=TEXT([.A57]; &quot;mmmm&quot;)" table:style-name="ce14">
            <text:p>April</text:p>
          </table:table-cell>
          <table:table-cell office:value-type="string" office:string-value="2023-04" table:formula="of:=TEXT([.A57]; &quot;yyyy-mm&quot;)" table:style-name="ce14">
            <text:p>2023-04</text:p>
          </table:table-cell>
          <table:table-cell office:value-type="float" office:value="109" table:style-name="ce9">
            <text:p>109</text:p>
          </table:table-cell>
          <table:table-cell office:value-type="float" office:value="214" table:style-name="ce9">
            <text:p>214</text:p>
          </table:table-cell>
          <table:table-cell office:value-type="float" office:value="173" table:style-name="ce9">
            <text:p>173</text:p>
          </table:table-cell>
          <table:table-cell office:value-type="float" office:value="7795" table:style-name="ce9">
            <text:p>7795</text:p>
          </table:table-cell>
          <table:table-cell office:value-type="float" office:value="370" table:style-name="ce9">
            <text:p>370</text:p>
          </table:table-cell>
          <table:table-cell office:value-type="float" office:value="8009" table:formula="of:=SUM([.G57]+[.E57])" table:style-name="ce15">
            <text:p>8009</text:p>
          </table:table-cell>
          <table:table-cell office:value-type="float" office:value="-197" table:formula="of:=[.F57]-[.H57]" table:style-name="ce15">
            <text:p>-197</text:p>
          </table:table-cell>
          <table:table-cell office:value-type="percentage" office:value="-4.3201398426769885E-2" table:formula="of:=([.I58]-[.I57])/[.I57]" table:style-name="ce16">
            <text:p>-4%</text:p>
          </table:table-cell>
          <table:table-cell office:value-type="string" office:string-value="Valid" table:formula="of:=IF([.F57]&lt;=[.E57]; &quot;Valid&quot;; &quot;Invalid&quot;)" table:style-name="ce17">
            <text:p>Valid</text:p>
          </table:table-cell>
          <table:table-cell office:value-type="string" office:string-value="Valid" table:formula="of:=IF([.H57]&lt;=[.G57]; &quot;Valid&quot;; &quot;Invalid&quot;)" table:style-name="ce17">
            <text:p>Valid</text:p>
          </table:table-cell>
          <table:table-cell office:value-type="string" office:string-value="Stable/Reducing" table:formula="of:=IF([.J57]&gt;0; &quot;Increasing Pressure&quot;; &quot;Stable/Reducing&quot;)" table:style-name="ce18">
            <text:p>Stable/Reducing</text:p>
          </table:table-cell>
          <table:table-cell office:value-type="float" office:value="2.1387283236994219" table:formula="of:=IFERROR([.H57]/[.F57]; 0)" table:style-name="ce17">
            <text:p>2.138728324</text:p>
          </table:table-cell>
          <table:table-cell office:value-type="float" office:value="7756.2857142857147" table:formula="of:=AVERAGE([.I57:.I63])" table:style-name="ce15">
            <text:p>7756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4-16T00:00:00" table:style-name="ce14">
            <text:p>16-04-2023</text:p>
          </table:table-cell>
          <table:table-cell office:value-type="string" office:string-value="April" table:formula="of:=TEXT([.A58]; &quot;mmmm&quot;)" table:style-name="ce14">
            <text:p>April</text:p>
          </table:table-cell>
          <table:table-cell office:value-type="string" office:string-value="2023-04" table:formula="of:=TEXT([.A58]; &quot;yyyy-mm&quot;)" table:style-name="ce14">
            <text:p>2023-04</text:p>
          </table:table-cell>
          <table:table-cell office:value-type="float" office:value="191" table:style-name="ce9">
            <text:p>191</text:p>
          </table:table-cell>
          <table:table-cell office:value-type="float" office:value="283" table:style-name="ce9">
            <text:p>283</text:p>
          </table:table-cell>
          <table:table-cell office:value-type="float" office:value="192" table:style-name="ce9">
            <text:p>192</text:p>
          </table:table-cell>
          <table:table-cell office:value-type="float" office:value="7380" table:style-name="ce9">
            <text:p>7380</text:p>
          </table:table-cell>
          <table:table-cell office:value-type="float" office:value="272" table:style-name="ce9">
            <text:p>272</text:p>
          </table:table-cell>
          <table:table-cell office:value-type="float" office:value="7663" table:formula="of:=SUM([.G58]+[.E58])" table:style-name="ce15">
            <text:p>7663</text:p>
          </table:table-cell>
          <table:table-cell office:value-type="float" office:value="-80" table:formula="of:=[.F58]-[.H58]" table:style-name="ce15">
            <text:p>-80</text:p>
          </table:table-cell>
          <table:table-cell office:value-type="percentage" office:value="-2.8709382748270912E-3" table:formula="of:=([.I59]-[.I58])/[.I58]" table:style-name="ce16">
            <text:p>0%</text:p>
          </table:table-cell>
          <table:table-cell office:value-type="string" office:string-value="Valid" table:formula="of:=IF([.F58]&lt;=[.E58]; &quot;Valid&quot;; &quot;Invalid&quot;)" table:style-name="ce17">
            <text:p>Valid</text:p>
          </table:table-cell>
          <table:table-cell office:value-type="string" office:string-value="Valid" table:formula="of:=IF([.H58]&lt;=[.G58]; &quot;Valid&quot;; &quot;Invalid&quot;)" table:style-name="ce17">
            <text:p>Valid</text:p>
          </table:table-cell>
          <table:table-cell office:value-type="string" office:string-value="Stable/Reducing" table:formula="of:=IF([.J58]&gt;0; &quot;Increasing Pressure&quot;; &quot;Stable/Reducing&quot;)" table:style-name="ce18">
            <text:p>Stable/Reducing</text:p>
          </table:table-cell>
          <table:table-cell office:value-type="float" office:value="1.4166666666666667" table:formula="of:=IFERROR([.H58]/[.F58]; 0)" table:style-name="ce17">
            <text:p>1.416666667</text:p>
          </table:table-cell>
          <table:table-cell office:value-type="float" office:value="7773" table:formula="of:=AVERAGE([.I58:.I64])" table:style-name="ce15">
            <text:p>7773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4-17T00:00:00" table:style-name="ce14">
            <text:p>17-04-2023</text:p>
          </table:table-cell>
          <table:table-cell office:value-type="string" office:string-value="April" table:formula="of:=TEXT([.A59]; &quot;mmmm&quot;)" table:style-name="ce14">
            <text:p>April</text:p>
          </table:table-cell>
          <table:table-cell office:value-type="string" office:string-value="2023-04" table:formula="of:=TEXT([.A59]; &quot;yyyy-mm&quot;)" table:style-name="ce14">
            <text:p>2023-04</text:p>
          </table:table-cell>
          <table:table-cell office:value-type="float" office:value="170" table:style-name="ce9">
            <text:p>170</text:p>
          </table:table-cell>
          <table:table-cell office:value-type="float" office:value="297" table:style-name="ce9">
            <text:p>297</text:p>
          </table:table-cell>
          <table:table-cell office:value-type="float" office:value="196" table:style-name="ce9">
            <text:p>196</text:p>
          </table:table-cell>
          <table:table-cell office:value-type="float" office:value="7344" table:style-name="ce9">
            <text:p>7344</text:p>
          </table:table-cell>
          <table:table-cell office:value-type="float" office:value="248" table:style-name="ce9">
            <text:p>248</text:p>
          </table:table-cell>
          <table:table-cell office:value-type="float" office:value="7641" table:formula="of:=SUM([.G59]+[.E59])" table:style-name="ce15">
            <text:p>7641</text:p>
          </table:table-cell>
          <table:table-cell office:value-type="float" office:value="-52" table:formula="of:=[.F59]-[.H59]" table:style-name="ce15">
            <text:p>-52</text:p>
          </table:table-cell>
          <table:table-cell office:value-type="percentage" office:value="9.1611045674649917E-4" table:formula="of:=([.I60]-[.I59])/[.I59]" table:style-name="ce16">
            <text:p>0%</text:p>
          </table:table-cell>
          <table:table-cell office:value-type="string" office:string-value="Valid" table:formula="of:=IF([.F59]&lt;=[.E59]; &quot;Valid&quot;; &quot;Invalid&quot;)" table:style-name="ce17">
            <text:p>Valid</text:p>
          </table:table-cell>
          <table:table-cell office:value-type="string" office:string-value="Valid" table:formula="of:=IF([.H59]&lt;=[.G59]; &quot;Valid&quot;; &quot;Invalid&quot;)" table:style-name="ce17">
            <text:p>Valid</text:p>
          </table:table-cell>
          <table:table-cell office:value-type="string" office:string-value="Stable/Reducing" table:formula="of:=IF([.J59]&gt;0; &quot;Increasing Pressure&quot;; &quot;Stable/Reducing&quot;)" table:style-name="ce18">
            <text:p>Stable/Reducing</text:p>
          </table:table-cell>
          <table:table-cell office:value-type="float" office:value="1.2653061224489797" table:formula="of:=IFERROR([.H59]/[.F59]; 0)" table:style-name="ce17">
            <text:p>1.265306122</text:p>
          </table:table-cell>
          <table:table-cell office:value-type="float" office:value="7856.4285714285716" table:formula="of:=AVERAGE([.I59:.I65])" table:style-name="ce15">
            <text:p>7856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4-18T00:00:00" table:style-name="ce14">
            <text:p>18-04-2023</text:p>
          </table:table-cell>
          <table:table-cell office:value-type="string" office:string-value="April" table:formula="of:=TEXT([.A60]; &quot;mmmm&quot;)" table:style-name="ce14">
            <text:p>April</text:p>
          </table:table-cell>
          <table:table-cell office:value-type="string" office:string-value="2023-04" table:formula="of:=TEXT([.A60]; &quot;yyyy-mm&quot;)" table:style-name="ce14">
            <text:p>2023-04</text:p>
          </table:table-cell>
          <table:table-cell office:value-type="float" office:value="152" table:style-name="ce9">
            <text:p>152</text:p>
          </table:table-cell>
          <table:table-cell office:value-type="float" office:value="272" table:style-name="ce9">
            <text:p>272</text:p>
          </table:table-cell>
          <table:table-cell office:value-type="float" office:value="214" table:style-name="ce9">
            <text:p>214</text:p>
          </table:table-cell>
          <table:table-cell office:value-type="float" office:value="7376" table:style-name="ce9">
            <text:p>7376</text:p>
          </table:table-cell>
          <table:table-cell office:value-type="float" office:value="234" table:style-name="ce9">
            <text:p>234</text:p>
          </table:table-cell>
          <table:table-cell office:value-type="float" office:value="7648" table:formula="of:=SUM([.G60]+[.E60])" table:style-name="ce15">
            <text:p>7648</text:p>
          </table:table-cell>
          <table:table-cell office:value-type="float" office:value="-20" table:formula="of:=[.F60]-[.H60]" table:style-name="ce15">
            <text:p>-20</text:p>
          </table:table-cell>
          <table:table-cell office:value-type="percentage" office:value="9.8064853556485351E-3" table:formula="of:=([.I61]-[.I60])/[.I60]" table:style-name="ce16">
            <text:p>1%</text:p>
          </table:table-cell>
          <table:table-cell office:value-type="string" office:string-value="Valid" table:formula="of:=IF([.F60]&lt;=[.E60]; &quot;Valid&quot;; &quot;Invalid&quot;)" table:style-name="ce17">
            <text:p>Valid</text:p>
          </table:table-cell>
          <table:table-cell office:value-type="string" office:string-value="Valid" table:formula="of:=IF([.H60]&lt;=[.G60]; &quot;Valid&quot;; &quot;Invalid&quot;)" table:style-name="ce17">
            <text:p>Valid</text:p>
          </table:table-cell>
          <table:table-cell office:value-type="string" office:string-value="Stable/Reducing" table:formula="of:=IF([.J60]&gt;0; &quot;Increasing Pressure&quot;; &quot;Stable/Reducing&quot;)" table:style-name="ce18">
            <text:p>Stable/Reducing</text:p>
          </table:table-cell>
          <table:table-cell office:value-type="float" office:value="1.0934579439252337" table:formula="of:=IFERROR([.H60]/[.F60]; 0)" table:style-name="ce17">
            <text:p>1.093457944</text:p>
          </table:table-cell>
          <table:table-cell office:value-type="float" office:value="7959.4285714285716" table:formula="of:=AVERAGE([.I60:.I66])" table:style-name="ce15">
            <text:p>7959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4-19T00:00:00" table:style-name="ce14">
            <text:p>19-04-2023</text:p>
          </table:table-cell>
          <table:table-cell office:value-type="string" office:string-value="April" table:formula="of:=TEXT([.A61]; &quot;mmmm&quot;)" table:style-name="ce14">
            <text:p>April</text:p>
          </table:table-cell>
          <table:table-cell office:value-type="string" office:string-value="2023-04" table:formula="of:=TEXT([.A61]; &quot;yyyy-mm&quot;)" table:style-name="ce14">
            <text:p>2023-04</text:p>
          </table:table-cell>
          <table:table-cell office:value-type="float" office:value="239" table:style-name="ce9">
            <text:p>239</text:p>
          </table:table-cell>
          <table:table-cell office:value-type="float" office:value="367" table:style-name="ce9">
            <text:p>367</text:p>
          </table:table-cell>
          <table:table-cell office:value-type="float" office:value="224" table:style-name="ce9">
            <text:p>224</text:p>
          </table:table-cell>
          <table:table-cell office:value-type="float" office:value="7356" table:style-name="ce9">
            <text:p>7356</text:p>
          </table:table-cell>
          <table:table-cell office:value-type="float" office:value="229" table:style-name="ce9">
            <text:p>229</text:p>
          </table:table-cell>
          <table:table-cell office:value-type="float" office:value="7723" table:formula="of:=SUM([.G61]+[.E61])" table:style-name="ce15">
            <text:p>7723</text:p>
          </table:table-cell>
          <table:table-cell office:value-type="float" office:value="-5" table:formula="of:=[.F61]-[.H61]" table:style-name="ce15">
            <text:p>-5</text:p>
          </table:table-cell>
          <table:table-cell office:value-type="percentage" office:value="6.0857179852388966E-3" table:formula="of:=([.I62]-[.I61])/[.I61]" table:style-name="ce16">
            <text:p>1%</text:p>
          </table:table-cell>
          <table:table-cell office:value-type="string" office:string-value="Valid" table:formula="of:=IF([.F61]&lt;=[.E61]; &quot;Valid&quot;; &quot;Invalid&quot;)" table:style-name="ce17">
            <text:p>Valid</text:p>
          </table:table-cell>
          <table:table-cell office:value-type="string" office:string-value="Valid" table:formula="of:=IF([.H61]&lt;=[.G61]; &quot;Valid&quot;; &quot;Invalid&quot;)" table:style-name="ce17">
            <text:p>Valid</text:p>
          </table:table-cell>
          <table:table-cell office:value-type="string" office:string-value="Stable/Reducing" table:formula="of:=IF([.J61]&gt;0; &quot;Increasing Pressure&quot;; &quot;Stable/Reducing&quot;)" table:style-name="ce18">
            <text:p>Stable/Reducing</text:p>
          </table:table-cell>
          <table:table-cell office:value-type="float" office:value="1.0223214285714286" table:formula="of:=IFERROR([.H61]/[.F61]; 0)" table:style-name="ce17">
            <text:p>1.022321429</text:p>
          </table:table-cell>
          <table:table-cell office:value-type="float" office:value="8072.8571428571431" table:formula="of:=AVERAGE([.I61:.I67])" table:style-name="ce15">
            <text:p>8073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4-20T00:00:00" table:style-name="ce14">
            <text:p>20-04-2023</text:p>
          </table:table-cell>
          <table:table-cell office:value-type="string" office:string-value="April" table:formula="of:=TEXT([.A62]; &quot;mmmm&quot;)" table:style-name="ce14">
            <text:p>April</text:p>
          </table:table-cell>
          <table:table-cell office:value-type="string" office:string-value="2023-04" table:formula="of:=TEXT([.A62]; &quot;yyyy-mm&quot;)" table:style-name="ce14">
            <text:p>2023-04</text:p>
          </table:table-cell>
          <table:table-cell office:value-type="float" office:value="113" table:style-name="ce9">
            <text:p>113</text:p>
          </table:table-cell>
          <table:table-cell office:value-type="float" office:value="280" table:style-name="ce9">
            <text:p>280</text:p>
          </table:table-cell>
          <table:table-cell office:value-type="float" office:value="237" table:style-name="ce9">
            <text:p>237</text:p>
          </table:table-cell>
          <table:table-cell office:value-type="float" office:value="7490" table:style-name="ce9">
            <text:p>7490</text:p>
          </table:table-cell>
          <table:table-cell office:value-type="float" office:value="320" table:style-name="ce9">
            <text:p>320</text:p>
          </table:table-cell>
          <table:table-cell office:value-type="float" office:value="7770" table:formula="of:=SUM([.G62]+[.E62])" table:style-name="ce15">
            <text:p>7770</text:p>
          </table:table-cell>
          <table:table-cell office:value-type="float" office:value="-83" table:formula="of:=[.F62]-[.H62]" table:style-name="ce15">
            <text:p>-83</text:p>
          </table:table-cell>
          <table:table-cell office:value-type="percentage" office:value="9.0090090090090089E-3" table:formula="of:=([.I63]-[.I62])/[.I62]" table:style-name="ce16">
            <text:p>1%</text:p>
          </table:table-cell>
          <table:table-cell office:value-type="string" office:string-value="Valid" table:formula="of:=IF([.F62]&lt;=[.E62]; &quot;Valid&quot;; &quot;Invalid&quot;)" table:style-name="ce17">
            <text:p>Valid</text:p>
          </table:table-cell>
          <table:table-cell office:value-type="string" office:string-value="Valid" table:formula="of:=IF([.H62]&lt;=[.G62]; &quot;Valid&quot;; &quot;Invalid&quot;)" table:style-name="ce17">
            <text:p>Valid</text:p>
          </table:table-cell>
          <table:table-cell office:value-type="string" office:string-value="Stable/Reducing" table:formula="of:=IF([.J62]&gt;0; &quot;Increasing Pressure&quot;; &quot;Stable/Reducing&quot;)" table:style-name="ce18">
            <text:p>Stable/Reducing</text:p>
          </table:table-cell>
          <table:table-cell office:value-type="float" office:value="1.350210970464135" table:formula="of:=IFERROR([.H62]/[.F62]; 0)" table:style-name="ce17">
            <text:p>1.35021097</text:p>
          </table:table-cell>
          <table:table-cell office:value-type="float" office:value="8197.4285714285706" table:formula="of:=AVERAGE([.I62:.I68])" table:style-name="ce15">
            <text:p>8197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4-23T00:00:00" table:style-name="ce14">
            <text:p>23-04-2023</text:p>
          </table:table-cell>
          <table:table-cell office:value-type="string" office:string-value="April" table:formula="of:=TEXT([.A63]; &quot;mmmm&quot;)" table:style-name="ce14">
            <text:p>April</text:p>
          </table:table-cell>
          <table:table-cell office:value-type="string" office:string-value="2023-04" table:formula="of:=TEXT([.A63]; &quot;yyyy-mm&quot;)" table:style-name="ce14">
            <text:p>2023-04</text:p>
          </table:table-cell>
          <table:table-cell office:value-type="float" office:value="196" table:style-name="ce9">
            <text:p>196</text:p>
          </table:table-cell>
          <table:table-cell office:value-type="float" office:value="306" table:style-name="ce9">
            <text:p>306</text:p>
          </table:table-cell>
          <table:table-cell office:value-type="float" office:value="187" table:style-name="ce9">
            <text:p>187</text:p>
          </table:table-cell>
          <table:table-cell office:value-type="float" office:value="7534" table:style-name="ce9">
            <text:p>7534</text:p>
          </table:table-cell>
          <table:table-cell office:value-type="float" office:value="266" table:style-name="ce9">
            <text:p>266</text:p>
          </table:table-cell>
          <table:table-cell office:value-type="float" office:value="7840" table:formula="of:=SUM([.G63]+[.E63])" table:style-name="ce15">
            <text:p>7840</text:p>
          </table:table-cell>
          <table:table-cell office:value-type="float" office:value="-79" table:formula="of:=[.F63]-[.H63]" table:style-name="ce15">
            <text:p>-79</text:p>
          </table:table-cell>
          <table:table-cell office:value-type="percentage" office:value="3.6479591836734694E-2" table:formula="of:=([.I64]-[.I63])/[.I63]" table:style-name="ce16">
            <text:p>4%</text:p>
          </table:table-cell>
          <table:table-cell office:value-type="string" office:string-value="Valid" table:formula="of:=IF([.F63]&lt;=[.E63]; &quot;Valid&quot;; &quot;Invalid&quot;)" table:style-name="ce17">
            <text:p>Valid</text:p>
          </table:table-cell>
          <table:table-cell office:value-type="string" office:string-value="Valid" table:formula="of:=IF([.H63]&lt;=[.G63]; &quot;Valid&quot;; &quot;Invalid&quot;)" table:style-name="ce17">
            <text:p>Valid</text:p>
          </table:table-cell>
          <table:table-cell office:value-type="string" office:string-value="Stable/Reducing" table:formula="of:=IF([.J63]&gt;0; &quot;Increasing Pressure&quot;; &quot;Stable/Reducing&quot;)" table:style-name="ce18">
            <text:p>Stable/Reducing</text:p>
          </table:table-cell>
          <table:table-cell office:value-type="float" office:value="1.4224598930481283" table:formula="of:=IFERROR([.H63]/[.F63]; 0)" table:style-name="ce17">
            <text:p>1.422459893</text:p>
          </table:table-cell>
          <table:table-cell office:value-type="float" office:value="8345.5714285714294" table:formula="of:=AVERAGE([.I63:.I69])" table:style-name="ce15">
            <text:p>8346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4-24T00:00:00" table:style-name="ce14">
            <text:p>24-04-2023</text:p>
          </table:table-cell>
          <table:table-cell office:value-type="string" office:string-value="April" table:formula="of:=TEXT([.A64]; &quot;mmmm&quot;)" table:style-name="ce14">
            <text:p>April</text:p>
          </table:table-cell>
          <table:table-cell office:value-type="string" office:string-value="2023-04" table:formula="of:=TEXT([.A64]; &quot;yyyy-mm&quot;)" table:style-name="ce14">
            <text:p>2023-04</text:p>
          </table:table-cell>
          <table:table-cell office:value-type="float" office:value="236" table:style-name="ce9">
            <text:p>236</text:p>
          </table:table-cell>
          <table:table-cell office:value-type="float" office:value="330" table:style-name="ce9">
            <text:p>330</text:p>
          </table:table-cell>
          <table:table-cell office:value-type="float" office:value="222" table:style-name="ce9">
            <text:p>222</text:p>
          </table:table-cell>
          <table:table-cell office:value-type="float" office:value="7796" table:style-name="ce9">
            <text:p>7796</text:p>
          </table:table-cell>
          <table:table-cell office:value-type="float" office:value="213" table:style-name="ce9">
            <text:p>213</text:p>
          </table:table-cell>
          <table:table-cell office:value-type="float" office:value="8126" table:formula="of:=SUM([.G64]+[.E64])" table:style-name="ce15">
            <text:p>8126</text:p>
          </table:table-cell>
          <table:table-cell office:value-type="float" office:value="9" table:formula="of:=[.F64]-[.H64]" table:style-name="ce15">
            <text:p>9</text:p>
          </table:table-cell>
          <table:table-cell office:value-type="percentage" office:value="1.4890475018459267E-2" table:formula="of:=([.I65]-[.I64])/[.I64]" table:style-name="ce16">
            <text:p>1%</text:p>
          </table:table-cell>
          <table:table-cell office:value-type="string" office:string-value="Valid" table:formula="of:=IF([.F64]&lt;=[.E64]; &quot;Valid&quot;; &quot;Invalid&quot;)" table:style-name="ce17">
            <text:p>Valid</text:p>
          </table:table-cell>
          <table:table-cell office:value-type="string" office:string-value="Valid" table:formula="of:=IF([.H64]&lt;=[.G64]; &quot;Valid&quot;; &quot;Invalid&quot;)" table:style-name="ce17">
            <text:p>Valid</text:p>
          </table:table-cell>
          <table:table-cell office:value-type="string" office:string-value="Increasing Pressure" table:formula="of:=IF([.J64]&gt;0; &quot;Increasing Pressure&quot;; &quot;Stable/Reducing&quot;)" table:style-name="ce18">
            <text:p>Increasing Pressure</text:p>
          </table:table-cell>
          <table:table-cell office:value-type="float" office:value="0.95945945945945943" table:formula="of:=IFERROR([.H64]/[.F64]; 0)" table:style-name="ce17">
            <text:p>0.959459459</text:p>
          </table:table-cell>
          <table:table-cell office:value-type="float" office:value="8508.4285714285706" table:formula="of:=AVERAGE([.I64:.I70])" table:style-name="ce15">
            <text:p>8508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4-25T00:00:00" table:style-name="ce14">
            <text:p>25-04-2023</text:p>
          </table:table-cell>
          <table:table-cell office:value-type="string" office:string-value="April" table:formula="of:=TEXT([.A65]; &quot;mmmm&quot;)" table:style-name="ce14">
            <text:p>April</text:p>
          </table:table-cell>
          <table:table-cell office:value-type="string" office:string-value="2023-04" table:formula="of:=TEXT([.A65]; &quot;yyyy-mm&quot;)" table:style-name="ce14">
            <text:p>2023-04</text:p>
          </table:table-cell>
          <table:table-cell office:value-type="float" office:value="81" table:style-name="ce9">
            <text:p>81</text:p>
          </table:table-cell>
          <table:table-cell office:value-type="float" office:value="230" table:style-name="ce9">
            <text:p>230</text:p>
          </table:table-cell>
          <table:table-cell office:value-type="float" office:value="242" table:style-name="ce9">
            <text:p>242</text:p>
          </table:table-cell>
          <table:table-cell office:value-type="float" office:value="8017" table:style-name="ce9">
            <text:p>8017</text:p>
          </table:table-cell>
          <table:table-cell office:value-type="float" office:value="202" table:style-name="ce9">
            <text:p>202</text:p>
          </table:table-cell>
          <table:table-cell office:value-type="float" office:value="8247" table:formula="of:=SUM([.G65]+[.E65])" table:style-name="ce15">
            <text:p>8247</text:p>
          </table:table-cell>
          <table:table-cell office:value-type="float" office:value="40" table:formula="of:=[.F65]-[.H65]" table:style-name="ce15">
            <text:p>40</text:p>
          </table:table-cell>
          <table:table-cell office:value-type="percentage" office:value="1.3944464653813509E-2" table:formula="of:=([.I66]-[.I65])/[.I65]" table:style-name="ce16">
            <text:p>1%</text:p>
          </table:table-cell>
          <table:table-cell office:value-type="string" office:string-value="Invalid" table:formula="of:=IF([.F65]&lt;=[.E65]; &quot;Valid&quot;; &quot;Invalid&quot;)" table:style-name="ce17">
            <text:p>Invalid</text:p>
          </table:table-cell>
          <table:table-cell office:value-type="string" office:string-value="Valid" table:formula="of:=IF([.H65]&lt;=[.G65]; &quot;Valid&quot;; &quot;Invalid&quot;)" table:style-name="ce17">
            <text:p>Valid</text:p>
          </table:table-cell>
          <table:table-cell office:value-type="string" office:string-value="Increasing Pressure" table:formula="of:=IF([.J65]&gt;0; &quot;Increasing Pressure&quot;; &quot;Stable/Reducing&quot;)" table:style-name="ce18">
            <text:p>Increasing Pressure</text:p>
          </table:table-cell>
          <table:table-cell office:value-type="float" office:value="0.83471074380165289" table:formula="of:=IFERROR([.H65]/[.F65]; 0)" table:style-name="ce17">
            <text:p>0.834710744</text:p>
          </table:table-cell>
          <table:table-cell office:value-type="float" office:value="8641.4285714285706" table:formula="of:=AVERAGE([.I65:.I71])" table:style-name="ce15">
            <text:p>8641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4-26T00:00:00" table:style-name="ce14">
            <text:p>26-04-2023</text:p>
          </table:table-cell>
          <table:table-cell office:value-type="string" office:string-value="April" table:formula="of:=TEXT([.A66]; &quot;mmmm&quot;)" table:style-name="ce14">
            <text:p>April</text:p>
          </table:table-cell>
          <table:table-cell office:value-type="string" office:string-value="2023-04" table:formula="of:=TEXT([.A66]; &quot;yyyy-mm&quot;)" table:style-name="ce14">
            <text:p>2023-04</text:p>
          </table:table-cell>
          <table:table-cell office:value-type="float" office:value="118" table:style-name="ce9">
            <text:p>118</text:p>
          </table:table-cell>
          <table:table-cell office:value-type="float" office:value="245" table:style-name="ce9">
            <text:p>245</text:p>
          </table:table-cell>
          <table:table-cell office:value-type="float" office:value="160" table:style-name="ce9">
            <text:p>160</text:p>
          </table:table-cell>
          <table:table-cell office:value-type="float" office:value="8117" table:style-name="ce9">
            <text:p>8117</text:p>
          </table:table-cell>
          <table:table-cell office:value-type="float" office:value="256" table:style-name="ce9">
            <text:p>256</text:p>
          </table:table-cell>
          <table:table-cell office:value-type="float" office:value="8362" table:formula="of:=SUM([.G66]+[.E66])" table:style-name="ce15">
            <text:p>8362</text:p>
          </table:table-cell>
          <table:table-cell office:value-type="float" office:value="-96" table:formula="of:=[.F66]-[.H66]" table:style-name="ce15">
            <text:p>-96</text:p>
          </table:table-cell>
          <table:table-cell office:value-type="percentage" office:value="9.5670892131069114E-3" table:formula="of:=([.I67]-[.I66])/[.I66]" table:style-name="ce16">
            <text:p>1%</text:p>
          </table:table-cell>
          <table:table-cell office:value-type="string" office:string-value="Valid" table:formula="of:=IF([.F66]&lt;=[.E66]; &quot;Valid&quot;; &quot;Invalid&quot;)" table:style-name="ce17">
            <text:p>Valid</text:p>
          </table:table-cell>
          <table:table-cell office:value-type="string" office:string-value="Valid" table:formula="of:=IF([.H66]&lt;=[.G66]; &quot;Valid&quot;; &quot;Invalid&quot;)" table:style-name="ce17">
            <text:p>Valid</text:p>
          </table:table-cell>
          <table:table-cell office:value-type="string" office:string-value="Stable/Reducing" table:formula="of:=IF([.J66]&gt;0; &quot;Increasing Pressure&quot;; &quot;Stable/Reducing&quot;)" table:style-name="ce18">
            <text:p>Stable/Reducing</text:p>
          </table:table-cell>
          <table:table-cell office:value-type="float" office:value="1.6" table:formula="of:=IFERROR([.H66]/[.F66]; 0)" table:style-name="ce17">
            <text:p>1.6</text:p>
          </table:table-cell>
          <table:table-cell office:value-type="float" office:value="8755.1428571428569" table:formula="of:=AVERAGE([.I66:.I72])" table:style-name="ce15">
            <text:p>8755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4-27T00:00:00" table:style-name="ce14">
            <text:p>27-04-2023</text:p>
          </table:table-cell>
          <table:table-cell office:value-type="string" office:string-value="April" table:formula="of:=TEXT([.A67]; &quot;mmmm&quot;)" table:style-name="ce14">
            <text:p>April</text:p>
          </table:table-cell>
          <table:table-cell office:value-type="string" office:string-value="2023-04" table:formula="of:=TEXT([.A67]; &quot;yyyy-mm&quot;)" table:style-name="ce14">
            <text:p>2023-04</text:p>
          </table:table-cell>
          <table:table-cell office:value-type="float" office:value="218" table:style-name="ce9">
            <text:p>218</text:p>
          </table:table-cell>
          <table:table-cell office:value-type="float" office:value="283" table:style-name="ce9">
            <text:p>283</text:p>
          </table:table-cell>
          <table:table-cell office:value-type="float" office:value="208" table:style-name="ce9">
            <text:p>208</text:p>
          </table:table-cell>
          <table:table-cell office:value-type="float" office:value="8159" table:style-name="ce9">
            <text:p>8159</text:p>
          </table:table-cell>
          <table:table-cell office:value-type="float" office:value="310" table:style-name="ce9">
            <text:p>310</text:p>
          </table:table-cell>
          <table:table-cell office:value-type="float" office:value="8442" table:formula="of:=SUM([.G67]+[.E67])" table:style-name="ce15">
            <text:p>8442</text:p>
          </table:table-cell>
          <table:table-cell office:value-type="float" office:value="-102" table:formula="of:=[.F67]-[.H67]" table:style-name="ce15">
            <text:p>-102</text:p>
          </table:table-cell>
          <table:table-cell office:value-type="percentage" office:value="1.8123667377398719E-2" table:formula="of:=([.I68]-[.I67])/[.I67]" table:style-name="ce16">
            <text:p>2%</text:p>
          </table:table-cell>
          <table:table-cell office:value-type="string" office:string-value="Valid" table:formula="of:=IF([.F67]&lt;=[.E67]; &quot;Valid&quot;; &quot;Invalid&quot;)" table:style-name="ce17">
            <text:p>Valid</text:p>
          </table:table-cell>
          <table:table-cell office:value-type="string" office:string-value="Valid" table:formula="of:=IF([.H67]&lt;=[.G67]; &quot;Valid&quot;; &quot;Invalid&quot;)" table:style-name="ce17">
            <text:p>Valid</text:p>
          </table:table-cell>
          <table:table-cell office:value-type="string" office:string-value="Stable/Reducing" table:formula="of:=IF([.J67]&gt;0; &quot;Increasing Pressure&quot;; &quot;Stable/Reducing&quot;)" table:style-name="ce18">
            <text:p>Stable/Reducing</text:p>
          </table:table-cell>
          <table:table-cell office:value-type="float" office:value="1.4903846153846154" table:formula="of:=IFERROR([.H67]/[.F67]; 0)" table:style-name="ce17">
            <text:p>1.490384615</text:p>
          </table:table-cell>
          <table:table-cell office:value-type="float" office:value="8820.8571428571431" table:formula="of:=AVERAGE([.I67:.I73])" table:style-name="ce15">
            <text:p>8821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4-30T00:00:00" table:style-name="ce14">
            <text:p>30-04-2023</text:p>
          </table:table-cell>
          <table:table-cell office:value-type="string" office:string-value="April" table:formula="of:=TEXT([.A68]; &quot;mmmm&quot;)" table:style-name="ce14">
            <text:p>April</text:p>
          </table:table-cell>
          <table:table-cell office:value-type="string" office:string-value="2023-04" table:formula="of:=TEXT([.A68]; &quot;yyyy-mm&quot;)" table:style-name="ce14">
            <text:p>2023-04</text:p>
          </table:table-cell>
          <table:table-cell office:value-type="float" office:value="132" table:style-name="ce9">
            <text:p>132</text:p>
          </table:table-cell>
          <table:table-cell office:value-type="float" office:value="243" table:style-name="ce9">
            <text:p>243</text:p>
          </table:table-cell>
          <table:table-cell office:value-type="float" office:value="183" table:style-name="ce9">
            <text:p>183</text:p>
          </table:table-cell>
          <table:table-cell office:value-type="float" office:value="8352" table:style-name="ce9">
            <text:p>8352</text:p>
          </table:table-cell>
          <table:table-cell office:value-type="float" office:value="293" table:style-name="ce9">
            <text:p>293</text:p>
          </table:table-cell>
          <table:table-cell office:value-type="float" office:value="8595" table:formula="of:=SUM([.G68]+[.E68])" table:style-name="ce15">
            <text:p>8595</text:p>
          </table:table-cell>
          <table:table-cell office:value-type="float" office:value="-110" table:formula="of:=[.F68]-[.H68]" table:style-name="ce15">
            <text:p>-110</text:p>
          </table:table-cell>
          <table:table-cell office:value-type="percentage" office:value="2.4665503199534613E-2" table:formula="of:=([.I69]-[.I68])/[.I68]" table:style-name="ce16">
            <text:p>2%</text:p>
          </table:table-cell>
          <table:table-cell office:value-type="string" office:string-value="Valid" table:formula="of:=IF([.F68]&lt;=[.E68]; &quot;Valid&quot;; &quot;Invalid&quot;)" table:style-name="ce17">
            <text:p>Valid</text:p>
          </table:table-cell>
          <table:table-cell office:value-type="string" office:string-value="Valid" table:formula="of:=IF([.H68]&lt;=[.G68]; &quot;Valid&quot;; &quot;Invalid&quot;)" table:style-name="ce17">
            <text:p>Valid</text:p>
          </table:table-cell>
          <table:table-cell office:value-type="string" office:string-value="Stable/Reducing" table:formula="of:=IF([.J68]&gt;0; &quot;Increasing Pressure&quot;; &quot;Stable/Reducing&quot;)" table:style-name="ce18">
            <text:p>Stable/Reducing</text:p>
          </table:table-cell>
          <table:table-cell office:value-type="float" office:value="1.6010928961748634" table:formula="of:=IFERROR([.H68]/[.F68]; 0)" table:style-name="ce17">
            <text:p>1.601092896</text:p>
          </table:table-cell>
          <table:table-cell office:value-type="float" office:value="8883" table:formula="of:=AVERAGE([.I68:.I74])" table:style-name="ce15">
            <text:p>8883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5-01T00:00:00" table:style-name="ce14">
            <text:p>01-05-2023</text:p>
          </table:table-cell>
          <table:table-cell office:value-type="string" office:string-value="May" table:formula="of:=TEXT([.A69]; &quot;mmmm&quot;)" table:style-name="ce14">
            <text:p>May</text:p>
          </table:table-cell>
          <table:table-cell office:value-type="string" office:string-value="2023-05" table:formula="of:=TEXT([.A69]; &quot;yyyy-mm&quot;)" table:style-name="ce14">
            <text:p>2023-05</text:p>
          </table:table-cell>
          <table:table-cell office:value-type="float" office:value="224" table:style-name="ce9">
            <text:p>224</text:p>
          </table:table-cell>
          <table:table-cell office:value-type="float" office:value="315" table:style-name="ce9">
            <text:p>315</text:p>
          </table:table-cell>
          <table:table-cell office:value-type="float" office:value="152" table:style-name="ce9">
            <text:p>152</text:p>
          </table:table-cell>
          <table:table-cell office:value-type="float" office:value="8492" table:style-name="ce9">
            <text:p>8492</text:p>
          </table:table-cell>
          <table:table-cell office:value-type="float" office:value="237" table:style-name="ce9">
            <text:p>237</text:p>
          </table:table-cell>
          <table:table-cell office:value-type="float" office:value="8807" table:formula="of:=SUM([.G69]+[.E69])" table:style-name="ce15">
            <text:p>8807</text:p>
          </table:table-cell>
          <table:table-cell office:value-type="float" office:value="-85" table:formula="of:=[.F69]-[.H69]" table:style-name="ce15">
            <text:p>-85</text:p>
          </table:table-cell>
          <table:table-cell office:value-type="percentage" office:value="1.964346542522993E-2" table:formula="of:=([.I70]-[.I69])/[.I69]" table:style-name="ce16">
            <text:p>2%</text:p>
          </table:table-cell>
          <table:table-cell office:value-type="string" office:string-value="Valid" table:formula="of:=IF([.F69]&lt;=[.E69]; &quot;Valid&quot;; &quot;Invalid&quot;)" table:style-name="ce17">
            <text:p>Valid</text:p>
          </table:table-cell>
          <table:table-cell office:value-type="string" office:string-value="Valid" table:formula="of:=IF([.H69]&lt;=[.G69]; &quot;Valid&quot;; &quot;Invalid&quot;)" table:style-name="ce17">
            <text:p>Valid</text:p>
          </table:table-cell>
          <table:table-cell office:value-type="string" office:string-value="Stable/Reducing" table:formula="of:=IF([.J69]&gt;0; &quot;Increasing Pressure&quot;; &quot;Stable/Reducing&quot;)" table:style-name="ce18">
            <text:p>Stable/Reducing</text:p>
          </table:table-cell>
          <table:table-cell office:value-type="float" office:value="1.5592105263157894" table:formula="of:=IFERROR([.H69]/[.F69]; 0)" table:style-name="ce17">
            <text:p>1.559210526</text:p>
          </table:table-cell>
          <table:table-cell office:value-type="float" office:value="8928.8571428571431" table:formula="of:=AVERAGE([.I69:.I75])" table:style-name="ce15">
            <text:p>8929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5-02T00:00:00" table:style-name="ce14">
            <text:p>02-05-2023</text:p>
          </table:table-cell>
          <table:table-cell office:value-type="string" office:string-value="May" table:formula="of:=TEXT([.A70]; &quot;mmmm&quot;)" table:style-name="ce14">
            <text:p>May</text:p>
          </table:table-cell>
          <table:table-cell office:value-type="string" office:string-value="2023-05" table:formula="of:=TEXT([.A70]; &quot;yyyy-mm&quot;)" table:style-name="ce14">
            <text:p>2023-05</text:p>
          </table:table-cell>
          <table:table-cell office:value-type="float" office:value="167" table:style-name="ce9">
            <text:p>167</text:p>
          </table:table-cell>
          <table:table-cell office:value-type="float" office:value="326" table:style-name="ce9">
            <text:p>326</text:p>
          </table:table-cell>
          <table:table-cell office:value-type="float" office:value="213" table:style-name="ce9">
            <text:p>213</text:p>
          </table:table-cell>
          <table:table-cell office:value-type="float" office:value="8654" table:style-name="ce9">
            <text:p>8654</text:p>
          </table:table-cell>
          <table:table-cell office:value-type="float" office:value="245" table:style-name="ce9">
            <text:p>245</text:p>
          </table:table-cell>
          <table:table-cell office:value-type="float" office:value="8980" table:formula="of:=SUM([.G70]+[.E70])" table:style-name="ce15">
            <text:p>8980</text:p>
          </table:table-cell>
          <table:table-cell office:value-type="float" office:value="-32" table:formula="of:=[.F70]-[.H70]" table:style-name="ce15">
            <text:p>-32</text:p>
          </table:table-cell>
          <table:table-cell office:value-type="percentage" office:value="8.5746102449888641E-3" table:formula="of:=([.I71]-[.I70])/[.I70]" table:style-name="ce16">
            <text:p>1%</text:p>
          </table:table-cell>
          <table:table-cell office:value-type="string" office:string-value="Valid" table:formula="of:=IF([.F70]&lt;=[.E70]; &quot;Valid&quot;; &quot;Invalid&quot;)" table:style-name="ce17">
            <text:p>Valid</text:p>
          </table:table-cell>
          <table:table-cell office:value-type="string" office:string-value="Valid" table:formula="of:=IF([.H70]&lt;=[.G70]; &quot;Valid&quot;; &quot;Invalid&quot;)" table:style-name="ce17">
            <text:p>Valid</text:p>
          </table:table-cell>
          <table:table-cell office:value-type="string" office:string-value="Stable/Reducing" table:formula="of:=IF([.J70]&gt;0; &quot;Increasing Pressure&quot;; &quot;Stable/Reducing&quot;)" table:style-name="ce18">
            <text:p>Stable/Reducing</text:p>
          </table:table-cell>
          <table:table-cell office:value-type="float" office:value="1.1502347417840375" table:formula="of:=IFERROR([.H70]/[.F70]; 0)" table:style-name="ce17">
            <text:p>1.150234742</text:p>
          </table:table-cell>
          <table:table-cell office:value-type="float" office:value="8951.5714285714294" table:formula="of:=AVERAGE([.I70:.I76])" table:style-name="ce15">
            <text:p>8952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5-03T00:00:00" table:style-name="ce14">
            <text:p>03-05-2023</text:p>
          </table:table-cell>
          <table:table-cell office:value-type="string" office:string-value="May" table:formula="of:=TEXT([.A71]; &quot;mmmm&quot;)" table:style-name="ce14">
            <text:p>May</text:p>
          </table:table-cell>
          <table:table-cell office:value-type="string" office:string-value="2023-05" table:formula="of:=TEXT([.A71]; &quot;yyyy-mm&quot;)" table:style-name="ce14">
            <text:p>2023-05</text:p>
          </table:table-cell>
          <table:table-cell office:value-type="float" office:value="209" table:style-name="ce9">
            <text:p>209</text:p>
          </table:table-cell>
          <table:table-cell office:value-type="float" office:value="353" table:style-name="ce9">
            <text:p>353</text:p>
          </table:table-cell>
          <table:table-cell office:value-type="float" office:value="232" table:style-name="ce9">
            <text:p>232</text:p>
          </table:table-cell>
          <table:table-cell office:value-type="float" office:value="8704" table:style-name="ce9">
            <text:p>8704</text:p>
          </table:table-cell>
          <table:table-cell office:value-type="float" office:value="267" table:style-name="ce9">
            <text:p>267</text:p>
          </table:table-cell>
          <table:table-cell office:value-type="float" office:value="9057" table:formula="of:=SUM([.G71]+[.E71])" table:style-name="ce15">
            <text:p>9057</text:p>
          </table:table-cell>
          <table:table-cell office:value-type="float" office:value="-35" table:formula="of:=[.F71]-[.H71]" table:style-name="ce15">
            <text:p>-35</text:p>
          </table:table-cell>
          <table:table-cell office:value-type="percentage" office:value="-1.5457657060836921E-3" table:formula="of:=([.I72]-[.I71])/[.I71]" table:style-name="ce16">
            <text:p>0%</text:p>
          </table:table-cell>
          <table:table-cell office:value-type="string" office:string-value="Valid" table:formula="of:=IF([.F71]&lt;=[.E71]; &quot;Valid&quot;; &quot;Invalid&quot;)" table:style-name="ce17">
            <text:p>Valid</text:p>
          </table:table-cell>
          <table:table-cell office:value-type="string" office:string-value="Valid" table:formula="of:=IF([.H71]&lt;=[.G71]; &quot;Valid&quot;; &quot;Invalid&quot;)" table:style-name="ce17">
            <text:p>Valid</text:p>
          </table:table-cell>
          <table:table-cell office:value-type="string" office:string-value="Stable/Reducing" table:formula="of:=IF([.J71]&gt;0; &quot;Increasing Pressure&quot;; &quot;Stable/Reducing&quot;)" table:style-name="ce18">
            <text:p>Stable/Reducing</text:p>
          </table:table-cell>
          <table:table-cell office:value-type="float" office:value="1.1508620689655173" table:formula="of:=IFERROR([.H71]/[.F71]; 0)" table:style-name="ce17">
            <text:p>1.150862069</text:p>
          </table:table-cell>
          <table:table-cell office:value-type="float" office:value="8966.4285714285706" table:formula="of:=AVERAGE([.I71:.I77])" table:style-name="ce15">
            <text:p>8966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5-04T00:00:00" table:style-name="ce14">
            <text:p>04-05-2023</text:p>
          </table:table-cell>
          <table:table-cell office:value-type="string" office:string-value="May" table:formula="of:=TEXT([.A72]; &quot;mmmm&quot;)" table:style-name="ce14">
            <text:p>May</text:p>
          </table:table-cell>
          <table:table-cell office:value-type="string" office:string-value="2023-05" table:formula="of:=TEXT([.A72]; &quot;yyyy-mm&quot;)" table:style-name="ce14">
            <text:p>2023-05</text:p>
          </table:table-cell>
          <table:table-cell office:value-type="float" office:value="153" table:style-name="ce9">
            <text:p>153</text:p>
          </table:table-cell>
          <table:table-cell office:value-type="float" office:value="253" table:style-name="ce9">
            <text:p>253</text:p>
          </table:table-cell>
          <table:table-cell office:value-type="float" office:value="286" table:style-name="ce9">
            <text:p>286</text:p>
          </table:table-cell>
          <table:table-cell office:value-type="float" office:value="8790" table:style-name="ce9">
            <text:p>8790</text:p>
          </table:table-cell>
          <table:table-cell office:value-type="float" office:value="332" table:style-name="ce9">
            <text:p>332</text:p>
          </table:table-cell>
          <table:table-cell office:value-type="float" office:value="9043" table:formula="of:=SUM([.G72]+[.E72])" table:style-name="ce15">
            <text:p>9043</text:p>
          </table:table-cell>
          <table:table-cell office:value-type="float" office:value="-46" table:formula="of:=[.F72]-[.H72]" table:style-name="ce15">
            <text:p>-46</text:p>
          </table:table-cell>
          <table:table-cell office:value-type="percentage" office:value="-2.4438792436138449E-2" table:formula="of:=([.I73]-[.I72])/[.I72]" table:style-name="ce16">
            <text:p>-2%</text:p>
          </table:table-cell>
          <table:table-cell office:value-type="string" office:string-value="Invalid" table:formula="of:=IF([.F72]&lt;=[.E72]; &quot;Valid&quot;; &quot;Invalid&quot;)" table:style-name="ce17">
            <text:p>Invalid</text:p>
          </table:table-cell>
          <table:table-cell office:value-type="string" office:string-value="Valid" table:formula="of:=IF([.H72]&lt;=[.G72]; &quot;Valid&quot;; &quot;Invalid&quot;)" table:style-name="ce17">
            <text:p>Valid</text:p>
          </table:table-cell>
          <table:table-cell office:value-type="string" office:string-value="Stable/Reducing" table:formula="of:=IF([.J72]&gt;0; &quot;Increasing Pressure&quot;; &quot;Stable/Reducing&quot;)" table:style-name="ce18">
            <text:p>Stable/Reducing</text:p>
          </table:table-cell>
          <table:table-cell office:value-type="float" office:value="1.1608391608391608" table:formula="of:=IFERROR([.H72]/[.F72]; 0)" table:style-name="ce17">
            <text:p>1.160839161</text:p>
          </table:table-cell>
          <table:table-cell office:value-type="float" office:value="8915.4285714285706" table:formula="of:=AVERAGE([.I72:.I78])" table:style-name="ce15">
            <text:p>8915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5-07T00:00:00" table:style-name="ce14">
            <text:p>07-05-2023</text:p>
          </table:table-cell>
          <table:table-cell office:value-type="string" office:string-value="May" table:formula="of:=TEXT([.A73]; &quot;mmmm&quot;)" table:style-name="ce14">
            <text:p>May</text:p>
          </table:table-cell>
          <table:table-cell office:value-type="string" office:string-value="2023-05" table:formula="of:=TEXT([.A73]; &quot;yyyy-mm&quot;)" table:style-name="ce14">
            <text:p>2023-05</text:p>
          </table:table-cell>
          <table:table-cell office:value-type="float" office:value="180" table:style-name="ce9">
            <text:p>180</text:p>
          </table:table-cell>
          <table:table-cell office:value-type="float" office:value="337" table:style-name="ce9">
            <text:p>337</text:p>
          </table:table-cell>
          <table:table-cell office:value-type="float" office:value="219" table:style-name="ce9">
            <text:p>219</text:p>
          </table:table-cell>
          <table:table-cell office:value-type="float" office:value="8485" table:style-name="ce9">
            <text:p>8485</text:p>
          </table:table-cell>
          <table:table-cell office:value-type="float" office:value="375" table:style-name="ce9">
            <text:p>375</text:p>
          </table:table-cell>
          <table:table-cell office:value-type="float" office:value="8822" table:formula="of:=SUM([.G73]+[.E73])" table:style-name="ce15">
            <text:p>8822</text:p>
          </table:table-cell>
          <table:table-cell office:value-type="float" office:value="-156" table:formula="of:=[.F73]-[.H73]" table:style-name="ce15">
            <text:p>-156</text:p>
          </table:table-cell>
          <table:table-cell office:value-type="percentage" office:value="6.2344139650872821E-3" table:formula="of:=([.I74]-[.I73])/[.I73]" table:style-name="ce16">
            <text:p>1%</text:p>
          </table:table-cell>
          <table:table-cell office:value-type="string" office:string-value="Valid" table:formula="of:=IF([.F73]&lt;=[.E73]; &quot;Valid&quot;; &quot;Invalid&quot;)" table:style-name="ce17">
            <text:p>Valid</text:p>
          </table:table-cell>
          <table:table-cell office:value-type="string" office:string-value="Valid" table:formula="of:=IF([.H73]&lt;=[.G73]; &quot;Valid&quot;; &quot;Invalid&quot;)" table:style-name="ce17">
            <text:p>Valid</text:p>
          </table:table-cell>
          <table:table-cell office:value-type="string" office:string-value="Stable/Reducing" table:formula="of:=IF([.J73]&gt;0; &quot;Increasing Pressure&quot;; &quot;Stable/Reducing&quot;)" table:style-name="ce18">
            <text:p>Stable/Reducing</text:p>
          </table:table-cell>
          <table:table-cell office:value-type="float" office:value="1.7123287671232876" table:formula="of:=IFERROR([.H73]/[.F73]; 0)" table:style-name="ce17">
            <text:p>1.712328767</text:p>
          </table:table-cell>
          <table:table-cell office:value-type="float" office:value="8890" table:formula="of:=AVERAGE([.I73:.I79])" table:style-name="ce15">
            <text:p>8890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5-08T00:00:00" table:style-name="ce14">
            <text:p>08-05-2023</text:p>
          </table:table-cell>
          <table:table-cell office:value-type="string" office:string-value="May" table:formula="of:=TEXT([.A74]; &quot;mmmm&quot;)" table:style-name="ce14">
            <text:p>May</text:p>
          </table:table-cell>
          <table:table-cell office:value-type="string" office:string-value="2023-05" table:formula="of:=TEXT([.A74]; &quot;yyyy-mm&quot;)" table:style-name="ce14">
            <text:p>2023-05</text:p>
          </table:table-cell>
          <table:table-cell office:value-type="float" office:value="133" table:style-name="ce9">
            <text:p>133</text:p>
          </table:table-cell>
          <table:table-cell office:value-type="float" office:value="287" table:style-name="ce9">
            <text:p>287</text:p>
          </table:table-cell>
          <table:table-cell office:value-type="float" office:value="189" table:style-name="ce9">
            <text:p>189</text:p>
          </table:table-cell>
          <table:table-cell office:value-type="float" office:value="8590" table:style-name="ce9">
            <text:p>8590</text:p>
          </table:table-cell>
          <table:table-cell office:value-type="float" office:value="261" table:style-name="ce9">
            <text:p>261</text:p>
          </table:table-cell>
          <table:table-cell office:value-type="float" office:value="8877" table:formula="of:=SUM([.G74]+[.E74])" table:style-name="ce15">
            <text:p>8877</text:p>
          </table:table-cell>
          <table:table-cell office:value-type="float" office:value="-72" table:formula="of:=[.F74]-[.H74]" table:style-name="ce15">
            <text:p>-72</text:p>
          </table:table-cell>
          <table:table-cell office:value-type="percentage" office:value="4.3933761405880369E-3" table:formula="of:=([.I75]-[.I74])/[.I74]" table:style-name="ce16">
            <text:p>0%</text:p>
          </table:table-cell>
          <table:table-cell office:value-type="string" office:string-value="Valid" table:formula="of:=IF([.F74]&lt;=[.E74]; &quot;Valid&quot;; &quot;Invalid&quot;)" table:style-name="ce17">
            <text:p>Valid</text:p>
          </table:table-cell>
          <table:table-cell office:value-type="string" office:string-value="Valid" table:formula="of:=IF([.H74]&lt;=[.G74]; &quot;Valid&quot;; &quot;Invalid&quot;)" table:style-name="ce17">
            <text:p>Valid</text:p>
          </table:table-cell>
          <table:table-cell office:value-type="string" office:string-value="Stable/Reducing" table:formula="of:=IF([.J74]&gt;0; &quot;Increasing Pressure&quot;; &quot;Stable/Reducing&quot;)" table:style-name="ce18">
            <text:p>Stable/Reducing</text:p>
          </table:table-cell>
          <table:table-cell office:value-type="float" office:value="1.3809523809523809" table:formula="of:=IFERROR([.H74]/[.F74]; 0)" table:style-name="ce17">
            <text:p>1.380952381</text:p>
          </table:table-cell>
          <table:table-cell office:value-type="float" office:value="8897.7142857142862" table:formula="of:=AVERAGE([.I74:.I80])" table:style-name="ce15">
            <text:p>8898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5-09T00:00:00" table:style-name="ce14">
            <text:p>09-05-2023</text:p>
          </table:table-cell>
          <table:table-cell office:value-type="string" office:string-value="May" table:formula="of:=TEXT([.A75]; &quot;mmmm&quot;)" table:style-name="ce14">
            <text:p>May</text:p>
          </table:table-cell>
          <table:table-cell office:value-type="string" office:string-value="2023-05" table:formula="of:=TEXT([.A75]; &quot;yyyy-mm&quot;)" table:style-name="ce14">
            <text:p>2023-05</text:p>
          </table:table-cell>
          <table:table-cell office:value-type="float" office:value="187" table:style-name="ce9">
            <text:p>187</text:p>
          </table:table-cell>
          <table:table-cell office:value-type="float" office:value="310" table:style-name="ce9">
            <text:p>310</text:p>
          </table:table-cell>
          <table:table-cell office:value-type="float" office:value="247" table:style-name="ce9">
            <text:p>247</text:p>
          </table:table-cell>
          <table:table-cell office:value-type="float" office:value="8606" table:style-name="ce9">
            <text:p>8606</text:p>
          </table:table-cell>
          <table:table-cell office:value-type="float" office:value="250" table:style-name="ce9">
            <text:p>250</text:p>
          </table:table-cell>
          <table:table-cell office:value-type="float" office:value="8916" table:formula="of:=SUM([.G75]+[.E75])" table:style-name="ce15">
            <text:p>8916</text:p>
          </table:table-cell>
          <table:table-cell office:value-type="float" office:value="-3" table:formula="of:=[.F75]-[.H75]" table:style-name="ce15">
            <text:p>-3</text:p>
          </table:table-cell>
          <table:table-cell office:value-type="percentage" office:value="5.6078959174517724E-3" table:formula="of:=([.I76]-[.I75])/[.I75]" table:style-name="ce16">
            <text:p>1%</text:p>
          </table:table-cell>
          <table:table-cell office:value-type="string" office:string-value="Valid" table:formula="of:=IF([.F75]&lt;=[.E75]; &quot;Valid&quot;; &quot;Invalid&quot;)" table:style-name="ce17">
            <text:p>Valid</text:p>
          </table:table-cell>
          <table:table-cell office:value-type="string" office:string-value="Valid" table:formula="of:=IF([.H75]&lt;=[.G75]; &quot;Valid&quot;; &quot;Invalid&quot;)" table:style-name="ce17">
            <text:p>Valid</text:p>
          </table:table-cell>
          <table:table-cell office:value-type="string" office:string-value="Stable/Reducing" table:formula="of:=IF([.J75]&gt;0; &quot;Increasing Pressure&quot;; &quot;Stable/Reducing&quot;)" table:style-name="ce18">
            <text:p>Stable/Reducing</text:p>
          </table:table-cell>
          <table:table-cell office:value-type="float" office:value="1.0121457489878543" table:formula="of:=IFERROR([.H75]/[.F75]; 0)" table:style-name="ce17">
            <text:p>1.012145749</text:p>
          </table:table-cell>
          <table:table-cell office:value-type="float" office:value="8876.8571428571431" table:formula="of:=AVERAGE([.I75:.I81])" table:style-name="ce15">
            <text:p>8877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5-10T00:00:00" table:style-name="ce14">
            <text:p>10-05-2023</text:p>
          </table:table-cell>
          <table:table-cell office:value-type="string" office:string-value="May" table:formula="of:=TEXT([.A76]; &quot;mmmm&quot;)" table:style-name="ce14">
            <text:p>May</text:p>
          </table:table-cell>
          <table:table-cell office:value-type="string" office:string-value="2023-05" table:formula="of:=TEXT([.A76]; &quot;yyyy-mm&quot;)" table:style-name="ce14">
            <text:p>2023-05</text:p>
          </table:table-cell>
          <table:table-cell office:value-type="float" office:value="168" table:style-name="ce9">
            <text:p>168</text:p>
          </table:table-cell>
          <table:table-cell office:value-type="float" office:value="285" table:style-name="ce9">
            <text:p>285</text:p>
          </table:table-cell>
          <table:table-cell office:value-type="float" office:value="210" table:style-name="ce9">
            <text:p>210</text:p>
          </table:table-cell>
          <table:table-cell office:value-type="float" office:value="8681" table:style-name="ce9">
            <text:p>8681</text:p>
          </table:table-cell>
          <table:table-cell office:value-type="float" office:value="304" table:style-name="ce9">
            <text:p>304</text:p>
          </table:table-cell>
          <table:table-cell office:value-type="float" office:value="8966" table:formula="of:=SUM([.G76]+[.E76])" table:style-name="ce15">
            <text:p>8966</text:p>
          </table:table-cell>
          <table:table-cell office:value-type="float" office:value="-94" table:formula="of:=[.F76]-[.H76]" table:style-name="ce15">
            <text:p>-94</text:p>
          </table:table-cell>
          <table:table-cell office:value-type="percentage" office:value="1.3160829801472228E-2" table:formula="of:=([.I77]-[.I76])/[.I76]" table:style-name="ce16">
            <text:p>1%</text:p>
          </table:table-cell>
          <table:table-cell office:value-type="string" office:string-value="Valid" table:formula="of:=IF([.F76]&lt;=[.E76]; &quot;Valid&quot;; &quot;Invalid&quot;)" table:style-name="ce17">
            <text:p>Valid</text:p>
          </table:table-cell>
          <table:table-cell office:value-type="string" office:string-value="Valid" table:formula="of:=IF([.H76]&lt;=[.G76]; &quot;Valid&quot;; &quot;Invalid&quot;)" table:style-name="ce17">
            <text:p>Valid</text:p>
          </table:table-cell>
          <table:table-cell office:value-type="string" office:string-value="Stable/Reducing" table:formula="of:=IF([.J76]&gt;0; &quot;Increasing Pressure&quot;; &quot;Stable/Reducing&quot;)" table:style-name="ce18">
            <text:p>Stable/Reducing</text:p>
          </table:table-cell>
          <table:table-cell office:value-type="float" office:value="1.4476190476190476" table:formula="of:=IFERROR([.H76]/[.F76]; 0)" table:style-name="ce17">
            <text:p>1.447619048</text:p>
          </table:table-cell>
          <table:table-cell office:value-type="float" office:value="8831.1428571428569" table:formula="of:=AVERAGE([.I76:.I82])" table:style-name="ce15">
            <text:p>8831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5-11T00:00:00" table:style-name="ce14">
            <text:p>11-05-2023</text:p>
          </table:table-cell>
          <table:table-cell office:value-type="string" office:string-value="May" table:formula="of:=TEXT([.A77]; &quot;mmmm&quot;)" table:style-name="ce14">
            <text:p>May</text:p>
          </table:table-cell>
          <table:table-cell office:value-type="string" office:string-value="2023-05" table:formula="of:=TEXT([.A77]; &quot;yyyy-mm&quot;)" table:style-name="ce14">
            <text:p>2023-05</text:p>
          </table:table-cell>
          <table:table-cell office:value-type="float" office:value="269" table:style-name="ce9">
            <text:p>269</text:p>
          </table:table-cell>
          <table:table-cell office:value-type="float" office:value="412" table:style-name="ce9">
            <text:p>412</text:p>
          </table:table-cell>
          <table:table-cell office:value-type="float" office:value="204" table:style-name="ce9">
            <text:p>204</text:p>
          </table:table-cell>
          <table:table-cell office:value-type="float" office:value="8672" table:style-name="ce9">
            <text:p>8672</text:p>
          </table:table-cell>
          <table:table-cell office:value-type="float" office:value="392" table:style-name="ce9">
            <text:p>392</text:p>
          </table:table-cell>
          <table:table-cell office:value-type="float" office:value="9084" table:formula="of:=SUM([.G77]+[.E77])" table:style-name="ce15">
            <text:p>9084</text:p>
          </table:table-cell>
          <table:table-cell office:value-type="float" office:value="-188" table:formula="of:=[.F77]-[.H77]" table:style-name="ce15">
            <text:p>-188</text:p>
          </table:table-cell>
          <table:table-cell office:value-type="percentage" office:value="-4.2272126816380449E-2" table:formula="of:=([.I78]-[.I77])/[.I77]" table:style-name="ce16">
            <text:p>-4%</text:p>
          </table:table-cell>
          <table:table-cell office:value-type="string" office:string-value="Valid" table:formula="of:=IF([.F77]&lt;=[.E77]; &quot;Valid&quot;; &quot;Invalid&quot;)" table:style-name="ce17">
            <text:p>Valid</text:p>
          </table:table-cell>
          <table:table-cell office:value-type="string" office:string-value="Valid" table:formula="of:=IF([.H77]&lt;=[.G77]; &quot;Valid&quot;; &quot;Invalid&quot;)" table:style-name="ce17">
            <text:p>Valid</text:p>
          </table:table-cell>
          <table:table-cell office:value-type="string" office:string-value="Stable/Reducing" table:formula="of:=IF([.J77]&gt;0; &quot;Increasing Pressure&quot;; &quot;Stable/Reducing&quot;)" table:style-name="ce18">
            <text:p>Stable/Reducing</text:p>
          </table:table-cell>
          <table:table-cell office:value-type="float" office:value="1.9215686274509804" table:formula="of:=IFERROR([.H77]/[.F77]; 0)" table:style-name="ce17">
            <text:p>1.921568627</text:p>
          </table:table-cell>
          <table:table-cell office:value-type="float" office:value="8692.5714285714294" table:formula="of:=AVERAGE([.I77:.I83])" table:style-name="ce15">
            <text:p>8693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5-14T00:00:00" table:style-name="ce14">
            <text:p>14-05-2023</text:p>
          </table:table-cell>
          <table:table-cell office:value-type="string" office:string-value="May" table:formula="of:=TEXT([.A78]; &quot;mmmm&quot;)" table:style-name="ce14">
            <text:p>May</text:p>
          </table:table-cell>
          <table:table-cell office:value-type="string" office:string-value="2023-05" table:formula="of:=TEXT([.A78]; &quot;yyyy-mm&quot;)" table:style-name="ce14">
            <text:p>2023-05</text:p>
          </table:table-cell>
          <table:table-cell office:value-type="float" office:value="100" table:style-name="ce9">
            <text:p>100</text:p>
          </table:table-cell>
          <table:table-cell office:value-type="float" office:value="255" table:style-name="ce9">
            <text:p>255</text:p>
          </table:table-cell>
          <table:table-cell office:value-type="float" office:value="236" table:style-name="ce9">
            <text:p>236</text:p>
          </table:table-cell>
          <table:table-cell office:value-type="float" office:value="8445" table:style-name="ce9">
            <text:p>8445</text:p>
          </table:table-cell>
          <table:table-cell office:value-type="float" office:value="288" table:style-name="ce9">
            <text:p>288</text:p>
          </table:table-cell>
          <table:table-cell office:value-type="float" office:value="8700" table:formula="of:=SUM([.G78]+[.E78])" table:style-name="ce15">
            <text:p>8700</text:p>
          </table:table-cell>
          <table:table-cell office:value-type="float" office:value="-52" table:formula="of:=[.F78]-[.H78]" table:style-name="ce15">
            <text:p>-52</text:p>
          </table:table-cell>
          <table:table-cell office:value-type="percentage" office:value="1.896551724137931E-2" table:formula="of:=([.I79]-[.I78])/[.I78]" table:style-name="ce16">
            <text:p>2%</text:p>
          </table:table-cell>
          <table:table-cell office:value-type="string" office:string-value="Valid" table:formula="of:=IF([.F78]&lt;=[.E78]; &quot;Valid&quot;; &quot;Invalid&quot;)" table:style-name="ce17">
            <text:p>Valid</text:p>
          </table:table-cell>
          <table:table-cell office:value-type="string" office:string-value="Valid" table:formula="of:=IF([.H78]&lt;=[.G78]; &quot;Valid&quot;; &quot;Invalid&quot;)" table:style-name="ce17">
            <text:p>Valid</text:p>
          </table:table-cell>
          <table:table-cell office:value-type="string" office:string-value="Stable/Reducing" table:formula="of:=IF([.J78]&gt;0; &quot;Increasing Pressure&quot;; &quot;Stable/Reducing&quot;)" table:style-name="ce18">
            <text:p>Stable/Reducing</text:p>
          </table:table-cell>
          <table:table-cell office:value-type="float" office:value="1.2203389830508475" table:formula="of:=IFERROR([.H78]/[.F78]; 0)" table:style-name="ce17">
            <text:p>1.220338983</text:p>
          </table:table-cell>
          <table:table-cell office:value-type="float" office:value="8538.2857142857138" table:formula="of:=AVERAGE([.I78:.I84])" table:style-name="ce15">
            <text:p>8538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5-15T00:00:00" table:style-name="ce14">
            <text:p>15-05-2023</text:p>
          </table:table-cell>
          <table:table-cell office:value-type="string" office:string-value="May" table:formula="of:=TEXT([.A79]; &quot;mmmm&quot;)" table:style-name="ce14">
            <text:p>May</text:p>
          </table:table-cell>
          <table:table-cell office:value-type="string" office:string-value="2023-05" table:formula="of:=TEXT([.A79]; &quot;yyyy-mm&quot;)" table:style-name="ce14">
            <text:p>2023-05</text:p>
          </table:table-cell>
          <table:table-cell office:value-type="float" office:value="205" table:style-name="ce9">
            <text:p>205</text:p>
          </table:table-cell>
          <table:table-cell office:value-type="float" office:value="294" table:style-name="ce9">
            <text:p>294</text:p>
          </table:table-cell>
          <table:table-cell office:value-type="float" office:value="177" table:style-name="ce9">
            <text:p>177</text:p>
          </table:table-cell>
          <table:table-cell office:value-type="float" office:value="8571" table:style-name="ce9">
            <text:p>8571</text:p>
          </table:table-cell>
          <table:table-cell office:value-type="float" office:value="277" table:style-name="ce9">
            <text:p>277</text:p>
          </table:table-cell>
          <table:table-cell office:value-type="float" office:value="8865" table:formula="of:=SUM([.G79]+[.E79])" table:style-name="ce15">
            <text:p>8865</text:p>
          </table:table-cell>
          <table:table-cell office:value-type="float" office:value="-100" table:formula="of:=[.F79]-[.H79]" table:style-name="ce15">
            <text:p>-100</text:p>
          </table:table-cell>
          <table:table-cell office:value-type="percentage" office:value="1.2408347433728144E-3" table:formula="of:=([.I80]-[.I79])/[.I79]" table:style-name="ce16">
            <text:p>0%</text:p>
          </table:table-cell>
          <table:table-cell office:value-type="string" office:string-value="Valid" table:formula="of:=IF([.F79]&lt;=[.E79]; &quot;Valid&quot;; &quot;Invalid&quot;)" table:style-name="ce17">
            <text:p>Valid</text:p>
          </table:table-cell>
          <table:table-cell office:value-type="string" office:string-value="Valid" table:formula="of:=IF([.H79]&lt;=[.G79]; &quot;Valid&quot;; &quot;Invalid&quot;)" table:style-name="ce17">
            <text:p>Valid</text:p>
          </table:table-cell>
          <table:table-cell office:value-type="string" office:string-value="Stable/Reducing" table:formula="of:=IF([.J79]&gt;0; &quot;Increasing Pressure&quot;; &quot;Stable/Reducing&quot;)" table:style-name="ce18">
            <text:p>Stable/Reducing</text:p>
          </table:table-cell>
          <table:table-cell office:value-type="float" office:value="1.5649717514124293" table:formula="of:=IFERROR([.H79]/[.F79]; 0)" table:style-name="ce17">
            <text:p>1.564971751</text:p>
          </table:table-cell>
          <table:table-cell office:value-type="float" office:value="8417.4285714285706" table:formula="of:=AVERAGE([.I79:.I85])" table:style-name="ce15">
            <text:p>8417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5-16T00:00:00" table:style-name="ce14">
            <text:p>16-05-2023</text:p>
          </table:table-cell>
          <table:table-cell office:value-type="string" office:string-value="May" table:formula="of:=TEXT([.A80]; &quot;mmmm&quot;)" table:style-name="ce14">
            <text:p>May</text:p>
          </table:table-cell>
          <table:table-cell office:value-type="string" office:string-value="2023-05" table:formula="of:=TEXT([.A80]; &quot;yyyy-mm&quot;)" table:style-name="ce14">
            <text:p>2023-05</text:p>
          </table:table-cell>
          <table:table-cell office:value-type="float" office:value="161" table:style-name="ce9">
            <text:p>161</text:p>
          </table:table-cell>
          <table:table-cell office:value-type="float" office:value="304" table:style-name="ce9">
            <text:p>304</text:p>
          </table:table-cell>
          <table:table-cell office:value-type="float" office:value="211" table:style-name="ce9">
            <text:p>211</text:p>
          </table:table-cell>
          <table:table-cell office:value-type="float" office:value="8572" table:style-name="ce9">
            <text:p>8572</text:p>
          </table:table-cell>
          <table:table-cell office:value-type="float" office:value="272" table:style-name="ce9">
            <text:p>272</text:p>
          </table:table-cell>
          <table:table-cell office:value-type="float" office:value="8876" table:formula="of:=SUM([.G80]+[.E80])" table:style-name="ce15">
            <text:p>8876</text:p>
          </table:table-cell>
          <table:table-cell office:value-type="float" office:value="-61" table:formula="of:=[.F80]-[.H80]" table:style-name="ce15">
            <text:p>-61</text:p>
          </table:table-cell>
          <table:table-cell office:value-type="percentage" office:value="-1.6336187471834161E-2" table:formula="of:=([.I81]-[.I80])/[.I80]" table:style-name="ce16">
            <text:p>-2%</text:p>
          </table:table-cell>
          <table:table-cell office:value-type="string" office:string-value="Valid" table:formula="of:=IF([.F80]&lt;=[.E80]; &quot;Valid&quot;; &quot;Invalid&quot;)" table:style-name="ce17">
            <text:p>Valid</text:p>
          </table:table-cell>
          <table:table-cell office:value-type="string" office:string-value="Valid" table:formula="of:=IF([.H80]&lt;=[.G80]; &quot;Valid&quot;; &quot;Invalid&quot;)" table:style-name="ce17">
            <text:p>Valid</text:p>
          </table:table-cell>
          <table:table-cell office:value-type="string" office:string-value="Stable/Reducing" table:formula="of:=IF([.J80]&gt;0; &quot;Increasing Pressure&quot;; &quot;Stable/Reducing&quot;)" table:style-name="ce18">
            <text:p>Stable/Reducing</text:p>
          </table:table-cell>
          <table:table-cell office:value-type="float" office:value="1.2890995260663507" table:formula="of:=IFERROR([.H80]/[.F80]; 0)" table:style-name="ce17">
            <text:p>1.289099526</text:p>
          </table:table-cell>
          <table:table-cell office:value-type="float" office:value="8262.2857142857138" table:formula="of:=AVERAGE([.I80:.I86])" table:style-name="ce15">
            <text:p>8262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5-17T00:00:00" table:style-name="ce14">
            <text:p>17-05-2023</text:p>
          </table:table-cell>
          <table:table-cell office:value-type="string" office:string-value="May" table:formula="of:=TEXT([.A81]; &quot;mmmm&quot;)" table:style-name="ce14">
            <text:p>May</text:p>
          </table:table-cell>
          <table:table-cell office:value-type="string" office:string-value="2023-05" table:formula="of:=TEXT([.A81]; &quot;yyyy-mm&quot;)" table:style-name="ce14">
            <text:p>2023-05</text:p>
          </table:table-cell>
          <table:table-cell office:value-type="float" office:value="57" table:style-name="ce9">
            <text:p>57</text:p>
          </table:table-cell>
          <table:table-cell office:value-type="float" office:value="162" table:style-name="ce9">
            <text:p>162</text:p>
          </table:table-cell>
          <table:table-cell office:value-type="float" office:value="193" table:style-name="ce9">
            <text:p>193</text:p>
          </table:table-cell>
          <table:table-cell office:value-type="float" office:value="8569" table:style-name="ce9">
            <text:p>8569</text:p>
          </table:table-cell>
          <table:table-cell office:value-type="float" office:value="307" table:style-name="ce9">
            <text:p>307</text:p>
          </table:table-cell>
          <table:table-cell office:value-type="float" office:value="8731" table:formula="of:=SUM([.G81]+[.E81])" table:style-name="ce15">
            <text:p>8731</text:p>
          </table:table-cell>
          <table:table-cell office:value-type="float" office:value="-114" table:formula="of:=[.F81]-[.H81]" table:style-name="ce15">
            <text:p>-114</text:p>
          </table:table-cell>
          <table:table-cell office:value-type="percentage" office:value="-1.5462146374985683E-2" table:formula="of:=([.I82]-[.I81])/[.I81]" table:style-name="ce16">
            <text:p>-2%</text:p>
          </table:table-cell>
          <table:table-cell office:value-type="string" office:string-value="Invalid" table:formula="of:=IF([.F81]&lt;=[.E81]; &quot;Valid&quot;; &quot;Invalid&quot;)" table:style-name="ce17">
            <text:p>Invalid</text:p>
          </table:table-cell>
          <table:table-cell office:value-type="string" office:string-value="Valid" table:formula="of:=IF([.H81]&lt;=[.G81]; &quot;Valid&quot;; &quot;Invalid&quot;)" table:style-name="ce17">
            <text:p>Valid</text:p>
          </table:table-cell>
          <table:table-cell office:value-type="string" office:string-value="Stable/Reducing" table:formula="of:=IF([.J81]&gt;0; &quot;Increasing Pressure&quot;; &quot;Stable/Reducing&quot;)" table:style-name="ce18">
            <text:p>Stable/Reducing</text:p>
          </table:table-cell>
          <table:table-cell office:value-type="float" office:value="1.5906735751295338" table:formula="of:=IFERROR([.H81]/[.F81]; 0)" table:style-name="ce17">
            <text:p>1.590673575</text:p>
          </table:table-cell>
          <table:table-cell office:value-type="float" office:value="8082.7142857142853" table:formula="of:=AVERAGE([.I81:.I87])" table:style-name="ce15">
            <text:p>8083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5-18T00:00:00" table:style-name="ce14">
            <text:p>18-05-2023</text:p>
          </table:table-cell>
          <table:table-cell office:value-type="string" office:string-value="May" table:formula="of:=TEXT([.A82]; &quot;mmmm&quot;)" table:style-name="ce14">
            <text:p>May</text:p>
          </table:table-cell>
          <table:table-cell office:value-type="string" office:string-value="2023-05" table:formula="of:=TEXT([.A82]; &quot;yyyy-mm&quot;)" table:style-name="ce14">
            <text:p>2023-05</text:p>
          </table:table-cell>
          <table:table-cell office:value-type="float" office:value="80" table:style-name="ce9">
            <text:p>80</text:p>
          </table:table-cell>
          <table:table-cell office:value-type="float" office:value="122" table:style-name="ce9">
            <text:p>122</text:p>
          </table:table-cell>
          <table:table-cell office:value-type="float" office:value="152" table:style-name="ce9">
            <text:p>152</text:p>
          </table:table-cell>
          <table:table-cell office:value-type="float" office:value="8474" table:style-name="ce9">
            <text:p>8474</text:p>
          </table:table-cell>
          <table:table-cell office:value-type="float" office:value="351" table:style-name="ce9">
            <text:p>351</text:p>
          </table:table-cell>
          <table:table-cell office:value-type="float" office:value="8596" table:formula="of:=SUM([.G82]+[.E82])" table:style-name="ce15">
            <text:p>8596</text:p>
          </table:table-cell>
          <table:table-cell office:value-type="float" office:value="-199" table:formula="of:=[.F82]-[.H82]" table:style-name="ce15">
            <text:p>-199</text:p>
          </table:table-cell>
          <table:table-cell office:value-type="percentage" office:value="-6.9799906933457417E-2" table:formula="of:=([.I83]-[.I82])/[.I82]" table:style-name="ce16">
            <text:p>-7%</text:p>
          </table:table-cell>
          <table:table-cell office:value-type="string" office:string-value="Invalid" table:formula="of:=IF([.F82]&lt;=[.E82]; &quot;Valid&quot;; &quot;Invalid&quot;)" table:style-name="ce17">
            <text:p>Invalid</text:p>
          </table:table-cell>
          <table:table-cell office:value-type="string" office:string-value="Valid" table:formula="of:=IF([.H82]&lt;=[.G82]; &quot;Valid&quot;; &quot;Invalid&quot;)" table:style-name="ce17">
            <text:p>Valid</text:p>
          </table:table-cell>
          <table:table-cell office:value-type="string" office:string-value="Stable/Reducing" table:formula="of:=IF([.J82]&gt;0; &quot;Increasing Pressure&quot;; &quot;Stable/Reducing&quot;)" table:style-name="ce18">
            <text:p>Stable/Reducing</text:p>
          </table:table-cell>
          <table:table-cell office:value-type="float" office:value="2.3092105263157894" table:formula="of:=IFERROR([.H82]/[.F82]; 0)" table:style-name="ce17">
            <text:p>2.309210526</text:p>
          </table:table-cell>
          <table:table-cell office:value-type="float" office:value="7843.4285714285716" table:formula="of:=AVERAGE([.I82:.I88])" table:style-name="ce15">
            <text:p>7843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5-21T00:00:00" table:style-name="ce14">
            <text:p>21-05-2023</text:p>
          </table:table-cell>
          <table:table-cell office:value-type="string" office:string-value="May" table:formula="of:=TEXT([.A83]; &quot;mmmm&quot;)" table:style-name="ce14">
            <text:p>May</text:p>
          </table:table-cell>
          <table:table-cell office:value-type="string" office:string-value="2023-05" table:formula="of:=TEXT([.A83]; &quot;yyyy-mm&quot;)" table:style-name="ce14">
            <text:p>2023-05</text:p>
          </table:table-cell>
          <table:table-cell office:value-type="float" office:value="107" table:style-name="ce9">
            <text:p>107</text:p>
          </table:table-cell>
          <table:table-cell office:value-type="float" office:value="170" table:style-name="ce9">
            <text:p>170</text:p>
          </table:table-cell>
          <table:table-cell office:value-type="float" office:value="133" table:style-name="ce9">
            <text:p>133</text:p>
          </table:table-cell>
          <table:table-cell office:value-type="float" office:value="7826" table:style-name="ce9">
            <text:p>7826</text:p>
          </table:table-cell>
          <table:table-cell office:value-type="float" office:value="343" table:style-name="ce9">
            <text:p>343</text:p>
          </table:table-cell>
          <table:table-cell office:value-type="float" office:value="7996" table:formula="of:=SUM([.G83]+[.E83])" table:style-name="ce15">
            <text:p>7996</text:p>
          </table:table-cell>
          <table:table-cell office:value-type="float" office:value="-210" table:formula="of:=[.F83]-[.H83]" table:style-name="ce15">
            <text:p>-210</text:p>
          </table:table-cell>
          <table:table-cell office:value-type="percentage" office:value="1.0005002501250625E-3" table:formula="of:=([.I84]-[.I83])/[.I83]" table:style-name="ce16">
            <text:p>0%</text:p>
          </table:table-cell>
          <table:table-cell office:value-type="string" office:string-value="Valid" table:formula="of:=IF([.F83]&lt;=[.E83]; &quot;Valid&quot;; &quot;Invalid&quot;)" table:style-name="ce17">
            <text:p>Valid</text:p>
          </table:table-cell>
          <table:table-cell office:value-type="string" office:string-value="Valid" table:formula="of:=IF([.H83]&lt;=[.G83]; &quot;Valid&quot;; &quot;Invalid&quot;)" table:style-name="ce17">
            <text:p>Valid</text:p>
          </table:table-cell>
          <table:table-cell office:value-type="string" office:string-value="Stable/Reducing" table:formula="of:=IF([.J83]&gt;0; &quot;Increasing Pressure&quot;; &quot;Stable/Reducing&quot;)" table:style-name="ce18">
            <text:p>Stable/Reducing</text:p>
          </table:table-cell>
          <table:table-cell office:value-type="float" office:value="2.5789473684210527" table:formula="of:=IFERROR([.H83]/[.F83]; 0)" table:style-name="ce17">
            <text:p>2.578947368</text:p>
          </table:table-cell>
          <table:table-cell office:value-type="float" office:value="7633.8571428571431" table:formula="of:=AVERAGE([.I83:.I89])" table:style-name="ce15">
            <text:p>7634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5-22T00:00:00" table:style-name="ce14">
            <text:p>22-05-2023</text:p>
          </table:table-cell>
          <table:table-cell office:value-type="string" office:string-value="May" table:formula="of:=TEXT([.A84]; &quot;mmmm&quot;)" table:style-name="ce14">
            <text:p>May</text:p>
          </table:table-cell>
          <table:table-cell office:value-type="string" office:string-value="2023-05" table:formula="of:=TEXT([.A84]; &quot;yyyy-mm&quot;)" table:style-name="ce14">
            <text:p>2023-05</text:p>
          </table:table-cell>
          <table:table-cell office:value-type="float" office:value="99" table:style-name="ce9">
            <text:p>99</text:p>
          </table:table-cell>
          <table:table-cell office:value-type="float" office:value="156" table:style-name="ce9">
            <text:p>156</text:p>
          </table:table-cell>
          <table:table-cell office:value-type="float" office:value="139" table:style-name="ce9">
            <text:p>139</text:p>
          </table:table-cell>
          <table:table-cell office:value-type="float" office:value="7848" table:style-name="ce9">
            <text:p>7848</text:p>
          </table:table-cell>
          <table:table-cell office:value-type="float" office:value="240" table:style-name="ce9">
            <text:p>240</text:p>
          </table:table-cell>
          <table:table-cell office:value-type="float" office:value="8004" table:formula="of:=SUM([.G84]+[.E84])" table:style-name="ce15">
            <text:p>8004</text:p>
          </table:table-cell>
          <table:table-cell office:value-type="float" office:value="-101" table:formula="of:=[.F84]-[.H84]" table:style-name="ce15">
            <text:p>-101</text:p>
          </table:table-cell>
          <table:table-cell office:value-type="percentage" office:value="-1.8740629685157422E-2" table:formula="of:=([.I85]-[.I84])/[.I84]" table:style-name="ce16">
            <text:p>-2%</text:p>
          </table:table-cell>
          <table:table-cell office:value-type="string" office:string-value="Valid" table:formula="of:=IF([.F84]&lt;=[.E84]; &quot;Valid&quot;; &quot;Invalid&quot;)" table:style-name="ce17">
            <text:p>Valid</text:p>
          </table:table-cell>
          <table:table-cell office:value-type="string" office:string-value="Valid" table:formula="of:=IF([.H84]&lt;=[.G84]; &quot;Valid&quot;; &quot;Invalid&quot;)" table:style-name="ce17">
            <text:p>Valid</text:p>
          </table:table-cell>
          <table:table-cell office:value-type="string" office:string-value="Stable/Reducing" table:formula="of:=IF([.J84]&gt;0; &quot;Increasing Pressure&quot;; &quot;Stable/Reducing&quot;)" table:style-name="ce18">
            <text:p>Stable/Reducing</text:p>
          </table:table-cell>
          <table:table-cell office:value-type="float" office:value="1.7266187050359711" table:formula="of:=IFERROR([.H84]/[.F84]; 0)" table:style-name="ce17">
            <text:p>1.726618705</text:p>
          </table:table-cell>
          <table:table-cell office:value-type="float" office:value="7510.5714285714284" table:formula="of:=AVERAGE([.I84:.I90])" table:style-name="ce15">
            <text:p>7511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5-23T00:00:00" table:style-name="ce14">
            <text:p>23-05-2023</text:p>
          </table:table-cell>
          <table:table-cell office:value-type="string" office:string-value="May" table:formula="of:=TEXT([.A85]; &quot;mmmm&quot;)" table:style-name="ce14">
            <text:p>May</text:p>
          </table:table-cell>
          <table:table-cell office:value-type="string" office:string-value="2023-05" table:formula="of:=TEXT([.A85]; &quot;yyyy-mm&quot;)" table:style-name="ce14">
            <text:p>2023-05</text:p>
          </table:table-cell>
          <table:table-cell office:value-type="float" office:value="25" table:style-name="ce9">
            <text:p>25</text:p>
          </table:table-cell>
          <table:table-cell office:value-type="float" office:value="66" table:style-name="ce9">
            <text:p>66</text:p>
          </table:table-cell>
          <table:table-cell office:value-type="float" office:value="94" table:style-name="ce9">
            <text:p>94</text:p>
          </table:table-cell>
          <table:table-cell office:value-type="float" office:value="7788" table:style-name="ce9">
            <text:p>7788</text:p>
          </table:table-cell>
          <table:table-cell office:value-type="float" office:value="246" table:style-name="ce9">
            <text:p>246</text:p>
          </table:table-cell>
          <table:table-cell office:value-type="float" office:value="7854" table:formula="of:=SUM([.G85]+[.E85])" table:style-name="ce15">
            <text:p>7854</text:p>
          </table:table-cell>
          <table:table-cell office:value-type="float" office:value="-152" table:formula="of:=[.F85]-[.H85]" table:style-name="ce15">
            <text:p>-152</text:p>
          </table:table-cell>
          <table:table-cell office:value-type="percentage" office:value="-9.5492742551566076E-3" table:formula="of:=([.I86]-[.I85])/[.I85]" table:style-name="ce16">
            <text:p>-1%</text:p>
          </table:table-cell>
          <table:table-cell office:value-type="string" office:string-value="Invalid" table:formula="of:=IF([.F85]&lt;=[.E85]; &quot;Valid&quot;; &quot;Invalid&quot;)" table:style-name="ce17">
            <text:p>Invalid</text:p>
          </table:table-cell>
          <table:table-cell office:value-type="string" office:string-value="Valid" table:formula="of:=IF([.H85]&lt;=[.G85]; &quot;Valid&quot;; &quot;Invalid&quot;)" table:style-name="ce17">
            <text:p>Valid</text:p>
          </table:table-cell>
          <table:table-cell office:value-type="string" office:string-value="Stable/Reducing" table:formula="of:=IF([.J85]&gt;0; &quot;Increasing Pressure&quot;; &quot;Stable/Reducing&quot;)" table:style-name="ce18">
            <text:p>Stable/Reducing</text:p>
          </table:table-cell>
          <table:table-cell office:value-type="float" office:value="2.6170212765957448" table:formula="of:=IFERROR([.H85]/[.F85]; 0)" table:style-name="ce17">
            <text:p>2.617021277</text:p>
          </table:table-cell>
          <table:table-cell office:value-type="float" office:value="7379.1428571428569" table:formula="of:=AVERAGE([.I85:.I91])" table:style-name="ce15">
            <text:p>7379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5-24T00:00:00" table:style-name="ce14">
            <text:p>24-05-2023</text:p>
          </table:table-cell>
          <table:table-cell office:value-type="string" office:string-value="May" table:formula="of:=TEXT([.A86]; &quot;mmmm&quot;)" table:style-name="ce14">
            <text:p>May</text:p>
          </table:table-cell>
          <table:table-cell office:value-type="string" office:string-value="2023-05" table:formula="of:=TEXT([.A86]; &quot;yyyy-mm&quot;)" table:style-name="ce14">
            <text:p>2023-05</text:p>
          </table:table-cell>
          <table:table-cell office:value-type="float" office:value="35" table:style-name="ce9">
            <text:p>35</text:p>
          </table:table-cell>
          <table:table-cell office:value-type="float" office:value="70" table:style-name="ce9">
            <text:p>70</text:p>
          </table:table-cell>
          <table:table-cell office:value-type="float" office:value="53" table:style-name="ce9">
            <text:p>53</text:p>
          </table:table-cell>
          <table:table-cell office:value-type="float" office:value="7709" table:style-name="ce9">
            <text:p>7709</text:p>
          </table:table-cell>
          <table:table-cell office:value-type="float" office:value="276" table:style-name="ce9">
            <text:p>276</text:p>
          </table:table-cell>
          <table:table-cell office:value-type="float" office:value="7779" table:formula="of:=SUM([.G86]+[.E86])" table:style-name="ce15">
            <text:p>7779</text:p>
          </table:table-cell>
          <table:table-cell office:value-type="float" office:value="-223" table:formula="of:=[.F86]-[.H86]" table:style-name="ce15">
            <text:p>-223</text:p>
          </table:table-cell>
          <table:table-cell office:value-type="percentage" office:value="-2.0568196426275873E-2" table:formula="of:=([.I87]-[.I86])/[.I86]" table:style-name="ce16">
            <text:p>-2%</text:p>
          </table:table-cell>
          <table:table-cell office:value-type="string" office:string-value="Valid" table:formula="of:=IF([.F86]&lt;=[.E86]; &quot;Valid&quot;; &quot;Invalid&quot;)" table:style-name="ce17">
            <text:p>Valid</text:p>
          </table:table-cell>
          <table:table-cell office:value-type="string" office:string-value="Valid" table:formula="of:=IF([.H86]&lt;=[.G86]; &quot;Valid&quot;; &quot;Invalid&quot;)" table:style-name="ce17">
            <text:p>Valid</text:p>
          </table:table-cell>
          <table:table-cell office:value-type="string" office:string-value="Stable/Reducing" table:formula="of:=IF([.J86]&gt;0; &quot;Increasing Pressure&quot;; &quot;Stable/Reducing&quot;)" table:style-name="ce18">
            <text:p>Stable/Reducing</text:p>
          </table:table-cell>
          <table:table-cell office:value-type="float" office:value="5.2075471698113205" table:formula="of:=IFERROR([.H86]/[.F86]; 0)" table:style-name="ce17">
            <text:p>5.20754717</text:p>
          </table:table-cell>
          <table:table-cell office:value-type="float" office:value="7208.2857142857147" table:formula="of:=AVERAGE([.I86:.I92])" table:style-name="ce15">
            <text:p>7208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5-25T00:00:00" table:style-name="ce14">
            <text:p>25-05-2023</text:p>
          </table:table-cell>
          <table:table-cell office:value-type="string" office:string-value="May" table:formula="of:=TEXT([.A87]; &quot;mmmm&quot;)" table:style-name="ce14">
            <text:p>May</text:p>
          </table:table-cell>
          <table:table-cell office:value-type="string" office:string-value="2023-05" table:formula="of:=TEXT([.A87]; &quot;yyyy-mm&quot;)" table:style-name="ce14">
            <text:p>2023-05</text:p>
          </table:table-cell>
          <table:table-cell office:value-type="float" office:value="43" table:style-name="ce9">
            <text:p>43</text:p>
          </table:table-cell>
          <table:table-cell office:value-type="float" office:value="73" table:style-name="ce9">
            <text:p>73</text:p>
          </table:table-cell>
          <table:table-cell office:value-type="float" office:value="64" table:style-name="ce9">
            <text:p>64</text:p>
          </table:table-cell>
          <table:table-cell office:value-type="float" office:value="7546" table:style-name="ce9">
            <text:p>7546</text:p>
          </table:table-cell>
          <table:table-cell office:value-type="float" office:value="408" table:style-name="ce9">
            <text:p>408</text:p>
          </table:table-cell>
          <table:table-cell office:value-type="float" office:value="7619" table:formula="of:=SUM([.G87]+[.E87])" table:style-name="ce15">
            <text:p>7619</text:p>
          </table:table-cell>
          <table:table-cell office:value-type="float" office:value="-344" table:formula="of:=[.F87]-[.H87]" table:style-name="ce15">
            <text:p>-344</text:p>
          </table:table-cell>
          <table:table-cell office:value-type="percentage" office:value="-7.3894211838823998E-2" table:formula="of:=([.I88]-[.I87])/[.I87]" table:style-name="ce16">
            <text:p>-7%</text:p>
          </table:table-cell>
          <table:table-cell office:value-type="string" office:string-value="Valid" table:formula="of:=IF([.F87]&lt;=[.E87]; &quot;Valid&quot;; &quot;Invalid&quot;)" table:style-name="ce17">
            <text:p>Valid</text:p>
          </table:table-cell>
          <table:table-cell office:value-type="string" office:string-value="Valid" table:formula="of:=IF([.H87]&lt;=[.G87]; &quot;Valid&quot;; &quot;Invalid&quot;)" table:style-name="ce17">
            <text:p>Valid</text:p>
          </table:table-cell>
          <table:table-cell office:value-type="string" office:string-value="Stable/Reducing" table:formula="of:=IF([.J87]&gt;0; &quot;Increasing Pressure&quot;; &quot;Stable/Reducing&quot;)" table:style-name="ce18">
            <text:p>Stable/Reducing</text:p>
          </table:table-cell>
          <table:table-cell office:value-type="float" office:value="6.375" table:formula="of:=IFERROR([.H87]/[.F87]; 0)" table:style-name="ce17">
            <text:p>6.375</text:p>
          </table:table-cell>
          <table:table-cell office:value-type="float" office:value="7044.1428571428569" table:formula="of:=AVERAGE([.I87:.I93])" table:style-name="ce15">
            <text:p>7044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5-29T00:00:00" table:style-name="ce14">
            <text:p>29-05-2023</text:p>
          </table:table-cell>
          <table:table-cell office:value-type="string" office:string-value="May" table:formula="of:=TEXT([.A88]; &quot;mmmm&quot;)" table:style-name="ce14">
            <text:p>May</text:p>
          </table:table-cell>
          <table:table-cell office:value-type="string" office:string-value="2023-05" table:formula="of:=TEXT([.A88]; &quot;yyyy-mm&quot;)" table:style-name="ce14">
            <text:p>2023-05</text:p>
          </table:table-cell>
          <table:table-cell office:value-type="float" office:value="41" table:style-name="ce9">
            <text:p>41</text:p>
          </table:table-cell>
          <table:table-cell office:value-type="float" office:value="60" table:style-name="ce9">
            <text:p>60</text:p>
          </table:table-cell>
          <table:table-cell office:value-type="float" office:value="71" table:style-name="ce9">
            <text:p>71</text:p>
          </table:table-cell>
          <table:table-cell office:value-type="float" office:value="6996" table:style-name="ce9">
            <text:p>6996</text:p>
          </table:table-cell>
          <table:table-cell office:value-type="float" office:value="207" table:style-name="ce9">
            <text:p>207</text:p>
          </table:table-cell>
          <table:table-cell office:value-type="float" office:value="7056" table:formula="of:=SUM([.G88]+[.E88])" table:style-name="ce15">
            <text:p>7056</text:p>
          </table:table-cell>
          <table:table-cell office:value-type="float" office:value="-136" table:formula="of:=[.F88]-[.H88]" table:style-name="ce15">
            <text:p>-136</text:p>
          </table:table-cell>
          <table:table-cell office:value-type="percentage" office:value="1.0345804988662131E-2" table:formula="of:=([.I89]-[.I88])/[.I88]" table:style-name="ce16">
            <text:p>1%</text:p>
          </table:table-cell>
          <table:table-cell office:value-type="string" office:string-value="Invalid" table:formula="of:=IF([.F88]&lt;=[.E88]; &quot;Valid&quot;; &quot;Invalid&quot;)" table:style-name="ce17">
            <text:p>Invalid</text:p>
          </table:table-cell>
          <table:table-cell office:value-type="string" office:string-value="Valid" table:formula="of:=IF([.H88]&lt;=[.G88]; &quot;Valid&quot;; &quot;Invalid&quot;)" table:style-name="ce17">
            <text:p>Valid</text:p>
          </table:table-cell>
          <table:table-cell office:value-type="string" office:string-value="Stable/Reducing" table:formula="of:=IF([.J88]&gt;0; &quot;Increasing Pressure&quot;; &quot;Stable/Reducing&quot;)" table:style-name="ce18">
            <text:p>Stable/Reducing</text:p>
          </table:table-cell>
          <table:table-cell office:value-type="float" office:value="2.915492957746479" table:formula="of:=IFERROR([.H88]/[.F88]; 0)" table:style-name="ce17">
            <text:p>2.915492958</text:p>
          </table:table-cell>
          <table:table-cell office:value-type="float" office:value="6903.1428571428569" table:formula="of:=AVERAGE([.I88:.I94])" table:style-name="ce15">
            <text:p>6903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5-30T00:00:00" table:style-name="ce14">
            <text:p>30-05-2023</text:p>
          </table:table-cell>
          <table:table-cell office:value-type="string" office:string-value="May" table:formula="of:=TEXT([.A89]; &quot;mmmm&quot;)" table:style-name="ce14">
            <text:p>May</text:p>
          </table:table-cell>
          <table:table-cell office:value-type="string" office:string-value="2023-05" table:formula="of:=TEXT([.A89]; &quot;yyyy-mm&quot;)" table:style-name="ce14">
            <text:p>2023-05</text:p>
          </table:table-cell>
          <table:table-cell office:value-type="float" office:value="65" table:style-name="ce9">
            <text:p>65</text:p>
          </table:table-cell>
          <table:table-cell office:value-type="float" office:value="83" table:style-name="ce9">
            <text:p>83</text:p>
          </table:table-cell>
          <table:table-cell office:value-type="float" office:value="65" table:style-name="ce9">
            <text:p>65</text:p>
          </table:table-cell>
          <table:table-cell office:value-type="float" office:value="7046" table:style-name="ce9">
            <text:p>7046</text:p>
          </table:table-cell>
          <table:table-cell office:value-type="float" office:value="168" table:style-name="ce9">
            <text:p>168</text:p>
          </table:table-cell>
          <table:table-cell office:value-type="float" office:value="7129" table:formula="of:=SUM([.G89]+[.E89])" table:style-name="ce15">
            <text:p>7129</text:p>
          </table:table-cell>
          <table:table-cell office:value-type="float" office:value="-103" table:formula="of:=[.F89]-[.H89]" table:style-name="ce15">
            <text:p>-103</text:p>
          </table:table-cell>
          <table:table-cell office:value-type="percentage" office:value="5.6108851171272271E-4" table:formula="of:=([.I90]-[.I89])/[.I89]" table:style-name="ce16">
            <text:p>0%</text:p>
          </table:table-cell>
          <table:table-cell office:value-type="string" office:string-value="Valid" table:formula="of:=IF([.F89]&lt;=[.E89]; &quot;Valid&quot;; &quot;Invalid&quot;)" table:style-name="ce17">
            <text:p>Valid</text:p>
          </table:table-cell>
          <table:table-cell office:value-type="string" office:string-value="Valid" table:formula="of:=IF([.H89]&lt;=[.G89]; &quot;Valid&quot;; &quot;Invalid&quot;)" table:style-name="ce17">
            <text:p>Valid</text:p>
          </table:table-cell>
          <table:table-cell office:value-type="string" office:string-value="Stable/Reducing" table:formula="of:=IF([.J89]&gt;0; &quot;Increasing Pressure&quot;; &quot;Stable/Reducing&quot;)" table:style-name="ce18">
            <text:p>Stable/Reducing</text:p>
          </table:table-cell>
          <table:table-cell office:value-type="float" office:value="2.5846153846153848" table:formula="of:=IFERROR([.H89]/[.F89]; 0)" table:style-name="ce17">
            <text:p>2.584615385</text:p>
          </table:table-cell>
          <table:table-cell office:value-type="float" office:value="6844.4285714285716" table:formula="of:=AVERAGE([.I89:.I95])" table:style-name="ce15">
            <text:p>6844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5-31T00:00:00" table:style-name="ce14">
            <text:p>31-05-2023</text:p>
          </table:table-cell>
          <table:table-cell office:value-type="string" office:string-value="May" table:formula="of:=TEXT([.A90]; &quot;mmmm&quot;)" table:style-name="ce14">
            <text:p>May</text:p>
          </table:table-cell>
          <table:table-cell office:value-type="string" office:string-value="2023-05" table:formula="of:=TEXT([.A90]; &quot;yyyy-mm&quot;)" table:style-name="ce14">
            <text:p>2023-05</text:p>
          </table:table-cell>
          <table:table-cell office:value-type="float" office:value="38" table:style-name="ce9">
            <text:p>38</text:p>
          </table:table-cell>
          <table:table-cell office:value-type="float" office:value="80" table:style-name="ce9">
            <text:p>80</text:p>
          </table:table-cell>
          <table:table-cell office:value-type="float" office:value="82" table:style-name="ce9">
            <text:p>82</text:p>
          </table:table-cell>
          <table:table-cell office:value-type="float" office:value="7053" table:style-name="ce9">
            <text:p>7053</text:p>
          </table:table-cell>
          <table:table-cell office:value-type="float" office:value="210" table:style-name="ce9">
            <text:p>210</text:p>
          </table:table-cell>
          <table:table-cell office:value-type="float" office:value="7133" table:formula="of:=SUM([.G90]+[.E90])" table:style-name="ce15">
            <text:p>7133</text:p>
          </table:table-cell>
          <table:table-cell office:value-type="float" office:value="-128" table:formula="of:=[.F90]-[.H90]" table:style-name="ce15">
            <text:p>-128</text:p>
          </table:table-cell>
          <table:table-cell office:value-type="percentage" office:value="-6.8694798822374874E-3" table:formula="of:=([.I91]-[.I90])/[.I90]" table:style-name="ce16">
            <text:p>-1%</text:p>
          </table:table-cell>
          <table:table-cell office:value-type="string" office:string-value="Invalid" table:formula="of:=IF([.F90]&lt;=[.E90]; &quot;Valid&quot;; &quot;Invalid&quot;)" table:style-name="ce17">
            <text:p>Invalid</text:p>
          </table:table-cell>
          <table:table-cell office:value-type="string" office:string-value="Valid" table:formula="of:=IF([.H90]&lt;=[.G90]; &quot;Valid&quot;; &quot;Invalid&quot;)" table:style-name="ce17">
            <text:p>Valid</text:p>
          </table:table-cell>
          <table:table-cell office:value-type="string" office:string-value="Stable/Reducing" table:formula="of:=IF([.J90]&gt;0; &quot;Increasing Pressure&quot;; &quot;Stable/Reducing&quot;)" table:style-name="ce18">
            <text:p>Stable/Reducing</text:p>
          </table:table-cell>
          <table:table-cell office:value-type="float" office:value="2.5609756097560976" table:formula="of:=IFERROR([.H90]/[.F90]; 0)" table:style-name="ce17">
            <text:p>2.56097561</text:p>
          </table:table-cell>
          <table:table-cell office:value-type="float" office:value="6774.8571428571431" table:formula="of:=AVERAGE([.I90:.I96])" table:style-name="ce15">
            <text:p>6775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6-01T00:00:00" table:style-name="ce14">
            <text:p>01-06-2023</text:p>
          </table:table-cell>
          <table:table-cell office:value-type="string" office:string-value="June" table:formula="of:=TEXT([.A91]; &quot;mmmm&quot;)" table:style-name="ce14">
            <text:p>June</text:p>
          </table:table-cell>
          <table:table-cell office:value-type="string" office:string-value="2023-06" table:formula="of:=TEXT([.A91]; &quot;yyyy-mm&quot;)" table:style-name="ce14">
            <text:p>2023-06</text:p>
          </table:table-cell>
          <table:table-cell office:value-type="float" office:value="56" table:style-name="ce9">
            <text:p>56</text:p>
          </table:table-cell>
          <table:table-cell office:value-type="float" office:value="82" table:style-name="ce9">
            <text:p>82</text:p>
          </table:table-cell>
          <table:table-cell office:value-type="float" office:value="68" table:style-name="ce9">
            <text:p>68</text:p>
          </table:table-cell>
          <table:table-cell office:value-type="float" office:value="7002" table:style-name="ce9">
            <text:p>7002</text:p>
          </table:table-cell>
          <table:table-cell office:value-type="float" office:value="287" table:style-name="ce9">
            <text:p>287</text:p>
          </table:table-cell>
          <table:table-cell office:value-type="float" office:value="7084" table:formula="of:=SUM([.G91]+[.E91])" table:style-name="ce15">
            <text:p>7084</text:p>
          </table:table-cell>
          <table:table-cell office:value-type="float" office:value="-219" table:formula="of:=[.F91]-[.H91]" table:style-name="ce15">
            <text:p>-219</text:p>
          </table:table-cell>
          <table:table-cell office:value-type="percentage" office:value="-6.0135516657255784E-2" table:formula="of:=([.I92]-[.I91])/[.I91]" table:style-name="ce16">
            <text:p>-6%</text:p>
          </table:table-cell>
          <table:table-cell office:value-type="string" office:string-value="Valid" table:formula="of:=IF([.F91]&lt;=[.E91]; &quot;Valid&quot;; &quot;Invalid&quot;)" table:style-name="ce17">
            <text:p>Valid</text:p>
          </table:table-cell>
          <table:table-cell office:value-type="string" office:string-value="Valid" table:formula="of:=IF([.H91]&lt;=[.G91]; &quot;Valid&quot;; &quot;Invalid&quot;)" table:style-name="ce17">
            <text:p>Valid</text:p>
          </table:table-cell>
          <table:table-cell office:value-type="string" office:string-value="Stable/Reducing" table:formula="of:=IF([.J91]&gt;0; &quot;Increasing Pressure&quot;; &quot;Stable/Reducing&quot;)" table:style-name="ce18">
            <text:p>Stable/Reducing</text:p>
          </table:table-cell>
          <table:table-cell office:value-type="float" office:value="4.2205882352941178" table:formula="of:=IFERROR([.H91]/[.F91]; 0)" table:style-name="ce17">
            <text:p>4.220588235</text:p>
          </table:table-cell>
          <table:table-cell office:value-type="float" office:value="6635.7142857142853" table:formula="of:=AVERAGE([.I91:.I97])" table:style-name="ce15">
            <text:p>6636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6-04T00:00:00" table:style-name="ce14">
            <text:p>04-06-2023</text:p>
          </table:table-cell>
          <table:table-cell office:value-type="string" office:string-value="June" table:formula="of:=TEXT([.A92]; &quot;mmmm&quot;)" table:style-name="ce14">
            <text:p>June</text:p>
          </table:table-cell>
          <table:table-cell office:value-type="string" office:string-value="2023-06" table:formula="of:=TEXT([.A92]; &quot;yyyy-mm&quot;)" table:style-name="ce14">
            <text:p>2023-06</text:p>
          </table:table-cell>
          <table:table-cell office:value-type="float" office:value="74" table:style-name="ce9">
            <text:p>74</text:p>
          </table:table-cell>
          <table:table-cell office:value-type="float" office:value="103" table:style-name="ce9">
            <text:p>103</text:p>
          </table:table-cell>
          <table:table-cell office:value-type="float" office:value="80" table:style-name="ce9">
            <text:p>80</text:p>
          </table:table-cell>
          <table:table-cell office:value-type="float" office:value="6555" table:style-name="ce9">
            <text:p>6555</text:p>
          </table:table-cell>
          <table:table-cell office:value-type="float" office:value="292" table:style-name="ce9">
            <text:p>292</text:p>
          </table:table-cell>
          <table:table-cell office:value-type="float" office:value="6658" table:formula="of:=SUM([.G92]+[.E92])" table:style-name="ce15">
            <text:p>6658</text:p>
          </table:table-cell>
          <table:table-cell office:value-type="float" office:value="-212" table:formula="of:=[.F92]-[.H92]" table:style-name="ce15">
            <text:p>-212</text:p>
          </table:table-cell>
          <table:table-cell office:value-type="percentage" office:value="-4.205467107239411E-3" table:formula="of:=([.I93]-[.I92])/[.I92]" table:style-name="ce16">
            <text:p>0%</text:p>
          </table:table-cell>
          <table:table-cell office:value-type="string" office:string-value="Valid" table:formula="of:=IF([.F92]&lt;=[.E92]; &quot;Valid&quot;; &quot;Invalid&quot;)" table:style-name="ce17">
            <text:p>Valid</text:p>
          </table:table-cell>
          <table:table-cell office:value-type="string" office:string-value="Valid" table:formula="of:=IF([.H92]&lt;=[.G92]; &quot;Valid&quot;; &quot;Invalid&quot;)" table:style-name="ce17">
            <text:p>Valid</text:p>
          </table:table-cell>
          <table:table-cell office:value-type="string" office:string-value="Stable/Reducing" table:formula="of:=IF([.J92]&gt;0; &quot;Increasing Pressure&quot;; &quot;Stable/Reducing&quot;)" table:style-name="ce18">
            <text:p>Stable/Reducing</text:p>
          </table:table-cell>
          <table:table-cell office:value-type="float" office:value="3.65" table:formula="of:=IFERROR([.H92]/[.F92]; 0)" table:style-name="ce17">
            <text:p>3.65</text:p>
          </table:table-cell>
          <table:table-cell office:value-type="float" office:value="6500.7142857142853" table:formula="of:=AVERAGE([.I92:.I98])" table:style-name="ce15">
            <text:p>6501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6-05T00:00:00" table:style-name="ce14">
            <text:p>05-06-2023</text:p>
          </table:table-cell>
          <table:table-cell office:value-type="string" office:string-value="June" table:formula="of:=TEXT([.A93]; &quot;mmmm&quot;)" table:style-name="ce14">
            <text:p>June</text:p>
          </table:table-cell>
          <table:table-cell office:value-type="string" office:string-value="2023-06" table:formula="of:=TEXT([.A93]; &quot;yyyy-mm&quot;)" table:style-name="ce14">
            <text:p>2023-06</text:p>
          </table:table-cell>
          <table:table-cell office:value-type="float" office:value="68" table:style-name="ce9">
            <text:p>68</text:p>
          </table:table-cell>
          <table:table-cell office:value-type="float" office:value="107" table:style-name="ce9">
            <text:p>107</text:p>
          </table:table-cell>
          <table:table-cell office:value-type="float" office:value="102" table:style-name="ce9">
            <text:p>102</text:p>
          </table:table-cell>
          <table:table-cell office:value-type="float" office:value="6523" table:style-name="ce9">
            <text:p>6523</text:p>
          </table:table-cell>
          <table:table-cell office:value-type="float" office:value="189" table:style-name="ce9">
            <text:p>189</text:p>
          </table:table-cell>
          <table:table-cell office:value-type="float" office:value="6630" table:formula="of:=SUM([.G93]+[.E93])" table:style-name="ce15">
            <text:p>6630</text:p>
          </table:table-cell>
          <table:table-cell office:value-type="float" office:value="-87" table:formula="of:=[.F93]-[.H93]" table:style-name="ce15">
            <text:p>-87</text:p>
          </table:table-cell>
          <table:table-cell office:value-type="percentage" office:value="3.0165912518853697E-4" table:formula="of:=([.I94]-[.I93])/[.I93]" table:style-name="ce16">
            <text:p>0%</text:p>
          </table:table-cell>
          <table:table-cell office:value-type="string" office:string-value="Valid" table:formula="of:=IF([.F93]&lt;=[.E93]; &quot;Valid&quot;; &quot;Invalid&quot;)" table:style-name="ce17">
            <text:p>Valid</text:p>
          </table:table-cell>
          <table:table-cell office:value-type="string" office:string-value="Valid" table:formula="of:=IF([.H93]&lt;=[.G93]; &quot;Valid&quot;; &quot;Invalid&quot;)" table:style-name="ce17">
            <text:p>Valid</text:p>
          </table:table-cell>
          <table:table-cell office:value-type="string" office:string-value="Stable/Reducing" table:formula="of:=IF([.J93]&gt;0; &quot;Increasing Pressure&quot;; &quot;Stable/Reducing&quot;)" table:style-name="ce18">
            <text:p>Stable/Reducing</text:p>
          </table:table-cell>
          <table:table-cell office:value-type="float" office:value="1.8529411764705883" table:formula="of:=IFERROR([.H93]/[.F93]; 0)" table:style-name="ce17">
            <text:p>1.852941176</text:p>
          </table:table-cell>
          <table:table-cell office:value-type="float" office:value="6424.5714285714284" table:formula="of:=AVERAGE([.I93:.I99])" table:style-name="ce15">
            <text:p>6425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6-06T00:00:00" table:style-name="ce14">
            <text:p>06-06-2023</text:p>
          </table:table-cell>
          <table:table-cell office:value-type="string" office:string-value="June" table:formula="of:=TEXT([.A94]; &quot;mmmm&quot;)" table:style-name="ce14">
            <text:p>June</text:p>
          </table:table-cell>
          <table:table-cell office:value-type="string" office:string-value="2023-06" table:formula="of:=TEXT([.A94]; &quot;yyyy-mm&quot;)" table:style-name="ce14">
            <text:p>2023-06</text:p>
          </table:table-cell>
          <table:table-cell office:value-type="float" office:value="92" table:style-name="ce9">
            <text:p>92</text:p>
          </table:table-cell>
          <table:table-cell office:value-type="float" office:value="124" table:style-name="ce9">
            <text:p>124</text:p>
          </table:table-cell>
          <table:table-cell office:value-type="float" office:value="93" table:style-name="ce9">
            <text:p>93</text:p>
          </table:table-cell>
          <table:table-cell office:value-type="float" office:value="6508" table:style-name="ce9">
            <text:p>6508</text:p>
          </table:table-cell>
          <table:table-cell office:value-type="float" office:value="187" table:style-name="ce9">
            <text:p>187</text:p>
          </table:table-cell>
          <table:table-cell office:value-type="float" office:value="6632" table:formula="of:=SUM([.G94]+[.E94])" table:style-name="ce15">
            <text:p>6632</text:p>
          </table:table-cell>
          <table:table-cell office:value-type="float" office:value="-94" table:formula="of:=[.F94]-[.H94]" table:style-name="ce15">
            <text:p>-94</text:p>
          </table:table-cell>
          <table:table-cell office:value-type="percentage" office:value="1.9601930036188178E-3" table:formula="of:=([.I95]-[.I94])/[.I94]" table:style-name="ce16">
            <text:p>0%</text:p>
          </table:table-cell>
          <table:table-cell office:value-type="string" office:string-value="Valid" table:formula="of:=IF([.F94]&lt;=[.E94]; &quot;Valid&quot;; &quot;Invalid&quot;)" table:style-name="ce17">
            <text:p>Valid</text:p>
          </table:table-cell>
          <table:table-cell office:value-type="string" office:string-value="Valid" table:formula="of:=IF([.H94]&lt;=[.G94]; &quot;Valid&quot;; &quot;Invalid&quot;)" table:style-name="ce17">
            <text:p>Valid</text:p>
          </table:table-cell>
          <table:table-cell office:value-type="string" office:string-value="Stable/Reducing" table:formula="of:=IF([.J94]&gt;0; &quot;Increasing Pressure&quot;; &quot;Stable/Reducing&quot;)" table:style-name="ce18">
            <text:p>Stable/Reducing</text:p>
          </table:table-cell>
          <table:table-cell office:value-type="float" office:value="2.010752688172043" table:formula="of:=IFERROR([.H94]/[.F94]; 0)" table:style-name="ce17">
            <text:p>2.010752688</text:p>
          </table:table-cell>
          <table:table-cell office:value-type="float" office:value="6357.7142857142853" table:formula="of:=AVERAGE([.I94:.I100])" table:style-name="ce15">
            <text:p>6358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6-07T00:00:00" table:style-name="ce14">
            <text:p>07-06-2023</text:p>
          </table:table-cell>
          <table:table-cell office:value-type="string" office:string-value="June" table:formula="of:=TEXT([.A95]; &quot;mmmm&quot;)" table:style-name="ce14">
            <text:p>June</text:p>
          </table:table-cell>
          <table:table-cell office:value-type="string" office:string-value="2023-06" table:formula="of:=TEXT([.A95]; &quot;yyyy-mm&quot;)" table:style-name="ce14">
            <text:p>2023-06</text:p>
          </table:table-cell>
          <table:table-cell office:value-type="float" office:value="113" table:style-name="ce9">
            <text:p>113</text:p>
          </table:table-cell>
          <table:table-cell office:value-type="float" office:value="162" table:style-name="ce9">
            <text:p>162</text:p>
          </table:table-cell>
          <table:table-cell office:value-type="float" office:value="107" table:style-name="ce9">
            <text:p>107</text:p>
          </table:table-cell>
          <table:table-cell office:value-type="float" office:value="6483" table:style-name="ce9">
            <text:p>6483</text:p>
          </table:table-cell>
          <table:table-cell office:value-type="float" office:value="208" table:style-name="ce9">
            <text:p>208</text:p>
          </table:table-cell>
          <table:table-cell office:value-type="float" office:value="6645" table:formula="of:=SUM([.G95]+[.E95])" table:style-name="ce15">
            <text:p>6645</text:p>
          </table:table-cell>
          <table:table-cell office:value-type="float" office:value="-101" table:formula="of:=[.F95]-[.H95]" table:style-name="ce15">
            <text:p>-101</text:p>
          </table:table-cell>
          <table:table-cell office:value-type="percentage" office:value="-4.514672686230248E-4" table:formula="of:=([.I96]-[.I95])/[.I95]" table:style-name="ce16">
            <text:p>0%</text:p>
          </table:table-cell>
          <table:table-cell office:value-type="string" office:string-value="Valid" table:formula="of:=IF([.F95]&lt;=[.E95]; &quot;Valid&quot;; &quot;Invalid&quot;)" table:style-name="ce17">
            <text:p>Valid</text:p>
          </table:table-cell>
          <table:table-cell office:value-type="string" office:string-value="Valid" table:formula="of:=IF([.H95]&lt;=[.G95]; &quot;Valid&quot;; &quot;Invalid&quot;)" table:style-name="ce17">
            <text:p>Valid</text:p>
          </table:table-cell>
          <table:table-cell office:value-type="string" office:string-value="Stable/Reducing" table:formula="of:=IF([.J95]&gt;0; &quot;Increasing Pressure&quot;; &quot;Stable/Reducing&quot;)" table:style-name="ce18">
            <text:p>Stable/Reducing</text:p>
          </table:table-cell>
          <table:table-cell office:value-type="float" office:value="1.9439252336448598" table:formula="of:=IFERROR([.H95]/[.F95]; 0)" table:style-name="ce17">
            <text:p>1.943925234</text:p>
          </table:table-cell>
          <table:table-cell office:value-type="float" office:value="6283.5714285714284" table:formula="of:=AVERAGE([.I95:.I101])" table:style-name="ce15">
            <text:p>6284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6-08T00:00:00" table:style-name="ce14">
            <text:p>08-06-2023</text:p>
          </table:table-cell>
          <table:table-cell office:value-type="string" office:string-value="June" table:formula="of:=TEXT([.A96]; &quot;mmmm&quot;)" table:style-name="ce14">
            <text:p>June</text:p>
          </table:table-cell>
          <table:table-cell office:value-type="string" office:string-value="2023-06" table:formula="of:=TEXT([.A96]; &quot;yyyy-mm&quot;)" table:style-name="ce14">
            <text:p>2023-06</text:p>
          </table:table-cell>
          <table:table-cell office:value-type="float" office:value="106" table:style-name="ce9">
            <text:p>106</text:p>
          </table:table-cell>
          <table:table-cell office:value-type="float" office:value="196" table:style-name="ce9">
            <text:p>196</text:p>
          </table:table-cell>
          <table:table-cell office:value-type="float" office:value="131" table:style-name="ce9">
            <text:p>131</text:p>
          </table:table-cell>
          <table:table-cell office:value-type="float" office:value="6446" table:style-name="ce9">
            <text:p>6446</text:p>
          </table:table-cell>
          <table:table-cell office:value-type="float" office:value="255" table:style-name="ce9">
            <text:p>255</text:p>
          </table:table-cell>
          <table:table-cell office:value-type="float" office:value="6642" table:formula="of:=SUM([.G96]+[.E96])" table:style-name="ce15">
            <text:p>6642</text:p>
          </table:table-cell>
          <table:table-cell office:value-type="float" office:value="-124" table:formula="of:=[.F96]-[.H96]" table:style-name="ce15">
            <text:p>-124</text:p>
          </table:table-cell>
          <table:table-cell office:value-type="percentage" office:value="-7.2719060523938575E-2" table:formula="of:=([.I97]-[.I96])/[.I96]" table:style-name="ce16">
            <text:p>-7%</text:p>
          </table:table-cell>
          <table:table-cell office:value-type="string" office:string-value="Valid" table:formula="of:=IF([.F96]&lt;=[.E96]; &quot;Valid&quot;; &quot;Invalid&quot;)" table:style-name="ce17">
            <text:p>Valid</text:p>
          </table:table-cell>
          <table:table-cell office:value-type="string" office:string-value="Valid" table:formula="of:=IF([.H96]&lt;=[.G96]; &quot;Valid&quot;; &quot;Invalid&quot;)" table:style-name="ce17">
            <text:p>Valid</text:p>
          </table:table-cell>
          <table:table-cell office:value-type="string" office:string-value="Stable/Reducing" table:formula="of:=IF([.J96]&gt;0; &quot;Increasing Pressure&quot;; &quot;Stable/Reducing&quot;)" table:style-name="ce18">
            <text:p>Stable/Reducing</text:p>
          </table:table-cell>
          <table:table-cell office:value-type="float" office:value="1.9465648854961832" table:formula="of:=IFERROR([.H96]/[.F96]; 0)" table:style-name="ce17">
            <text:p>1.946564885</text:p>
          </table:table-cell>
          <table:table-cell office:value-type="float" office:value="6152.8571428571431" table:formula="of:=AVERAGE([.I96:.I102])" table:style-name="ce15">
            <text:p>6153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6-11T00:00:00" table:style-name="ce14">
            <text:p>11-06-2023</text:p>
          </table:table-cell>
          <table:table-cell office:value-type="string" office:string-value="June" table:formula="of:=TEXT([.A97]; &quot;mmmm&quot;)" table:style-name="ce14">
            <text:p>June</text:p>
          </table:table-cell>
          <table:table-cell office:value-type="string" office:string-value="2023-06" table:formula="of:=TEXT([.A97]; &quot;yyyy-mm&quot;)" table:style-name="ce14">
            <text:p>2023-06</text:p>
          </table:table-cell>
          <table:table-cell office:value-type="float" office:value="86" table:style-name="ce9">
            <text:p>86</text:p>
          </table:table-cell>
          <table:table-cell office:value-type="float" office:value="152" table:style-name="ce9">
            <text:p>152</text:p>
          </table:table-cell>
          <table:table-cell office:value-type="float" office:value="168" table:style-name="ce9">
            <text:p>168</text:p>
          </table:table-cell>
          <table:table-cell office:value-type="float" office:value="6007" table:style-name="ce9">
            <text:p>6007</text:p>
          </table:table-cell>
          <table:table-cell office:value-type="float" office:value="238" table:style-name="ce9">
            <text:p>238</text:p>
          </table:table-cell>
          <table:table-cell office:value-type="float" office:value="6159" table:formula="of:=SUM([.G97]+[.E97])" table:style-name="ce15">
            <text:p>6159</text:p>
          </table:table-cell>
          <table:table-cell office:value-type="float" office:value="-70" table:formula="of:=[.F97]-[.H97]" table:style-name="ce15">
            <text:p>-70</text:p>
          </table:table-cell>
          <table:table-cell office:value-type="percentage" office:value="-3.2472804026627698E-3" table:formula="of:=([.I98]-[.I97])/[.I97]" table:style-name="ce16">
            <text:p>0%</text:p>
          </table:table-cell>
          <table:table-cell office:value-type="string" office:string-value="Invalid" table:formula="of:=IF([.F97]&lt;=[.E97]; &quot;Valid&quot;; &quot;Invalid&quot;)" table:style-name="ce17">
            <text:p>Invalid</text:p>
          </table:table-cell>
          <table:table-cell office:value-type="string" office:string-value="Valid" table:formula="of:=IF([.H97]&lt;=[.G97]; &quot;Valid&quot;; &quot;Invalid&quot;)" table:style-name="ce17">
            <text:p>Valid</text:p>
          </table:table-cell>
          <table:table-cell office:value-type="string" office:string-value="Stable/Reducing" table:formula="of:=IF([.J97]&gt;0; &quot;Increasing Pressure&quot;; &quot;Stable/Reducing&quot;)" table:style-name="ce18">
            <text:p>Stable/Reducing</text:p>
          </table:table-cell>
          <table:table-cell office:value-type="float" office:value="1.4166666666666667" table:formula="of:=IFERROR([.H97]/[.F97]; 0)" table:style-name="ce17">
            <text:p>1.416666667</text:p>
          </table:table-cell>
          <table:table-cell office:value-type="float" office:value="6055" table:formula="of:=AVERAGE([.I97:.I103])" table:style-name="ce15">
            <text:p>6055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6-12T00:00:00" table:style-name="ce14">
            <text:p>12-06-2023</text:p>
          </table:table-cell>
          <table:table-cell office:value-type="string" office:string-value="June" table:formula="of:=TEXT([.A98]; &quot;mmmm&quot;)" table:style-name="ce14">
            <text:p>June</text:p>
          </table:table-cell>
          <table:table-cell office:value-type="string" office:string-value="2023-06" table:formula="of:=TEXT([.A98]; &quot;yyyy-mm&quot;)" table:style-name="ce14">
            <text:p>2023-06</text:p>
          </table:table-cell>
          <table:table-cell office:value-type="float" office:value="84" table:style-name="ce9">
            <text:p>84</text:p>
          </table:table-cell>
          <table:table-cell office:value-type="float" office:value="118" table:style-name="ce9">
            <text:p>118</text:p>
          </table:table-cell>
          <table:table-cell office:value-type="float" office:value="136" table:style-name="ce9">
            <text:p>136</text:p>
          </table:table-cell>
          <table:table-cell office:value-type="float" office:value="6021" table:style-name="ce9">
            <text:p>6021</text:p>
          </table:table-cell>
          <table:table-cell office:value-type="float" office:value="177" table:style-name="ce9">
            <text:p>177</text:p>
          </table:table-cell>
          <table:table-cell office:value-type="float" office:value="6139" table:formula="of:=SUM([.G98]+[.E98])" table:style-name="ce15">
            <text:p>6139</text:p>
          </table:table-cell>
          <table:table-cell office:value-type="float" office:value="-41" table:formula="of:=[.F98]-[.H98]" table:style-name="ce15">
            <text:p>-41</text:p>
          </table:table-cell>
          <table:table-cell office:value-type="percentage" office:value="-2.2805017103762829E-3" table:formula="of:=([.I99]-[.I98])/[.I98]" table:style-name="ce16">
            <text:p>0%</text:p>
          </table:table-cell>
          <table:table-cell office:value-type="string" office:string-value="Invalid" table:formula="of:=IF([.F98]&lt;=[.E98]; &quot;Valid&quot;; &quot;Invalid&quot;)" table:style-name="ce17">
            <text:p>Invalid</text:p>
          </table:table-cell>
          <table:table-cell office:value-type="string" office:string-value="Valid" table:formula="of:=IF([.H98]&lt;=[.G98]; &quot;Valid&quot;; &quot;Invalid&quot;)" table:style-name="ce17">
            <text:p>Valid</text:p>
          </table:table-cell>
          <table:table-cell office:value-type="string" office:string-value="Stable/Reducing" table:formula="of:=IF([.J98]&gt;0; &quot;Increasing Pressure&quot;; &quot;Stable/Reducing&quot;)" table:style-name="ce18">
            <text:p>Stable/Reducing</text:p>
          </table:table-cell>
          <table:table-cell office:value-type="float" office:value="1.3014705882352942" table:formula="of:=IFERROR([.H98]/[.F98]; 0)" table:style-name="ce17">
            <text:p>1.301470588</text:p>
          </table:table-cell>
          <table:table-cell office:value-type="float" office:value="6049.1428571428569" table:formula="of:=AVERAGE([.I98:.I104])" table:style-name="ce15">
            <text:p>6049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6-13T00:00:00" table:style-name="ce14">
            <text:p>13-06-2023</text:p>
          </table:table-cell>
          <table:table-cell office:value-type="string" office:string-value="June" table:formula="of:=TEXT([.A99]; &quot;mmmm&quot;)" table:style-name="ce14">
            <text:p>June</text:p>
          </table:table-cell>
          <table:table-cell office:value-type="string" office:string-value="2023-06" table:formula="of:=TEXT([.A99]; &quot;yyyy-mm&quot;)" table:style-name="ce14">
            <text:p>2023-06</text:p>
          </table:table-cell>
          <table:table-cell office:value-type="float" office:value="59" table:style-name="ce9">
            <text:p>59</text:p>
          </table:table-cell>
          <table:table-cell office:value-type="float" office:value="64" table:style-name="ce9">
            <text:p>64</text:p>
          </table:table-cell>
          <table:table-cell office:value-type="float" office:value="117" table:style-name="ce9">
            <text:p>117</text:p>
          </table:table-cell>
          <table:table-cell office:value-type="float" office:value="6061" table:style-name="ce9">
            <text:p>6061</text:p>
          </table:table-cell>
          <table:table-cell office:value-type="float" office:value="146" table:style-name="ce9">
            <text:p>146</text:p>
          </table:table-cell>
          <table:table-cell office:value-type="float" office:value="6125" table:formula="of:=SUM([.G99]+[.E99])" table:style-name="ce15">
            <text:p>6125</text:p>
          </table:table-cell>
          <table:table-cell office:value-type="float" office:value="-29" table:formula="of:=[.F99]-[.H99]" table:style-name="ce15">
            <text:p>-29</text:p>
          </table:table-cell>
          <table:table-cell office:value-type="percentage" office:value="6.0408163265306125E-3" table:formula="of:=([.I100]-[.I99])/[.I99]" table:style-name="ce16">
            <text:p>1%</text:p>
          </table:table-cell>
          <table:table-cell office:value-type="string" office:string-value="Invalid" table:formula="of:=IF([.F99]&lt;=[.E99]; &quot;Valid&quot;; &quot;Invalid&quot;)" table:style-name="ce17">
            <text:p>Invalid</text:p>
          </table:table-cell>
          <table:table-cell office:value-type="string" office:string-value="Valid" table:formula="of:=IF([.H99]&lt;=[.G99]; &quot;Valid&quot;; &quot;Invalid&quot;)" table:style-name="ce17">
            <text:p>Valid</text:p>
          </table:table-cell>
          <table:table-cell office:value-type="string" office:string-value="Stable/Reducing" table:formula="of:=IF([.J99]&gt;0; &quot;Increasing Pressure&quot;; &quot;Stable/Reducing&quot;)" table:style-name="ce18">
            <text:p>Stable/Reducing</text:p>
          </table:table-cell>
          <table:table-cell office:value-type="float" office:value="1.2478632478632479" table:formula="of:=IFERROR([.H99]/[.F99]; 0)" table:style-name="ce17">
            <text:p>1.247863248</text:p>
          </table:table-cell>
          <table:table-cell office:value-type="float" office:value="6056.4285714285716" table:formula="of:=AVERAGE([.I99:.I105])" table:style-name="ce15">
            <text:p>6056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6-14T00:00:00" table:style-name="ce14">
            <text:p>14-06-2023</text:p>
          </table:table-cell>
          <table:table-cell office:value-type="string" office:string-value="June" table:formula="of:=TEXT([.A100]; &quot;mmmm&quot;)" table:style-name="ce14">
            <text:p>June</text:p>
          </table:table-cell>
          <table:table-cell office:value-type="string" office:string-value="2023-06" table:formula="of:=TEXT([.A100]; &quot;yyyy-mm&quot;)" table:style-name="ce14">
            <text:p>2023-06</text:p>
          </table:table-cell>
          <table:table-cell office:value-type="float" office:value="62" table:style-name="ce9">
            <text:p>62</text:p>
          </table:table-cell>
          <table:table-cell office:value-type="float" office:value="97" table:style-name="ce9">
            <text:p>97</text:p>
          </table:table-cell>
          <table:table-cell office:value-type="float" office:value="52" table:style-name="ce9">
            <text:p>52</text:p>
          </table:table-cell>
          <table:table-cell office:value-type="float" office:value="6065" table:style-name="ce9">
            <text:p>6065</text:p>
          </table:table-cell>
          <table:table-cell office:value-type="float" office:value="167" table:style-name="ce9">
            <text:p>167</text:p>
          </table:table-cell>
          <table:table-cell office:value-type="float" office:value="6162" table:formula="of:=SUM([.G100]+[.E100])" table:style-name="ce15">
            <text:p>6162</text:p>
          </table:table-cell>
          <table:table-cell office:value-type="float" office:value="-115" table:formula="of:=[.F100]-[.H100]" table:style-name="ce15">
            <text:p>-115</text:p>
          </table:table-cell>
          <table:table-cell office:value-type="percentage" office:value="-7.9519636481661798E-3" table:formula="of:=([.I101]-[.I100])/[.I100]" table:style-name="ce16">
            <text:p>-1%</text:p>
          </table:table-cell>
          <table:table-cell office:value-type="string" office:string-value="Valid" table:formula="of:=IF([.F100]&lt;=[.E100]; &quot;Valid&quot;; &quot;Invalid&quot;)" table:style-name="ce17">
            <text:p>Valid</text:p>
          </table:table-cell>
          <table:table-cell office:value-type="string" office:string-value="Valid" table:formula="of:=IF([.H100]&lt;=[.G100]; &quot;Valid&quot;; &quot;Invalid&quot;)" table:style-name="ce17">
            <text:p>Valid</text:p>
          </table:table-cell>
          <table:table-cell office:value-type="string" office:string-value="Stable/Reducing" table:formula="of:=IF([.J100]&gt;0; &quot;Increasing Pressure&quot;; &quot;Stable/Reducing&quot;)" table:style-name="ce18">
            <text:p>Stable/Reducing</text:p>
          </table:table-cell>
          <table:table-cell office:value-type="float" office:value="3.2115384615384617" table:formula="of:=IFERROR([.H100]/[.F100]; 0)" table:style-name="ce17">
            <text:p>3.211538462</text:p>
          </table:table-cell>
          <table:table-cell office:value-type="float" office:value="6034.1428571428569" table:formula="of:=AVERAGE([.I100:.I106])" table:style-name="ce15">
            <text:p>6034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6-15T00:00:00" table:style-name="ce14">
            <text:p>15-06-2023</text:p>
          </table:table-cell>
          <table:table-cell office:value-type="string" office:string-value="June" table:formula="of:=TEXT([.A101]; &quot;mmmm&quot;)" table:style-name="ce14">
            <text:p>June</text:p>
          </table:table-cell>
          <table:table-cell office:value-type="string" office:string-value="2023-06" table:formula="of:=TEXT([.A101]; &quot;yyyy-mm&quot;)" table:style-name="ce14">
            <text:p>2023-06</text:p>
          </table:table-cell>
          <table:table-cell office:value-type="float" office:value="91" table:style-name="ce9">
            <text:p>91</text:p>
          </table:table-cell>
          <table:table-cell office:value-type="float" office:value="75" table:style-name="ce9">
            <text:p>75</text:p>
          </table:table-cell>
          <table:table-cell office:value-type="float" office:value="97" table:style-name="ce9">
            <text:p>97</text:p>
          </table:table-cell>
          <table:table-cell office:value-type="float" office:value="6038" table:style-name="ce9">
            <text:p>6038</text:p>
          </table:table-cell>
          <table:table-cell office:value-type="float" office:value="272" table:style-name="ce9">
            <text:p>272</text:p>
          </table:table-cell>
          <table:table-cell office:value-type="float" office:value="6113" table:formula="of:=SUM([.G101]+[.E101])" table:style-name="ce15">
            <text:p>6113</text:p>
          </table:table-cell>
          <table:table-cell office:value-type="float" office:value="-175" table:formula="of:=[.F101]-[.H101]" table:style-name="ce15">
            <text:p>-175</text:p>
          </table:table-cell>
          <table:table-cell office:value-type="percentage" office:value="-6.2653361688205469E-2" table:formula="of:=([.I102]-[.I101])/[.I101]" table:style-name="ce16">
            <text:p>-6%</text:p>
          </table:table-cell>
          <table:table-cell office:value-type="string" office:string-value="Invalid" table:formula="of:=IF([.F101]&lt;=[.E101]; &quot;Valid&quot;; &quot;Invalid&quot;)" table:style-name="ce17">
            <text:p>Invalid</text:p>
          </table:table-cell>
          <table:table-cell office:value-type="string" office:string-value="Valid" table:formula="of:=IF([.H101]&lt;=[.G101]; &quot;Valid&quot;; &quot;Invalid&quot;)" table:style-name="ce17">
            <text:p>Valid</text:p>
          </table:table-cell>
          <table:table-cell office:value-type="string" office:string-value="Stable/Reducing" table:formula="of:=IF([.J101]&gt;0; &quot;Increasing Pressure&quot;; &quot;Stable/Reducing&quot;)" table:style-name="ce18">
            <text:p>Stable/Reducing</text:p>
          </table:table-cell>
          <table:table-cell office:value-type="float" office:value="2.804123711340206" table:formula="of:=IFERROR([.H101]/[.F101]; 0)" table:style-name="ce17">
            <text:p>2.804123711</text:p>
          </table:table-cell>
          <table:table-cell office:value-type="float" office:value="6022.1428571428569" table:formula="of:=AVERAGE([.I101:.I107])" table:style-name="ce15">
            <text:p>6022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6-19T00:00:00" table:style-name="ce14">
            <text:p>19-06-2023</text:p>
          </table:table-cell>
          <table:table-cell office:value-type="string" office:string-value="June" table:formula="of:=TEXT([.A102]; &quot;mmmm&quot;)" table:style-name="ce14">
            <text:p>June</text:p>
          </table:table-cell>
          <table:table-cell office:value-type="string" office:string-value="2023-06" table:formula="of:=TEXT([.A102]; &quot;yyyy-mm&quot;)" table:style-name="ce14">
            <text:p>2023-06</text:p>
          </table:table-cell>
          <table:table-cell office:value-type="float" office:value="29" table:style-name="ce9">
            <text:p>29</text:p>
          </table:table-cell>
          <table:table-cell office:value-type="float" office:value="51" table:style-name="ce9">
            <text:p>51</text:p>
          </table:table-cell>
          <table:table-cell office:value-type="float" office:value="11" table:style-name="ce9">
            <text:p>11</text:p>
          </table:table-cell>
          <table:table-cell office:value-type="float" office:value="5679" table:style-name="ce9">
            <text:p>5679</text:p>
          </table:table-cell>
          <table:table-cell office:value-type="float" office:value="142" table:style-name="ce9">
            <text:p>142</text:p>
          </table:table-cell>
          <table:table-cell office:value-type="float" office:value="5730" table:formula="of:=SUM([.G102]+[.E102])" table:style-name="ce15">
            <text:p>5730</text:p>
          </table:table-cell>
          <table:table-cell office:value-type="float" office:value="-131" table:formula="of:=[.F102]-[.H102]" table:style-name="ce15">
            <text:p>-131</text:p>
          </table:table-cell>
          <table:table-cell office:value-type="percentage" office:value="3.9616055846422339E-2" table:formula="of:=([.I103]-[.I102])/[.I102]" table:style-name="ce16">
            <text:p>4%</text:p>
          </table:table-cell>
          <table:table-cell office:value-type="string" office:string-value="Valid" table:formula="of:=IF([.F102]&lt;=[.E102]; &quot;Valid&quot;; &quot;Invalid&quot;)" table:style-name="ce17">
            <text:p>Valid</text:p>
          </table:table-cell>
          <table:table-cell office:value-type="string" office:string-value="Valid" table:formula="of:=IF([.H102]&lt;=[.G102]; &quot;Valid&quot;; &quot;Invalid&quot;)" table:style-name="ce17">
            <text:p>Valid</text:p>
          </table:table-cell>
          <table:table-cell office:value-type="string" office:string-value="Stable/Reducing" table:formula="of:=IF([.J102]&gt;0; &quot;Increasing Pressure&quot;; &quot;Stable/Reducing&quot;)" table:style-name="ce18">
            <text:p>Stable/Reducing</text:p>
          </table:table-cell>
          <table:table-cell office:value-type="float" office:value="12.909090909090908" table:formula="of:=IFERROR([.H102]/[.F102]; 0)" table:style-name="ce17">
            <text:p>12.90909091</text:p>
          </table:table-cell>
          <table:table-cell office:value-type="float" office:value="6026.2857142857147" table:formula="of:=AVERAGE([.I102:.I108])" table:style-name="ce15">
            <text:p>6026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6-20T00:00:00" table:style-name="ce14">
            <text:p>20-06-2023</text:p>
          </table:table-cell>
          <table:table-cell office:value-type="string" office:string-value="June" table:formula="of:=TEXT([.A103]; &quot;mmmm&quot;)" table:style-name="ce14">
            <text:p>June</text:p>
          </table:table-cell>
          <table:table-cell office:value-type="string" office:string-value="2023-06" table:formula="of:=TEXT([.A103]; &quot;yyyy-mm&quot;)" table:style-name="ce14">
            <text:p>2023-06</text:p>
          </table:table-cell>
          <table:table-cell office:value-type="float" office:value="33" table:style-name="ce9">
            <text:p>33</text:p>
          </table:table-cell>
          <table:table-cell office:value-type="float" office:value="53" table:style-name="ce9">
            <text:p>53</text:p>
          </table:table-cell>
          <table:table-cell office:value-type="float" office:value="34" table:style-name="ce9">
            <text:p>34</text:p>
          </table:table-cell>
          <table:table-cell office:value-type="float" office:value="5904" table:style-name="ce9">
            <text:p>5904</text:p>
          </table:table-cell>
          <table:table-cell office:value-type="float" office:value="134" table:style-name="ce9">
            <text:p>134</text:p>
          </table:table-cell>
          <table:table-cell office:value-type="float" office:value="5957" table:formula="of:=SUM([.G103]+[.E103])" table:style-name="ce15">
            <text:p>5957</text:p>
          </table:table-cell>
          <table:table-cell office:value-type="float" office:value="-100" table:formula="of:=[.F103]-[.H103]" table:style-name="ce15">
            <text:p>-100</text:p>
          </table:table-cell>
          <table:table-cell office:value-type="percentage" office:value="2.7027027027027029E-2" table:formula="of:=([.I104]-[.I103])/[.I103]" table:style-name="ce16">
            <text:p>3%</text:p>
          </table:table-cell>
          <table:table-cell office:value-type="string" office:string-value="Valid" table:formula="of:=IF([.F103]&lt;=[.E103]; &quot;Valid&quot;; &quot;Invalid&quot;)" table:style-name="ce17">
            <text:p>Valid</text:p>
          </table:table-cell>
          <table:table-cell office:value-type="string" office:string-value="Valid" table:formula="of:=IF([.H103]&lt;=[.G103]; &quot;Valid&quot;; &quot;Invalid&quot;)" table:style-name="ce17">
            <text:p>Valid</text:p>
          </table:table-cell>
          <table:table-cell office:value-type="string" office:string-value="Stable/Reducing" table:formula="of:=IF([.J103]&gt;0; &quot;Increasing Pressure&quot;; &quot;Stable/Reducing&quot;)" table:style-name="ce18">
            <text:p>Stable/Reducing</text:p>
          </table:table-cell>
          <table:table-cell office:value-type="float" office:value="3.9411764705882355" table:formula="of:=IFERROR([.H103]/[.F103]; 0)" table:style-name="ce17">
            <text:p>3.941176471</text:p>
          </table:table-cell>
          <table:table-cell office:value-type="float" office:value="6093.1428571428569" table:formula="of:=AVERAGE([.I103:.I109])" table:style-name="ce15">
            <text:p>6093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6-21T00:00:00" table:style-name="ce14">
            <text:p>21-06-2023</text:p>
          </table:table-cell>
          <table:table-cell office:value-type="string" office:string-value="June" table:formula="of:=TEXT([.A104]; &quot;mmmm&quot;)" table:style-name="ce14">
            <text:p>June</text:p>
          </table:table-cell>
          <table:table-cell office:value-type="string" office:string-value="2023-06" table:formula="of:=TEXT([.A104]; &quot;yyyy-mm&quot;)" table:style-name="ce14">
            <text:p>2023-06</text:p>
          </table:table-cell>
          <table:table-cell office:value-type="float" office:value="93" table:style-name="ce9">
            <text:p>93</text:p>
          </table:table-cell>
          <table:table-cell office:value-type="float" office:value="196" table:style-name="ce9">
            <text:p>196</text:p>
          </table:table-cell>
          <table:table-cell office:value-type="float" office:value="169" table:style-name="ce9">
            <text:p>169</text:p>
          </table:table-cell>
          <table:table-cell office:value-type="float" office:value="5922" table:style-name="ce9">
            <text:p>5922</text:p>
          </table:table-cell>
          <table:table-cell office:value-type="float" office:value="149" table:style-name="ce9">
            <text:p>149</text:p>
          </table:table-cell>
          <table:table-cell office:value-type="float" office:value="6118" table:formula="of:=SUM([.G104]+[.E104])" table:style-name="ce15">
            <text:p>6118</text:p>
          </table:table-cell>
          <table:table-cell office:value-type="float" office:value="20" table:formula="of:=[.F104]-[.H104]" table:style-name="ce15">
            <text:p>20</text:p>
          </table:table-cell>
          <table:table-cell office:value-type="percentage" office:value="1.1768551814318405E-2" table:formula="of:=([.I105]-[.I104])/[.I104]" table:style-name="ce16">
            <text:p>1%</text:p>
          </table:table-cell>
          <table:table-cell office:value-type="string" office:string-value="Valid" table:formula="of:=IF([.F104]&lt;=[.E104]; &quot;Valid&quot;; &quot;Invalid&quot;)" table:style-name="ce17">
            <text:p>Valid</text:p>
          </table:table-cell>
          <table:table-cell office:value-type="string" office:string-value="Valid" table:formula="of:=IF([.H104]&lt;=[.G104]; &quot;Valid&quot;; &quot;Invalid&quot;)" table:style-name="ce17">
            <text:p>Valid</text:p>
          </table:table-cell>
          <table:table-cell office:value-type="string" office:string-value="Increasing Pressure" table:formula="of:=IF([.J104]&gt;0; &quot;Increasing Pressure&quot;; &quot;Stable/Reducing&quot;)" table:style-name="ce18">
            <text:p>Increasing Pressure</text:p>
          </table:table-cell>
          <table:table-cell office:value-type="float" office:value="0.88165680473372776" table:formula="of:=IFERROR([.H104]/[.F104]; 0)" table:style-name="ce17">
            <text:p>0.881656805</text:p>
          </table:table-cell>
          <table:table-cell office:value-type="float" office:value="6138" table:formula="of:=AVERAGE([.I104:.I110])" table:style-name="ce15">
            <text:p>6138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6-22T00:00:00" table:style-name="ce14">
            <text:p>22-06-2023</text:p>
          </table:table-cell>
          <table:table-cell office:value-type="string" office:string-value="June" table:formula="of:=TEXT([.A105]; &quot;mmmm&quot;)" table:style-name="ce14">
            <text:p>June</text:p>
          </table:table-cell>
          <table:table-cell office:value-type="string" office:string-value="2023-06" table:formula="of:=TEXT([.A105]; &quot;yyyy-mm&quot;)" table:style-name="ce14">
            <text:p>2023-06</text:p>
          </table:table-cell>
          <table:table-cell office:value-type="float" office:value="124" table:style-name="ce9">
            <text:p>124</text:p>
          </table:table-cell>
          <table:table-cell office:value-type="float" office:value="234" table:style-name="ce9">
            <text:p>234</text:p>
          </table:table-cell>
          <table:table-cell office:value-type="float" office:value="161" table:style-name="ce9">
            <text:p>161</text:p>
          </table:table-cell>
          <table:table-cell office:value-type="float" office:value="5956" table:style-name="ce9">
            <text:p>5956</text:p>
          </table:table-cell>
          <table:table-cell office:value-type="float" office:value="207" table:style-name="ce9">
            <text:p>207</text:p>
          </table:table-cell>
          <table:table-cell office:value-type="float" office:value="6190" table:formula="of:=SUM([.G105]+[.E105])" table:style-name="ce15">
            <text:p>6190</text:p>
          </table:table-cell>
          <table:table-cell office:value-type="float" office:value="-46" table:formula="of:=[.F105]-[.H105]" table:style-name="ce15">
            <text:p>-46</text:p>
          </table:table-cell>
          <table:table-cell office:value-type="percentage" office:value="-3.5702746365105009E-2" table:formula="of:=([.I106]-[.I105])/[.I105]" table:style-name="ce16">
            <text:p>-4%</text:p>
          </table:table-cell>
          <table:table-cell office:value-type="string" office:string-value="Valid" table:formula="of:=IF([.F105]&lt;=[.E105]; &quot;Valid&quot;; &quot;Invalid&quot;)" table:style-name="ce17">
            <text:p>Valid</text:p>
          </table:table-cell>
          <table:table-cell office:value-type="string" office:string-value="Valid" table:formula="of:=IF([.H105]&lt;=[.G105]; &quot;Valid&quot;; &quot;Invalid&quot;)" table:style-name="ce17">
            <text:p>Valid</text:p>
          </table:table-cell>
          <table:table-cell office:value-type="string" office:string-value="Stable/Reducing" table:formula="of:=IF([.J105]&gt;0; &quot;Increasing Pressure&quot;; &quot;Stable/Reducing&quot;)" table:style-name="ce18">
            <text:p>Stable/Reducing</text:p>
          </table:table-cell>
          <table:table-cell office:value-type="float" office:value="1.2857142857142858" table:formula="of:=IFERROR([.H105]/[.F105]; 0)" table:style-name="ce17">
            <text:p>1.285714286</text:p>
          </table:table-cell>
          <table:table-cell office:value-type="float" office:value="6148" table:formula="of:=AVERAGE([.I105:.I111])" table:style-name="ce15">
            <text:p>6148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6-25T00:00:00" table:style-name="ce14">
            <text:p>25-06-2023</text:p>
          </table:table-cell>
          <table:table-cell office:value-type="string" office:string-value="June" table:formula="of:=TEXT([.A106]; &quot;mmmm&quot;)" table:style-name="ce14">
            <text:p>June</text:p>
          </table:table-cell>
          <table:table-cell office:value-type="string" office:string-value="2023-06" table:formula="of:=TEXT([.A106]; &quot;yyyy-mm&quot;)" table:style-name="ce14">
            <text:p>2023-06</text:p>
          </table:table-cell>
          <table:table-cell office:value-type="float" office:value="92" table:style-name="ce9">
            <text:p>92</text:p>
          </table:table-cell>
          <table:table-cell office:value-type="float" office:value="203" table:style-name="ce9">
            <text:p>203</text:p>
          </table:table-cell>
          <table:table-cell office:value-type="float" office:value="173" table:style-name="ce9">
            <text:p>173</text:p>
          </table:table-cell>
          <table:table-cell office:value-type="float" office:value="5766" table:style-name="ce9">
            <text:p>5766</text:p>
          </table:table-cell>
          <table:table-cell office:value-type="float" office:value="263" table:style-name="ce9">
            <text:p>263</text:p>
          </table:table-cell>
          <table:table-cell office:value-type="float" office:value="5969" table:formula="of:=SUM([.G106]+[.E106])" table:style-name="ce15">
            <text:p>5969</text:p>
          </table:table-cell>
          <table:table-cell office:value-type="float" office:value="-90" table:formula="of:=[.F106]-[.H106]" table:style-name="ce15">
            <text:p>-90</text:p>
          </table:table-cell>
          <table:table-cell office:value-type="percentage" office:value="1.8261015245434747E-2" table:formula="of:=([.I107]-[.I106])/[.I106]" table:style-name="ce16">
            <text:p>2%</text:p>
          </table:table-cell>
          <table:table-cell office:value-type="string" office:string-value="Valid" table:formula="of:=IF([.F106]&lt;=[.E106]; &quot;Valid&quot;; &quot;Invalid&quot;)" table:style-name="ce17">
            <text:p>Valid</text:p>
          </table:table-cell>
          <table:table-cell office:value-type="string" office:string-value="Valid" table:formula="of:=IF([.H106]&lt;=[.G106]; &quot;Valid&quot;; &quot;Invalid&quot;)" table:style-name="ce17">
            <text:p>Valid</text:p>
          </table:table-cell>
          <table:table-cell office:value-type="string" office:string-value="Stable/Reducing" table:formula="of:=IF([.J106]&gt;0; &quot;Increasing Pressure&quot;; &quot;Stable/Reducing&quot;)" table:style-name="ce18">
            <text:p>Stable/Reducing</text:p>
          </table:table-cell>
          <table:table-cell office:value-type="float" office:value="1.5202312138728324" table:formula="of:=IFERROR([.H106]/[.F106]; 0)" table:style-name="ce17">
            <text:p>1.520231214</text:p>
          </table:table-cell>
          <table:table-cell office:value-type="float" office:value="6183.8571428571431" table:formula="of:=AVERAGE([.I106:.I112])" table:style-name="ce15">
            <text:p>6184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6-26T00:00:00" table:style-name="ce14">
            <text:p>26-06-2023</text:p>
          </table:table-cell>
          <table:table-cell office:value-type="string" office:string-value="June" table:formula="of:=TEXT([.A107]; &quot;mmmm&quot;)" table:style-name="ce14">
            <text:p>June</text:p>
          </table:table-cell>
          <table:table-cell office:value-type="string" office:string-value="2023-06" table:formula="of:=TEXT([.A107]; &quot;yyyy-mm&quot;)" table:style-name="ce14">
            <text:p>2023-06</text:p>
          </table:table-cell>
          <table:table-cell office:value-type="float" office:value="186" table:style-name="ce9">
            <text:p>186</text:p>
          </table:table-cell>
          <table:table-cell office:value-type="float" office:value="259" table:style-name="ce9">
            <text:p>259</text:p>
          </table:table-cell>
          <table:table-cell office:value-type="float" office:value="172" table:style-name="ce9">
            <text:p>172</text:p>
          </table:table-cell>
          <table:table-cell office:value-type="float" office:value="5819" table:style-name="ce9">
            <text:p>5819</text:p>
          </table:table-cell>
          <table:table-cell office:value-type="float" office:value="174" table:style-name="ce9">
            <text:p>174</text:p>
          </table:table-cell>
          <table:table-cell office:value-type="float" office:value="6078" table:formula="of:=SUM([.G107]+[.E107])" table:style-name="ce15">
            <text:p>6078</text:p>
          </table:table-cell>
          <table:table-cell office:value-type="float" office:value="-2" table:formula="of:=[.F107]-[.H107]" table:style-name="ce15">
            <text:p>-2</text:p>
          </table:table-cell>
          <table:table-cell office:value-type="percentage" office:value="1.0529779532741033E-2" table:formula="of:=([.I108]-[.I107])/[.I107]" table:style-name="ce16">
            <text:p>1%</text:p>
          </table:table-cell>
          <table:table-cell office:value-type="string" office:string-value="Valid" table:formula="of:=IF([.F107]&lt;=[.E107]; &quot;Valid&quot;; &quot;Invalid&quot;)" table:style-name="ce17">
            <text:p>Valid</text:p>
          </table:table-cell>
          <table:table-cell office:value-type="string" office:string-value="Valid" table:formula="of:=IF([.H107]&lt;=[.G107]; &quot;Valid&quot;; &quot;Invalid&quot;)" table:style-name="ce17">
            <text:p>Valid</text:p>
          </table:table-cell>
          <table:table-cell office:value-type="string" office:string-value="Stable/Reducing" table:formula="of:=IF([.J107]&gt;0; &quot;Increasing Pressure&quot;; &quot;Stable/Reducing&quot;)" table:style-name="ce18">
            <text:p>Stable/Reducing</text:p>
          </table:table-cell>
          <table:table-cell office:value-type="float" office:value="1.0116279069767442" table:formula="of:=IFERROR([.H107]/[.F107]; 0)" table:style-name="ce17">
            <text:p>1.011627907</text:p>
          </table:table-cell>
          <table:table-cell office:value-type="float" office:value="6246.5714285714284" table:formula="of:=AVERAGE([.I107:.I113])" table:style-name="ce15">
            <text:p>6247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6-27T00:00:00" table:style-name="ce14">
            <text:p>27-06-2023</text:p>
          </table:table-cell>
          <table:table-cell office:value-type="string" office:string-value="June" table:formula="of:=TEXT([.A108]; &quot;mmmm&quot;)" table:style-name="ce14">
            <text:p>June</text:p>
          </table:table-cell>
          <table:table-cell office:value-type="string" office:string-value="2023-06" table:formula="of:=TEXT([.A108]; &quot;yyyy-mm&quot;)" table:style-name="ce14">
            <text:p>2023-06</text:p>
          </table:table-cell>
          <table:table-cell office:value-type="float" office:value="154" table:style-name="ce9">
            <text:p>154</text:p>
          </table:table-cell>
          <table:table-cell office:value-type="float" office:value="225" table:style-name="ce9">
            <text:p>225</text:p>
          </table:table-cell>
          <table:table-cell office:value-type="float" office:value="220" table:style-name="ce9">
            <text:p>220</text:p>
          </table:table-cell>
          <table:table-cell office:value-type="float" office:value="5917" table:style-name="ce9">
            <text:p>5917</text:p>
          </table:table-cell>
          <table:table-cell office:value-type="float" office:value="155" table:style-name="ce9">
            <text:p>155</text:p>
          </table:table-cell>
          <table:table-cell office:value-type="float" office:value="6142" table:formula="of:=SUM([.G108]+[.E108])" table:style-name="ce15">
            <text:p>6142</text:p>
          </table:table-cell>
          <table:table-cell office:value-type="float" office:value="65" table:formula="of:=[.F108]-[.H108]" table:style-name="ce15">
            <text:p>65</text:p>
          </table:table-cell>
          <table:table-cell office:value-type="percentage" office:value="9.1175512862259854E-3" table:formula="of:=([.I109]-[.I108])/[.I108]" table:style-name="ce16">
            <text:p>1%</text:p>
          </table:table-cell>
          <table:table-cell office:value-type="string" office:string-value="Valid" table:formula="of:=IF([.F108]&lt;=[.E108]; &quot;Valid&quot;; &quot;Invalid&quot;)" table:style-name="ce17">
            <text:p>Valid</text:p>
          </table:table-cell>
          <table:table-cell office:value-type="string" office:string-value="Valid" table:formula="of:=IF([.H108]&lt;=[.G108]; &quot;Valid&quot;; &quot;Invalid&quot;)" table:style-name="ce17">
            <text:p>Valid</text:p>
          </table:table-cell>
          <table:table-cell office:value-type="string" office:string-value="Increasing Pressure" table:formula="of:=IF([.J108]&gt;0; &quot;Increasing Pressure&quot;; &quot;Stable/Reducing&quot;)" table:style-name="ce18">
            <text:p>Increasing Pressure</text:p>
          </table:table-cell>
          <table:table-cell office:value-type="float" office:value="0.70454545454545459" table:formula="of:=IFERROR([.H108]/[.F108]; 0)" table:style-name="ce17">
            <text:p>0.704545455</text:p>
          </table:table-cell>
          <table:table-cell office:value-type="float" office:value="6292.7142857142853" table:formula="of:=AVERAGE([.I108:.I114])" table:style-name="ce15">
            <text:p>6293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6-28T00:00:00" table:style-name="ce14">
            <text:p>28-06-2023</text:p>
          </table:table-cell>
          <table:table-cell office:value-type="string" office:string-value="June" table:formula="of:=TEXT([.A109]; &quot;mmmm&quot;)" table:style-name="ce14">
            <text:p>June</text:p>
          </table:table-cell>
          <table:table-cell office:value-type="string" office:string-value="2023-06" table:formula="of:=TEXT([.A109]; &quot;yyyy-mm&quot;)" table:style-name="ce14">
            <text:p>2023-06</text:p>
          </table:table-cell>
          <table:table-cell office:value-type="float" office:value="91" table:style-name="ce9">
            <text:p>91</text:p>
          </table:table-cell>
          <table:table-cell office:value-type="float" office:value="199" table:style-name="ce9">
            <text:p>199</text:p>
          </table:table-cell>
          <table:table-cell office:value-type="float" office:value="172" table:style-name="ce9">
            <text:p>172</text:p>
          </table:table-cell>
          <table:table-cell office:value-type="float" office:value="5999" table:style-name="ce9">
            <text:p>5999</text:p>
          </table:table-cell>
          <table:table-cell office:value-type="float" office:value="174" table:style-name="ce9">
            <text:p>174</text:p>
          </table:table-cell>
          <table:table-cell office:value-type="float" office:value="6198" table:formula="of:=SUM([.G109]+[.E109])" table:style-name="ce15">
            <text:p>6198</text:p>
          </table:table-cell>
          <table:table-cell office:value-type="float" office:value="-2" table:formula="of:=[.F109]-[.H109]" table:style-name="ce15">
            <text:p>-2</text:p>
          </table:table-cell>
          <table:table-cell office:value-type="percentage" office:value="1.1777992900935785E-2" table:formula="of:=([.I110]-[.I109])/[.I109]" table:style-name="ce16">
            <text:p>1%</text:p>
          </table:table-cell>
          <table:table-cell office:value-type="string" office:string-value="Valid" table:formula="of:=IF([.F109]&lt;=[.E109]; &quot;Valid&quot;; &quot;Invalid&quot;)" table:style-name="ce17">
            <text:p>Valid</text:p>
          </table:table-cell>
          <table:table-cell office:value-type="string" office:string-value="Valid" table:formula="of:=IF([.H109]&lt;=[.G109]; &quot;Valid&quot;; &quot;Invalid&quot;)" table:style-name="ce17">
            <text:p>Valid</text:p>
          </table:table-cell>
          <table:table-cell office:value-type="string" office:string-value="Stable/Reducing" table:formula="of:=IF([.J109]&gt;0; &quot;Increasing Pressure&quot;; &quot;Stable/Reducing&quot;)" table:style-name="ce18">
            <text:p>Stable/Reducing</text:p>
          </table:table-cell>
          <table:table-cell office:value-type="float" office:value="1.0116279069767442" table:formula="of:=IFERROR([.H109]/[.F109]; 0)" table:style-name="ce17">
            <text:p>1.011627907</text:p>
          </table:table-cell>
          <table:table-cell office:value-type="float" office:value="6330.1428571428569" table:formula="of:=AVERAGE([.I109:.I115])" table:style-name="ce15">
            <text:p>6330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6-29T00:00:00" table:style-name="ce14">
            <text:p>29-06-2023</text:p>
          </table:table-cell>
          <table:table-cell office:value-type="string" office:string-value="June" table:formula="of:=TEXT([.A110]; &quot;mmmm&quot;)" table:style-name="ce14">
            <text:p>June</text:p>
          </table:table-cell>
          <table:table-cell office:value-type="string" office:string-value="2023-06" table:formula="of:=TEXT([.A110]; &quot;yyyy-mm&quot;)" table:style-name="ce14">
            <text:p>2023-06</text:p>
          </table:table-cell>
          <table:table-cell office:value-type="float" office:value="81" table:style-name="ce9">
            <text:p>81</text:p>
          </table:table-cell>
          <table:table-cell office:value-type="float" office:value="213" table:style-name="ce9">
            <text:p>213</text:p>
          </table:table-cell>
          <table:table-cell office:value-type="float" office:value="153" table:style-name="ce9">
            <text:p>153</text:p>
          </table:table-cell>
          <table:table-cell office:value-type="float" office:value="6058" table:style-name="ce9">
            <text:p>6058</text:p>
          </table:table-cell>
          <table:table-cell office:value-type="float" office:value="213" table:style-name="ce9">
            <text:p>213</text:p>
          </table:table-cell>
          <table:table-cell office:value-type="float" office:value="6271" table:formula="of:=SUM([.G110]+[.E110])" table:style-name="ce15">
            <text:p>6271</text:p>
          </table:table-cell>
          <table:table-cell office:value-type="float" office:value="-60" table:formula="of:=[.F110]-[.H110]" table:style-name="ce15">
            <text:p>-60</text:p>
          </table:table-cell>
          <table:table-cell office:value-type="percentage" office:value="-1.3235528623823951E-2" table:formula="of:=([.I111]-[.I110])/[.I110]" table:style-name="ce16">
            <text:p>-1%</text:p>
          </table:table-cell>
          <table:table-cell office:value-type="string" office:string-value="Valid" table:formula="of:=IF([.F110]&lt;=[.E110]; &quot;Valid&quot;; &quot;Invalid&quot;)" table:style-name="ce17">
            <text:p>Valid</text:p>
          </table:table-cell>
          <table:table-cell office:value-type="string" office:string-value="Valid" table:formula="of:=IF([.H110]&lt;=[.G110]; &quot;Valid&quot;; &quot;Invalid&quot;)" table:style-name="ce17">
            <text:p>Valid</text:p>
          </table:table-cell>
          <table:table-cell office:value-type="string" office:string-value="Stable/Reducing" table:formula="of:=IF([.J110]&gt;0; &quot;Increasing Pressure&quot;; &quot;Stable/Reducing&quot;)" table:style-name="ce18">
            <text:p>Stable/Reducing</text:p>
          </table:table-cell>
          <table:table-cell office:value-type="float" office:value="1.392156862745098" table:formula="of:=IFERROR([.H110]/[.F110]; 0)" table:style-name="ce17">
            <text:p>1.392156863</text:p>
          </table:table-cell>
          <table:table-cell office:value-type="float" office:value="6385.4285714285716" table:formula="of:=AVERAGE([.I110:.I116])" table:style-name="ce15">
            <text:p>6385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7-02T00:00:00" table:style-name="ce14">
            <text:p>02-07-2023</text:p>
          </table:table-cell>
          <table:table-cell office:value-type="string" office:string-value="July" table:formula="of:=TEXT([.A111]; &quot;mmmm&quot;)" table:style-name="ce14">
            <text:p>July</text:p>
          </table:table-cell>
          <table:table-cell office:value-type="string" office:string-value="2023-07" table:formula="of:=TEXT([.A111]; &quot;yyyy-mm&quot;)" table:style-name="ce14">
            <text:p>2023-07</text:p>
          </table:table-cell>
          <table:table-cell office:value-type="float" office:value="209" table:style-name="ce9">
            <text:p>209</text:p>
          </table:table-cell>
          <table:table-cell office:value-type="float" office:value="285" table:style-name="ce9">
            <text:p>285</text:p>
          </table:table-cell>
          <table:table-cell office:value-type="float" office:value="184" table:style-name="ce9">
            <text:p>184</text:p>
          </table:table-cell>
          <table:table-cell office:value-type="float" office:value="5903" table:style-name="ce9">
            <text:p>5903</text:p>
          </table:table-cell>
          <table:table-cell office:value-type="float" office:value="309" table:style-name="ce9">
            <text:p>309</text:p>
          </table:table-cell>
          <table:table-cell office:value-type="float" office:value="6188" table:formula="of:=SUM([.G111]+[.E111])" table:style-name="ce15">
            <text:p>6188</text:p>
          </table:table-cell>
          <table:table-cell office:value-type="float" office:value="-125" table:formula="of:=[.F111]-[.H111]" table:style-name="ce15">
            <text:p>-125</text:p>
          </table:table-cell>
          <table:table-cell office:value-type="percentage" office:value="4.0885585003232063E-2" table:formula="of:=([.I112]-[.I111])/[.I111]" table:style-name="ce16">
            <text:p>4%</text:p>
          </table:table-cell>
          <table:table-cell office:value-type="string" office:string-value="Valid" table:formula="of:=IF([.F111]&lt;=[.E111]; &quot;Valid&quot;; &quot;Invalid&quot;)" table:style-name="ce17">
            <text:p>Valid</text:p>
          </table:table-cell>
          <table:table-cell office:value-type="string" office:string-value="Valid" table:formula="of:=IF([.H111]&lt;=[.G111]; &quot;Valid&quot;; &quot;Invalid&quot;)" table:style-name="ce17">
            <text:p>Valid</text:p>
          </table:table-cell>
          <table:table-cell office:value-type="string" office:string-value="Stable/Reducing" table:formula="of:=IF([.J111]&gt;0; &quot;Increasing Pressure&quot;; &quot;Stable/Reducing&quot;)" table:style-name="ce18">
            <text:p>Stable/Reducing</text:p>
          </table:table-cell>
          <table:table-cell office:value-type="float" office:value="1.6793478260869565" table:formula="of:=IFERROR([.H111]/[.F111]; 0)" table:style-name="ce17">
            <text:p>1.679347826</text:p>
          </table:table-cell>
          <table:table-cell office:value-type="float" office:value="6448.7142857142853" table:formula="of:=AVERAGE([.I111:.I117])" table:style-name="ce15">
            <text:p>6449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7-04T00:00:00" table:style-name="ce14">
            <text:p>04-07-2023</text:p>
          </table:table-cell>
          <table:table-cell office:value-type="string" office:string-value="July" table:formula="of:=TEXT([.A112]; &quot;mmmm&quot;)" table:style-name="ce14">
            <text:p>July</text:p>
          </table:table-cell>
          <table:table-cell office:value-type="string" office:string-value="2023-07" table:formula="of:=TEXT([.A112]; &quot;yyyy-mm&quot;)" table:style-name="ce14">
            <text:p>2023-07</text:p>
          </table:table-cell>
          <table:table-cell office:value-type="float" office:value="184" table:style-name="ce9">
            <text:p>184</text:p>
          </table:table-cell>
          <table:table-cell office:value-type="float" office:value="314" table:style-name="ce9">
            <text:p>314</text:p>
          </table:table-cell>
          <table:table-cell office:value-type="float" office:value="217" table:style-name="ce9">
            <text:p>217</text:p>
          </table:table-cell>
          <table:table-cell office:value-type="float" office:value="6127" table:style-name="ce9">
            <text:p>6127</text:p>
          </table:table-cell>
          <table:table-cell office:value-type="float" office:value="124" table:style-name="ce9">
            <text:p>124</text:p>
          </table:table-cell>
          <table:table-cell office:value-type="float" office:value="6441" table:formula="of:=SUM([.G112]+[.E112])" table:style-name="ce15">
            <text:p>6441</text:p>
          </table:table-cell>
          <table:table-cell office:value-type="float" office:value="93" table:formula="of:=[.F112]-[.H112]" table:style-name="ce15">
            <text:p>93</text:p>
          </table:table-cell>
          <table:table-cell office:value-type="percentage" office:value="-5.1234280391243593E-3" table:formula="of:=([.I113]-[.I112])/[.I112]" table:style-name="ce16">
            <text:p>-1%</text:p>
          </table:table-cell>
          <table:table-cell office:value-type="string" office:string-value="Valid" table:formula="of:=IF([.F112]&lt;=[.E112]; &quot;Valid&quot;; &quot;Invalid&quot;)" table:style-name="ce17">
            <text:p>Valid</text:p>
          </table:table-cell>
          <table:table-cell office:value-type="string" office:string-value="Valid" table:formula="of:=IF([.H112]&lt;=[.G112]; &quot;Valid&quot;; &quot;Invalid&quot;)" table:style-name="ce17">
            <text:p>Valid</text:p>
          </table:table-cell>
          <table:table-cell office:value-type="string" office:string-value="Increasing Pressure" table:formula="of:=IF([.J112]&gt;0; &quot;Increasing Pressure&quot;; &quot;Stable/Reducing&quot;)" table:style-name="ce18">
            <text:p>Increasing Pressure</text:p>
          </table:table-cell>
          <table:table-cell office:value-type="float" office:value="0.5714285714285714" table:formula="of:=IFERROR([.H112]/[.F112]; 0)" table:style-name="ce17">
            <text:p>0.571428571</text:p>
          </table:table-cell>
          <table:table-cell office:value-type="float" office:value="6518.8571428571431" table:formula="of:=AVERAGE([.I112:.I118])" table:style-name="ce15">
            <text:p>6519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7-05T00:00:00" table:style-name="ce14">
            <text:p>05-07-2023</text:p>
          </table:table-cell>
          <table:table-cell office:value-type="string" office:string-value="July" table:formula="of:=TEXT([.A113]; &quot;mmmm&quot;)" table:style-name="ce14">
            <text:p>July</text:p>
          </table:table-cell>
          <table:table-cell office:value-type="string" office:string-value="2023-07" table:formula="of:=TEXT([.A113]; &quot;yyyy-mm&quot;)" table:style-name="ce14">
            <text:p>2023-07</text:p>
          </table:table-cell>
          <table:table-cell office:value-type="float" office:value="107" table:style-name="ce9">
            <text:p>107</text:p>
          </table:table-cell>
          <table:table-cell office:value-type="float" office:value="215" table:style-name="ce9">
            <text:p>215</text:p>
          </table:table-cell>
          <table:table-cell office:value-type="float" office:value="230" table:style-name="ce9">
            <text:p>230</text:p>
          </table:table-cell>
          <table:table-cell office:value-type="float" office:value="6193" table:style-name="ce9">
            <text:p>6193</text:p>
          </table:table-cell>
          <table:table-cell office:value-type="float" office:value="167" table:style-name="ce9">
            <text:p>167</text:p>
          </table:table-cell>
          <table:table-cell office:value-type="float" office:value="6408" table:formula="of:=SUM([.G113]+[.E113])" table:style-name="ce15">
            <text:p>6408</text:p>
          </table:table-cell>
          <table:table-cell office:value-type="float" office:value="63" table:formula="of:=[.F113]-[.H113]" table:style-name="ce15">
            <text:p>63</text:p>
          </table:table-cell>
          <table:table-cell office:value-type="percentage" office:value="-1.0923845193508116E-3" table:formula="of:=([.I114]-[.I113])/[.I113]" table:style-name="ce16">
            <text:p>0%</text:p>
          </table:table-cell>
          <table:table-cell office:value-type="string" office:string-value="Invalid" table:formula="of:=IF([.F113]&lt;=[.E113]; &quot;Valid&quot;; &quot;Invalid&quot;)" table:style-name="ce17">
            <text:p>Invalid</text:p>
          </table:table-cell>
          <table:table-cell office:value-type="string" office:string-value="Valid" table:formula="of:=IF([.H113]&lt;=[.G113]; &quot;Valid&quot;; &quot;Invalid&quot;)" table:style-name="ce17">
            <text:p>Valid</text:p>
          </table:table-cell>
          <table:table-cell office:value-type="string" office:string-value="Increasing Pressure" table:formula="of:=IF([.J113]&gt;0; &quot;Increasing Pressure&quot;; &quot;Stable/Reducing&quot;)" table:style-name="ce18">
            <text:p>Increasing Pressure</text:p>
          </table:table-cell>
          <table:table-cell office:value-type="float" office:value="0.72608695652173916" table:formula="of:=IFERROR([.H113]/[.F113]; 0)" table:style-name="ce17">
            <text:p>0.726086957</text:p>
          </table:table-cell>
          <table:table-cell office:value-type="float" office:value="6574.5714285714284" table:formula="of:=AVERAGE([.I113:.I119])" table:style-name="ce15">
            <text:p>6575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7-06T00:00:00" table:style-name="ce14">
            <text:p>06-07-2023</text:p>
          </table:table-cell>
          <table:table-cell office:value-type="string" office:string-value="July" table:formula="of:=TEXT([.A114]; &quot;mmmm&quot;)" table:style-name="ce14">
            <text:p>July</text:p>
          </table:table-cell>
          <table:table-cell office:value-type="string" office:string-value="2023-07" table:formula="of:=TEXT([.A114]; &quot;yyyy-mm&quot;)" table:style-name="ce14">
            <text:p>2023-07</text:p>
          </table:table-cell>
          <table:table-cell office:value-type="float" office:value="101" table:style-name="ce9">
            <text:p>101</text:p>
          </table:table-cell>
          <table:table-cell office:value-type="float" office:value="162" table:style-name="ce9">
            <text:p>162</text:p>
          </table:table-cell>
          <table:table-cell office:value-type="float" office:value="178" table:style-name="ce9">
            <text:p>178</text:p>
          </table:table-cell>
          <table:table-cell office:value-type="float" office:value="6239" table:style-name="ce9">
            <text:p>6239</text:p>
          </table:table-cell>
          <table:table-cell office:value-type="float" office:value="205" table:style-name="ce9">
            <text:p>205</text:p>
          </table:table-cell>
          <table:table-cell office:value-type="float" office:value="6401" table:formula="of:=SUM([.G114]+[.E114])" table:style-name="ce15">
            <text:p>6401</text:p>
          </table:table-cell>
          <table:table-cell office:value-type="float" office:value="-27" table:formula="of:=[.F114]-[.H114]" table:style-name="ce15">
            <text:p>-27</text:p>
          </table:table-cell>
          <table:table-cell office:value-type="percentage" office:value="4.6867676925480396E-4" table:formula="of:=([.I115]-[.I114])/[.I114]" table:style-name="ce16">
            <text:p>0%</text:p>
          </table:table-cell>
          <table:table-cell office:value-type="string" office:string-value="Invalid" table:formula="of:=IF([.F114]&lt;=[.E114]; &quot;Valid&quot;; &quot;Invalid&quot;)" table:style-name="ce17">
            <text:p>Invalid</text:p>
          </table:table-cell>
          <table:table-cell office:value-type="string" office:string-value="Valid" table:formula="of:=IF([.H114]&lt;=[.G114]; &quot;Valid&quot;; &quot;Invalid&quot;)" table:style-name="ce17">
            <text:p>Valid</text:p>
          </table:table-cell>
          <table:table-cell office:value-type="string" office:string-value="Stable/Reducing" table:formula="of:=IF([.J114]&gt;0; &quot;Increasing Pressure&quot;; &quot;Stable/Reducing&quot;)" table:style-name="ce18">
            <text:p>Stable/Reducing</text:p>
          </table:table-cell>
          <table:table-cell office:value-type="float" office:value="1.151685393258427" table:formula="of:=IFERROR([.H114]/[.F114]; 0)" table:style-name="ce17">
            <text:p>1.151685393</text:p>
          </table:table-cell>
          <table:table-cell office:value-type="float" office:value="6613.7142857142853" table:formula="of:=AVERAGE([.I114:.I120])" table:style-name="ce15">
            <text:p>6614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7-09T00:00:00" table:style-name="ce14">
            <text:p>09-07-2023</text:p>
          </table:table-cell>
          <table:table-cell office:value-type="string" office:string-value="July" table:formula="of:=TEXT([.A115]; &quot;mmmm&quot;)" table:style-name="ce14">
            <text:p>July</text:p>
          </table:table-cell>
          <table:table-cell office:value-type="string" office:string-value="2023-07" table:formula="of:=TEXT([.A115]; &quot;yyyy-mm&quot;)" table:style-name="ce14">
            <text:p>2023-07</text:p>
          </table:table-cell>
          <table:table-cell office:value-type="float" office:value="99" table:style-name="ce9">
            <text:p>99</text:p>
          </table:table-cell>
          <table:table-cell office:value-type="float" office:value="190" table:style-name="ce9">
            <text:p>190</text:p>
          </table:table-cell>
          <table:table-cell office:value-type="float" office:value="176" table:style-name="ce9">
            <text:p>176</text:p>
          </table:table-cell>
          <table:table-cell office:value-type="float" office:value="6214" table:style-name="ce9">
            <text:p>6214</text:p>
          </table:table-cell>
          <table:table-cell office:value-type="float" office:value="196" table:style-name="ce9">
            <text:p>196</text:p>
          </table:table-cell>
          <table:table-cell office:value-type="float" office:value="6404" table:formula="of:=SUM([.G115]+[.E115])" table:style-name="ce15">
            <text:p>6404</text:p>
          </table:table-cell>
          <table:table-cell office:value-type="float" office:value="-20" table:formula="of:=[.F115]-[.H115]" table:style-name="ce15">
            <text:p>-20</text:p>
          </table:table-cell>
          <table:table-cell office:value-type="percentage" office:value="2.8263585259212992E-2" table:formula="of:=([.I116]-[.I115])/[.I115]" table:style-name="ce16">
            <text:p>3%</text:p>
          </table:table-cell>
          <table:table-cell office:value-type="string" office:string-value="Valid" table:formula="of:=IF([.F115]&lt;=[.E115]; &quot;Valid&quot;; &quot;Invalid&quot;)" table:style-name="ce17">
            <text:p>Valid</text:p>
          </table:table-cell>
          <table:table-cell office:value-type="string" office:string-value="Valid" table:formula="of:=IF([.H115]&lt;=[.G115]; &quot;Valid&quot;; &quot;Invalid&quot;)" table:style-name="ce17">
            <text:p>Valid</text:p>
          </table:table-cell>
          <table:table-cell office:value-type="string" office:string-value="Stable/Reducing" table:formula="of:=IF([.J115]&gt;0; &quot;Increasing Pressure&quot;; &quot;Stable/Reducing&quot;)" table:style-name="ce18">
            <text:p>Stable/Reducing</text:p>
          </table:table-cell>
          <table:table-cell office:value-type="float" office:value="1.1136363636363635" table:formula="of:=IFERROR([.H115]/[.F115]; 0)" table:style-name="ce17">
            <text:p>1.113636364</text:p>
          </table:table-cell>
          <table:table-cell office:value-type="float" office:value="6676.4285714285716" table:formula="of:=AVERAGE([.I115:.I121])" table:style-name="ce15">
            <text:p>6676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7-10T00:00:00" table:style-name="ce14">
            <text:p>10-07-2023</text:p>
          </table:table-cell>
          <table:table-cell office:value-type="string" office:string-value="July" table:formula="of:=TEXT([.A116]; &quot;mmmm&quot;)" table:style-name="ce14">
            <text:p>July</text:p>
          </table:table-cell>
          <table:table-cell office:value-type="string" office:string-value="2023-07" table:formula="of:=TEXT([.A116]; &quot;yyyy-mm&quot;)" table:style-name="ce14">
            <text:p>2023-07</text:p>
          </table:table-cell>
          <table:table-cell office:value-type="float" office:value="167" table:style-name="ce9">
            <text:p>167</text:p>
          </table:table-cell>
          <table:table-cell office:value-type="float" office:value="239" table:style-name="ce9">
            <text:p>239</text:p>
          </table:table-cell>
          <table:table-cell office:value-type="float" office:value="166" table:style-name="ce9">
            <text:p>166</text:p>
          </table:table-cell>
          <table:table-cell office:value-type="float" office:value="6346" table:style-name="ce9">
            <text:p>6346</text:p>
          </table:table-cell>
          <table:table-cell office:value-type="float" office:value="163" table:style-name="ce9">
            <text:p>163</text:p>
          </table:table-cell>
          <table:table-cell office:value-type="float" office:value="6585" table:formula="of:=SUM([.G116]+[.E116])" table:style-name="ce15">
            <text:p>6585</text:p>
          </table:table-cell>
          <table:table-cell office:value-type="float" office:value="3" table:formula="of:=[.F116]-[.H116]" table:style-name="ce15">
            <text:p>3</text:p>
          </table:table-cell>
          <table:table-cell office:value-type="percentage" office:value="1.958997722095672E-2" table:formula="of:=([.I117]-[.I116])/[.I116]" table:style-name="ce16">
            <text:p>2%</text:p>
          </table:table-cell>
          <table:table-cell office:value-type="string" office:string-value="Valid" table:formula="of:=IF([.F116]&lt;=[.E116]; &quot;Valid&quot;; &quot;Invalid&quot;)" table:style-name="ce17">
            <text:p>Valid</text:p>
          </table:table-cell>
          <table:table-cell office:value-type="string" office:string-value="Valid" table:formula="of:=IF([.H116]&lt;=[.G116]; &quot;Valid&quot;; &quot;Invalid&quot;)" table:style-name="ce17">
            <text:p>Valid</text:p>
          </table:table-cell>
          <table:table-cell office:value-type="string" office:string-value="Increasing Pressure" table:formula="of:=IF([.J116]&gt;0; &quot;Increasing Pressure&quot;; &quot;Stable/Reducing&quot;)" table:style-name="ce18">
            <text:p>Increasing Pressure</text:p>
          </table:table-cell>
          <table:table-cell office:value-type="float" office:value="0.98192771084337349" table:formula="of:=IFERROR([.H116]/[.F116]; 0)" table:style-name="ce17">
            <text:p>0.981927711</text:p>
          </table:table-cell>
          <table:table-cell office:value-type="float" office:value="6784.2857142857147" table:formula="of:=AVERAGE([.I116:.I122])" table:style-name="ce15">
            <text:p>6784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7-11T00:00:00" table:style-name="ce14">
            <text:p>11-07-2023</text:p>
          </table:table-cell>
          <table:table-cell office:value-type="string" office:string-value="July" table:formula="of:=TEXT([.A117]; &quot;mmmm&quot;)" table:style-name="ce14">
            <text:p>July</text:p>
          </table:table-cell>
          <table:table-cell office:value-type="string" office:string-value="2023-07" table:formula="of:=TEXT([.A117]; &quot;yyyy-mm&quot;)" table:style-name="ce14">
            <text:p>2023-07</text:p>
          </table:table-cell>
          <table:table-cell office:value-type="float" office:value="115" table:style-name="ce9">
            <text:p>115</text:p>
          </table:table-cell>
          <table:table-cell office:value-type="float" office:value="216" table:style-name="ce9">
            <text:p>216</text:p>
          </table:table-cell>
          <table:table-cell office:value-type="float" office:value="169" table:style-name="ce9">
            <text:p>169</text:p>
          </table:table-cell>
          <table:table-cell office:value-type="float" office:value="6498" table:style-name="ce9">
            <text:p>6498</text:p>
          </table:table-cell>
          <table:table-cell office:value-type="float" office:value="143" table:style-name="ce9">
            <text:p>143</text:p>
          </table:table-cell>
          <table:table-cell office:value-type="float" office:value="6714" table:formula="of:=SUM([.G117]+[.E117])" table:style-name="ce15">
            <text:p>6714</text:p>
          </table:table-cell>
          <table:table-cell office:value-type="float" office:value="26" table:formula="of:=[.F117]-[.H117]" table:style-name="ce15">
            <text:p>26</text:p>
          </table:table-cell>
          <table:table-cell office:value-type="percentage" office:value="-5.2129877867143279E-3" table:formula="of:=([.I118]-[.I117])/[.I117]" table:style-name="ce16">
            <text:p>-1%</text:p>
          </table:table-cell>
          <table:table-cell office:value-type="string" office:string-value="Valid" table:formula="of:=IF([.F117]&lt;=[.E117]; &quot;Valid&quot;; &quot;Invalid&quot;)" table:style-name="ce17">
            <text:p>Valid</text:p>
          </table:table-cell>
          <table:table-cell office:value-type="string" office:string-value="Valid" table:formula="of:=IF([.H117]&lt;=[.G117]; &quot;Valid&quot;; &quot;Invalid&quot;)" table:style-name="ce17">
            <text:p>Valid</text:p>
          </table:table-cell>
          <table:table-cell office:value-type="string" office:string-value="Increasing Pressure" table:formula="of:=IF([.J117]&gt;0; &quot;Increasing Pressure&quot;; &quot;Stable/Reducing&quot;)" table:style-name="ce18">
            <text:p>Increasing Pressure</text:p>
          </table:table-cell>
          <table:table-cell office:value-type="float" office:value="0.84615384615384615" table:formula="of:=IFERROR([.H117]/[.F117]; 0)" table:style-name="ce17">
            <text:p>0.846153846</text:p>
          </table:table-cell>
          <table:table-cell office:value-type="float" office:value="6876.5714285714284" table:formula="of:=AVERAGE([.I117:.I123])" table:style-name="ce15">
            <text:p>6877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7-12T00:00:00" table:style-name="ce14">
            <text:p>12-07-2023</text:p>
          </table:table-cell>
          <table:table-cell office:value-type="string" office:string-value="July" table:formula="of:=TEXT([.A118]; &quot;mmmm&quot;)" table:style-name="ce14">
            <text:p>July</text:p>
          </table:table-cell>
          <table:table-cell office:value-type="string" office:string-value="2023-07" table:formula="of:=TEXT([.A118]; &quot;yyyy-mm&quot;)" table:style-name="ce14">
            <text:p>2023-07</text:p>
          </table:table-cell>
          <table:table-cell office:value-type="float" office:value="84" table:style-name="ce9">
            <text:p>84</text:p>
          </table:table-cell>
          <table:table-cell office:value-type="float" office:value="158" table:style-name="ce9">
            <text:p>158</text:p>
          </table:table-cell>
          <table:table-cell office:value-type="float" office:value="193" table:style-name="ce9">
            <text:p>193</text:p>
          </table:table-cell>
          <table:table-cell office:value-type="float" office:value="6521" table:style-name="ce9">
            <text:p>6521</text:p>
          </table:table-cell>
          <table:table-cell office:value-type="float" office:value="210" table:style-name="ce9">
            <text:p>210</text:p>
          </table:table-cell>
          <table:table-cell office:value-type="float" office:value="6679" table:formula="of:=SUM([.G118]+[.E118])" table:style-name="ce15">
            <text:p>6679</text:p>
          </table:table-cell>
          <table:table-cell office:value-type="float" office:value="-17" table:formula="of:=[.F118]-[.H118]" table:style-name="ce15">
            <text:p>-17</text:p>
          </table:table-cell>
          <table:table-cell office:value-type="percentage" office:value="2.2757897888905525E-2" table:formula="of:=([.I119]-[.I118])/[.I118]" table:style-name="ce16">
            <text:p>2%</text:p>
          </table:table-cell>
          <table:table-cell office:value-type="string" office:string-value="Invalid" table:formula="of:=IF([.F118]&lt;=[.E118]; &quot;Valid&quot;; &quot;Invalid&quot;)" table:style-name="ce17">
            <text:p>Invalid</text:p>
          </table:table-cell>
          <table:table-cell office:value-type="string" office:string-value="Valid" table:formula="of:=IF([.H118]&lt;=[.G118]; &quot;Valid&quot;; &quot;Invalid&quot;)" table:style-name="ce17">
            <text:p>Valid</text:p>
          </table:table-cell>
          <table:table-cell office:value-type="string" office:string-value="Stable/Reducing" table:formula="of:=IF([.J118]&gt;0; &quot;Increasing Pressure&quot;; &quot;Stable/Reducing&quot;)" table:style-name="ce18">
            <text:p>Stable/Reducing</text:p>
          </table:table-cell>
          <table:table-cell office:value-type="float" office:value="1.0880829015544042" table:formula="of:=IFERROR([.H118]/[.F118]; 0)" table:style-name="ce17">
            <text:p>1.088082902</text:p>
          </table:table-cell>
          <table:table-cell office:value-type="float" office:value="6973.4285714285716" table:formula="of:=AVERAGE([.I118:.I124])" table:style-name="ce15">
            <text:p>6973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7-13T00:00:00" table:style-name="ce14">
            <text:p>13-07-2023</text:p>
          </table:table-cell>
          <table:table-cell office:value-type="string" office:string-value="July" table:formula="of:=TEXT([.A119]; &quot;mmmm&quot;)" table:style-name="ce14">
            <text:p>July</text:p>
          </table:table-cell>
          <table:table-cell office:value-type="string" office:string-value="2023-07" table:formula="of:=TEXT([.A119]; &quot;yyyy-mm&quot;)" table:style-name="ce14">
            <text:p>2023-07</text:p>
          </table:table-cell>
          <table:table-cell office:value-type="float" office:value="130" table:style-name="ce9">
            <text:p>130</text:p>
          </table:table-cell>
          <table:table-cell office:value-type="float" office:value="227" table:style-name="ce9">
            <text:p>227</text:p>
          </table:table-cell>
          <table:table-cell office:value-type="float" office:value="192" table:style-name="ce9">
            <text:p>192</text:p>
          </table:table-cell>
          <table:table-cell office:value-type="float" office:value="6604" table:style-name="ce9">
            <text:p>6604</text:p>
          </table:table-cell>
          <table:table-cell office:value-type="float" office:value="226" table:style-name="ce9">
            <text:p>226</text:p>
          </table:table-cell>
          <table:table-cell office:value-type="float" office:value="6831" table:formula="of:=SUM([.G119]+[.E119])" table:style-name="ce15">
            <text:p>6831</text:p>
          </table:table-cell>
          <table:table-cell office:value-type="float" office:value="-34" table:formula="of:=[.F119]-[.H119]" table:style-name="ce15">
            <text:p>-34</text:p>
          </table:table-cell>
          <table:table-cell office:value-type="percentage" office:value="-2.1812326160152246E-2" table:formula="of:=([.I120]-[.I119])/[.I119]" table:style-name="ce16">
            <text:p>-2%</text:p>
          </table:table-cell>
          <table:table-cell office:value-type="string" office:string-value="Valid" table:formula="of:=IF([.F119]&lt;=[.E119]; &quot;Valid&quot;; &quot;Invalid&quot;)" table:style-name="ce17">
            <text:p>Valid</text:p>
          </table:table-cell>
          <table:table-cell office:value-type="string" office:string-value="Valid" table:formula="of:=IF([.H119]&lt;=[.G119]; &quot;Valid&quot;; &quot;Invalid&quot;)" table:style-name="ce17">
            <text:p>Valid</text:p>
          </table:table-cell>
          <table:table-cell office:value-type="string" office:string-value="Stable/Reducing" table:formula="of:=IF([.J119]&gt;0; &quot;Increasing Pressure&quot;; &quot;Stable/Reducing&quot;)" table:style-name="ce18">
            <text:p>Stable/Reducing</text:p>
          </table:table-cell>
          <table:table-cell office:value-type="float" office:value="1.1770833333333333" table:formula="of:=IFERROR([.H119]/[.F119]; 0)" table:style-name="ce17">
            <text:p>1.177083333</text:p>
          </table:table-cell>
          <table:table-cell office:value-type="float" office:value="7058.1428571428569" table:formula="of:=AVERAGE([.I119:.I125])" table:style-name="ce15">
            <text:p>7058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7-16T00:00:00" table:style-name="ce14">
            <text:p>16-07-2023</text:p>
          </table:table-cell>
          <table:table-cell office:value-type="string" office:string-value="July" table:formula="of:=TEXT([.A120]; &quot;mmmm&quot;)" table:style-name="ce14">
            <text:p>July</text:p>
          </table:table-cell>
          <table:table-cell office:value-type="string" office:string-value="2023-07" table:formula="of:=TEXT([.A120]; &quot;yyyy-mm&quot;)" table:style-name="ce14">
            <text:p>2023-07</text:p>
          </table:table-cell>
          <table:table-cell office:value-type="float" office:value="88" table:style-name="ce9">
            <text:p>88</text:p>
          </table:table-cell>
          <table:table-cell office:value-type="float" office:value="214" table:style-name="ce9">
            <text:p>214</text:p>
          </table:table-cell>
          <table:table-cell office:value-type="float" office:value="160" table:style-name="ce9">
            <text:p>160</text:p>
          </table:table-cell>
          <table:table-cell office:value-type="float" office:value="6468" table:style-name="ce9">
            <text:p>6468</text:p>
          </table:table-cell>
          <table:table-cell office:value-type="float" office:value="218" table:style-name="ce9">
            <text:p>218</text:p>
          </table:table-cell>
          <table:table-cell office:value-type="float" office:value="6682" table:formula="of:=SUM([.G120]+[.E120])" table:style-name="ce15">
            <text:p>6682</text:p>
          </table:table-cell>
          <table:table-cell office:value-type="float" office:value="-58" table:formula="of:=[.F120]-[.H120]" table:style-name="ce15">
            <text:p>-58</text:p>
          </table:table-cell>
          <table:table-cell office:value-type="percentage" office:value="2.3645615085303801E-2" table:formula="of:=([.I121]-[.I120])/[.I120]" table:style-name="ce16">
            <text:p>2%</text:p>
          </table:table-cell>
          <table:table-cell office:value-type="string" office:string-value="Valid" table:formula="of:=IF([.F120]&lt;=[.E120]; &quot;Valid&quot;; &quot;Invalid&quot;)" table:style-name="ce17">
            <text:p>Valid</text:p>
          </table:table-cell>
          <table:table-cell office:value-type="string" office:string-value="Valid" table:formula="of:=IF([.H120]&lt;=[.G120]; &quot;Valid&quot;; &quot;Invalid&quot;)" table:style-name="ce17">
            <text:p>Valid</text:p>
          </table:table-cell>
          <table:table-cell office:value-type="string" office:string-value="Stable/Reducing" table:formula="of:=IF([.J120]&gt;0; &quot;Increasing Pressure&quot;; &quot;Stable/Reducing&quot;)" table:style-name="ce18">
            <text:p>Stable/Reducing</text:p>
          </table:table-cell>
          <table:table-cell office:value-type="float" office:value="1.3625" table:formula="of:=IFERROR([.H120]/[.F120]; 0)" table:style-name="ce17">
            <text:p>1.3625</text:p>
          </table:table-cell>
          <table:table-cell office:value-type="float" office:value="7153.7142857142853" table:formula="of:=AVERAGE([.I120:.I126])" table:style-name="ce15">
            <text:p>7154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7-17T00:00:00" table:style-name="ce14">
            <text:p>17-07-2023</text:p>
          </table:table-cell>
          <table:table-cell office:value-type="string" office:string-value="July" table:formula="of:=TEXT([.A121]; &quot;mmmm&quot;)" table:style-name="ce14">
            <text:p>July</text:p>
          </table:table-cell>
          <table:table-cell office:value-type="string" office:string-value="2023-07" table:formula="of:=TEXT([.A121]; &quot;yyyy-mm&quot;)" table:style-name="ce14">
            <text:p>2023-07</text:p>
          </table:table-cell>
          <table:table-cell office:value-type="float" office:value="113" table:style-name="ce9">
            <text:p>113</text:p>
          </table:table-cell>
          <table:table-cell office:value-type="float" office:value="208" table:style-name="ce9">
            <text:p>208</text:p>
          </table:table-cell>
          <table:table-cell office:value-type="float" office:value="159" table:style-name="ce9">
            <text:p>159</text:p>
          </table:table-cell>
          <table:table-cell office:value-type="float" office:value="6632" table:style-name="ce9">
            <text:p>6632</text:p>
          </table:table-cell>
          <table:table-cell office:value-type="float" office:value="160" table:style-name="ce9">
            <text:p>160</text:p>
          </table:table-cell>
          <table:table-cell office:value-type="float" office:value="6840" table:formula="of:=SUM([.G121]+[.E121])" table:style-name="ce15">
            <text:p>6840</text:p>
          </table:table-cell>
          <table:table-cell office:value-type="float" office:value="-1" table:formula="of:=[.F121]-[.H121]" table:style-name="ce15">
            <text:p>-1</text:p>
          </table:table-cell>
          <table:table-cell office:value-type="percentage" office:value="4.6637426900584797E-2" table:formula="of:=([.I122]-[.I121])/[.I121]" table:style-name="ce16">
            <text:p>5%</text:p>
          </table:table-cell>
          <table:table-cell office:value-type="string" office:string-value="Valid" table:formula="of:=IF([.F121]&lt;=[.E121]; &quot;Valid&quot;; &quot;Invalid&quot;)" table:style-name="ce17">
            <text:p>Valid</text:p>
          </table:table-cell>
          <table:table-cell office:value-type="string" office:string-value="Valid" table:formula="of:=IF([.H121]&lt;=[.G121]; &quot;Valid&quot;; &quot;Invalid&quot;)" table:style-name="ce17">
            <text:p>Valid</text:p>
          </table:table-cell>
          <table:table-cell office:value-type="string" office:string-value="Stable/Reducing" table:formula="of:=IF([.J121]&gt;0; &quot;Increasing Pressure&quot;; &quot;Stable/Reducing&quot;)" table:style-name="ce18">
            <text:p>Stable/Reducing</text:p>
          </table:table-cell>
          <table:table-cell office:value-type="float" office:value="1.0062893081761006" table:formula="of:=IFERROR([.H121]/[.F121]; 0)" table:style-name="ce17">
            <text:p>1.006289308</text:p>
          </table:table-cell>
          <table:table-cell office:value-type="float" office:value="7314" table:formula="of:=AVERAGE([.I121:.I127])" table:style-name="ce15">
            <text:p>7314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7-18T00:00:00" table:style-name="ce14">
            <text:p>18-07-2023</text:p>
          </table:table-cell>
          <table:table-cell office:value-type="string" office:string-value="July" table:formula="of:=TEXT([.A122]; &quot;mmmm&quot;)" table:style-name="ce14">
            <text:p>July</text:p>
          </table:table-cell>
          <table:table-cell office:value-type="string" office:string-value="2023-07" table:formula="of:=TEXT([.A122]; &quot;yyyy-mm&quot;)" table:style-name="ce14">
            <text:p>2023-07</text:p>
          </table:table-cell>
          <table:table-cell office:value-type="float" office:value="174" table:style-name="ce9">
            <text:p>174</text:p>
          </table:table-cell>
          <table:table-cell office:value-type="float" office:value="285" table:style-name="ce9">
            <text:p>285</text:p>
          </table:table-cell>
          <table:table-cell office:value-type="float" office:value="150" table:style-name="ce9">
            <text:p>150</text:p>
          </table:table-cell>
          <table:table-cell office:value-type="float" office:value="6874" table:style-name="ce9">
            <text:p>6874</text:p>
          </table:table-cell>
          <table:table-cell office:value-type="float" office:value="181" table:style-name="ce9">
            <text:p>181</text:p>
          </table:table-cell>
          <table:table-cell office:value-type="float" office:value="7159" table:formula="of:=SUM([.G122]+[.E122])" table:style-name="ce15">
            <text:p>7159</text:p>
          </table:table-cell>
          <table:table-cell office:value-type="float" office:value="-31" table:formula="of:=[.F122]-[.H122]" table:style-name="ce15">
            <text:p>-31</text:p>
          </table:table-cell>
          <table:table-cell office:value-type="percentage" office:value="1.0057270568515155E-2" table:formula="of:=([.I123]-[.I122])/[.I122]" table:style-name="ce16">
            <text:p>1%</text:p>
          </table:table-cell>
          <table:table-cell office:value-type="string" office:string-value="Valid" table:formula="of:=IF([.F122]&lt;=[.E122]; &quot;Valid&quot;; &quot;Invalid&quot;)" table:style-name="ce17">
            <text:p>Valid</text:p>
          </table:table-cell>
          <table:table-cell office:value-type="string" office:string-value="Valid" table:formula="of:=IF([.H122]&lt;=[.G122]; &quot;Valid&quot;; &quot;Invalid&quot;)" table:style-name="ce17">
            <text:p>Valid</text:p>
          </table:table-cell>
          <table:table-cell office:value-type="string" office:string-value="Stable/Reducing" table:formula="of:=IF([.J122]&gt;0; &quot;Increasing Pressure&quot;; &quot;Stable/Reducing&quot;)" table:style-name="ce18">
            <text:p>Stable/Reducing</text:p>
          </table:table-cell>
          <table:table-cell office:value-type="float" office:value="1.2066666666666668" table:formula="of:=IFERROR([.H122]/[.F122]; 0)" table:style-name="ce17">
            <text:p>1.206666667</text:p>
          </table:table-cell>
          <table:table-cell office:value-type="float" office:value="7474" table:formula="of:=AVERAGE([.I122:.I128])" table:style-name="ce15">
            <text:p>7474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7-19T00:00:00" table:style-name="ce14">
            <text:p>19-07-2023</text:p>
          </table:table-cell>
          <table:table-cell office:value-type="string" office:string-value="July" table:formula="of:=TEXT([.A123]; &quot;mmmm&quot;)" table:style-name="ce14">
            <text:p>July</text:p>
          </table:table-cell>
          <table:table-cell office:value-type="string" office:string-value="2023-07" table:formula="of:=TEXT([.A123]; &quot;yyyy-mm&quot;)" table:style-name="ce14">
            <text:p>2023-07</text:p>
          </table:table-cell>
          <table:table-cell office:value-type="float" office:value="104" table:style-name="ce9">
            <text:p>104</text:p>
          </table:table-cell>
          <table:table-cell office:value-type="float" office:value="230" table:style-name="ce9">
            <text:p>230</text:p>
          </table:table-cell>
          <table:table-cell office:value-type="float" office:value="206" table:style-name="ce9">
            <text:p>206</text:p>
          </table:table-cell>
          <table:table-cell office:value-type="float" office:value="7001" table:style-name="ce9">
            <text:p>7001</text:p>
          </table:table-cell>
          <table:table-cell office:value-type="float" office:value="226" table:style-name="ce9">
            <text:p>226</text:p>
          </table:table-cell>
          <table:table-cell office:value-type="float" office:value="7231" table:formula="of:=SUM([.G123]+[.E123])" table:style-name="ce15">
            <text:p>7231</text:p>
          </table:table-cell>
          <table:table-cell office:value-type="float" office:value="-20" table:formula="of:=[.F123]-[.H123]" table:style-name="ce15">
            <text:p>-20</text:p>
          </table:table-cell>
          <table:table-cell office:value-type="percentage" office:value="2.2265246853823813E-2" table:formula="of:=([.I124]-[.I123])/[.I123]" table:style-name="ce16">
            <text:p>2%</text:p>
          </table:table-cell>
          <table:table-cell office:value-type="string" office:string-value="Valid" table:formula="of:=IF([.F123]&lt;=[.E123]; &quot;Valid&quot;; &quot;Invalid&quot;)" table:style-name="ce17">
            <text:p>Valid</text:p>
          </table:table-cell>
          <table:table-cell office:value-type="string" office:string-value="Valid" table:formula="of:=IF([.H123]&lt;=[.G123]; &quot;Valid&quot;; &quot;Invalid&quot;)" table:style-name="ce17">
            <text:p>Valid</text:p>
          </table:table-cell>
          <table:table-cell office:value-type="string" office:string-value="Stable/Reducing" table:formula="of:=IF([.J123]&gt;0; &quot;Increasing Pressure&quot;; &quot;Stable/Reducing&quot;)" table:style-name="ce18">
            <text:p>Stable/Reducing</text:p>
          </table:table-cell>
          <table:table-cell office:value-type="float" office:value="1.0970873786407767" table:formula="of:=IFERROR([.H123]/[.F123]; 0)" table:style-name="ce17">
            <text:p>1.097087379</text:p>
          </table:table-cell>
          <table:table-cell office:value-type="float" office:value="7597.8571428571431" table:formula="of:=AVERAGE([.I123:.I129])" table:style-name="ce15">
            <text:p>7598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7-20T00:00:00" table:style-name="ce14">
            <text:p>20-07-2023</text:p>
          </table:table-cell>
          <table:table-cell office:value-type="string" office:string-value="July" table:formula="of:=TEXT([.A124]; &quot;mmmm&quot;)" table:style-name="ce14">
            <text:p>July</text:p>
          </table:table-cell>
          <table:table-cell office:value-type="string" office:string-value="2023-07" table:formula="of:=TEXT([.A124]; &quot;yyyy-mm&quot;)" table:style-name="ce14">
            <text:p>2023-07</text:p>
          </table:table-cell>
          <table:table-cell office:value-type="float" office:value="147" table:style-name="ce9">
            <text:p>147</text:p>
          </table:table-cell>
          <table:table-cell office:value-type="float" office:value="276" table:style-name="ce9">
            <text:p>276</text:p>
          </table:table-cell>
          <table:table-cell office:value-type="float" office:value="214" table:style-name="ce9">
            <text:p>214</text:p>
          </table:table-cell>
          <table:table-cell office:value-type="float" office:value="7116" table:style-name="ce9">
            <text:p>7116</text:p>
          </table:table-cell>
          <table:table-cell office:value-type="float" office:value="281" table:style-name="ce9">
            <text:p>281</text:p>
          </table:table-cell>
          <table:table-cell office:value-type="float" office:value="7392" table:formula="of:=SUM([.G124]+[.E124])" table:style-name="ce15">
            <text:p>7392</text:p>
          </table:table-cell>
          <table:table-cell office:value-type="float" office:value="-67" table:formula="of:=[.F124]-[.H124]" table:style-name="ce15">
            <text:p>-67</text:p>
          </table:table-cell>
          <table:table-cell office:value-type="percentage" office:value="-1.6233766233766232E-2" table:formula="of:=([.I125]-[.I124])/[.I124]" table:style-name="ce16">
            <text:p>-2%</text:p>
          </table:table-cell>
          <table:table-cell office:value-type="string" office:string-value="Valid" table:formula="of:=IF([.F124]&lt;=[.E124]; &quot;Valid&quot;; &quot;Invalid&quot;)" table:style-name="ce17">
            <text:p>Valid</text:p>
          </table:table-cell>
          <table:table-cell office:value-type="string" office:string-value="Valid" table:formula="of:=IF([.H124]&lt;=[.G124]; &quot;Valid&quot;; &quot;Invalid&quot;)" table:style-name="ce17">
            <text:p>Valid</text:p>
          </table:table-cell>
          <table:table-cell office:value-type="string" office:string-value="Stable/Reducing" table:formula="of:=IF([.J124]&gt;0; &quot;Increasing Pressure&quot;; &quot;Stable/Reducing&quot;)" table:style-name="ce18">
            <text:p>Stable/Reducing</text:p>
          </table:table-cell>
          <table:table-cell office:value-type="float" office:value="1.3130841121495327" table:formula="of:=IFERROR([.H124]/[.F124]; 0)" table:style-name="ce17">
            <text:p>1.313084112</text:p>
          </table:table-cell>
          <table:table-cell office:value-type="float" office:value="7700.2857142857147" table:formula="of:=AVERAGE([.I124:.I130])" table:style-name="ce15">
            <text:p>7700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7-23T00:00:00" table:style-name="ce14">
            <text:p>23-07-2023</text:p>
          </table:table-cell>
          <table:table-cell office:value-type="string" office:string-value="July" table:formula="of:=TEXT([.A125]; &quot;mmmm&quot;)" table:style-name="ce14">
            <text:p>July</text:p>
          </table:table-cell>
          <table:table-cell office:value-type="string" office:string-value="2023-07" table:formula="of:=TEXT([.A125]; &quot;yyyy-mm&quot;)" table:style-name="ce14">
            <text:p>2023-07</text:p>
          </table:table-cell>
          <table:table-cell office:value-type="float" office:value="108" table:style-name="ce9">
            <text:p>108</text:p>
          </table:table-cell>
          <table:table-cell office:value-type="float" office:value="220" table:style-name="ce9">
            <text:p>220</text:p>
          </table:table-cell>
          <table:table-cell office:value-type="float" office:value="213" table:style-name="ce9">
            <text:p>213</text:p>
          </table:table-cell>
          <table:table-cell office:value-type="float" office:value="7052" table:style-name="ce9">
            <text:p>7052</text:p>
          </table:table-cell>
          <table:table-cell office:value-type="float" office:value="276" table:style-name="ce9">
            <text:p>276</text:p>
          </table:table-cell>
          <table:table-cell office:value-type="float" office:value="7272" table:formula="of:=SUM([.G125]+[.E125])" table:style-name="ce15">
            <text:p>7272</text:p>
          </table:table-cell>
          <table:table-cell office:value-type="float" office:value="-63" table:formula="of:=[.F125]-[.H125]" table:style-name="ce15">
            <text:p>-63</text:p>
          </table:table-cell>
          <table:table-cell office:value-type="percentage" office:value="3.1353135313531351E-2" table:formula="of:=([.I126]-[.I125])/[.I125]" table:style-name="ce16">
            <text:p>3%</text:p>
          </table:table-cell>
          <table:table-cell office:value-type="string" office:string-value="Valid" table:formula="of:=IF([.F125]&lt;=[.E125]; &quot;Valid&quot;; &quot;Invalid&quot;)" table:style-name="ce17">
            <text:p>Valid</text:p>
          </table:table-cell>
          <table:table-cell office:value-type="string" office:string-value="Valid" table:formula="of:=IF([.H125]&lt;=[.G125]; &quot;Valid&quot;; &quot;Invalid&quot;)" table:style-name="ce17">
            <text:p>Valid</text:p>
          </table:table-cell>
          <table:table-cell office:value-type="string" office:string-value="Stable/Reducing" table:formula="of:=IF([.J125]&gt;0; &quot;Increasing Pressure&quot;; &quot;Stable/Reducing&quot;)" table:style-name="ce18">
            <text:p>Stable/Reducing</text:p>
          </table:table-cell>
          <table:table-cell office:value-type="float" office:value="1.295774647887324" table:formula="of:=IFERROR([.H125]/[.F125]; 0)" table:style-name="ce17">
            <text:p>1.295774648</text:p>
          </table:table-cell>
          <table:table-cell office:value-type="float" office:value="7798" table:formula="of:=AVERAGE([.I125:.I131])" table:style-name="ce15">
            <text:p>7798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7-24T00:00:00" table:style-name="ce14">
            <text:p>24-07-2023</text:p>
          </table:table-cell>
          <table:table-cell office:value-type="string" office:string-value="July" table:formula="of:=TEXT([.A126]; &quot;mmmm&quot;)" table:style-name="ce14">
            <text:p>July</text:p>
          </table:table-cell>
          <table:table-cell office:value-type="string" office:string-value="2023-07" table:formula="of:=TEXT([.A126]; &quot;yyyy-mm&quot;)" table:style-name="ce14">
            <text:p>2023-07</text:p>
          </table:table-cell>
          <table:table-cell office:value-type="float" office:value="180" table:style-name="ce9">
            <text:p>180</text:p>
          </table:table-cell>
          <table:table-cell office:value-type="float" office:value="280" table:style-name="ce9">
            <text:p>280</text:p>
          </table:table-cell>
          <table:table-cell office:value-type="float" office:value="146" table:style-name="ce9">
            <text:p>146</text:p>
          </table:table-cell>
          <table:table-cell office:value-type="float" office:value="7220" table:style-name="ce9">
            <text:p>7220</text:p>
          </table:table-cell>
          <table:table-cell office:value-type="float" office:value="187" table:style-name="ce9">
            <text:p>187</text:p>
          </table:table-cell>
          <table:table-cell office:value-type="float" office:value="7500" table:formula="of:=SUM([.G126]+[.E126])" table:style-name="ce15">
            <text:p>7500</text:p>
          </table:table-cell>
          <table:table-cell office:value-type="float" office:value="-41" table:formula="of:=[.F126]-[.H126]" table:style-name="ce15">
            <text:p>-41</text:p>
          </table:table-cell>
          <table:table-cell office:value-type="percentage" office:value="4.0533333333333331E-2" table:formula="of:=([.I127]-[.I126])/[.I126]" table:style-name="ce16">
            <text:p>4%</text:p>
          </table:table-cell>
          <table:table-cell office:value-type="string" office:string-value="Valid" table:formula="of:=IF([.F126]&lt;=[.E126]; &quot;Valid&quot;; &quot;Invalid&quot;)" table:style-name="ce17">
            <text:p>Valid</text:p>
          </table:table-cell>
          <table:table-cell office:value-type="string" office:string-value="Valid" table:formula="of:=IF([.H126]&lt;=[.G126]; &quot;Valid&quot;; &quot;Invalid&quot;)" table:style-name="ce17">
            <text:p>Valid</text:p>
          </table:table-cell>
          <table:table-cell office:value-type="string" office:string-value="Stable/Reducing" table:formula="of:=IF([.J126]&gt;0; &quot;Increasing Pressure&quot;; &quot;Stable/Reducing&quot;)" table:style-name="ce18">
            <text:p>Stable/Reducing</text:p>
          </table:table-cell>
          <table:table-cell office:value-type="float" office:value="1.2808219178082192" table:formula="of:=IFERROR([.H126]/[.F126]; 0)" table:style-name="ce17">
            <text:p>1.280821918</text:p>
          </table:table-cell>
          <table:table-cell office:value-type="float" office:value="7951.8571428571431" table:formula="of:=AVERAGE([.I126:.I132])" table:style-name="ce15">
            <text:p>7952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7-25T00:00:00" table:style-name="ce14">
            <text:p>25-07-2023</text:p>
          </table:table-cell>
          <table:table-cell office:value-type="string" office:string-value="July" table:formula="of:=TEXT([.A127]; &quot;mmmm&quot;)" table:style-name="ce14">
            <text:p>July</text:p>
          </table:table-cell>
          <table:table-cell office:value-type="string" office:string-value="2023-07" table:formula="of:=TEXT([.A127]; &quot;yyyy-mm&quot;)" table:style-name="ce14">
            <text:p>2023-07</text:p>
          </table:table-cell>
          <table:table-cell office:value-type="float" office:value="134" table:style-name="ce9">
            <text:p>134</text:p>
          </table:table-cell>
          <table:table-cell office:value-type="float" office:value="294" table:style-name="ce9">
            <text:p>294</text:p>
          </table:table-cell>
          <table:table-cell office:value-type="float" office:value="186" table:style-name="ce9">
            <text:p>186</text:p>
          </table:table-cell>
          <table:table-cell office:value-type="float" office:value="7510" table:style-name="ce9">
            <text:p>7510</text:p>
          </table:table-cell>
          <table:table-cell office:value-type="float" office:value="136" table:style-name="ce9">
            <text:p>136</text:p>
          </table:table-cell>
          <table:table-cell office:value-type="float" office:value="7804" table:formula="of:=SUM([.G127]+[.E127])" table:style-name="ce15">
            <text:p>7804</text:p>
          </table:table-cell>
          <table:table-cell office:value-type="float" office:value="50" table:formula="of:=[.F127]-[.H127]" table:style-name="ce15">
            <text:p>50</text:p>
          </table:table-cell>
          <table:table-cell office:value-type="percentage" office:value="1.9989748846745259E-2" table:formula="of:=([.I128]-[.I127])/[.I127]" table:style-name="ce16">
            <text:p>2%</text:p>
          </table:table-cell>
          <table:table-cell office:value-type="string" office:string-value="Valid" table:formula="of:=IF([.F127]&lt;=[.E127]; &quot;Valid&quot;; &quot;Invalid&quot;)" table:style-name="ce17">
            <text:p>Valid</text:p>
          </table:table-cell>
          <table:table-cell office:value-type="string" office:string-value="Valid" table:formula="of:=IF([.H127]&lt;=[.G127]; &quot;Valid&quot;; &quot;Invalid&quot;)" table:style-name="ce17">
            <text:p>Valid</text:p>
          </table:table-cell>
          <table:table-cell office:value-type="string" office:string-value="Increasing Pressure" table:formula="of:=IF([.J127]&gt;0; &quot;Increasing Pressure&quot;; &quot;Stable/Reducing&quot;)" table:style-name="ce18">
            <text:p>Increasing Pressure</text:p>
          </table:table-cell>
          <table:table-cell office:value-type="float" office:value="0.73118279569892475" table:formula="of:=IFERROR([.H127]/[.F127]; 0)" table:style-name="ce17">
            <text:p>0.731182796</text:p>
          </table:table-cell>
          <table:table-cell office:value-type="float" office:value="8085" table:formula="of:=AVERAGE([.I127:.I133])" table:style-name="ce15">
            <text:p>8085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7-26T00:00:00" table:style-name="ce14">
            <text:p>26-07-2023</text:p>
          </table:table-cell>
          <table:table-cell office:value-type="string" office:string-value="July" table:formula="of:=TEXT([.A128]; &quot;mmmm&quot;)" table:style-name="ce14">
            <text:p>July</text:p>
          </table:table-cell>
          <table:table-cell office:value-type="string" office:string-value="2023-07" table:formula="of:=TEXT([.A128]; &quot;yyyy-mm&quot;)" table:style-name="ce14">
            <text:p>2023-07</text:p>
          </table:table-cell>
          <table:table-cell office:value-type="float" office:value="202" table:style-name="ce9">
            <text:p>202</text:p>
          </table:table-cell>
          <table:table-cell office:value-type="float" office:value="313" table:style-name="ce9">
            <text:p>313</text:p>
          </table:table-cell>
          <table:table-cell office:value-type="float" office:value="158" table:style-name="ce9">
            <text:p>158</text:p>
          </table:table-cell>
          <table:table-cell office:value-type="float" office:value="7647" table:style-name="ce9">
            <text:p>7647</text:p>
          </table:table-cell>
          <table:table-cell office:value-type="float" office:value="215" table:style-name="ce9">
            <text:p>215</text:p>
          </table:table-cell>
          <table:table-cell office:value-type="float" office:value="7960" table:formula="of:=SUM([.G128]+[.E128])" table:style-name="ce15">
            <text:p>7960</text:p>
          </table:table-cell>
          <table:table-cell office:value-type="float" office:value="-57" table:formula="of:=[.F128]-[.H128]" table:style-name="ce15">
            <text:p>-57</text:p>
          </table:table-cell>
          <table:table-cell office:value-type="percentage" office:value="8.2914572864321613E-3" table:formula="of:=([.I129]-[.I128])/[.I128]" table:style-name="ce16">
            <text:p>1%</text:p>
          </table:table-cell>
          <table:table-cell office:value-type="string" office:string-value="Valid" table:formula="of:=IF([.F128]&lt;=[.E128]; &quot;Valid&quot;; &quot;Invalid&quot;)" table:style-name="ce17">
            <text:p>Valid</text:p>
          </table:table-cell>
          <table:table-cell office:value-type="string" office:string-value="Valid" table:formula="of:=IF([.H128]&lt;=[.G128]; &quot;Valid&quot;; &quot;Invalid&quot;)" table:style-name="ce17">
            <text:p>Valid</text:p>
          </table:table-cell>
          <table:table-cell office:value-type="string" office:string-value="Stable/Reducing" table:formula="of:=IF([.J128]&gt;0; &quot;Increasing Pressure&quot;; &quot;Stable/Reducing&quot;)" table:style-name="ce18">
            <text:p>Stable/Reducing</text:p>
          </table:table-cell>
          <table:table-cell office:value-type="float" office:value="1.360759493670886" table:formula="of:=IFERROR([.H128]/[.F128]; 0)" table:style-name="ce17">
            <text:p>1.360759494</text:p>
          </table:table-cell>
          <table:table-cell office:value-type="float" office:value="8184.8571428571431" table:formula="of:=AVERAGE([.I128:.I134])" table:style-name="ce15">
            <text:p>8185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7-27T00:00:00" table:style-name="ce14">
            <text:p>27-07-2023</text:p>
          </table:table-cell>
          <table:table-cell office:value-type="string" office:string-value="July" table:formula="of:=TEXT([.A129]; &quot;mmmm&quot;)" table:style-name="ce14">
            <text:p>July</text:p>
          </table:table-cell>
          <table:table-cell office:value-type="string" office:string-value="2023-07" table:formula="of:=TEXT([.A129]; &quot;yyyy-mm&quot;)" table:style-name="ce14">
            <text:p>2023-07</text:p>
          </table:table-cell>
          <table:table-cell office:value-type="float" office:value="110" table:style-name="ce9">
            <text:p>110</text:p>
          </table:table-cell>
          <table:table-cell office:value-type="float" office:value="272" table:style-name="ce9">
            <text:p>272</text:p>
          </table:table-cell>
          <table:table-cell office:value-type="float" office:value="193" table:style-name="ce9">
            <text:p>193</text:p>
          </table:table-cell>
          <table:table-cell office:value-type="float" office:value="7754" table:style-name="ce9">
            <text:p>7754</text:p>
          </table:table-cell>
          <table:table-cell office:value-type="float" office:value="259" table:style-name="ce9">
            <text:p>259</text:p>
          </table:table-cell>
          <table:table-cell office:value-type="float" office:value="8026" table:formula="of:=SUM([.G129]+[.E129])" table:style-name="ce15">
            <text:p>8026</text:p>
          </table:table-cell>
          <table:table-cell office:value-type="float" office:value="-66" table:formula="of:=[.F129]-[.H129]" table:style-name="ce15">
            <text:p>-66</text:p>
          </table:table-cell>
          <table:table-cell office:value-type="percentage" office:value="-9.7184151507600305E-3" table:formula="of:=([.I130]-[.I129])/[.I129]" table:style-name="ce16">
            <text:p>-1%</text:p>
          </table:table-cell>
          <table:table-cell office:value-type="string" office:string-value="Valid" table:formula="of:=IF([.F129]&lt;=[.E129]; &quot;Valid&quot;; &quot;Invalid&quot;)" table:style-name="ce17">
            <text:p>Valid</text:p>
          </table:table-cell>
          <table:table-cell office:value-type="string" office:string-value="Valid" table:formula="of:=IF([.H129]&lt;=[.G129]; &quot;Valid&quot;; &quot;Invalid&quot;)" table:style-name="ce17">
            <text:p>Valid</text:p>
          </table:table-cell>
          <table:table-cell office:value-type="string" office:string-value="Stable/Reducing" table:formula="of:=IF([.J129]&gt;0; &quot;Increasing Pressure&quot;; &quot;Stable/Reducing&quot;)" table:style-name="ce18">
            <text:p>Stable/Reducing</text:p>
          </table:table-cell>
          <table:table-cell office:value-type="float" office:value="1.3419689119170986" table:formula="of:=IFERROR([.H129]/[.F129]; 0)" table:style-name="ce17">
            <text:p>1.341968912</text:p>
          </table:table-cell>
          <table:table-cell office:value-type="float" office:value="8268.1428571428569" table:formula="of:=AVERAGE([.I129:.I135])" table:style-name="ce15">
            <text:p>8268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7-30T00:00:00" table:style-name="ce14">
            <text:p>30-07-2023</text:p>
          </table:table-cell>
          <table:table-cell office:value-type="string" office:string-value="July" table:formula="of:=TEXT([.A130]; &quot;mmmm&quot;)" table:style-name="ce14">
            <text:p>July</text:p>
          </table:table-cell>
          <table:table-cell office:value-type="string" office:string-value="2023-07" table:formula="of:=TEXT([.A130]; &quot;yyyy-mm&quot;)" table:style-name="ce14">
            <text:p>2023-07</text:p>
          </table:table-cell>
          <table:table-cell office:value-type="float" office:value="166" table:style-name="ce9">
            <text:p>166</text:p>
          </table:table-cell>
          <table:table-cell office:value-type="float" office:value="277" table:style-name="ce9">
            <text:p>277</text:p>
          </table:table-cell>
          <table:table-cell office:value-type="float" office:value="229" table:style-name="ce9">
            <text:p>229</text:p>
          </table:table-cell>
          <table:table-cell office:value-type="float" office:value="7671" table:style-name="ce9">
            <text:p>7671</text:p>
          </table:table-cell>
          <table:table-cell office:value-type="float" office:value="305" table:style-name="ce9">
            <text:p>305</text:p>
          </table:table-cell>
          <table:table-cell office:value-type="float" office:value="7948" table:formula="of:=SUM([.G130]+[.E130])" table:style-name="ce15">
            <text:p>7948</text:p>
          </table:table-cell>
          <table:table-cell office:value-type="float" office:value="-76" table:formula="of:=[.F130]-[.H130]" table:style-name="ce15">
            <text:p>-76</text:p>
          </table:table-cell>
          <table:table-cell office:value-type="percentage" office:value="1.6104680422747861E-2" table:formula="of:=([.I131]-[.I130])/[.I130]" table:style-name="ce16">
            <text:p>2%</text:p>
          </table:table-cell>
          <table:table-cell office:value-type="string" office:string-value="Valid" table:formula="of:=IF([.F130]&lt;=[.E130]; &quot;Valid&quot;; &quot;Invalid&quot;)" table:style-name="ce17">
            <text:p>Valid</text:p>
          </table:table-cell>
          <table:table-cell office:value-type="string" office:string-value="Valid" table:formula="of:=IF([.H130]&lt;=[.G130]; &quot;Valid&quot;; &quot;Invalid&quot;)" table:style-name="ce17">
            <text:p>Valid</text:p>
          </table:table-cell>
          <table:table-cell office:value-type="string" office:string-value="Stable/Reducing" table:formula="of:=IF([.J130]&gt;0; &quot;Increasing Pressure&quot;; &quot;Stable/Reducing&quot;)" table:style-name="ce18">
            <text:p>Stable/Reducing</text:p>
          </table:table-cell>
          <table:table-cell office:value-type="float" office:value="1.331877729257642" table:formula="of:=IFERROR([.H130]/[.F130]; 0)" table:style-name="ce17">
            <text:p>1.331877729</text:p>
          </table:table-cell>
          <table:table-cell office:value-type="float" office:value="8371.4285714285706" table:formula="of:=AVERAGE([.I130:.I136])" table:style-name="ce15">
            <text:p>8371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7-31T00:00:00" table:style-name="ce14">
            <text:p>31-07-2023</text:p>
          </table:table-cell>
          <table:table-cell office:value-type="string" office:string-value="July" table:formula="of:=TEXT([.A131]; &quot;mmmm&quot;)" table:style-name="ce14">
            <text:p>July</text:p>
          </table:table-cell>
          <table:table-cell office:value-type="string" office:string-value="2023-07" table:formula="of:=TEXT([.A131]; &quot;yyyy-mm&quot;)" table:style-name="ce14">
            <text:p>2023-07</text:p>
          </table:table-cell>
          <table:table-cell office:value-type="float" office:value="136" table:style-name="ce9">
            <text:p>136</text:p>
          </table:table-cell>
          <table:table-cell office:value-type="float" office:value="276" table:style-name="ce9">
            <text:p>276</text:p>
          </table:table-cell>
          <table:table-cell office:value-type="float" office:value="178" table:style-name="ce9">
            <text:p>178</text:p>
          </table:table-cell>
          <table:table-cell office:value-type="float" office:value="7800" table:style-name="ce9">
            <text:p>7800</text:p>
          </table:table-cell>
          <table:table-cell office:value-type="float" office:value="220" table:style-name="ce9">
            <text:p>220</text:p>
          </table:table-cell>
          <table:table-cell office:value-type="float" office:value="8076" table:formula="of:=SUM([.G131]+[.E131])" table:style-name="ce15">
            <text:p>8076</text:p>
          </table:table-cell>
          <table:table-cell office:value-type="float" office:value="-42" table:formula="of:=[.F131]-[.H131]" table:style-name="ce15">
            <text:p>-42</text:p>
          </table:table-cell>
          <table:table-cell office:value-type="percentage" office:value="3.3803863298662702E-2" table:formula="of:=([.I132]-[.I131])/[.I131]" table:style-name="ce16">
            <text:p>3%</text:p>
          </table:table-cell>
          <table:table-cell office:value-type="string" office:string-value="Valid" table:formula="of:=IF([.F131]&lt;=[.E131]; &quot;Valid&quot;; &quot;Invalid&quot;)" table:style-name="ce17">
            <text:p>Valid</text:p>
          </table:table-cell>
          <table:table-cell office:value-type="string" office:string-value="Valid" table:formula="of:=IF([.H131]&lt;=[.G131]; &quot;Valid&quot;; &quot;Invalid&quot;)" table:style-name="ce17">
            <text:p>Valid</text:p>
          </table:table-cell>
          <table:table-cell office:value-type="string" office:string-value="Stable/Reducing" table:formula="of:=IF([.J131]&gt;0; &quot;Increasing Pressure&quot;; &quot;Stable/Reducing&quot;)" table:style-name="ce18">
            <text:p>Stable/Reducing</text:p>
          </table:table-cell>
          <table:table-cell office:value-type="float" office:value="1.2359550561797752" table:formula="of:=IFERROR([.H131]/[.F131]; 0)" table:style-name="ce17">
            <text:p>1.235955056</text:p>
          </table:table-cell>
          <table:table-cell office:value-type="float" office:value="8515.5714285714294" table:formula="of:=AVERAGE([.I131:.I137])" table:style-name="ce15">
            <text:p>8516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8-01T00:00:00" table:style-name="ce14">
            <text:p>01-08-2023</text:p>
          </table:table-cell>
          <table:table-cell office:value-type="string" office:string-value="August" table:formula="of:=TEXT([.A132]; &quot;mmmm&quot;)" table:style-name="ce14">
            <text:p>August</text:p>
          </table:table-cell>
          <table:table-cell office:value-type="string" office:string-value="2023-08" table:formula="of:=TEXT([.A132]; &quot;yyyy-mm&quot;)" table:style-name="ce14">
            <text:p>2023-08</text:p>
          </table:table-cell>
          <table:table-cell office:value-type="float" office:value="87" table:style-name="ce9">
            <text:p>87</text:p>
          </table:table-cell>
          <table:table-cell office:value-type="float" office:value="246" table:style-name="ce9">
            <text:p>246</text:p>
          </table:table-cell>
          <table:table-cell office:value-type="float" office:value="173" table:style-name="ce9">
            <text:p>173</text:p>
          </table:table-cell>
          <table:table-cell office:value-type="float" office:value="8103" table:style-name="ce9">
            <text:p>8103</text:p>
          </table:table-cell>
          <table:table-cell office:value-type="float" office:value="168" table:style-name="ce9">
            <text:p>168</text:p>
          </table:table-cell>
          <table:table-cell office:value-type="float" office:value="8349" table:formula="of:=SUM([.G132]+[.E132])" table:style-name="ce15">
            <text:p>8349</text:p>
          </table:table-cell>
          <table:table-cell office:value-type="float" office:value="5" table:formula="of:=[.F132]-[.H132]" table:style-name="ce15">
            <text:p>5</text:p>
          </table:table-cell>
          <table:table-cell office:value-type="percentage" office:value="9.9413103365672533E-3" table:formula="of:=([.I133]-[.I132])/[.I132]" table:style-name="ce16">
            <text:p>1%</text:p>
          </table:table-cell>
          <table:table-cell office:value-type="string" office:string-value="Valid" table:formula="of:=IF([.F132]&lt;=[.E132]; &quot;Valid&quot;; &quot;Invalid&quot;)" table:style-name="ce17">
            <text:p>Valid</text:p>
          </table:table-cell>
          <table:table-cell office:value-type="string" office:string-value="Valid" table:formula="of:=IF([.H132]&lt;=[.G132]; &quot;Valid&quot;; &quot;Invalid&quot;)" table:style-name="ce17">
            <text:p>Valid</text:p>
          </table:table-cell>
          <table:table-cell office:value-type="string" office:string-value="Increasing Pressure" table:formula="of:=IF([.J132]&gt;0; &quot;Increasing Pressure&quot;; &quot;Stable/Reducing&quot;)" table:style-name="ce18">
            <text:p>Increasing Pressure</text:p>
          </table:table-cell>
          <table:table-cell office:value-type="float" office:value="0.97109826589595372" table:formula="of:=IFERROR([.H132]/[.F132]; 0)" table:style-name="ce17">
            <text:p>0.971098266</text:p>
          </table:table-cell>
          <table:table-cell office:value-type="float" office:value="8651.4285714285706" table:formula="of:=AVERAGE([.I132:.I138])" table:style-name="ce15">
            <text:p>8651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8-02T00:00:00" table:style-name="ce14">
            <text:p>02-08-2023</text:p>
          </table:table-cell>
          <table:table-cell office:value-type="string" office:string-value="August" table:formula="of:=TEXT([.A133]; &quot;mmmm&quot;)" table:style-name="ce14">
            <text:p>August</text:p>
          </table:table-cell>
          <table:table-cell office:value-type="string" office:string-value="2023-08" table:formula="of:=TEXT([.A133]; &quot;yyyy-mm&quot;)" table:style-name="ce14">
            <text:p>2023-08</text:p>
          </table:table-cell>
          <table:table-cell office:value-type="float" office:value="84" table:style-name="ce9">
            <text:p>84</text:p>
          </table:table-cell>
          <table:table-cell office:value-type="float" office:value="171" table:style-name="ce9">
            <text:p>171</text:p>
          </table:table-cell>
          <table:table-cell office:value-type="float" office:value="157" table:style-name="ce9">
            <text:p>157</text:p>
          </table:table-cell>
          <table:table-cell office:value-type="float" office:value="8261" table:style-name="ce9">
            <text:p>8261</text:p>
          </table:table-cell>
          <table:table-cell office:value-type="float" office:value="271" table:style-name="ce9">
            <text:p>271</text:p>
          </table:table-cell>
          <table:table-cell office:value-type="float" office:value="8432" table:formula="of:=SUM([.G133]+[.E133])" table:style-name="ce15">
            <text:p>8432</text:p>
          </table:table-cell>
          <table:table-cell office:value-type="float" office:value="-114" table:formula="of:=[.F133]-[.H133]" table:style-name="ce15">
            <text:p>-114</text:p>
          </table:table-cell>
          <table:table-cell office:value-type="percentage" office:value="8.4203036053130936E-3" table:formula="of:=([.I134]-[.I133])/[.I133]" table:style-name="ce16">
            <text:p>1%</text:p>
          </table:table-cell>
          <table:table-cell office:value-type="string" office:string-value="Valid" table:formula="of:=IF([.F133]&lt;=[.E133]; &quot;Valid&quot;; &quot;Invalid&quot;)" table:style-name="ce17">
            <text:p>Valid</text:p>
          </table:table-cell>
          <table:table-cell office:value-type="string" office:string-value="Valid" table:formula="of:=IF([.H133]&lt;=[.G133]; &quot;Valid&quot;; &quot;Invalid&quot;)" table:style-name="ce17">
            <text:p>Valid</text:p>
          </table:table-cell>
          <table:table-cell office:value-type="string" office:string-value="Stable/Reducing" table:formula="of:=IF([.J133]&gt;0; &quot;Increasing Pressure&quot;; &quot;Stable/Reducing&quot;)" table:style-name="ce18">
            <text:p>Stable/Reducing</text:p>
          </table:table-cell>
          <table:table-cell office:value-type="float" office:value="1.7261146496815287" table:formula="of:=IFERROR([.H133]/[.F133]; 0)" table:style-name="ce17">
            <text:p>1.72611465</text:p>
          </table:table-cell>
          <table:table-cell office:value-type="float" office:value="8765.7142857142862" table:formula="of:=AVERAGE([.I133:.I139])" table:style-name="ce15">
            <text:p>8766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8-03T00:00:00" table:style-name="ce14">
            <text:p>03-08-2023</text:p>
          </table:table-cell>
          <table:table-cell office:value-type="string" office:string-value="August" table:formula="of:=TEXT([.A134]; &quot;mmmm&quot;)" table:style-name="ce14">
            <text:p>August</text:p>
          </table:table-cell>
          <table:table-cell office:value-type="string" office:string-value="2023-08" table:formula="of:=TEXT([.A134]; &quot;yyyy-mm&quot;)" table:style-name="ce14">
            <text:p>2023-08</text:p>
          </table:table-cell>
          <table:table-cell office:value-type="float" office:value="167" table:style-name="ce9">
            <text:p>167</text:p>
          </table:table-cell>
          <table:table-cell office:value-type="float" office:value="209" table:style-name="ce9">
            <text:p>209</text:p>
          </table:table-cell>
          <table:table-cell office:value-type="float" office:value="157" table:style-name="ce9">
            <text:p>157</text:p>
          </table:table-cell>
          <table:table-cell office:value-type="float" office:value="8294" table:style-name="ce9">
            <text:p>8294</text:p>
          </table:table-cell>
          <table:table-cell office:value-type="float" office:value="339" table:style-name="ce9">
            <text:p>339</text:p>
          </table:table-cell>
          <table:table-cell office:value-type="float" office:value="8503" table:formula="of:=SUM([.G134]+[.E134])" table:style-name="ce15">
            <text:p>8503</text:p>
          </table:table-cell>
          <table:table-cell office:value-type="float" office:value="-182" table:formula="of:=[.F134]-[.H134]" table:style-name="ce15">
            <text:p>-182</text:p>
          </table:table-cell>
          <table:table-cell office:value-type="percentage" office:value="4.7042220392802536E-3" table:formula="of:=([.I135]-[.I134])/[.I134]" table:style-name="ce16">
            <text:p>0%</text:p>
          </table:table-cell>
          <table:table-cell office:value-type="string" office:string-value="Valid" table:formula="of:=IF([.F134]&lt;=[.E134]; &quot;Valid&quot;; &quot;Invalid&quot;)" table:style-name="ce17">
            <text:p>Valid</text:p>
          </table:table-cell>
          <table:table-cell office:value-type="string" office:string-value="Valid" table:formula="of:=IF([.H134]&lt;=[.G134]; &quot;Valid&quot;; &quot;Invalid&quot;)" table:style-name="ce17">
            <text:p>Valid</text:p>
          </table:table-cell>
          <table:table-cell office:value-type="string" office:string-value="Stable/Reducing" table:formula="of:=IF([.J134]&gt;0; &quot;Increasing Pressure&quot;; &quot;Stable/Reducing&quot;)" table:style-name="ce18">
            <text:p>Stable/Reducing</text:p>
          </table:table-cell>
          <table:table-cell office:value-type="float" office:value="2.1592356687898091" table:formula="of:=IFERROR([.H134]/[.F134]; 0)" table:style-name="ce17">
            <text:p>2.159235669</text:p>
          </table:table-cell>
          <table:table-cell office:value-type="float" office:value="8972.4285714285706" table:formula="of:=AVERAGE([.I134:.I140])" table:style-name="ce15">
            <text:p>8972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8-06T00:00:00" table:style-name="ce14">
            <text:p>06-08-2023</text:p>
          </table:table-cell>
          <table:table-cell office:value-type="string" office:string-value="August" table:formula="of:=TEXT([.A135]; &quot;mmmm&quot;)" table:style-name="ce14">
            <text:p>August</text:p>
          </table:table-cell>
          <table:table-cell office:value-type="string" office:string-value="2023-08" table:formula="of:=TEXT([.A135]; &quot;yyyy-mm&quot;)" table:style-name="ce14">
            <text:p>2023-08</text:p>
          </table:table-cell>
          <table:table-cell office:value-type="float" office:value="109" table:style-name="ce9">
            <text:p>109</text:p>
          </table:table-cell>
          <table:table-cell office:value-type="float" office:value="245" table:style-name="ce9">
            <text:p>245</text:p>
          </table:table-cell>
          <table:table-cell office:value-type="float" office:value="159" table:style-name="ce9">
            <text:p>159</text:p>
          </table:table-cell>
          <table:table-cell office:value-type="float" office:value="8298" table:style-name="ce9">
            <text:p>8298</text:p>
          </table:table-cell>
          <table:table-cell office:value-type="float" office:value="322" table:style-name="ce9">
            <text:p>322</text:p>
          </table:table-cell>
          <table:table-cell office:value-type="float" office:value="8543" table:formula="of:=SUM([.G135]+[.E135])" table:style-name="ce15">
            <text:p>8543</text:p>
          </table:table-cell>
          <table:table-cell office:value-type="float" office:value="-163" table:formula="of:=[.F135]-[.H135]" table:style-name="ce15">
            <text:p>-163</text:p>
          </table:table-cell>
          <table:table-cell office:value-type="percentage" office:value="2.4113309141987591E-2" table:formula="of:=([.I136]-[.I135])/[.I135]" table:style-name="ce16">
            <text:p>2%</text:p>
          </table:table-cell>
          <table:table-cell office:value-type="string" office:string-value="Valid" table:formula="of:=IF([.F135]&lt;=[.E135]; &quot;Valid&quot;; &quot;Invalid&quot;)" table:style-name="ce17">
            <text:p>Valid</text:p>
          </table:table-cell>
          <table:table-cell office:value-type="string" office:string-value="Valid" table:formula="of:=IF([.H135]&lt;=[.G135]; &quot;Valid&quot;; &quot;Invalid&quot;)" table:style-name="ce17">
            <text:p>Valid</text:p>
          </table:table-cell>
          <table:table-cell office:value-type="string" office:string-value="Stable/Reducing" table:formula="of:=IF([.J135]&gt;0; &quot;Increasing Pressure&quot;; &quot;Stable/Reducing&quot;)" table:style-name="ce18">
            <text:p>Stable/Reducing</text:p>
          </table:table-cell>
          <table:table-cell office:value-type="float" office:value="2.0251572327044025" table:formula="of:=IFERROR([.H135]/[.F135]; 0)" table:style-name="ce17">
            <text:p>2.025157233</text:p>
          </table:table-cell>
          <table:table-cell office:value-type="float" office:value="9173.8571428571431" table:formula="of:=AVERAGE([.I135:.I141])" table:style-name="ce15">
            <text:p>9174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8-07T00:00:00" table:style-name="ce14">
            <text:p>07-08-2023</text:p>
          </table:table-cell>
          <table:table-cell office:value-type="string" office:string-value="August" table:formula="of:=TEXT([.A136]; &quot;mmmm&quot;)" table:style-name="ce14">
            <text:p>August</text:p>
          </table:table-cell>
          <table:table-cell office:value-type="string" office:string-value="2023-08" table:formula="of:=TEXT([.A136]; &quot;yyyy-mm&quot;)" table:style-name="ce14">
            <text:p>2023-08</text:p>
          </table:table-cell>
          <table:table-cell office:value-type="float" office:value="156" table:style-name="ce9">
            <text:p>156</text:p>
          </table:table-cell>
          <table:table-cell office:value-type="float" office:value="256" table:style-name="ce9">
            <text:p>256</text:p>
          </table:table-cell>
          <table:table-cell office:value-type="float" office:value="176" table:style-name="ce9">
            <text:p>176</text:p>
          </table:table-cell>
          <table:table-cell office:value-type="float" office:value="8493" table:style-name="ce9">
            <text:p>8493</text:p>
          </table:table-cell>
          <table:table-cell office:value-type="float" office:value="202" table:style-name="ce9">
            <text:p>202</text:p>
          </table:table-cell>
          <table:table-cell office:value-type="float" office:value="8749" table:formula="of:=SUM([.G136]+[.E136])" table:style-name="ce15">
            <text:p>8749</text:p>
          </table:table-cell>
          <table:table-cell office:value-type="float" office:value="-26" table:formula="of:=[.F136]-[.H136]" table:style-name="ce15">
            <text:p>-26</text:p>
          </table:table-cell>
          <table:table-cell office:value-type="percentage" office:value="2.3774145616641901E-2" table:formula="of:=([.I137]-[.I136])/[.I136]" table:style-name="ce16">
            <text:p>2%</text:p>
          </table:table-cell>
          <table:table-cell office:value-type="string" office:string-value="Valid" table:formula="of:=IF([.F136]&lt;=[.E136]; &quot;Valid&quot;; &quot;Invalid&quot;)" table:style-name="ce17">
            <text:p>Valid</text:p>
          </table:table-cell>
          <table:table-cell office:value-type="string" office:string-value="Valid" table:formula="of:=IF([.H136]&lt;=[.G136]; &quot;Valid&quot;; &quot;Invalid&quot;)" table:style-name="ce17">
            <text:p>Valid</text:p>
          </table:table-cell>
          <table:table-cell office:value-type="string" office:string-value="Stable/Reducing" table:formula="of:=IF([.J136]&gt;0; &quot;Increasing Pressure&quot;; &quot;Stable/Reducing&quot;)" table:style-name="ce18">
            <text:p>Stable/Reducing</text:p>
          </table:table-cell>
          <table:table-cell office:value-type="float" office:value="1.1477272727272727" table:formula="of:=IFERROR([.H136]/[.F136]; 0)" table:style-name="ce17">
            <text:p>1.147727273</text:p>
          </table:table-cell>
          <table:table-cell office:value-type="float" office:value="9338.1428571428569" table:formula="of:=AVERAGE([.I136:.I142])" table:style-name="ce15">
            <text:p>9338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8-08T00:00:00" table:style-name="ce14">
            <text:p>08-08-2023</text:p>
          </table:table-cell>
          <table:table-cell office:value-type="string" office:string-value="August" table:formula="of:=TEXT([.A137]; &quot;mmmm&quot;)" table:style-name="ce14">
            <text:p>August</text:p>
          </table:table-cell>
          <table:table-cell office:value-type="string" office:string-value="2023-08" table:formula="of:=TEXT([.A137]; &quot;yyyy-mm&quot;)" table:style-name="ce14">
            <text:p>2023-08</text:p>
          </table:table-cell>
          <table:table-cell office:value-type="float" office:value="125" table:style-name="ce9">
            <text:p>125</text:p>
          </table:table-cell>
          <table:table-cell office:value-type="float" office:value="232" table:style-name="ce9">
            <text:p>232</text:p>
          </table:table-cell>
          <table:table-cell office:value-type="float" office:value="192" table:style-name="ce9">
            <text:p>192</text:p>
          </table:table-cell>
          <table:table-cell office:value-type="float" office:value="8725" table:style-name="ce9">
            <text:p>8725</text:p>
          </table:table-cell>
          <table:table-cell office:value-type="float" office:value="207" table:style-name="ce9">
            <text:p>207</text:p>
          </table:table-cell>
          <table:table-cell office:value-type="float" office:value="8957" table:formula="of:=SUM([.G137]+[.E137])" table:style-name="ce15">
            <text:p>8957</text:p>
          </table:table-cell>
          <table:table-cell office:value-type="float" office:value="-15" table:formula="of:=[.F137]-[.H137]" table:style-name="ce15">
            <text:p>-15</text:p>
          </table:table-cell>
          <table:table-cell office:value-type="percentage" office:value="7.8151166685274092E-3" table:formula="of:=([.I138]-[.I137])/[.I137]" table:style-name="ce16">
            <text:p>1%</text:p>
          </table:table-cell>
          <table:table-cell office:value-type="string" office:string-value="Valid" table:formula="of:=IF([.F137]&lt;=[.E137]; &quot;Valid&quot;; &quot;Invalid&quot;)" table:style-name="ce17">
            <text:p>Valid</text:p>
          </table:table-cell>
          <table:table-cell office:value-type="string" office:string-value="Valid" table:formula="of:=IF([.H137]&lt;=[.G137]; &quot;Valid&quot;; &quot;Invalid&quot;)" table:style-name="ce17">
            <text:p>Valid</text:p>
          </table:table-cell>
          <table:table-cell office:value-type="string" office:string-value="Stable/Reducing" table:formula="of:=IF([.J137]&gt;0; &quot;Increasing Pressure&quot;; &quot;Stable/Reducing&quot;)" table:style-name="ce18">
            <text:p>Stable/Reducing</text:p>
          </table:table-cell>
          <table:table-cell office:value-type="float" office:value="1.078125" table:formula="of:=IFERROR([.H137]/[.F137]; 0)" table:style-name="ce17">
            <text:p>1.078125</text:p>
          </table:table-cell>
          <table:table-cell office:value-type="float" office:value="9498.4285714285706" table:formula="of:=AVERAGE([.I137:.I143])" table:style-name="ce15">
            <text:p>9498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8-09T00:00:00" table:style-name="ce14">
            <text:p>09-08-2023</text:p>
          </table:table-cell>
          <table:table-cell office:value-type="string" office:string-value="August" table:formula="of:=TEXT([.A138]; &quot;mmmm&quot;)" table:style-name="ce14">
            <text:p>August</text:p>
          </table:table-cell>
          <table:table-cell office:value-type="string" office:string-value="2023-08" table:formula="of:=TEXT([.A138]; &quot;yyyy-mm&quot;)" table:style-name="ce14">
            <text:p>2023-08</text:p>
          </table:table-cell>
          <table:table-cell office:value-type="float" office:value="118" table:style-name="ce9">
            <text:p>118</text:p>
          </table:table-cell>
          <table:table-cell office:value-type="float" office:value="139" table:style-name="ce9">
            <text:p>139</text:p>
          </table:table-cell>
          <table:table-cell office:value-type="float" office:value="168" table:style-name="ce9">
            <text:p>168</text:p>
          </table:table-cell>
          <table:table-cell office:value-type="float" office:value="8888" table:style-name="ce9">
            <text:p>8888</text:p>
          </table:table-cell>
          <table:table-cell office:value-type="float" office:value="251" table:style-name="ce9">
            <text:p>251</text:p>
          </table:table-cell>
          <table:table-cell office:value-type="float" office:value="9027" table:formula="of:=SUM([.G138]+[.E138])" table:style-name="ce15">
            <text:p>9027</text:p>
          </table:table-cell>
          <table:table-cell office:value-type="float" office:value="-83" table:formula="of:=[.F138]-[.H138]" table:style-name="ce15">
            <text:p>-83</text:p>
          </table:table-cell>
          <table:table-cell office:value-type="percentage" office:value="1.3515010523983604E-2" table:formula="of:=([.I139]-[.I138])/[.I138]" table:style-name="ce16">
            <text:p>1%</text:p>
          </table:table-cell>
          <table:table-cell office:value-type="string" office:string-value="Invalid" table:formula="of:=IF([.F138]&lt;=[.E138]; &quot;Valid&quot;; &quot;Invalid&quot;)" table:style-name="ce17">
            <text:p>Invalid</text:p>
          </table:table-cell>
          <table:table-cell office:value-type="string" office:string-value="Valid" table:formula="of:=IF([.H138]&lt;=[.G138]; &quot;Valid&quot;; &quot;Invalid&quot;)" table:style-name="ce17">
            <text:p>Valid</text:p>
          </table:table-cell>
          <table:table-cell office:value-type="string" office:string-value="Stable/Reducing" table:formula="of:=IF([.J138]&gt;0; &quot;Increasing Pressure&quot;; &quot;Stable/Reducing&quot;)" table:style-name="ce18">
            <text:p>Stable/Reducing</text:p>
          </table:table-cell>
          <table:table-cell office:value-type="float" office:value="1.4940476190476191" table:formula="of:=IFERROR([.H138]/[.F138]; 0)" table:style-name="ce17">
            <text:p>1.494047619</text:p>
          </table:table-cell>
          <table:table-cell office:value-type="float" office:value="9666" table:formula="of:=AVERAGE([.I138:.I144])" table:style-name="ce15">
            <text:p>9666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8-10T00:00:00" table:style-name="ce14">
            <text:p>10-08-2023</text:p>
          </table:table-cell>
          <table:table-cell office:value-type="string" office:string-value="August" table:formula="of:=TEXT([.A139]; &quot;mmmm&quot;)" table:style-name="ce14">
            <text:p>August</text:p>
          </table:table-cell>
          <table:table-cell office:value-type="string" office:string-value="2023-08" table:formula="of:=TEXT([.A139]; &quot;yyyy-mm&quot;)" table:style-name="ce14">
            <text:p>2023-08</text:p>
          </table:table-cell>
          <table:table-cell office:value-type="float" office:value="142" table:style-name="ce9">
            <text:p>142</text:p>
          </table:table-cell>
          <table:table-cell office:value-type="float" office:value="235" table:style-name="ce9">
            <text:p>235</text:p>
          </table:table-cell>
          <table:table-cell office:value-type="float" office:value="139" table:style-name="ce9">
            <text:p>139</text:p>
          </table:table-cell>
          <table:table-cell office:value-type="float" office:value="8914" table:style-name="ce9">
            <text:p>8914</text:p>
          </table:table-cell>
          <table:table-cell office:value-type="float" office:value="353" table:style-name="ce9">
            <text:p>353</text:p>
          </table:table-cell>
          <table:table-cell office:value-type="float" office:value="9149" table:formula="of:=SUM([.G139]+[.E139])" table:style-name="ce15">
            <text:p>9149</text:p>
          </table:table-cell>
          <table:table-cell office:value-type="float" office:value="-214" table:formula="of:=[.F139]-[.H139]" table:style-name="ce15">
            <text:p>-214</text:p>
          </table:table-cell>
          <table:table-cell office:value-type="percentage" office:value="7.9790140999016282E-2" table:formula="of:=([.I140]-[.I139])/[.I139]" table:style-name="ce16">
            <text:p>8%</text:p>
          </table:table-cell>
          <table:table-cell office:value-type="string" office:string-value="Valid" table:formula="of:=IF([.F139]&lt;=[.E139]; &quot;Valid&quot;; &quot;Invalid&quot;)" table:style-name="ce17">
            <text:p>Valid</text:p>
          </table:table-cell>
          <table:table-cell office:value-type="string" office:string-value="Valid" table:formula="of:=IF([.H139]&lt;=[.G139]; &quot;Valid&quot;; &quot;Invalid&quot;)" table:style-name="ce17">
            <text:p>Valid</text:p>
          </table:table-cell>
          <table:table-cell office:value-type="string" office:string-value="Stable/Reducing" table:formula="of:=IF([.J139]&gt;0; &quot;Increasing Pressure&quot;; &quot;Stable/Reducing&quot;)" table:style-name="ce18">
            <text:p>Stable/Reducing</text:p>
          </table:table-cell>
          <table:table-cell office:value-type="float" office:value="2.5395683453237412" table:formula="of:=IFERROR([.H139]/[.F139]; 0)" table:style-name="ce17">
            <text:p>2.539568345</text:p>
          </table:table-cell>
          <table:table-cell office:value-type="float" office:value="9845.4285714285706" table:formula="of:=AVERAGE([.I139:.I145])" table:style-name="ce15">
            <text:p>9845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8-16T00:00:00" table:style-name="ce14">
            <text:p>16-08-2023</text:p>
          </table:table-cell>
          <table:table-cell office:value-type="string" office:string-value="August" table:formula="of:=TEXT([.A140]; &quot;mmmm&quot;)" table:style-name="ce14">
            <text:p>August</text:p>
          </table:table-cell>
          <table:table-cell office:value-type="string" office:string-value="2023-08" table:formula="of:=TEXT([.A140]; &quot;yyyy-mm&quot;)" table:style-name="ce14">
            <text:p>2023-08</text:p>
          </table:table-cell>
          <table:table-cell office:value-type="float" office:value="148" table:style-name="ce9">
            <text:p>148</text:p>
          </table:table-cell>
          <table:table-cell office:value-type="float" office:value="245" table:style-name="ce9">
            <text:p>245</text:p>
          </table:table-cell>
          <table:table-cell office:value-type="float" office:value="175" table:style-name="ce9">
            <text:p>175</text:p>
          </table:table-cell>
          <table:table-cell office:value-type="float" office:value="9634" table:style-name="ce9">
            <text:p>9634</text:p>
          </table:table-cell>
          <table:table-cell office:value-type="float" office:value="288" table:style-name="ce9">
            <text:p>288</text:p>
          </table:table-cell>
          <table:table-cell office:value-type="float" office:value="9879" table:formula="of:=SUM([.G140]+[.E140])" table:style-name="ce15">
            <text:p>9879</text:p>
          </table:table-cell>
          <table:table-cell office:value-type="float" office:value="-113" table:formula="of:=[.F140]-[.H140]" table:style-name="ce15">
            <text:p>-113</text:p>
          </table:table-cell>
          <table:table-cell office:value-type="percentage" office:value="3.4416438910820934E-3" table:formula="of:=([.I141]-[.I140])/[.I140]" table:style-name="ce16">
            <text:p>0%</text:p>
          </table:table-cell>
          <table:table-cell office:value-type="string" office:string-value="Valid" table:formula="of:=IF([.F140]&lt;=[.E140]; &quot;Valid&quot;; &quot;Invalid&quot;)" table:style-name="ce17">
            <text:p>Valid</text:p>
          </table:table-cell>
          <table:table-cell office:value-type="string" office:string-value="Valid" table:formula="of:=IF([.H140]&lt;=[.G140]; &quot;Valid&quot;; &quot;Invalid&quot;)" table:style-name="ce17">
            <text:p>Valid</text:p>
          </table:table-cell>
          <table:table-cell office:value-type="string" office:string-value="Stable/Reducing" table:formula="of:=IF([.J140]&gt;0; &quot;Increasing Pressure&quot;; &quot;Stable/Reducing&quot;)" table:style-name="ce18">
            <text:p>Stable/Reducing</text:p>
          </table:table-cell>
          <table:table-cell office:value-type="float" office:value="1.6457142857142857" table:formula="of:=IFERROR([.H140]/[.F140]; 0)" table:style-name="ce17">
            <text:p>1.645714286</text:p>
          </table:table-cell>
          <table:table-cell office:value-type="float" office:value="10001.285714285714" table:formula="of:=AVERAGE([.I140:.I146])" table:style-name="ce15">
            <text:p>10001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8-17T00:00:00" table:style-name="ce14">
            <text:p>17-08-2023</text:p>
          </table:table-cell>
          <table:table-cell office:value-type="string" office:string-value="August" table:formula="of:=TEXT([.A141]; &quot;mmmm&quot;)" table:style-name="ce14">
            <text:p>August</text:p>
          </table:table-cell>
          <table:table-cell office:value-type="string" office:string-value="2023-08" table:formula="of:=TEXT([.A141]; &quot;yyyy-mm&quot;)" table:style-name="ce14">
            <text:p>2023-08</text:p>
          </table:table-cell>
          <table:table-cell office:value-type="float" office:value="119" table:style-name="ce9">
            <text:p>119</text:p>
          </table:table-cell>
          <table:table-cell office:value-type="float" office:value="219" table:style-name="ce9">
            <text:p>219</text:p>
          </table:table-cell>
          <table:table-cell office:value-type="float" office:value="210" table:style-name="ce9">
            <text:p>210</text:p>
          </table:table-cell>
          <table:table-cell office:value-type="float" office:value="9694" table:style-name="ce9">
            <text:p>9694</text:p>
          </table:table-cell>
          <table:table-cell office:value-type="float" office:value="407" table:style-name="ce9">
            <text:p>407</text:p>
          </table:table-cell>
          <table:table-cell office:value-type="float" office:value="9913" table:formula="of:=SUM([.G141]+[.E141])" table:style-name="ce15">
            <text:p>9913</text:p>
          </table:table-cell>
          <table:table-cell office:value-type="float" office:value="-197" table:formula="of:=[.F141]-[.H141]" table:style-name="ce15">
            <text:p>-197</text:p>
          </table:table-cell>
          <table:table-cell office:value-type="percentage" office:value="-2.2193079794209623E-2" table:formula="of:=([.I142]-[.I141])/[.I141]" table:style-name="ce16">
            <text:p>-2%</text:p>
          </table:table-cell>
          <table:table-cell office:value-type="string" office:string-value="Valid" table:formula="of:=IF([.F141]&lt;=[.E141]; &quot;Valid&quot;; &quot;Invalid&quot;)" table:style-name="ce17">
            <text:p>Valid</text:p>
          </table:table-cell>
          <table:table-cell office:value-type="string" office:string-value="Valid" table:formula="of:=IF([.H141]&lt;=[.G141]; &quot;Valid&quot;; &quot;Invalid&quot;)" table:style-name="ce17">
            <text:p>Valid</text:p>
          </table:table-cell>
          <table:table-cell office:value-type="string" office:string-value="Stable/Reducing" table:formula="of:=IF([.J141]&gt;0; &quot;Increasing Pressure&quot;; &quot;Stable/Reducing&quot;)" table:style-name="ce18">
            <text:p>Stable/Reducing</text:p>
          </table:table-cell>
          <table:table-cell office:value-type="float" office:value="1.9380952380952381" table:formula="of:=IFERROR([.H141]/[.F141]; 0)" table:style-name="ce17">
            <text:p>1.938095238</text:p>
          </table:table-cell>
          <table:table-cell office:value-type="float" office:value="10040.857142857143" table:formula="of:=AVERAGE([.I141:.I147])" table:style-name="ce15">
            <text:p>10041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8-20T00:00:00" table:style-name="ce14">
            <text:p>20-08-2023</text:p>
          </table:table-cell>
          <table:table-cell office:value-type="string" office:string-value="August" table:formula="of:=TEXT([.A142]; &quot;mmmm&quot;)" table:style-name="ce14">
            <text:p>August</text:p>
          </table:table-cell>
          <table:table-cell office:value-type="string" office:string-value="2023-08" table:formula="of:=TEXT([.A142]; &quot;yyyy-mm&quot;)" table:style-name="ce14">
            <text:p>2023-08</text:p>
          </table:table-cell>
          <table:table-cell office:value-type="float" office:value="105" table:style-name="ce9">
            <text:p>105</text:p>
          </table:table-cell>
          <table:table-cell office:value-type="float" office:value="210" table:style-name="ce9">
            <text:p>210</text:p>
          </table:table-cell>
          <table:table-cell office:value-type="float" office:value="149" table:style-name="ce9">
            <text:p>149</text:p>
          </table:table-cell>
          <table:table-cell office:value-type="float" office:value="9483" table:style-name="ce9">
            <text:p>9483</text:p>
          </table:table-cell>
          <table:table-cell office:value-type="float" office:value="390" table:style-name="ce9">
            <text:p>390</text:p>
          </table:table-cell>
          <table:table-cell office:value-type="float" office:value="9693" table:formula="of:=SUM([.G142]+[.E142])" table:style-name="ce15">
            <text:p>9693</text:p>
          </table:table-cell>
          <table:table-cell office:value-type="float" office:value="-241" table:formula="of:=[.F142]-[.H142]" table:style-name="ce15">
            <text:p>-241</text:p>
          </table:table-cell>
          <table:table-cell office:value-type="percentage" office:value="1.8363767667388838E-2" table:formula="of:=([.I143]-[.I142])/[.I142]" table:style-name="ce16">
            <text:p>2%</text:p>
          </table:table-cell>
          <table:table-cell office:value-type="string" office:string-value="Valid" table:formula="of:=IF([.F142]&lt;=[.E142]; &quot;Valid&quot;; &quot;Invalid&quot;)" table:style-name="ce17">
            <text:p>Valid</text:p>
          </table:table-cell>
          <table:table-cell office:value-type="string" office:string-value="Valid" table:formula="of:=IF([.H142]&lt;=[.G142]; &quot;Valid&quot;; &quot;Invalid&quot;)" table:style-name="ce17">
            <text:p>Valid</text:p>
          </table:table-cell>
          <table:table-cell office:value-type="string" office:string-value="Stable/Reducing" table:formula="of:=IF([.J142]&gt;0; &quot;Increasing Pressure&quot;; &quot;Stable/Reducing&quot;)" table:style-name="ce18">
            <text:p>Stable/Reducing</text:p>
          </table:table-cell>
          <table:table-cell office:value-type="float" office:value="2.6174496644295302" table:formula="of:=IFERROR([.H142]/[.F142]; 0)" table:style-name="ce17">
            <text:p>2.617449664</text:p>
          </table:table-cell>
          <table:table-cell office:value-type="float" office:value="10097.428571428571" table:formula="of:=AVERAGE([.I142:.I148])" table:style-name="ce15">
            <text:p>10097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8-21T00:00:00" table:style-name="ce14">
            <text:p>21-08-2023</text:p>
          </table:table-cell>
          <table:table-cell office:value-type="string" office:string-value="August" table:formula="of:=TEXT([.A143]; &quot;mmmm&quot;)" table:style-name="ce14">
            <text:p>August</text:p>
          </table:table-cell>
          <table:table-cell office:value-type="string" office:string-value="2023-08" table:formula="of:=TEXT([.A143]; &quot;yyyy-mm&quot;)" table:style-name="ce14">
            <text:p>2023-08</text:p>
          </table:table-cell>
          <table:table-cell office:value-type="float" office:value="143" table:style-name="ce9">
            <text:p>143</text:p>
          </table:table-cell>
          <table:table-cell office:value-type="float" office:value="203" table:style-name="ce9">
            <text:p>203</text:p>
          </table:table-cell>
          <table:table-cell office:value-type="float" office:value="163" table:style-name="ce9">
            <text:p>163</text:p>
          </table:table-cell>
          <table:table-cell office:value-type="float" office:value="9668" table:style-name="ce9">
            <text:p>9668</text:p>
          </table:table-cell>
          <table:table-cell office:value-type="float" office:value="281" table:style-name="ce9">
            <text:p>281</text:p>
          </table:table-cell>
          <table:table-cell office:value-type="float" office:value="9871" table:formula="of:=SUM([.G143]+[.E143])" table:style-name="ce15">
            <text:p>9871</text:p>
          </table:table-cell>
          <table:table-cell office:value-type="float" office:value="-118" table:formula="of:=[.F143]-[.H143]" table:style-name="ce15">
            <text:p>-118</text:p>
          </table:table-cell>
          <table:table-cell office:value-type="percentage" office:value="2.6238476344848546E-2" table:formula="of:=([.I144]-[.I143])/[.I143]" table:style-name="ce16">
            <text:p>3%</text:p>
          </table:table-cell>
          <table:table-cell office:value-type="string" office:string-value="Valid" table:formula="of:=IF([.F143]&lt;=[.E143]; &quot;Valid&quot;; &quot;Invalid&quot;)" table:style-name="ce17">
            <text:p>Valid</text:p>
          </table:table-cell>
          <table:table-cell office:value-type="string" office:string-value="Valid" table:formula="of:=IF([.H143]&lt;=[.G143]; &quot;Valid&quot;; &quot;Invalid&quot;)" table:style-name="ce17">
            <text:p>Valid</text:p>
          </table:table-cell>
          <table:table-cell office:value-type="string" office:string-value="Stable/Reducing" table:formula="of:=IF([.J143]&gt;0; &quot;Increasing Pressure&quot;; &quot;Stable/Reducing&quot;)" table:style-name="ce18">
            <text:p>Stable/Reducing</text:p>
          </table:table-cell>
          <table:table-cell office:value-type="float" office:value="1.7239263803680982" table:formula="of:=IFERROR([.H143]/[.F143]; 0)" table:style-name="ce17">
            <text:p>1.72392638</text:p>
          </table:table-cell>
          <table:table-cell office:value-type="float" office:value="10205.857142857143" table:formula="of:=AVERAGE([.I143:.I149])" table:style-name="ce15">
            <text:p>10206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8-22T00:00:00" table:style-name="ce14">
            <text:p>22-08-2023</text:p>
          </table:table-cell>
          <table:table-cell office:value-type="string" office:string-value="August" table:formula="of:=TEXT([.A144]; &quot;mmmm&quot;)" table:style-name="ce14">
            <text:p>August</text:p>
          </table:table-cell>
          <table:table-cell office:value-type="string" office:string-value="2023-08" table:formula="of:=TEXT([.A144]; &quot;yyyy-mm&quot;)" table:style-name="ce14">
            <text:p>2023-08</text:p>
          </table:table-cell>
          <table:table-cell office:value-type="float" office:value="119" table:style-name="ce9">
            <text:p>119</text:p>
          </table:table-cell>
          <table:table-cell office:value-type="float" office:value="209" table:style-name="ce9">
            <text:p>209</text:p>
          </table:table-cell>
          <table:table-cell office:value-type="float" office:value="152" table:style-name="ce9">
            <text:p>152</text:p>
          </table:table-cell>
          <table:table-cell office:value-type="float" office:value="9921" table:style-name="ce9">
            <text:p>9921</text:p>
          </table:table-cell>
          <table:table-cell office:value-type="float" office:value="230" table:style-name="ce9">
            <text:p>230</text:p>
          </table:table-cell>
          <table:table-cell office:value-type="float" office:value="10130" table:formula="of:=SUM([.G144]+[.E144])" table:style-name="ce15">
            <text:p>10130</text:p>
          </table:table-cell>
          <table:table-cell office:value-type="float" office:value="-78" table:formula="of:=[.F144]-[.H144]" table:style-name="ce15">
            <text:p>-78</text:p>
          </table:table-cell>
          <table:table-cell office:value-type="percentage" office:value="1.5103652517275419E-2" table:formula="of:=([.I145]-[.I144])/[.I144]" table:style-name="ce16">
            <text:p>2%</text:p>
          </table:table-cell>
          <table:table-cell office:value-type="string" office:string-value="Valid" table:formula="of:=IF([.F144]&lt;=[.E144]; &quot;Valid&quot;; &quot;Invalid&quot;)" table:style-name="ce17">
            <text:p>Valid</text:p>
          </table:table-cell>
          <table:table-cell office:value-type="string" office:string-value="Valid" table:formula="of:=IF([.H144]&lt;=[.G144]; &quot;Valid&quot;; &quot;Invalid&quot;)" table:style-name="ce17">
            <text:p>Valid</text:p>
          </table:table-cell>
          <table:table-cell office:value-type="string" office:string-value="Stable/Reducing" table:formula="of:=IF([.J144]&gt;0; &quot;Increasing Pressure&quot;; &quot;Stable/Reducing&quot;)" table:style-name="ce18">
            <text:p>Stable/Reducing</text:p>
          </table:table-cell>
          <table:table-cell office:value-type="float" office:value="1.513157894736842" table:formula="of:=IFERROR([.H144]/[.F144]; 0)" table:style-name="ce17">
            <text:p>1.513157895</text:p>
          </table:table-cell>
          <table:table-cell office:value-type="float" office:value="10316.714285714286" table:formula="of:=AVERAGE([.I144:.I150])" table:style-name="ce15">
            <text:p>10317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8-23T00:00:00" table:style-name="ce14">
            <text:p>23-08-2023</text:p>
          </table:table-cell>
          <table:table-cell office:value-type="string" office:string-value="August" table:formula="of:=TEXT([.A145]; &quot;mmmm&quot;)" table:style-name="ce14">
            <text:p>August</text:p>
          </table:table-cell>
          <table:table-cell office:value-type="string" office:string-value="2023-08" table:formula="of:=TEXT([.A145]; &quot;yyyy-mm&quot;)" table:style-name="ce14">
            <text:p>2023-08</text:p>
          </table:table-cell>
          <table:table-cell office:value-type="float" office:value="155" table:style-name="ce9">
            <text:p>155</text:p>
          </table:table-cell>
          <table:table-cell office:value-type="float" office:value="212" table:style-name="ce9">
            <text:p>212</text:p>
          </table:table-cell>
          <table:table-cell office:value-type="float" office:value="181" table:style-name="ce9">
            <text:p>181</text:p>
          </table:table-cell>
          <table:table-cell office:value-type="float" office:value="10071" table:style-name="ce9">
            <text:p>10071</text:p>
          </table:table-cell>
          <table:table-cell office:value-type="float" office:value="285" table:style-name="ce9">
            <text:p>285</text:p>
          </table:table-cell>
          <table:table-cell office:value-type="float" office:value="10283" table:formula="of:=SUM([.G145]+[.E145])" table:style-name="ce15">
            <text:p>10283</text:p>
          </table:table-cell>
          <table:table-cell office:value-type="float" office:value="-104" table:formula="of:=[.F145]-[.H145]" table:style-name="ce15">
            <text:p>-104</text:p>
          </table:table-cell>
          <table:table-cell office:value-type="percentage" office:value="-4.1816590489156865E-3" table:formula="of:=([.I146]-[.I145])/[.I145]" table:style-name="ce16">
            <text:p>0%</text:p>
          </table:table-cell>
          <table:table-cell office:value-type="string" office:string-value="Valid" table:formula="of:=IF([.F145]&lt;=[.E145]; &quot;Valid&quot;; &quot;Invalid&quot;)" table:style-name="ce17">
            <text:p>Valid</text:p>
          </table:table-cell>
          <table:table-cell office:value-type="string" office:string-value="Valid" table:formula="of:=IF([.H145]&lt;=[.G145]; &quot;Valid&quot;; &quot;Invalid&quot;)" table:style-name="ce17">
            <text:p>Valid</text:p>
          </table:table-cell>
          <table:table-cell office:value-type="string" office:string-value="Stable/Reducing" table:formula="of:=IF([.J145]&gt;0; &quot;Increasing Pressure&quot;; &quot;Stable/Reducing&quot;)" table:style-name="ce18">
            <text:p>Stable/Reducing</text:p>
          </table:table-cell>
          <table:table-cell office:value-type="float" office:value="1.5745856353591161" table:formula="of:=IFERROR([.H145]/[.F145]; 0)" table:style-name="ce17">
            <text:p>1.574585635</text:p>
          </table:table-cell>
          <table:table-cell office:value-type="float" office:value="10358.142857142857" table:formula="of:=AVERAGE([.I145:.I151])" table:style-name="ce15">
            <text:p>10358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8-24T00:00:00" table:style-name="ce14">
            <text:p>24-08-2023</text:p>
          </table:table-cell>
          <table:table-cell office:value-type="string" office:string-value="August" table:formula="of:=TEXT([.A146]; &quot;mmmm&quot;)" table:style-name="ce14">
            <text:p>August</text:p>
          </table:table-cell>
          <table:table-cell office:value-type="string" office:string-value="2023-08" table:formula="of:=TEXT([.A146]; &quot;yyyy-mm&quot;)" table:style-name="ce14">
            <text:p>2023-08</text:p>
          </table:table-cell>
          <table:table-cell office:value-type="float" office:value="109" table:style-name="ce9">
            <text:p>109</text:p>
          </table:table-cell>
          <table:table-cell office:value-type="float" office:value="214" table:style-name="ce9">
            <text:p>214</text:p>
          </table:table-cell>
          <table:table-cell office:value-type="float" office:value="173" table:style-name="ce9">
            <text:p>173</text:p>
          </table:table-cell>
          <table:table-cell office:value-type="float" office:value="10026" table:style-name="ce9">
            <text:p>10026</text:p>
          </table:table-cell>
          <table:table-cell office:value-type="float" office:value="443" table:style-name="ce9">
            <text:p>443</text:p>
          </table:table-cell>
          <table:table-cell office:value-type="float" office:value="10240" table:formula="of:=SUM([.G146]+[.E146])" table:style-name="ce15">
            <text:p>10240</text:p>
          </table:table-cell>
          <table:table-cell office:value-type="float" office:value="-270" table:formula="of:=[.F146]-[.H146]" table:style-name="ce15">
            <text:p>-270</text:p>
          </table:table-cell>
          <table:table-cell office:value-type="percentage" office:value="-8.2031250000000003E-3" table:formula="of:=([.I147]-[.I146])/[.I146]" table:style-name="ce16">
            <text:p>-1%</text:p>
          </table:table-cell>
          <table:table-cell office:value-type="string" office:string-value="Valid" table:formula="of:=IF([.F146]&lt;=[.E146]; &quot;Valid&quot;; &quot;Invalid&quot;)" table:style-name="ce17">
            <text:p>Valid</text:p>
          </table:table-cell>
          <table:table-cell office:value-type="string" office:string-value="Valid" table:formula="of:=IF([.H146]&lt;=[.G146]; &quot;Valid&quot;; &quot;Invalid&quot;)" table:style-name="ce17">
            <text:p>Valid</text:p>
          </table:table-cell>
          <table:table-cell office:value-type="string" office:string-value="Stable/Reducing" table:formula="of:=IF([.J146]&gt;0; &quot;Increasing Pressure&quot;; &quot;Stable/Reducing&quot;)" table:style-name="ce18">
            <text:p>Stable/Reducing</text:p>
          </table:table-cell>
          <table:table-cell office:value-type="float" office:value="2.5606936416184971" table:formula="of:=IFERROR([.H146]/[.F146]; 0)" table:style-name="ce17">
            <text:p>2.560693642</text:p>
          </table:table-cell>
          <table:table-cell office:value-type="float" office:value="10359.714285714286" table:formula="of:=AVERAGE([.I146:.I152])" table:style-name="ce15">
            <text:p>10360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8-27T00:00:00" table:style-name="ce14">
            <text:p>27-08-2023</text:p>
          </table:table-cell>
          <table:table-cell office:value-type="string" office:string-value="August" table:formula="of:=TEXT([.A147]; &quot;mmmm&quot;)" table:style-name="ce14">
            <text:p>August</text:p>
          </table:table-cell>
          <table:table-cell office:value-type="string" office:string-value="2023-08" table:formula="of:=TEXT([.A147]; &quot;yyyy-mm&quot;)" table:style-name="ce14">
            <text:p>2023-08</text:p>
          </table:table-cell>
          <table:table-cell office:value-type="float" office:value="191" table:style-name="ce9">
            <text:p>191</text:p>
          </table:table-cell>
          <table:table-cell office:value-type="float" office:value="283" table:style-name="ce9">
            <text:p>283</text:p>
          </table:table-cell>
          <table:table-cell office:value-type="float" office:value="192" table:style-name="ce9">
            <text:p>192</text:p>
          </table:table-cell>
          <table:table-cell office:value-type="float" office:value="9873" table:style-name="ce9">
            <text:p>9873</text:p>
          </table:table-cell>
          <table:table-cell office:value-type="float" office:value="488" table:style-name="ce9">
            <text:p>488</text:p>
          </table:table-cell>
          <table:table-cell office:value-type="float" office:value="10156" table:formula="of:=SUM([.G147]+[.E147])" table:style-name="ce15">
            <text:p>10156</text:p>
          </table:table-cell>
          <table:table-cell office:value-type="float" office:value="-296" table:formula="of:=[.F147]-[.H147]" table:style-name="ce15">
            <text:p>-296</text:p>
          </table:table-cell>
          <table:table-cell office:value-type="percentage" office:value="1.5064986215045293E-2" table:formula="of:=([.I148]-[.I147])/[.I147]" table:style-name="ce16">
            <text:p>2%</text:p>
          </table:table-cell>
          <table:table-cell office:value-type="string" office:string-value="Valid" table:formula="of:=IF([.F147]&lt;=[.E147]; &quot;Valid&quot;; &quot;Invalid&quot;)" table:style-name="ce17">
            <text:p>Valid</text:p>
          </table:table-cell>
          <table:table-cell office:value-type="string" office:string-value="Valid" table:formula="of:=IF([.H147]&lt;=[.G147]; &quot;Valid&quot;; &quot;Invalid&quot;)" table:style-name="ce17">
            <text:p>Valid</text:p>
          </table:table-cell>
          <table:table-cell office:value-type="string" office:string-value="Stable/Reducing" table:formula="of:=IF([.J147]&gt;0; &quot;Increasing Pressure&quot;; &quot;Stable/Reducing&quot;)" table:style-name="ce18">
            <text:p>Stable/Reducing</text:p>
          </table:table-cell>
          <table:table-cell office:value-type="float" office:value="2.5416666666666665" table:formula="of:=IFERROR([.H147]/[.F147]; 0)" table:style-name="ce17">
            <text:p>2.541666667</text:p>
          </table:table-cell>
          <table:table-cell office:value-type="float" office:value="10392.857142857143" table:formula="of:=AVERAGE([.I147:.I153])" table:style-name="ce15">
            <text:p>10393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8-28T00:00:00" table:style-name="ce14">
            <text:p>28-08-2023</text:p>
          </table:table-cell>
          <table:table-cell office:value-type="string" office:string-value="August" table:formula="of:=TEXT([.A148]; &quot;mmmm&quot;)" table:style-name="ce14">
            <text:p>August</text:p>
          </table:table-cell>
          <table:table-cell office:value-type="string" office:string-value="2023-08" table:formula="of:=TEXT([.A148]; &quot;yyyy-mm&quot;)" table:style-name="ce14">
            <text:p>2023-08</text:p>
          </table:table-cell>
          <table:table-cell office:value-type="float" office:value="170" table:style-name="ce9">
            <text:p>170</text:p>
          </table:table-cell>
          <table:table-cell office:value-type="float" office:value="297" table:style-name="ce9">
            <text:p>297</text:p>
          </table:table-cell>
          <table:table-cell office:value-type="float" office:value="196" table:style-name="ce9">
            <text:p>196</text:p>
          </table:table-cell>
          <table:table-cell office:value-type="float" office:value="10012" table:style-name="ce9">
            <text:p>10012</text:p>
          </table:table-cell>
          <table:table-cell office:value-type="float" office:value="388" table:style-name="ce9">
            <text:p>388</text:p>
          </table:table-cell>
          <table:table-cell office:value-type="float" office:value="10309" table:formula="of:=SUM([.G148]+[.E148])" table:style-name="ce15">
            <text:p>10309</text:p>
          </table:table-cell>
          <table:table-cell office:value-type="float" office:value="-192" table:formula="of:=[.F148]-[.H148]" table:style-name="ce15">
            <text:p>-192</text:p>
          </table:table-cell>
          <table:table-cell office:value-type="percentage" office:value="1.3871374527112233E-2" table:formula="of:=([.I149]-[.I148])/[.I148]" table:style-name="ce16">
            <text:p>1%</text:p>
          </table:table-cell>
          <table:table-cell office:value-type="string" office:string-value="Valid" table:formula="of:=IF([.F148]&lt;=[.E148]; &quot;Valid&quot;; &quot;Invalid&quot;)" table:style-name="ce17">
            <text:p>Valid</text:p>
          </table:table-cell>
          <table:table-cell office:value-type="string" office:string-value="Valid" table:formula="of:=IF([.H148]&lt;=[.G148]; &quot;Valid&quot;; &quot;Invalid&quot;)" table:style-name="ce17">
            <text:p>Valid</text:p>
          </table:table-cell>
          <table:table-cell office:value-type="string" office:string-value="Stable/Reducing" table:formula="of:=IF([.J148]&gt;0; &quot;Increasing Pressure&quot;; &quot;Stable/Reducing&quot;)" table:style-name="ce18">
            <text:p>Stable/Reducing</text:p>
          </table:table-cell>
          <table:table-cell office:value-type="float" office:value="1.9795918367346939" table:formula="of:=IFERROR([.H148]/[.F148]; 0)" table:style-name="ce17">
            <text:p>1.979591837</text:p>
          </table:table-cell>
          <table:table-cell office:value-type="float" office:value="10454.285714285714" table:formula="of:=AVERAGE([.I148:.I154])" table:style-name="ce15">
            <text:p>10454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8-29T00:00:00" table:style-name="ce14">
            <text:p>29-08-2023</text:p>
          </table:table-cell>
          <table:table-cell office:value-type="string" office:string-value="August" table:formula="of:=TEXT([.A149]; &quot;mmmm&quot;)" table:style-name="ce14">
            <text:p>August</text:p>
          </table:table-cell>
          <table:table-cell office:value-type="string" office:string-value="2023-08" table:formula="of:=TEXT([.A149]; &quot;yyyy-mm&quot;)" table:style-name="ce14">
            <text:p>2023-08</text:p>
          </table:table-cell>
          <table:table-cell office:value-type="float" office:value="152" table:style-name="ce9">
            <text:p>152</text:p>
          </table:table-cell>
          <table:table-cell office:value-type="float" office:value="272" table:style-name="ce9">
            <text:p>272</text:p>
          </table:table-cell>
          <table:table-cell office:value-type="float" office:value="214" table:style-name="ce9">
            <text:p>214</text:p>
          </table:table-cell>
          <table:table-cell office:value-type="float" office:value="10180" table:style-name="ce9">
            <text:p>10180</text:p>
          </table:table-cell>
          <table:table-cell office:value-type="float" office:value="286" table:style-name="ce9">
            <text:p>286</text:p>
          </table:table-cell>
          <table:table-cell office:value-type="float" office:value="10452" table:formula="of:=SUM([.G149]+[.E149])" table:style-name="ce15">
            <text:p>10452</text:p>
          </table:table-cell>
          <table:table-cell office:value-type="float" office:value="-72" table:formula="of:=[.F149]-[.H149]" table:style-name="ce15">
            <text:p>-72</text:p>
          </table:table-cell>
          <table:table-cell office:value-type="percentage" office:value="1.8656716417910446E-2" table:formula="of:=([.I150]-[.I149])/[.I149]" table:style-name="ce16">
            <text:p>2%</text:p>
          </table:table-cell>
          <table:table-cell office:value-type="string" office:string-value="Valid" table:formula="of:=IF([.F149]&lt;=[.E149]; &quot;Valid&quot;; &quot;Invalid&quot;)" table:style-name="ce17">
            <text:p>Valid</text:p>
          </table:table-cell>
          <table:table-cell office:value-type="string" office:string-value="Valid" table:formula="of:=IF([.H149]&lt;=[.G149]; &quot;Valid&quot;; &quot;Invalid&quot;)" table:style-name="ce17">
            <text:p>Valid</text:p>
          </table:table-cell>
          <table:table-cell office:value-type="string" office:string-value="Stable/Reducing" table:formula="of:=IF([.J149]&gt;0; &quot;Increasing Pressure&quot;; &quot;Stable/Reducing&quot;)" table:style-name="ce18">
            <text:p>Stable/Reducing</text:p>
          </table:table-cell>
          <table:table-cell office:value-type="float" office:value="1.3364485981308412" table:formula="of:=IFERROR([.H149]/[.F149]; 0)" table:style-name="ce17">
            <text:p>1.336448598</text:p>
          </table:table-cell>
          <table:table-cell office:value-type="float" office:value="10505" table:formula="of:=AVERAGE([.I149:.I155])" table:style-name="ce15">
            <text:p>10505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8-30T00:00:00" table:style-name="ce14">
            <text:p>30-08-2023</text:p>
          </table:table-cell>
          <table:table-cell office:value-type="string" office:string-value="August" table:formula="of:=TEXT([.A150]; &quot;mmmm&quot;)" table:style-name="ce14">
            <text:p>August</text:p>
          </table:table-cell>
          <table:table-cell office:value-type="string" office:string-value="2023-08" table:formula="of:=TEXT([.A150]; &quot;yyyy-mm&quot;)" table:style-name="ce14">
            <text:p>2023-08</text:p>
          </table:table-cell>
          <table:table-cell office:value-type="float" office:value="239" table:style-name="ce9">
            <text:p>239</text:p>
          </table:table-cell>
          <table:table-cell office:value-type="float" office:value="367" table:style-name="ce9">
            <text:p>367</text:p>
          </table:table-cell>
          <table:table-cell office:value-type="float" office:value="224" table:style-name="ce9">
            <text:p>224</text:p>
          </table:table-cell>
          <table:table-cell office:value-type="float" office:value="10280" table:style-name="ce9">
            <text:p>10280</text:p>
          </table:table-cell>
          <table:table-cell office:value-type="float" office:value="366" table:style-name="ce9">
            <text:p>366</text:p>
          </table:table-cell>
          <table:table-cell office:value-type="float" office:value="10647" table:formula="of:=SUM([.G150]+[.E150])" table:style-name="ce15">
            <text:p>10647</text:p>
          </table:table-cell>
          <table:table-cell office:value-type="float" office:value="-142" table:formula="of:=[.F150]-[.H150]" table:style-name="ce15">
            <text:p>-142</text:p>
          </table:table-cell>
          <table:table-cell office:value-type="percentage" office:value="-2.1320559782098243E-2" table:formula="of:=([.I151]-[.I150])/[.I150]" table:style-name="ce16">
            <text:p>-2%</text:p>
          </table:table-cell>
          <table:table-cell office:value-type="string" office:string-value="Valid" table:formula="of:=IF([.F150]&lt;=[.E150]; &quot;Valid&quot;; &quot;Invalid&quot;)" table:style-name="ce17">
            <text:p>Valid</text:p>
          </table:table-cell>
          <table:table-cell office:value-type="string" office:string-value="Valid" table:formula="of:=IF([.H150]&lt;=[.G150]; &quot;Valid&quot;; &quot;Invalid&quot;)" table:style-name="ce17">
            <text:p>Valid</text:p>
          </table:table-cell>
          <table:table-cell office:value-type="string" office:string-value="Stable/Reducing" table:formula="of:=IF([.J150]&gt;0; &quot;Increasing Pressure&quot;; &quot;Stable/Reducing&quot;)" table:style-name="ce18">
            <text:p>Stable/Reducing</text:p>
          </table:table-cell>
          <table:table-cell office:value-type="float" office:value="1.6339285714285714" table:formula="of:=IFERROR([.H150]/[.F150]; 0)" table:style-name="ce17">
            <text:p>1.633928571</text:p>
          </table:table-cell>
          <table:table-cell office:value-type="float" office:value="10521.142857142857" table:formula="of:=AVERAGE([.I150:.I156])" table:style-name="ce15">
            <text:p>10521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8-31T00:00:00" table:style-name="ce14">
            <text:p>31-08-2023</text:p>
          </table:table-cell>
          <table:table-cell office:value-type="string" office:string-value="August" table:formula="of:=TEXT([.A151]; &quot;mmmm&quot;)" table:style-name="ce14">
            <text:p>August</text:p>
          </table:table-cell>
          <table:table-cell office:value-type="string" office:string-value="2023-08" table:formula="of:=TEXT([.A151]; &quot;yyyy-mm&quot;)" table:style-name="ce14">
            <text:p>2023-08</text:p>
          </table:table-cell>
          <table:table-cell office:value-type="float" office:value="113" table:style-name="ce9">
            <text:p>113</text:p>
          </table:table-cell>
          <table:table-cell office:value-type="float" office:value="280" table:style-name="ce9">
            <text:p>280</text:p>
          </table:table-cell>
          <table:table-cell office:value-type="float" office:value="237" table:style-name="ce9">
            <text:p>237</text:p>
          </table:table-cell>
          <table:table-cell office:value-type="float" office:value="10140" table:style-name="ce9">
            <text:p>10140</text:p>
          </table:table-cell>
          <table:table-cell office:value-type="float" office:value="505" table:style-name="ce9">
            <text:p>505</text:p>
          </table:table-cell>
          <table:table-cell office:value-type="float" office:value="10420" table:formula="of:=SUM([.G151]+[.E151])" table:style-name="ce15">
            <text:p>10420</text:p>
          </table:table-cell>
          <table:table-cell office:value-type="float" office:value="-268" table:formula="of:=[.F151]-[.H151]" table:style-name="ce15">
            <text:p>-268</text:p>
          </table:table-cell>
          <table:table-cell office:value-type="percentage" office:value="-1.2092130518234165E-2" table:formula="of:=([.I152]-[.I151])/[.I151]" table:style-name="ce16">
            <text:p>-1%</text:p>
          </table:table-cell>
          <table:table-cell office:value-type="string" office:string-value="Valid" table:formula="of:=IF([.F151]&lt;=[.E151]; &quot;Valid&quot;; &quot;Invalid&quot;)" table:style-name="ce17">
            <text:p>Valid</text:p>
          </table:table-cell>
          <table:table-cell office:value-type="string" office:string-value="Valid" table:formula="of:=IF([.H151]&lt;=[.G151]; &quot;Valid&quot;; &quot;Invalid&quot;)" table:style-name="ce17">
            <text:p>Valid</text:p>
          </table:table-cell>
          <table:table-cell office:value-type="string" office:string-value="Stable/Reducing" table:formula="of:=IF([.J151]&gt;0; &quot;Increasing Pressure&quot;; &quot;Stable/Reducing&quot;)" table:style-name="ce18">
            <text:p>Stable/Reducing</text:p>
          </table:table-cell>
          <table:table-cell office:value-type="float" office:value="2.130801687763713" table:formula="of:=IFERROR([.H151]/[.F151]; 0)" table:style-name="ce17">
            <text:p>2.130801688</text:p>
          </table:table-cell>
          <table:table-cell office:value-type="float" office:value="10533.714285714286" table:formula="of:=AVERAGE([.I151:.I157])" table:style-name="ce15">
            <text:p>10534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9-04T00:00:00" table:style-name="ce14">
            <text:p>04-09-2023</text:p>
          </table:table-cell>
          <table:table-cell office:value-type="string" office:string-value="September" table:formula="of:=TEXT([.A152]; &quot;mmmm&quot;)" table:style-name="ce14">
            <text:p>September</text:p>
          </table:table-cell>
          <table:table-cell office:value-type="string" office:string-value="2023-09" table:formula="of:=TEXT([.A152]; &quot;yyyy-mm&quot;)" table:style-name="ce14">
            <text:p>2023-09</text:p>
          </table:table-cell>
          <table:table-cell office:value-type="float" office:value="196" table:style-name="ce9">
            <text:p>196</text:p>
          </table:table-cell>
          <table:table-cell office:value-type="float" office:value="306" table:style-name="ce9">
            <text:p>306</text:p>
          </table:table-cell>
          <table:table-cell office:value-type="float" office:value="187" table:style-name="ce9">
            <text:p>187</text:p>
          </table:table-cell>
          <table:table-cell office:value-type="float" office:value="9988" table:style-name="ce9">
            <text:p>9988</text:p>
          </table:table-cell>
          <table:table-cell office:value-type="float" office:value="293" table:style-name="ce9">
            <text:p>293</text:p>
          </table:table-cell>
          <table:table-cell office:value-type="float" office:value="10294" table:formula="of:=SUM([.G152]+[.E152])" table:style-name="ce15">
            <text:p>10294</text:p>
          </table:table-cell>
          <table:table-cell office:value-type="float" office:value="-106" table:formula="of:=[.F152]-[.H152]" table:style-name="ce15">
            <text:p>-106</text:p>
          </table:table-cell>
          <table:table-cell office:value-type="percentage" office:value="1.72916261900136E-2" table:formula="of:=([.I153]-[.I152])/[.I152]" table:style-name="ce16">
            <text:p>2%</text:p>
          </table:table-cell>
          <table:table-cell office:value-type="string" office:string-value="Valid" table:formula="of:=IF([.F152]&lt;=[.E152]; &quot;Valid&quot;; &quot;Invalid&quot;)" table:style-name="ce17">
            <text:p>Valid</text:p>
          </table:table-cell>
          <table:table-cell office:value-type="string" office:string-value="Valid" table:formula="of:=IF([.H152]&lt;=[.G152]; &quot;Valid&quot;; &quot;Invalid&quot;)" table:style-name="ce17">
            <text:p>Valid</text:p>
          </table:table-cell>
          <table:table-cell office:value-type="string" office:string-value="Stable/Reducing" table:formula="of:=IF([.J152]&gt;0; &quot;Increasing Pressure&quot;; &quot;Stable/Reducing&quot;)" table:style-name="ce18">
            <text:p>Stable/Reducing</text:p>
          </table:table-cell>
          <table:table-cell office:value-type="float" office:value="1.5668449197860963" table:formula="of:=IFERROR([.H152]/[.F152]; 0)" table:style-name="ce17">
            <text:p>1.56684492</text:p>
          </table:table-cell>
          <table:table-cell office:value-type="float" office:value="10611.428571428571" table:formula="of:=AVERAGE([.I152:.I158])" table:style-name="ce15">
            <text:p>10611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9-05T00:00:00" table:style-name="ce14">
            <text:p>05-09-2023</text:p>
          </table:table-cell>
          <table:table-cell office:value-type="string" office:string-value="September" table:formula="of:=TEXT([.A153]; &quot;mmmm&quot;)" table:style-name="ce14">
            <text:p>September</text:p>
          </table:table-cell>
          <table:table-cell office:value-type="string" office:string-value="2023-09" table:formula="of:=TEXT([.A153]; &quot;yyyy-mm&quot;)" table:style-name="ce14">
            <text:p>2023-09</text:p>
          </table:table-cell>
          <table:table-cell office:value-type="float" office:value="236" table:style-name="ce9">
            <text:p>236</text:p>
          </table:table-cell>
          <table:table-cell office:value-type="float" office:value="330" table:style-name="ce9">
            <text:p>330</text:p>
          </table:table-cell>
          <table:table-cell office:value-type="float" office:value="222" table:style-name="ce9">
            <text:p>222</text:p>
          </table:table-cell>
          <table:table-cell office:value-type="float" office:value="10142" table:style-name="ce9">
            <text:p>10142</text:p>
          </table:table-cell>
          <table:table-cell office:value-type="float" office:value="243" table:style-name="ce9">
            <text:p>243</text:p>
          </table:table-cell>
          <table:table-cell office:value-type="float" office:value="10472" table:formula="of:=SUM([.G153]+[.E153])" table:style-name="ce15">
            <text:p>10472</text:p>
          </table:table-cell>
          <table:table-cell office:value-type="float" office:value="-21" table:formula="of:=[.F153]-[.H153]" table:style-name="ce15">
            <text:p>-21</text:p>
          </table:table-cell>
          <table:table-cell office:value-type="percentage" office:value="1.0886172650878533E-2" table:formula="of:=([.I154]-[.I153])/[.I153]" table:style-name="ce16">
            <text:p>1%</text:p>
          </table:table-cell>
          <table:table-cell office:value-type="string" office:string-value="Valid" table:formula="of:=IF([.F153]&lt;=[.E153]; &quot;Valid&quot;; &quot;Invalid&quot;)" table:style-name="ce17">
            <text:p>Valid</text:p>
          </table:table-cell>
          <table:table-cell office:value-type="string" office:string-value="Valid" table:formula="of:=IF([.H153]&lt;=[.G153]; &quot;Valid&quot;; &quot;Invalid&quot;)" table:style-name="ce17">
            <text:p>Valid</text:p>
          </table:table-cell>
          <table:table-cell office:value-type="string" office:string-value="Stable/Reducing" table:formula="of:=IF([.J153]&gt;0; &quot;Increasing Pressure&quot;; &quot;Stable/Reducing&quot;)" table:style-name="ce18">
            <text:p>Stable/Reducing</text:p>
          </table:table-cell>
          <table:table-cell office:value-type="float" office:value="1.0945945945945945" table:formula="of:=IFERROR([.H153]/[.F153]; 0)" table:style-name="ce17">
            <text:p>1.094594595</text:p>
          </table:table-cell>
          <table:table-cell office:value-type="float" office:value="10712.857142857143" table:formula="of:=AVERAGE([.I153:.I159])" table:style-name="ce15">
            <text:p>10713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9-06T00:00:00" table:style-name="ce14">
            <text:p>06-09-2023</text:p>
          </table:table-cell>
          <table:table-cell office:value-type="string" office:string-value="September" table:formula="of:=TEXT([.A154]; &quot;mmmm&quot;)" table:style-name="ce14">
            <text:p>September</text:p>
          </table:table-cell>
          <table:table-cell office:value-type="string" office:string-value="2023-09" table:formula="of:=TEXT([.A154]; &quot;yyyy-mm&quot;)" table:style-name="ce14">
            <text:p>2023-09</text:p>
          </table:table-cell>
          <table:table-cell office:value-type="float" office:value="81" table:style-name="ce9">
            <text:p>81</text:p>
          </table:table-cell>
          <table:table-cell office:value-type="float" office:value="230" table:style-name="ce9">
            <text:p>230</text:p>
          </table:table-cell>
          <table:table-cell office:value-type="float" office:value="242" table:style-name="ce9">
            <text:p>242</text:p>
          </table:table-cell>
          <table:table-cell office:value-type="float" office:value="10356" table:style-name="ce9">
            <text:p>10356</text:p>
          </table:table-cell>
          <table:table-cell office:value-type="float" office:value="291" table:style-name="ce9">
            <text:p>291</text:p>
          </table:table-cell>
          <table:table-cell office:value-type="float" office:value="10586" table:formula="of:=SUM([.G154]+[.E154])" table:style-name="ce15">
            <text:p>10586</text:p>
          </table:table-cell>
          <table:table-cell office:value-type="float" office:value="-49" table:formula="of:=[.F154]-[.H154]" table:style-name="ce15">
            <text:p>-49</text:p>
          </table:table-cell>
          <table:table-cell office:value-type="percentage" office:value="7.36822218023805E-3" table:formula="of:=([.I155]-[.I154])/[.I154]" table:style-name="ce16">
            <text:p>1%</text:p>
          </table:table-cell>
          <table:table-cell office:value-type="string" office:string-value="Invalid" table:formula="of:=IF([.F154]&lt;=[.E154]; &quot;Valid&quot;; &quot;Invalid&quot;)" table:style-name="ce17">
            <text:p>Invalid</text:p>
          </table:table-cell>
          <table:table-cell office:value-type="string" office:string-value="Valid" table:formula="of:=IF([.H154]&lt;=[.G154]; &quot;Valid&quot;; &quot;Invalid&quot;)" table:style-name="ce17">
            <text:p>Valid</text:p>
          </table:table-cell>
          <table:table-cell office:value-type="string" office:string-value="Stable/Reducing" table:formula="of:=IF([.J154]&gt;0; &quot;Increasing Pressure&quot;; &quot;Stable/Reducing&quot;)" table:style-name="ce18">
            <text:p>Stable/Reducing</text:p>
          </table:table-cell>
          <table:table-cell office:value-type="float" office:value="1.2024793388429753" table:formula="of:=IFERROR([.H154]/[.F154]; 0)" table:style-name="ce17">
            <text:p>1.202479339</text:p>
          </table:table-cell>
          <table:table-cell office:value-type="float" office:value="10815.428571428571" table:formula="of:=AVERAGE([.I154:.I160])" table:style-name="ce15">
            <text:p>10815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9-07T00:00:00" table:style-name="ce14">
            <text:p>07-09-2023</text:p>
          </table:table-cell>
          <table:table-cell office:value-type="string" office:string-value="September" table:formula="of:=TEXT([.A155]; &quot;mmmm&quot;)" table:style-name="ce14">
            <text:p>September</text:p>
          </table:table-cell>
          <table:table-cell office:value-type="string" office:string-value="2023-09" table:formula="of:=TEXT([.A155]; &quot;yyyy-mm&quot;)" table:style-name="ce14">
            <text:p>2023-09</text:p>
          </table:table-cell>
          <table:table-cell office:value-type="float" office:value="118" table:style-name="ce9">
            <text:p>118</text:p>
          </table:table-cell>
          <table:table-cell office:value-type="float" office:value="245" table:style-name="ce9">
            <text:p>245</text:p>
          </table:table-cell>
          <table:table-cell office:value-type="float" office:value="160" table:style-name="ce9">
            <text:p>160</text:p>
          </table:table-cell>
          <table:table-cell office:value-type="float" office:value="10419" table:style-name="ce9">
            <text:p>10419</text:p>
          </table:table-cell>
          <table:table-cell office:value-type="float" office:value="398" table:style-name="ce9">
            <text:p>398</text:p>
          </table:table-cell>
          <table:table-cell office:value-type="float" office:value="10664" table:formula="of:=SUM([.G155]+[.E155])" table:style-name="ce15">
            <text:p>10664</text:p>
          </table:table-cell>
          <table:table-cell office:value-type="float" office:value="-238" table:formula="of:=[.F155]-[.H155]" table:style-name="ce15">
            <text:p>-238</text:p>
          </table:table-cell>
          <table:table-cell office:value-type="percentage" office:value="-9.2835708927231815E-3" table:formula="of:=([.I156]-[.I155])/[.I155]" table:style-name="ce16">
            <text:p>-1%</text:p>
          </table:table-cell>
          <table:table-cell office:value-type="string" office:string-value="Valid" table:formula="of:=IF([.F155]&lt;=[.E155]; &quot;Valid&quot;; &quot;Invalid&quot;)" table:style-name="ce17">
            <text:p>Valid</text:p>
          </table:table-cell>
          <table:table-cell office:value-type="string" office:string-value="Valid" table:formula="of:=IF([.H155]&lt;=[.G155]; &quot;Valid&quot;; &quot;Invalid&quot;)" table:style-name="ce17">
            <text:p>Valid</text:p>
          </table:table-cell>
          <table:table-cell office:value-type="string" office:string-value="Stable/Reducing" table:formula="of:=IF([.J155]&gt;0; &quot;Increasing Pressure&quot;; &quot;Stable/Reducing&quot;)" table:style-name="ce18">
            <text:p>Stable/Reducing</text:p>
          </table:table-cell>
          <table:table-cell office:value-type="float" office:value="2.4874999999999998" table:formula="of:=IFERROR([.H155]/[.F155]; 0)" table:style-name="ce17">
            <text:p>2.4875</text:p>
          </table:table-cell>
          <table:table-cell office:value-type="float" office:value="10882" table:formula="of:=AVERAGE([.I155:.I161])" table:style-name="ce15">
            <text:p>10882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9-10T00:00:00" table:style-name="ce14">
            <text:p>10-09-2023</text:p>
          </table:table-cell>
          <table:table-cell office:value-type="string" office:string-value="September" table:formula="of:=TEXT([.A156]; &quot;mmmm&quot;)" table:style-name="ce14">
            <text:p>September</text:p>
          </table:table-cell>
          <table:table-cell office:value-type="string" office:string-value="2023-09" table:formula="of:=TEXT([.A156]; &quot;yyyy-mm&quot;)" table:style-name="ce14">
            <text:p>2023-09</text:p>
          </table:table-cell>
          <table:table-cell office:value-type="float" office:value="218" table:style-name="ce9">
            <text:p>218</text:p>
          </table:table-cell>
          <table:table-cell office:value-type="float" office:value="283" table:style-name="ce9">
            <text:p>283</text:p>
          </table:table-cell>
          <table:table-cell office:value-type="float" office:value="208" table:style-name="ce9">
            <text:p>208</text:p>
          </table:table-cell>
          <table:table-cell office:value-type="float" office:value="10282" table:style-name="ce9">
            <text:p>10282</text:p>
          </table:table-cell>
          <table:table-cell office:value-type="float" office:value="382" table:style-name="ce9">
            <text:p>382</text:p>
          </table:table-cell>
          <table:table-cell office:value-type="float" office:value="10565" table:formula="of:=SUM([.G156]+[.E156])" table:style-name="ce15">
            <text:p>10565</text:p>
          </table:table-cell>
          <table:table-cell office:value-type="float" office:value="-174" table:formula="of:=[.F156]-[.H156]" table:style-name="ce15">
            <text:p>-174</text:p>
          </table:table-cell>
          <table:table-cell office:value-type="percentage" office:value="1.609086606720303E-2" table:formula="of:=([.I157]-[.I156])/[.I156]" table:style-name="ce16">
            <text:p>2%</text:p>
          </table:table-cell>
          <table:table-cell office:value-type="string" office:string-value="Valid" table:formula="of:=IF([.F156]&lt;=[.E156]; &quot;Valid&quot;; &quot;Invalid&quot;)" table:style-name="ce17">
            <text:p>Valid</text:p>
          </table:table-cell>
          <table:table-cell office:value-type="string" office:string-value="Valid" table:formula="of:=IF([.H156]&lt;=[.G156]; &quot;Valid&quot;; &quot;Invalid&quot;)" table:style-name="ce17">
            <text:p>Valid</text:p>
          </table:table-cell>
          <table:table-cell office:value-type="string" office:string-value="Stable/Reducing" table:formula="of:=IF([.J156]&gt;0; &quot;Increasing Pressure&quot;; &quot;Stable/Reducing&quot;)" table:style-name="ce18">
            <text:p>Stable/Reducing</text:p>
          </table:table-cell>
          <table:table-cell office:value-type="float" office:value="1.8365384615384615" table:formula="of:=IFERROR([.H156]/[.F156]; 0)" table:style-name="ce17">
            <text:p>1.836538462</text:p>
          </table:table-cell>
          <table:table-cell office:value-type="float" office:value="10962.714285714286" table:formula="of:=AVERAGE([.I156:.I162])" table:style-name="ce15">
            <text:p>10963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9-11T00:00:00" table:style-name="ce14">
            <text:p>11-09-2023</text:p>
          </table:table-cell>
          <table:table-cell office:value-type="string" office:string-value="September" table:formula="of:=TEXT([.A157]; &quot;mmmm&quot;)" table:style-name="ce14">
            <text:p>September</text:p>
          </table:table-cell>
          <table:table-cell office:value-type="string" office:string-value="2023-09" table:formula="of:=TEXT([.A157]; &quot;yyyy-mm&quot;)" table:style-name="ce14">
            <text:p>2023-09</text:p>
          </table:table-cell>
          <table:table-cell office:value-type="float" office:value="132" table:style-name="ce9">
            <text:p>132</text:p>
          </table:table-cell>
          <table:table-cell office:value-type="float" office:value="243" table:style-name="ce9">
            <text:p>243</text:p>
          </table:table-cell>
          <table:table-cell office:value-type="float" office:value="183" table:style-name="ce9">
            <text:p>183</text:p>
          </table:table-cell>
          <table:table-cell office:value-type="float" office:value="10492" table:style-name="ce9">
            <text:p>10492</text:p>
          </table:table-cell>
          <table:table-cell office:value-type="float" office:value="277" table:style-name="ce9">
            <text:p>277</text:p>
          </table:table-cell>
          <table:table-cell office:value-type="float" office:value="10735" table:formula="of:=SUM([.G157]+[.E157])" table:style-name="ce15">
            <text:p>10735</text:p>
          </table:table-cell>
          <table:table-cell office:value-type="float" office:value="-94" table:formula="of:=[.F157]-[.H157]" table:style-name="ce15">
            <text:p>-94</text:p>
          </table:table-cell>
          <table:table-cell office:value-type="percentage" office:value="2.1332091290172335E-2" table:formula="of:=([.I158]-[.I157])/[.I157]" table:style-name="ce16">
            <text:p>2%</text:p>
          </table:table-cell>
          <table:table-cell office:value-type="string" office:string-value="Valid" table:formula="of:=IF([.F157]&lt;=[.E157]; &quot;Valid&quot;; &quot;Invalid&quot;)" table:style-name="ce17">
            <text:p>Valid</text:p>
          </table:table-cell>
          <table:table-cell office:value-type="string" office:string-value="Valid" table:formula="of:=IF([.H157]&lt;=[.G157]; &quot;Valid&quot;; &quot;Invalid&quot;)" table:style-name="ce17">
            <text:p>Valid</text:p>
          </table:table-cell>
          <table:table-cell office:value-type="string" office:string-value="Stable/Reducing" table:formula="of:=IF([.J157]&gt;0; &quot;Increasing Pressure&quot;; &quot;Stable/Reducing&quot;)" table:style-name="ce18">
            <text:p>Stable/Reducing</text:p>
          </table:table-cell>
          <table:table-cell office:value-type="float" office:value="1.5136612021857923" table:formula="of:=IFERROR([.H157]/[.F157]; 0)" table:style-name="ce17">
            <text:p>1.513661202</text:p>
          </table:table-cell>
          <table:table-cell office:value-type="float" office:value="11079.428571428571" table:formula="of:=AVERAGE([.I157:.I163])" table:style-name="ce15">
            <text:p>11079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9-12T00:00:00" table:style-name="ce14">
            <text:p>12-09-2023</text:p>
          </table:table-cell>
          <table:table-cell office:value-type="string" office:string-value="September" table:formula="of:=TEXT([.A158]; &quot;mmmm&quot;)" table:style-name="ce14">
            <text:p>September</text:p>
          </table:table-cell>
          <table:table-cell office:value-type="string" office:string-value="2023-09" table:formula="of:=TEXT([.A158]; &quot;yyyy-mm&quot;)" table:style-name="ce14">
            <text:p>2023-09</text:p>
          </table:table-cell>
          <table:table-cell office:value-type="float" office:value="224" table:style-name="ce9">
            <text:p>224</text:p>
          </table:table-cell>
          <table:table-cell office:value-type="float" office:value="315" table:style-name="ce9">
            <text:p>315</text:p>
          </table:table-cell>
          <table:table-cell office:value-type="float" office:value="152" table:style-name="ce9">
            <text:p>152</text:p>
          </table:table-cell>
          <table:table-cell office:value-type="float" office:value="10649" table:style-name="ce9">
            <text:p>10649</text:p>
          </table:table-cell>
          <table:table-cell office:value-type="float" office:value="316" table:style-name="ce9">
            <text:p>316</text:p>
          </table:table-cell>
          <table:table-cell office:value-type="float" office:value="10964" table:formula="of:=SUM([.G158]+[.E158])" table:style-name="ce15">
            <text:p>10964</text:p>
          </table:table-cell>
          <table:table-cell office:value-type="float" office:value="-164" table:formula="of:=[.F158]-[.H158]" table:style-name="ce15">
            <text:p>-164</text:p>
          </table:table-cell>
          <table:table-cell office:value-type="percentage" office:value="3.6483035388544327E-3" table:formula="of:=([.I159]-[.I158])/[.I158]" table:style-name="ce16">
            <text:p>0%</text:p>
          </table:table-cell>
          <table:table-cell office:value-type="string" office:string-value="Valid" table:formula="of:=IF([.F158]&lt;=[.E158]; &quot;Valid&quot;; &quot;Invalid&quot;)" table:style-name="ce17">
            <text:p>Valid</text:p>
          </table:table-cell>
          <table:table-cell office:value-type="string" office:string-value="Valid" table:formula="of:=IF([.H158]&lt;=[.G158]; &quot;Valid&quot;; &quot;Invalid&quot;)" table:style-name="ce17">
            <text:p>Valid</text:p>
          </table:table-cell>
          <table:table-cell office:value-type="string" office:string-value="Stable/Reducing" table:formula="of:=IF([.J158]&gt;0; &quot;Increasing Pressure&quot;; &quot;Stable/Reducing&quot;)" table:style-name="ce18">
            <text:p>Stable/Reducing</text:p>
          </table:table-cell>
          <table:table-cell office:value-type="float" office:value="2.0789473684210527" table:formula="of:=IFERROR([.H158]/[.F158]; 0)" table:style-name="ce17">
            <text:p>2.078947368</text:p>
          </table:table-cell>
          <table:table-cell office:value-type="float" office:value="11170.714285714286" table:formula="of:=AVERAGE([.I158:.I164])" table:style-name="ce15">
            <text:p>11171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9-13T00:00:00" table:style-name="ce14">
            <text:p>13-09-2023</text:p>
          </table:table-cell>
          <table:table-cell office:value-type="string" office:string-value="September" table:formula="of:=TEXT([.A159]; &quot;mmmm&quot;)" table:style-name="ce14">
            <text:p>September</text:p>
          </table:table-cell>
          <table:table-cell office:value-type="string" office:string-value="2023-09" table:formula="of:=TEXT([.A159]; &quot;yyyy-mm&quot;)" table:style-name="ce14">
            <text:p>2023-09</text:p>
          </table:table-cell>
          <table:table-cell office:value-type="float" office:value="167" table:style-name="ce9">
            <text:p>167</text:p>
          </table:table-cell>
          <table:table-cell office:value-type="float" office:value="326" table:style-name="ce9">
            <text:p>326</text:p>
          </table:table-cell>
          <table:table-cell office:value-type="float" office:value="213" table:style-name="ce9">
            <text:p>213</text:p>
          </table:table-cell>
          <table:table-cell office:value-type="float" office:value="10678" table:style-name="ce9">
            <text:p>10678</text:p>
          </table:table-cell>
          <table:table-cell office:value-type="float" office:value="343" table:style-name="ce9">
            <text:p>343</text:p>
          </table:table-cell>
          <table:table-cell office:value-type="float" office:value="11004" table:formula="of:=SUM([.G159]+[.E159])" table:style-name="ce15">
            <text:p>11004</text:p>
          </table:table-cell>
          <table:table-cell office:value-type="float" office:value="-130" table:formula="of:=[.F159]-[.H159]" table:style-name="ce15">
            <text:p>-130</text:p>
          </table:table-cell>
          <table:table-cell office:value-type="percentage" office:value="1.6902944383860415E-2" table:formula="of:=([.I160]-[.I159])/[.I159]" table:style-name="ce16">
            <text:p>2%</text:p>
          </table:table-cell>
          <table:table-cell office:value-type="string" office:string-value="Valid" table:formula="of:=IF([.F159]&lt;=[.E159]; &quot;Valid&quot;; &quot;Invalid&quot;)" table:style-name="ce17">
            <text:p>Valid</text:p>
          </table:table-cell>
          <table:table-cell office:value-type="string" office:string-value="Valid" table:formula="of:=IF([.H159]&lt;=[.G159]; &quot;Valid&quot;; &quot;Invalid&quot;)" table:style-name="ce17">
            <text:p>Valid</text:p>
          </table:table-cell>
          <table:table-cell office:value-type="string" office:string-value="Stable/Reducing" table:formula="of:=IF([.J159]&gt;0; &quot;Increasing Pressure&quot;; &quot;Stable/Reducing&quot;)" table:style-name="ce18">
            <text:p>Stable/Reducing</text:p>
          </table:table-cell>
          <table:table-cell office:value-type="float" office:value="1.6103286384976525" table:formula="of:=IFERROR([.H159]/[.F159]; 0)" table:style-name="ce17">
            <text:p>1.610328638</text:p>
          </table:table-cell>
          <table:table-cell office:value-type="float" office:value="11226.142857142857" table:formula="of:=AVERAGE([.I159:.I165])" table:style-name="ce15">
            <text:p>11226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9-14T00:00:00" table:style-name="ce14">
            <text:p>14-09-2023</text:p>
          </table:table-cell>
          <table:table-cell office:value-type="string" office:string-value="September" table:formula="of:=TEXT([.A160]; &quot;mmmm&quot;)" table:style-name="ce14">
            <text:p>September</text:p>
          </table:table-cell>
          <table:table-cell office:value-type="string" office:string-value="2023-09" table:formula="of:=TEXT([.A160]; &quot;yyyy-mm&quot;)" table:style-name="ce14">
            <text:p>2023-09</text:p>
          </table:table-cell>
          <table:table-cell office:value-type="float" office:value="209" table:style-name="ce9">
            <text:p>209</text:p>
          </table:table-cell>
          <table:table-cell office:value-type="float" office:value="353" table:style-name="ce9">
            <text:p>353</text:p>
          </table:table-cell>
          <table:table-cell office:value-type="float" office:value="232" table:style-name="ce9">
            <text:p>232</text:p>
          </table:table-cell>
          <table:table-cell office:value-type="float" office:value="10837" table:style-name="ce9">
            <text:p>10837</text:p>
          </table:table-cell>
          <table:table-cell office:value-type="float" office:value="414" table:style-name="ce9">
            <text:p>414</text:p>
          </table:table-cell>
          <table:table-cell office:value-type="float" office:value="11190" table:formula="of:=SUM([.G160]+[.E160])" table:style-name="ce15">
            <text:p>11190</text:p>
          </table:table-cell>
          <table:table-cell office:value-type="float" office:value="-182" table:formula="of:=[.F160]-[.H160]" table:style-name="ce15">
            <text:p>-182</text:p>
          </table:table-cell>
          <table:table-cell office:value-type="percentage" office:value="-1.2332439678284183E-2" table:formula="of:=([.I161]-[.I160])/[.I160]" table:style-name="ce16">
            <text:p>-1%</text:p>
          </table:table-cell>
          <table:table-cell office:value-type="string" office:string-value="Valid" table:formula="of:=IF([.F160]&lt;=[.E160]; &quot;Valid&quot;; &quot;Invalid&quot;)" table:style-name="ce17">
            <text:p>Valid</text:p>
          </table:table-cell>
          <table:table-cell office:value-type="string" office:string-value="Valid" table:formula="of:=IF([.H160]&lt;=[.G160]; &quot;Valid&quot;; &quot;Invalid&quot;)" table:style-name="ce17">
            <text:p>Valid</text:p>
          </table:table-cell>
          <table:table-cell office:value-type="string" office:string-value="Stable/Reducing" table:formula="of:=IF([.J160]&gt;0; &quot;Increasing Pressure&quot;; &quot;Stable/Reducing&quot;)" table:style-name="ce18">
            <text:p>Stable/Reducing</text:p>
          </table:table-cell>
          <table:table-cell office:value-type="float" office:value="1.7844827586206897" table:formula="of:=IFERROR([.H160]/[.F160]; 0)" table:style-name="ce17">
            <text:p>1.784482759</text:p>
          </table:table-cell>
          <table:table-cell office:value-type="float" office:value="11247.857142857143" table:formula="of:=AVERAGE([.I160:.I166])" table:style-name="ce15">
            <text:p>11248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9-17T00:00:00" table:style-name="ce14">
            <text:p>17-09-2023</text:p>
          </table:table-cell>
          <table:table-cell office:value-type="string" office:string-value="September" table:formula="of:=TEXT([.A161]; &quot;mmmm&quot;)" table:style-name="ce14">
            <text:p>September</text:p>
          </table:table-cell>
          <table:table-cell office:value-type="string" office:string-value="2023-09" table:formula="of:=TEXT([.A161]; &quot;yyyy-mm&quot;)" table:style-name="ce14">
            <text:p>2023-09</text:p>
          </table:table-cell>
          <table:table-cell office:value-type="float" office:value="153" table:style-name="ce9">
            <text:p>153</text:p>
          </table:table-cell>
          <table:table-cell office:value-type="float" office:value="253" table:style-name="ce9">
            <text:p>253</text:p>
          </table:table-cell>
          <table:table-cell office:value-type="float" office:value="286" table:style-name="ce9">
            <text:p>286</text:p>
          </table:table-cell>
          <table:table-cell office:value-type="float" office:value="10799" table:style-name="ce9">
            <text:p>10799</text:p>
          </table:table-cell>
          <table:table-cell office:value-type="float" office:value="427" table:style-name="ce9">
            <text:p>427</text:p>
          </table:table-cell>
          <table:table-cell office:value-type="float" office:value="11052" table:formula="of:=SUM([.G161]+[.E161])" table:style-name="ce15">
            <text:p>11052</text:p>
          </table:table-cell>
          <table:table-cell office:value-type="float" office:value="-141" table:formula="of:=[.F161]-[.H161]" table:style-name="ce15">
            <text:p>-141</text:p>
          </table:table-cell>
          <table:table-cell office:value-type="percentage" office:value="1.6015200868621064E-2" table:formula="of:=([.I162]-[.I161])/[.I161]" table:style-name="ce16">
            <text:p>2%</text:p>
          </table:table-cell>
          <table:table-cell office:value-type="string" office:string-value="Invalid" table:formula="of:=IF([.F161]&lt;=[.E161]; &quot;Valid&quot;; &quot;Invalid&quot;)" table:style-name="ce17">
            <text:p>Invalid</text:p>
          </table:table-cell>
          <table:table-cell office:value-type="string" office:string-value="Valid" table:formula="of:=IF([.H161]&lt;=[.G161]; &quot;Valid&quot;; &quot;Invalid&quot;)" table:style-name="ce17">
            <text:p>Valid</text:p>
          </table:table-cell>
          <table:table-cell office:value-type="string" office:string-value="Stable/Reducing" table:formula="of:=IF([.J161]&gt;0; &quot;Increasing Pressure&quot;; &quot;Stable/Reducing&quot;)" table:style-name="ce18">
            <text:p>Stable/Reducing</text:p>
          </table:table-cell>
          <table:table-cell office:value-type="float" office:value="1.4930069930069929" table:formula="of:=IFERROR([.H161]/[.F161]; 0)" table:style-name="ce17">
            <text:p>1.493006993</text:p>
          </table:table-cell>
          <table:table-cell office:value-type="float" office:value="11234.571428571429" table:formula="of:=AVERAGE([.I161:.I167])" table:style-name="ce15">
            <text:p>11235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9-18T00:00:00" table:style-name="ce14">
            <text:p>18-09-2023</text:p>
          </table:table-cell>
          <table:table-cell office:value-type="string" office:string-value="September" table:formula="of:=TEXT([.A162]; &quot;mmmm&quot;)" table:style-name="ce14">
            <text:p>September</text:p>
          </table:table-cell>
          <table:table-cell office:value-type="string" office:string-value="2023-09" table:formula="of:=TEXT([.A162]; &quot;yyyy-mm&quot;)" table:style-name="ce14">
            <text:p>2023-09</text:p>
          </table:table-cell>
          <table:table-cell office:value-type="float" office:value="180" table:style-name="ce9">
            <text:p>180</text:p>
          </table:table-cell>
          <table:table-cell office:value-type="float" office:value="337" table:style-name="ce9">
            <text:p>337</text:p>
          </table:table-cell>
          <table:table-cell office:value-type="float" office:value="219" table:style-name="ce9">
            <text:p>219</text:p>
          </table:table-cell>
          <table:table-cell office:value-type="float" office:value="10892" table:style-name="ce9">
            <text:p>10892</text:p>
          </table:table-cell>
          <table:table-cell office:value-type="float" office:value="313" table:style-name="ce9">
            <text:p>313</text:p>
          </table:table-cell>
          <table:table-cell office:value-type="float" office:value="11229" table:formula="of:=SUM([.G162]+[.E162])" table:style-name="ce15">
            <text:p>11229</text:p>
          </table:table-cell>
          <table:table-cell office:value-type="float" office:value="-94" table:formula="of:=[.F162]-[.H162]" table:style-name="ce15">
            <text:p>-94</text:p>
          </table:table-cell>
          <table:table-cell office:value-type="percentage" office:value="1.3625434143734972E-2" table:formula="of:=([.I163]-[.I162])/[.I162]" table:style-name="ce16">
            <text:p>1%</text:p>
          </table:table-cell>
          <table:table-cell office:value-type="string" office:string-value="Valid" table:formula="of:=IF([.F162]&lt;=[.E162]; &quot;Valid&quot;; &quot;Invalid&quot;)" table:style-name="ce17">
            <text:p>Valid</text:p>
          </table:table-cell>
          <table:table-cell office:value-type="string" office:string-value="Valid" table:formula="of:=IF([.H162]&lt;=[.G162]; &quot;Valid&quot;; &quot;Invalid&quot;)" table:style-name="ce17">
            <text:p>Valid</text:p>
          </table:table-cell>
          <table:table-cell office:value-type="string" office:string-value="Stable/Reducing" table:formula="of:=IF([.J162]&gt;0; &quot;Increasing Pressure&quot;; &quot;Stable/Reducing&quot;)" table:style-name="ce18">
            <text:p>Stable/Reducing</text:p>
          </table:table-cell>
          <table:table-cell office:value-type="float" office:value="1.4292237442922375" table:formula="of:=IFERROR([.H162]/[.F162]; 0)" table:style-name="ce17">
            <text:p>1.429223744</text:p>
          </table:table-cell>
          <table:table-cell office:value-type="float" office:value="11266" table:formula="of:=AVERAGE([.I162:.I168])" table:style-name="ce15">
            <text:p>11266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9-19T00:00:00" table:style-name="ce14">
            <text:p>19-09-2023</text:p>
          </table:table-cell>
          <table:table-cell office:value-type="string" office:string-value="September" table:formula="of:=TEXT([.A163]; &quot;mmmm&quot;)" table:style-name="ce14">
            <text:p>September</text:p>
          </table:table-cell>
          <table:table-cell office:value-type="string" office:string-value="2023-09" table:formula="of:=TEXT([.A163]; &quot;yyyy-mm&quot;)" table:style-name="ce14">
            <text:p>2023-09</text:p>
          </table:table-cell>
          <table:table-cell office:value-type="float" office:value="133" table:style-name="ce9">
            <text:p>133</text:p>
          </table:table-cell>
          <table:table-cell office:value-type="float" office:value="287" table:style-name="ce9">
            <text:p>287</text:p>
          </table:table-cell>
          <table:table-cell office:value-type="float" office:value="189" table:style-name="ce9">
            <text:p>189</text:p>
          </table:table-cell>
          <table:table-cell office:value-type="float" office:value="11095" table:style-name="ce9">
            <text:p>11095</text:p>
          </table:table-cell>
          <table:table-cell office:value-type="float" office:value="260" table:style-name="ce9">
            <text:p>260</text:p>
          </table:table-cell>
          <table:table-cell office:value-type="float" office:value="11382" table:formula="of:=SUM([.G163]+[.E163])" table:style-name="ce15">
            <text:p>11382</text:p>
          </table:table-cell>
          <table:table-cell office:value-type="float" office:value="-71" table:formula="of:=[.F163]-[.H163]" table:style-name="ce15">
            <text:p>-71</text:p>
          </table:table-cell>
          <table:table-cell office:value-type="percentage" office:value="-7.0286417149885785E-4" table:formula="of:=([.I164]-[.I163])/[.I163]" table:style-name="ce16">
            <text:p>0%</text:p>
          </table:table-cell>
          <table:table-cell office:value-type="string" office:string-value="Valid" table:formula="of:=IF([.F163]&lt;=[.E163]; &quot;Valid&quot;; &quot;Invalid&quot;)" table:style-name="ce17">
            <text:p>Valid</text:p>
          </table:table-cell>
          <table:table-cell office:value-type="string" office:string-value="Valid" table:formula="of:=IF([.H163]&lt;=[.G163]; &quot;Valid&quot;; &quot;Invalid&quot;)" table:style-name="ce17">
            <text:p>Valid</text:p>
          </table:table-cell>
          <table:table-cell office:value-type="string" office:string-value="Stable/Reducing" table:formula="of:=IF([.J163]&gt;0; &quot;Increasing Pressure&quot;; &quot;Stable/Reducing&quot;)" table:style-name="ce18">
            <text:p>Stable/Reducing</text:p>
          </table:table-cell>
          <table:table-cell office:value-type="float" office:value="1.3756613756613756" table:formula="of:=IFERROR([.H163]/[.F163]; 0)" table:style-name="ce17">
            <text:p>1.375661376</text:p>
          </table:table-cell>
          <table:table-cell office:value-type="float" office:value="11279.142857142857" table:formula="of:=AVERAGE([.I163:.I169])" table:style-name="ce15">
            <text:p>11279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9-20T00:00:00" table:style-name="ce14">
            <text:p>20-09-2023</text:p>
          </table:table-cell>
          <table:table-cell office:value-type="string" office:string-value="September" table:formula="of:=TEXT([.A164]; &quot;mmmm&quot;)" table:style-name="ce14">
            <text:p>September</text:p>
          </table:table-cell>
          <table:table-cell office:value-type="string" office:string-value="2023-09" table:formula="of:=TEXT([.A164]; &quot;yyyy-mm&quot;)" table:style-name="ce14">
            <text:p>2023-09</text:p>
          </table:table-cell>
          <table:table-cell office:value-type="float" office:value="187" table:style-name="ce9">
            <text:p>187</text:p>
          </table:table-cell>
          <table:table-cell office:value-type="float" office:value="310" table:style-name="ce9">
            <text:p>310</text:p>
          </table:table-cell>
          <table:table-cell office:value-type="float" office:value="247" table:style-name="ce9">
            <text:p>247</text:p>
          </table:table-cell>
          <table:table-cell office:value-type="float" office:value="11064" table:style-name="ce9">
            <text:p>11064</text:p>
          </table:table-cell>
          <table:table-cell office:value-type="float" office:value="364" table:style-name="ce9">
            <text:p>364</text:p>
          </table:table-cell>
          <table:table-cell office:value-type="float" office:value="11374" table:formula="of:=SUM([.G164]+[.E164])" table:style-name="ce15">
            <text:p>11374</text:p>
          </table:table-cell>
          <table:table-cell office:value-type="float" office:value="-117" table:formula="of:=[.F164]-[.H164]" table:style-name="ce15">
            <text:p>-117</text:p>
          </table:table-cell>
          <table:table-cell office:value-type="percentage" office:value="-1.9342359767891683E-3" table:formula="of:=([.I165]-[.I164])/[.I164]" table:style-name="ce16">
            <text:p>0%</text:p>
          </table:table-cell>
          <table:table-cell office:value-type="string" office:string-value="Valid" table:formula="of:=IF([.F164]&lt;=[.E164]; &quot;Valid&quot;; &quot;Invalid&quot;)" table:style-name="ce17">
            <text:p>Valid</text:p>
          </table:table-cell>
          <table:table-cell office:value-type="string" office:string-value="Valid" table:formula="of:=IF([.H164]&lt;=[.G164]; &quot;Valid&quot;; &quot;Invalid&quot;)" table:style-name="ce17">
            <text:p>Valid</text:p>
          </table:table-cell>
          <table:table-cell office:value-type="string" office:string-value="Stable/Reducing" table:formula="of:=IF([.J164]&gt;0; &quot;Increasing Pressure&quot;; &quot;Stable/Reducing&quot;)" table:style-name="ce18">
            <text:p>Stable/Reducing</text:p>
          </table:table-cell>
          <table:table-cell office:value-type="float" office:value="1.4736842105263157" table:formula="of:=IFERROR([.H164]/[.F164]; 0)" table:style-name="ce17">
            <text:p>1.473684211</text:p>
          </table:table-cell>
          <table:table-cell office:value-type="float" office:value="11245.428571428571" table:formula="of:=AVERAGE([.I164:.I170])" table:style-name="ce15">
            <text:p>11245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9-21T00:00:00" table:style-name="ce14">
            <text:p>21-09-2023</text:p>
          </table:table-cell>
          <table:table-cell office:value-type="string" office:string-value="September" table:formula="of:=TEXT([.A165]; &quot;mmmm&quot;)" table:style-name="ce14">
            <text:p>September</text:p>
          </table:table-cell>
          <table:table-cell office:value-type="string" office:string-value="2023-09" table:formula="of:=TEXT([.A165]; &quot;yyyy-mm&quot;)" table:style-name="ce14">
            <text:p>2023-09</text:p>
          </table:table-cell>
          <table:table-cell office:value-type="float" office:value="168" table:style-name="ce9">
            <text:p>168</text:p>
          </table:table-cell>
          <table:table-cell office:value-type="float" office:value="285" table:style-name="ce9">
            <text:p>285</text:p>
          </table:table-cell>
          <table:table-cell office:value-type="float" office:value="210" table:style-name="ce9">
            <text:p>210</text:p>
          </table:table-cell>
          <table:table-cell office:value-type="float" office:value="11067" table:style-name="ce9">
            <text:p>11067</text:p>
          </table:table-cell>
          <table:table-cell office:value-type="float" office:value="428" table:style-name="ce9">
            <text:p>428</text:p>
          </table:table-cell>
          <table:table-cell office:value-type="float" office:value="11352" table:formula="of:=SUM([.G165]+[.E165])" table:style-name="ce15">
            <text:p>11352</text:p>
          </table:table-cell>
          <table:table-cell office:value-type="float" office:value="-218" table:formula="of:=[.F165]-[.H165]" table:style-name="ce15">
            <text:p>-218</text:p>
          </table:table-cell>
          <table:table-cell office:value-type="percentage" office:value="-1.7265680056377731E-2" table:formula="of:=([.I166]-[.I165])/[.I165]" table:style-name="ce16">
            <text:p>-2%</text:p>
          </table:table-cell>
          <table:table-cell office:value-type="string" office:string-value="Valid" table:formula="of:=IF([.F165]&lt;=[.E165]; &quot;Valid&quot;; &quot;Invalid&quot;)" table:style-name="ce17">
            <text:p>Valid</text:p>
          </table:table-cell>
          <table:table-cell office:value-type="string" office:string-value="Valid" table:formula="of:=IF([.H165]&lt;=[.G165]; &quot;Valid&quot;; &quot;Invalid&quot;)" table:style-name="ce17">
            <text:p>Valid</text:p>
          </table:table-cell>
          <table:table-cell office:value-type="string" office:string-value="Stable/Reducing" table:formula="of:=IF([.J165]&gt;0; &quot;Increasing Pressure&quot;; &quot;Stable/Reducing&quot;)" table:style-name="ce18">
            <text:p>Stable/Reducing</text:p>
          </table:table-cell>
          <table:table-cell office:value-type="float" office:value="2.038095238095238" table:formula="of:=IFERROR([.H165]/[.F165]; 0)" table:style-name="ce17">
            <text:p>2.038095238</text:p>
          </table:table-cell>
          <table:table-cell office:value-type="float" office:value="11152" table:formula="of:=AVERAGE([.I165:.I171])" table:style-name="ce15">
            <text:p>11152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9-24T00:00:00" table:style-name="ce14">
            <text:p>24-09-2023</text:p>
          </table:table-cell>
          <table:table-cell office:value-type="string" office:string-value="September" table:formula="of:=TEXT([.A166]; &quot;mmmm&quot;)" table:style-name="ce14">
            <text:p>September</text:p>
          </table:table-cell>
          <table:table-cell office:value-type="string" office:string-value="2023-09" table:formula="of:=TEXT([.A166]; &quot;yyyy-mm&quot;)" table:style-name="ce14">
            <text:p>2023-09</text:p>
          </table:table-cell>
          <table:table-cell office:value-type="float" office:value="269" table:style-name="ce9">
            <text:p>269</text:p>
          </table:table-cell>
          <table:table-cell office:value-type="float" office:value="412" table:style-name="ce9">
            <text:p>412</text:p>
          </table:table-cell>
          <table:table-cell office:value-type="float" office:value="204" table:style-name="ce9">
            <text:p>204</text:p>
          </table:table-cell>
          <table:table-cell office:value-type="float" office:value="10744" table:style-name="ce9">
            <text:p>10744</text:p>
          </table:table-cell>
          <table:table-cell office:value-type="float" office:value="403" table:style-name="ce9">
            <text:p>403</text:p>
          </table:table-cell>
          <table:table-cell office:value-type="float" office:value="11156" table:formula="of:=SUM([.G166]+[.E166])" table:style-name="ce15">
            <text:p>11156</text:p>
          </table:table-cell>
          <table:table-cell office:value-type="float" office:value="-199" table:formula="of:=[.F166]-[.H166]" table:style-name="ce15">
            <text:p>-199</text:p>
          </table:table-cell>
          <table:table-cell office:value-type="percentage" office:value="-5.2886339189673719E-3" table:formula="of:=([.I167]-[.I166])/[.I166]" table:style-name="ce16">
            <text:p>-1%</text:p>
          </table:table-cell>
          <table:table-cell office:value-type="string" office:string-value="Valid" table:formula="of:=IF([.F166]&lt;=[.E166]; &quot;Valid&quot;; &quot;Invalid&quot;)" table:style-name="ce17">
            <text:p>Valid</text:p>
          </table:table-cell>
          <table:table-cell office:value-type="string" office:string-value="Valid" table:formula="of:=IF([.H166]&lt;=[.G166]; &quot;Valid&quot;; &quot;Invalid&quot;)" table:style-name="ce17">
            <text:p>Valid</text:p>
          </table:table-cell>
          <table:table-cell office:value-type="string" office:string-value="Stable/Reducing" table:formula="of:=IF([.J166]&gt;0; &quot;Increasing Pressure&quot;; &quot;Stable/Reducing&quot;)" table:style-name="ce18">
            <text:p>Stable/Reducing</text:p>
          </table:table-cell>
          <table:table-cell office:value-type="float" office:value="1.9754901960784315" table:formula="of:=IFERROR([.H166]/[.F166]; 0)" table:style-name="ce17">
            <text:p>1.975490196</text:p>
          </table:table-cell>
          <table:table-cell office:value-type="float" office:value="11086.571428571429" table:formula="of:=AVERAGE([.I166:.I172])" table:style-name="ce15">
            <text:p>11087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9-25T00:00:00" table:style-name="ce14">
            <text:p>25-09-2023</text:p>
          </table:table-cell>
          <table:table-cell office:value-type="string" office:string-value="September" table:formula="of:=TEXT([.A167]; &quot;mmmm&quot;)" table:style-name="ce14">
            <text:p>September</text:p>
          </table:table-cell>
          <table:table-cell office:value-type="string" office:string-value="2023-09" table:formula="of:=TEXT([.A167]; &quot;yyyy-mm&quot;)" table:style-name="ce14">
            <text:p>2023-09</text:p>
          </table:table-cell>
          <table:table-cell office:value-type="float" office:value="100" table:style-name="ce9">
            <text:p>100</text:p>
          </table:table-cell>
          <table:table-cell office:value-type="float" office:value="255" table:style-name="ce9">
            <text:p>255</text:p>
          </table:table-cell>
          <table:table-cell office:value-type="float" office:value="236" table:style-name="ce9">
            <text:p>236</text:p>
          </table:table-cell>
          <table:table-cell office:value-type="float" office:value="10842" table:style-name="ce9">
            <text:p>10842</text:p>
          </table:table-cell>
          <table:table-cell office:value-type="float" office:value="284" table:style-name="ce9">
            <text:p>284</text:p>
          </table:table-cell>
          <table:table-cell office:value-type="float" office:value="11097" table:formula="of:=SUM([.G167]+[.E167])" table:style-name="ce15">
            <text:p>11097</text:p>
          </table:table-cell>
          <table:table-cell office:value-type="float" office:value="-48" table:formula="of:=[.F167]-[.H167]" table:style-name="ce15">
            <text:p>-48</text:p>
          </table:table-cell>
          <table:table-cell office:value-type="percentage" office:value="1.5770027935478059E-2" table:formula="of:=([.I168]-[.I167])/[.I167]" table:style-name="ce16">
            <text:p>2%</text:p>
          </table:table-cell>
          <table:table-cell office:value-type="string" office:string-value="Valid" table:formula="of:=IF([.F167]&lt;=[.E167]; &quot;Valid&quot;; &quot;Invalid&quot;)" table:style-name="ce17">
            <text:p>Valid</text:p>
          </table:table-cell>
          <table:table-cell office:value-type="string" office:string-value="Valid" table:formula="of:=IF([.H167]&lt;=[.G167]; &quot;Valid&quot;; &quot;Invalid&quot;)" table:style-name="ce17">
            <text:p>Valid</text:p>
          </table:table-cell>
          <table:table-cell office:value-type="string" office:string-value="Stable/Reducing" table:formula="of:=IF([.J167]&gt;0; &quot;Increasing Pressure&quot;; &quot;Stable/Reducing&quot;)" table:style-name="ce18">
            <text:p>Stable/Reducing</text:p>
          </table:table-cell>
          <table:table-cell office:value-type="float" office:value="1.2033898305084745" table:formula="of:=IFERROR([.H167]/[.F167]; 0)" table:style-name="ce17">
            <text:p>1.203389831</text:p>
          </table:table-cell>
          <table:table-cell office:value-type="float" office:value="11060.571428571429" table:formula="of:=AVERAGE([.I167:.I173])" table:style-name="ce15">
            <text:p>11061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9-26T00:00:00" table:style-name="ce14">
            <text:p>26-09-2023</text:p>
          </table:table-cell>
          <table:table-cell office:value-type="string" office:string-value="September" table:formula="of:=TEXT([.A168]; &quot;mmmm&quot;)" table:style-name="ce14">
            <text:p>September</text:p>
          </table:table-cell>
          <table:table-cell office:value-type="string" office:string-value="2023-09" table:formula="of:=TEXT([.A168]; &quot;yyyy-mm&quot;)" table:style-name="ce14">
            <text:p>2023-09</text:p>
          </table:table-cell>
          <table:table-cell office:value-type="float" office:value="205" table:style-name="ce9">
            <text:p>205</text:p>
          </table:table-cell>
          <table:table-cell office:value-type="float" office:value="294" table:style-name="ce9">
            <text:p>294</text:p>
          </table:table-cell>
          <table:table-cell office:value-type="float" office:value="177" table:style-name="ce9">
            <text:p>177</text:p>
          </table:table-cell>
          <table:table-cell office:value-type="float" office:value="10978" table:style-name="ce9">
            <text:p>10978</text:p>
          </table:table-cell>
          <table:table-cell office:value-type="float" office:value="332" table:style-name="ce9">
            <text:p>332</text:p>
          </table:table-cell>
          <table:table-cell office:value-type="float" office:value="11272" table:formula="of:=SUM([.G168]+[.E168])" table:style-name="ce15">
            <text:p>11272</text:p>
          </table:table-cell>
          <table:table-cell office:value-type="float" office:value="-155" table:formula="of:=[.F168]-[.H168]" table:style-name="ce15">
            <text:p>-155</text:p>
          </table:table-cell>
          <table:table-cell office:value-type="percentage" office:value="4.3470546486870125E-3" table:formula="of:=([.I169]-[.I168])/[.I168]" table:style-name="ce16">
            <text:p>0%</text:p>
          </table:table-cell>
          <table:table-cell office:value-type="string" office:string-value="Valid" table:formula="of:=IF([.F168]&lt;=[.E168]; &quot;Valid&quot;; &quot;Invalid&quot;)" table:style-name="ce17">
            <text:p>Valid</text:p>
          </table:table-cell>
          <table:table-cell office:value-type="string" office:string-value="Valid" table:formula="of:=IF([.H168]&lt;=[.G168]; &quot;Valid&quot;; &quot;Invalid&quot;)" table:style-name="ce17">
            <text:p>Valid</text:p>
          </table:table-cell>
          <table:table-cell office:value-type="string" office:string-value="Stable/Reducing" table:formula="of:=IF([.J168]&gt;0; &quot;Increasing Pressure&quot;; &quot;Stable/Reducing&quot;)" table:style-name="ce18">
            <text:p>Stable/Reducing</text:p>
          </table:table-cell>
          <table:table-cell office:value-type="float" office:value="1.8757062146892656" table:formula="of:=IFERROR([.H168]/[.F168]; 0)" table:style-name="ce17">
            <text:p>1.875706215</text:p>
          </table:table-cell>
          <table:table-cell office:value-type="float" office:value="11050.857142857143" table:formula="of:=AVERAGE([.I168:.I174])" table:style-name="ce15">
            <text:p>11051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9-27T00:00:00" table:style-name="ce14">
            <text:p>27-09-2023</text:p>
          </table:table-cell>
          <table:table-cell office:value-type="string" office:string-value="September" table:formula="of:=TEXT([.A169]; &quot;mmmm&quot;)" table:style-name="ce14">
            <text:p>September</text:p>
          </table:table-cell>
          <table:table-cell office:value-type="string" office:string-value="2023-09" table:formula="of:=TEXT([.A169]; &quot;yyyy-mm&quot;)" table:style-name="ce14">
            <text:p>2023-09</text:p>
          </table:table-cell>
          <table:table-cell office:value-type="float" office:value="161" table:style-name="ce9">
            <text:p>161</text:p>
          </table:table-cell>
          <table:table-cell office:value-type="float" office:value="304" table:style-name="ce9">
            <text:p>304</text:p>
          </table:table-cell>
          <table:table-cell office:value-type="float" office:value="211" table:style-name="ce9">
            <text:p>211</text:p>
          </table:table-cell>
          <table:table-cell office:value-type="float" office:value="11017" table:style-name="ce9">
            <text:p>11017</text:p>
          </table:table-cell>
          <table:table-cell office:value-type="float" office:value="331" table:style-name="ce9">
            <text:p>331</text:p>
          </table:table-cell>
          <table:table-cell office:value-type="float" office:value="11321" table:formula="of:=SUM([.G169]+[.E169])" table:style-name="ce15">
            <text:p>11321</text:p>
          </table:table-cell>
          <table:table-cell office:value-type="float" office:value="-120" table:formula="of:=[.F169]-[.H169]" table:style-name="ce15">
            <text:p>-120</text:p>
          </table:table-cell>
          <table:table-cell office:value-type="percentage" office:value="-1.545799841003445E-2" table:formula="of:=([.I170]-[.I169])/[.I169]" table:style-name="ce16">
            <text:p>-2%</text:p>
          </table:table-cell>
          <table:table-cell office:value-type="string" office:string-value="Valid" table:formula="of:=IF([.F169]&lt;=[.E169]; &quot;Valid&quot;; &quot;Invalid&quot;)" table:style-name="ce17">
            <text:p>Valid</text:p>
          </table:table-cell>
          <table:table-cell office:value-type="string" office:string-value="Valid" table:formula="of:=IF([.H169]&lt;=[.G169]; &quot;Valid&quot;; &quot;Invalid&quot;)" table:style-name="ce17">
            <text:p>Valid</text:p>
          </table:table-cell>
          <table:table-cell office:value-type="string" office:string-value="Stable/Reducing" table:formula="of:=IF([.J169]&gt;0; &quot;Increasing Pressure&quot;; &quot;Stable/Reducing&quot;)" table:style-name="ce18">
            <text:p>Stable/Reducing</text:p>
          </table:table-cell>
          <table:table-cell office:value-type="float" office:value="1.5687203791469195" table:formula="of:=IFERROR([.H169]/[.F169]; 0)" table:style-name="ce17">
            <text:p>1.568720379</text:p>
          </table:table-cell>
          <table:table-cell office:value-type="float" office:value="11040.571428571429" table:formula="of:=AVERAGE([.I169:.I175])" table:style-name="ce15">
            <text:p>11041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09-28T00:00:00" table:style-name="ce14">
            <text:p>28-09-2023</text:p>
          </table:table-cell>
          <table:table-cell office:value-type="string" office:string-value="September" table:formula="of:=TEXT([.A170]; &quot;mmmm&quot;)" table:style-name="ce14">
            <text:p>September</text:p>
          </table:table-cell>
          <table:table-cell office:value-type="string" office:string-value="2023-09" table:formula="of:=TEXT([.A170]; &quot;yyyy-mm&quot;)" table:style-name="ce14">
            <text:p>2023-09</text:p>
          </table:table-cell>
          <table:table-cell office:value-type="float" office:value="57" table:style-name="ce9">
            <text:p>57</text:p>
          </table:table-cell>
          <table:table-cell office:value-type="float" office:value="162" table:style-name="ce9">
            <text:p>162</text:p>
          </table:table-cell>
          <table:table-cell office:value-type="float" office:value="193" table:style-name="ce9">
            <text:p>193</text:p>
          </table:table-cell>
          <table:table-cell office:value-type="float" office:value="10984" table:style-name="ce9">
            <text:p>10984</text:p>
          </table:table-cell>
          <table:table-cell office:value-type="float" office:value="447" table:style-name="ce9">
            <text:p>447</text:p>
          </table:table-cell>
          <table:table-cell office:value-type="float" office:value="11146" table:formula="of:=SUM([.G170]+[.E170])" table:style-name="ce15">
            <text:p>11146</text:p>
          </table:table-cell>
          <table:table-cell office:value-type="float" office:value="-254" table:formula="of:=[.F170]-[.H170]" table:style-name="ce15">
            <text:p>-254</text:p>
          </table:table-cell>
          <table:table-cell office:value-type="percentage" office:value="-3.8219989233805853E-2" table:formula="of:=([.I171]-[.I170])/[.I170]" table:style-name="ce16">
            <text:p>-4%</text:p>
          </table:table-cell>
          <table:table-cell office:value-type="string" office:string-value="Invalid" table:formula="of:=IF([.F170]&lt;=[.E170]; &quot;Valid&quot;; &quot;Invalid&quot;)" table:style-name="ce17">
            <text:p>Invalid</text:p>
          </table:table-cell>
          <table:table-cell office:value-type="string" office:string-value="Valid" table:formula="of:=IF([.H170]&lt;=[.G170]; &quot;Valid&quot;; &quot;Invalid&quot;)" table:style-name="ce17">
            <text:p>Valid</text:p>
          </table:table-cell>
          <table:table-cell office:value-type="string" office:string-value="Stable/Reducing" table:formula="of:=IF([.J170]&gt;0; &quot;Increasing Pressure&quot;; &quot;Stable/Reducing&quot;)" table:style-name="ce18">
            <text:p>Stable/Reducing</text:p>
          </table:table-cell>
          <table:table-cell office:value-type="float" office:value="2.3160621761658029" table:formula="of:=IFERROR([.H170]/[.F170]; 0)" table:style-name="ce17">
            <text:p>2.316062176</text:p>
          </table:table-cell>
          <table:table-cell office:value-type="float" office:value="10978.714285714286" table:formula="of:=AVERAGE([.I170:.I176])" table:style-name="ce15">
            <text:p>10979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10-01T00:00:00" table:style-name="ce14">
            <text:p>01-10-2023</text:p>
          </table:table-cell>
          <table:table-cell office:value-type="string" office:string-value="October" table:formula="of:=TEXT([.A171]; &quot;mmmm&quot;)" table:style-name="ce14">
            <text:p>October</text:p>
          </table:table-cell>
          <table:table-cell office:value-type="string" office:string-value="2023-10" table:formula="of:=TEXT([.A171]; &quot;yyyy-mm&quot;)" table:style-name="ce14">
            <text:p>2023-10</text:p>
          </table:table-cell>
          <table:table-cell office:value-type="float" office:value="80" table:style-name="ce9">
            <text:p>80</text:p>
          </table:table-cell>
          <table:table-cell office:value-type="float" office:value="122" table:style-name="ce9">
            <text:p>122</text:p>
          </table:table-cell>
          <table:table-cell office:value-type="float" office:value="152" table:style-name="ce9">
            <text:p>152</text:p>
          </table:table-cell>
          <table:table-cell office:value-type="float" office:value="10598" table:style-name="ce9">
            <text:p>10598</text:p>
          </table:table-cell>
          <table:table-cell office:value-type="float" office:value="493" table:style-name="ce9">
            <text:p>493</text:p>
          </table:table-cell>
          <table:table-cell office:value-type="float" office:value="10720" table:formula="of:=SUM([.G171]+[.E171])" table:style-name="ce15">
            <text:p>10720</text:p>
          </table:table-cell>
          <table:table-cell office:value-type="float" office:value="-341" table:formula="of:=[.F171]-[.H171]" table:style-name="ce15">
            <text:p>-341</text:p>
          </table:table-cell>
          <table:table-cell office:value-type="percentage" office:value="1.6231343283582091E-2" table:formula="of:=([.I172]-[.I171])/[.I171]" table:style-name="ce16">
            <text:p>2%</text:p>
          </table:table-cell>
          <table:table-cell office:value-type="string" office:string-value="Invalid" table:formula="of:=IF([.F171]&lt;=[.E171]; &quot;Valid&quot;; &quot;Invalid&quot;)" table:style-name="ce17">
            <text:p>Invalid</text:p>
          </table:table-cell>
          <table:table-cell office:value-type="string" office:string-value="Valid" table:formula="of:=IF([.H171]&lt;=[.G171]; &quot;Valid&quot;; &quot;Invalid&quot;)" table:style-name="ce17">
            <text:p>Valid</text:p>
          </table:table-cell>
          <table:table-cell office:value-type="string" office:string-value="Stable/Reducing" table:formula="of:=IF([.J171]&gt;0; &quot;Increasing Pressure&quot;; &quot;Stable/Reducing&quot;)" table:style-name="ce18">
            <text:p>Stable/Reducing</text:p>
          </table:table-cell>
          <table:table-cell office:value-type="float" office:value="3.2434210526315788" table:formula="of:=IFERROR([.H171]/[.F171]; 0)" table:style-name="ce17">
            <text:p>3.243421053</text:p>
          </table:table-cell>
          <table:table-cell office:value-type="float" office:value="10953.571428571429" table:formula="of:=AVERAGE([.I171:.I177])" table:style-name="ce15">
            <text:p>10954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10-02T00:00:00" table:style-name="ce14">
            <text:p>02-10-2023</text:p>
          </table:table-cell>
          <table:table-cell office:value-type="string" office:string-value="October" table:formula="of:=TEXT([.A172]; &quot;mmmm&quot;)" table:style-name="ce14">
            <text:p>October</text:p>
          </table:table-cell>
          <table:table-cell office:value-type="string" office:string-value="2023-10" table:formula="of:=TEXT([.A172]; &quot;yyyy-mm&quot;)" table:style-name="ce14">
            <text:p>2023-10</text:p>
          </table:table-cell>
          <table:table-cell office:value-type="float" office:value="107" table:style-name="ce9">
            <text:p>107</text:p>
          </table:table-cell>
          <table:table-cell office:value-type="float" office:value="170" table:style-name="ce9">
            <text:p>170</text:p>
          </table:table-cell>
          <table:table-cell office:value-type="float" office:value="133" table:style-name="ce9">
            <text:p>133</text:p>
          </table:table-cell>
          <table:table-cell office:value-type="float" office:value="10724" table:style-name="ce9">
            <text:p>10724</text:p>
          </table:table-cell>
          <table:table-cell office:value-type="float" office:value="284" table:style-name="ce9">
            <text:p>284</text:p>
          </table:table-cell>
          <table:table-cell office:value-type="float" office:value="10894" table:formula="of:=SUM([.G172]+[.E172])" table:style-name="ce15">
            <text:p>10894</text:p>
          </table:table-cell>
          <table:table-cell office:value-type="float" office:value="-151" table:formula="of:=[.F172]-[.H172]" table:style-name="ce15">
            <text:p>-151</text:p>
          </table:table-cell>
          <table:table-cell office:value-type="percentage" office:value="7.3434918303653387E-3" table:formula="of:=([.I173]-[.I172])/[.I172]" table:style-name="ce16">
            <text:p>1%</text:p>
          </table:table-cell>
          <table:table-cell office:value-type="string" office:string-value="Valid" table:formula="of:=IF([.F172]&lt;=[.E172]; &quot;Valid&quot;; &quot;Invalid&quot;)" table:style-name="ce17">
            <text:p>Valid</text:p>
          </table:table-cell>
          <table:table-cell office:value-type="string" office:string-value="Valid" table:formula="of:=IF([.H172]&lt;=[.G172]; &quot;Valid&quot;; &quot;Invalid&quot;)" table:style-name="ce17">
            <text:p>Valid</text:p>
          </table:table-cell>
          <table:table-cell office:value-type="string" office:string-value="Stable/Reducing" table:formula="of:=IF([.J172]&gt;0; &quot;Increasing Pressure&quot;; &quot;Stable/Reducing&quot;)" table:style-name="ce18">
            <text:p>Stable/Reducing</text:p>
          </table:table-cell>
          <table:table-cell office:value-type="float" office:value="2.1353383458646618" table:formula="of:=IFERROR([.H172]/[.F172]; 0)" table:style-name="ce17">
            <text:p>2.135338346</text:p>
          </table:table-cell>
          <table:table-cell office:value-type="float" office:value="10999.714285714286" table:formula="of:=AVERAGE([.I172:.I178])" table:style-name="ce15">
            <text:p>11000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10-03T00:00:00" table:style-name="ce14">
            <text:p>03-10-2023</text:p>
          </table:table-cell>
          <table:table-cell office:value-type="string" office:string-value="October" table:formula="of:=TEXT([.A173]; &quot;mmmm&quot;)" table:style-name="ce14">
            <text:p>October</text:p>
          </table:table-cell>
          <table:table-cell office:value-type="string" office:string-value="2023-10" table:formula="of:=TEXT([.A173]; &quot;yyyy-mm&quot;)" table:style-name="ce14">
            <text:p>2023-10</text:p>
          </table:table-cell>
          <table:table-cell office:value-type="float" office:value="99" table:style-name="ce9">
            <text:p>99</text:p>
          </table:table-cell>
          <table:table-cell office:value-type="float" office:value="156" table:style-name="ce9">
            <text:p>156</text:p>
          </table:table-cell>
          <table:table-cell office:value-type="float" office:value="139" table:style-name="ce9">
            <text:p>139</text:p>
          </table:table-cell>
          <table:table-cell office:value-type="float" office:value="10818" table:style-name="ce9">
            <text:p>10818</text:p>
          </table:table-cell>
          <table:table-cell office:value-type="float" office:value="287" table:style-name="ce9">
            <text:p>287</text:p>
          </table:table-cell>
          <table:table-cell office:value-type="float" office:value="10974" table:formula="of:=SUM([.G173]+[.E173])" table:style-name="ce15">
            <text:p>10974</text:p>
          </table:table-cell>
          <table:table-cell office:value-type="float" office:value="-148" table:formula="of:=[.F173]-[.H173]" table:style-name="ce15">
            <text:p>-148</text:p>
          </table:table-cell>
          <table:table-cell office:value-type="percentage" office:value="5.011846181884454E-3" table:formula="of:=([.I174]-[.I173])/[.I173]" table:style-name="ce16">
            <text:p>1%</text:p>
          </table:table-cell>
          <table:table-cell office:value-type="string" office:string-value="Valid" table:formula="of:=IF([.F173]&lt;=[.E173]; &quot;Valid&quot;; &quot;Invalid&quot;)" table:style-name="ce17">
            <text:p>Valid</text:p>
          </table:table-cell>
          <table:table-cell office:value-type="string" office:string-value="Valid" table:formula="of:=IF([.H173]&lt;=[.G173]; &quot;Valid&quot;; &quot;Invalid&quot;)" table:style-name="ce17">
            <text:p>Valid</text:p>
          </table:table-cell>
          <table:table-cell office:value-type="string" office:string-value="Stable/Reducing" table:formula="of:=IF([.J173]&gt;0; &quot;Increasing Pressure&quot;; &quot;Stable/Reducing&quot;)" table:style-name="ce18">
            <text:p>Stable/Reducing</text:p>
          </table:table-cell>
          <table:table-cell office:value-type="float" office:value="2.064748201438849" table:formula="of:=IFERROR([.H173]/[.F173]; 0)" table:style-name="ce17">
            <text:p>2.064748201</text:p>
          </table:table-cell>
          <table:table-cell office:value-type="float" office:value="11025.142857142857" table:formula="of:=AVERAGE([.I173:.I179])" table:style-name="ce15">
            <text:p>11025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10-04T00:00:00" table:style-name="ce14">
            <text:p>04-10-2023</text:p>
          </table:table-cell>
          <table:table-cell office:value-type="string" office:string-value="October" table:formula="of:=TEXT([.A174]; &quot;mmmm&quot;)" table:style-name="ce14">
            <text:p>October</text:p>
          </table:table-cell>
          <table:table-cell office:value-type="string" office:string-value="2023-10" table:formula="of:=TEXT([.A174]; &quot;yyyy-mm&quot;)" table:style-name="ce14">
            <text:p>2023-10</text:p>
          </table:table-cell>
          <table:table-cell office:value-type="float" office:value="25" table:style-name="ce9">
            <text:p>25</text:p>
          </table:table-cell>
          <table:table-cell office:value-type="float" office:value="66" table:style-name="ce9">
            <text:p>66</text:p>
          </table:table-cell>
          <table:table-cell office:value-type="float" office:value="94" table:style-name="ce9">
            <text:p>94</text:p>
          </table:table-cell>
          <table:table-cell office:value-type="float" office:value="10963" table:style-name="ce9">
            <text:p>10963</text:p>
          </table:table-cell>
          <table:table-cell office:value-type="float" office:value="330" table:style-name="ce9">
            <text:p>330</text:p>
          </table:table-cell>
          <table:table-cell office:value-type="float" office:value="11029" table:formula="of:=SUM([.G174]+[.E174])" table:style-name="ce15">
            <text:p>11029</text:p>
          </table:table-cell>
          <table:table-cell office:value-type="float" office:value="-236" table:formula="of:=[.F174]-[.H174]" table:style-name="ce15">
            <text:p>-236</text:p>
          </table:table-cell>
          <table:table-cell office:value-type="percentage" office:value="1.5504578837609938E-2" table:formula="of:=([.I175]-[.I174])/[.I174]" table:style-name="ce16">
            <text:p>2%</text:p>
          </table:table-cell>
          <table:table-cell office:value-type="string" office:string-value="Invalid" table:formula="of:=IF([.F174]&lt;=[.E174]; &quot;Valid&quot;; &quot;Invalid&quot;)" table:style-name="ce17">
            <text:p>Invalid</text:p>
          </table:table-cell>
          <table:table-cell office:value-type="string" office:string-value="Valid" table:formula="of:=IF([.H174]&lt;=[.G174]; &quot;Valid&quot;; &quot;Invalid&quot;)" table:style-name="ce17">
            <text:p>Valid</text:p>
          </table:table-cell>
          <table:table-cell office:value-type="string" office:string-value="Stable/Reducing" table:formula="of:=IF([.J174]&gt;0; &quot;Increasing Pressure&quot;; &quot;Stable/Reducing&quot;)" table:style-name="ce18">
            <text:p>Stable/Reducing</text:p>
          </table:table-cell>
          <table:table-cell office:value-type="float" office:value="3.5106382978723403" table:formula="of:=IFERROR([.H174]/[.F174]; 0)" table:style-name="ce17">
            <text:p>3.510638298</text:p>
          </table:table-cell>
          <table:table-cell office:value-type="float" office:value="10979.285714285714" table:formula="of:=AVERAGE([.I174:.I180])" table:style-name="ce15">
            <text:p>10979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10-05T00:00:00" table:style-name="ce14">
            <text:p>05-10-2023</text:p>
          </table:table-cell>
          <table:table-cell office:value-type="string" office:string-value="October" table:formula="of:=TEXT([.A175]; &quot;mmmm&quot;)" table:style-name="ce14">
            <text:p>October</text:p>
          </table:table-cell>
          <table:table-cell office:value-type="string" office:string-value="2023-10" table:formula="of:=TEXT([.A175]; &quot;yyyy-mm&quot;)" table:style-name="ce14">
            <text:p>2023-10</text:p>
          </table:table-cell>
          <table:table-cell office:value-type="float" office:value="35" table:style-name="ce9">
            <text:p>35</text:p>
          </table:table-cell>
          <table:table-cell office:value-type="float" office:value="70" table:style-name="ce9">
            <text:p>70</text:p>
          </table:table-cell>
          <table:table-cell office:value-type="float" office:value="53" table:style-name="ce9">
            <text:p>53</text:p>
          </table:table-cell>
          <table:table-cell office:value-type="float" office:value="11130" table:style-name="ce9">
            <text:p>11130</text:p>
          </table:table-cell>
          <table:table-cell office:value-type="float" office:value="427" table:style-name="ce9">
            <text:p>427</text:p>
          </table:table-cell>
          <table:table-cell office:value-type="float" office:value="11200" table:formula="of:=SUM([.G175]+[.E175])" table:style-name="ce15">
            <text:p>11200</text:p>
          </table:table-cell>
          <table:table-cell office:value-type="float" office:value="-374" table:formula="of:=[.F175]-[.H175]" table:style-name="ce15">
            <text:p>-374</text:p>
          </table:table-cell>
          <table:table-cell office:value-type="percentage" office:value="-2.7857142857142858E-2" table:formula="of:=([.I176]-[.I175])/[.I175]" table:style-name="ce16">
            <text:p>-3%</text:p>
          </table:table-cell>
          <table:table-cell office:value-type="string" office:string-value="Valid" table:formula="of:=IF([.F175]&lt;=[.E175]; &quot;Valid&quot;; &quot;Invalid&quot;)" table:style-name="ce17">
            <text:p>Valid</text:p>
          </table:table-cell>
          <table:table-cell office:value-type="string" office:string-value="Valid" table:formula="of:=IF([.H175]&lt;=[.G175]; &quot;Valid&quot;; &quot;Invalid&quot;)" table:style-name="ce17">
            <text:p>Valid</text:p>
          </table:table-cell>
          <table:table-cell office:value-type="string" office:string-value="Stable/Reducing" table:formula="of:=IF([.J175]&gt;0; &quot;Increasing Pressure&quot;; &quot;Stable/Reducing&quot;)" table:style-name="ce18">
            <text:p>Stable/Reducing</text:p>
          </table:table-cell>
          <table:table-cell office:value-type="float" office:value="8.0566037735849054" table:formula="of:=IFERROR([.H175]/[.F175]; 0)" table:style-name="ce17">
            <text:p>8.056603774</text:p>
          </table:table-cell>
          <table:table-cell office:value-type="float" office:value="10936.857142857143" table:formula="of:=AVERAGE([.I175:.I181])" table:style-name="ce15">
            <text:p>10937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10-09T00:00:00" table:style-name="ce14">
            <text:p>09-10-2023</text:p>
          </table:table-cell>
          <table:table-cell office:value-type="string" office:string-value="October" table:formula="of:=TEXT([.A176]; &quot;mmmm&quot;)" table:style-name="ce14">
            <text:p>October</text:p>
          </table:table-cell>
          <table:table-cell office:value-type="string" office:string-value="2023-10" table:formula="of:=TEXT([.A176]; &quot;yyyy-mm&quot;)" table:style-name="ce14">
            <text:p>2023-10</text:p>
          </table:table-cell>
          <table:table-cell office:value-type="float" office:value="43" table:style-name="ce9">
            <text:p>43</text:p>
          </table:table-cell>
          <table:table-cell office:value-type="float" office:value="73" table:style-name="ce9">
            <text:p>73</text:p>
          </table:table-cell>
          <table:table-cell office:value-type="float" office:value="64" table:style-name="ce9">
            <text:p>64</text:p>
          </table:table-cell>
          <table:table-cell office:value-type="float" office:value="10815" table:style-name="ce9">
            <text:p>10815</text:p>
          </table:table-cell>
          <table:table-cell office:value-type="float" office:value="282" table:style-name="ce9">
            <text:p>282</text:p>
          </table:table-cell>
          <table:table-cell office:value-type="float" office:value="10888" table:formula="of:=SUM([.G176]+[.E176])" table:style-name="ce15">
            <text:p>10888</text:p>
          </table:table-cell>
          <table:table-cell office:value-type="float" office:value="-218" table:formula="of:=[.F176]-[.H176]" table:style-name="ce15">
            <text:p>-218</text:p>
          </table:table-cell>
          <table:table-cell office:value-type="percentage" office:value="7.5312270389419544E-3" table:formula="of:=([.I177]-[.I176])/[.I176]" table:style-name="ce16">
            <text:p>1%</text:p>
          </table:table-cell>
          <table:table-cell office:value-type="string" office:string-value="Valid" table:formula="of:=IF([.F176]&lt;=[.E176]; &quot;Valid&quot;; &quot;Invalid&quot;)" table:style-name="ce17">
            <text:p>Valid</text:p>
          </table:table-cell>
          <table:table-cell office:value-type="string" office:string-value="Valid" table:formula="of:=IF([.H176]&lt;=[.G176]; &quot;Valid&quot;; &quot;Invalid&quot;)" table:style-name="ce17">
            <text:p>Valid</text:p>
          </table:table-cell>
          <table:table-cell office:value-type="string" office:string-value="Stable/Reducing" table:formula="of:=IF([.J176]&gt;0; &quot;Increasing Pressure&quot;; &quot;Stable/Reducing&quot;)" table:style-name="ce18">
            <text:p>Stable/Reducing</text:p>
          </table:table-cell>
          <table:table-cell office:value-type="float" office:value="4.40625" table:formula="of:=IFERROR([.H176]/[.F176]; 0)" table:style-name="ce17">
            <text:p>4.40625</text:p>
          </table:table-cell>
          <table:table-cell office:value-type="float" office:value="10870.714285714286" table:formula="of:=AVERAGE([.I176:.I182])" table:style-name="ce15">
            <text:p>10871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10-10T00:00:00" table:style-name="ce14">
            <text:p>10-10-2023</text:p>
          </table:table-cell>
          <table:table-cell office:value-type="string" office:string-value="October" table:formula="of:=TEXT([.A177]; &quot;mmmm&quot;)" table:style-name="ce14">
            <text:p>October</text:p>
          </table:table-cell>
          <table:table-cell office:value-type="string" office:string-value="2023-10" table:formula="of:=TEXT([.A177]; &quot;yyyy-mm&quot;)" table:style-name="ce14">
            <text:p>2023-10</text:p>
          </table:table-cell>
          <table:table-cell office:value-type="float" office:value="41" table:style-name="ce9">
            <text:p>41</text:p>
          </table:table-cell>
          <table:table-cell office:value-type="float" office:value="60" table:style-name="ce9">
            <text:p>60</text:p>
          </table:table-cell>
          <table:table-cell office:value-type="float" office:value="71" table:style-name="ce9">
            <text:p>71</text:p>
          </table:table-cell>
          <table:table-cell office:value-type="float" office:value="10910" table:style-name="ce9">
            <text:p>10910</text:p>
          </table:table-cell>
          <table:table-cell office:value-type="float" office:value="257" table:style-name="ce9">
            <text:p>257</text:p>
          </table:table-cell>
          <table:table-cell office:value-type="float" office:value="10970" table:formula="of:=SUM([.G177]+[.E177])" table:style-name="ce15">
            <text:p>10970</text:p>
          </table:table-cell>
          <table:table-cell office:value-type="float" office:value="-186" table:formula="of:=[.F177]-[.H177]" table:style-name="ce15">
            <text:p>-186</text:p>
          </table:table-cell>
          <table:table-cell office:value-type="percentage" office:value="6.6545123062898819E-3" table:formula="of:=([.I178]-[.I177])/[.I177]" table:style-name="ce16">
            <text:p>1%</text:p>
          </table:table-cell>
          <table:table-cell office:value-type="string" office:string-value="Invalid" table:formula="of:=IF([.F177]&lt;=[.E177]; &quot;Valid&quot;; &quot;Invalid&quot;)" table:style-name="ce17">
            <text:p>Invalid</text:p>
          </table:table-cell>
          <table:table-cell office:value-type="string" office:string-value="Valid" table:formula="of:=IF([.H177]&lt;=[.G177]; &quot;Valid&quot;; &quot;Invalid&quot;)" table:style-name="ce17">
            <text:p>Valid</text:p>
          </table:table-cell>
          <table:table-cell office:value-type="string" office:string-value="Stable/Reducing" table:formula="of:=IF([.J177]&gt;0; &quot;Increasing Pressure&quot;; &quot;Stable/Reducing&quot;)" table:style-name="ce18">
            <text:p>Stable/Reducing</text:p>
          </table:table-cell>
          <table:table-cell office:value-type="float" office:value="3.619718309859155" table:formula="of:=IFERROR([.H177]/[.F177]; 0)" table:style-name="ce17">
            <text:p>3.61971831</text:p>
          </table:table-cell>
          <table:table-cell office:value-type="float" office:value="10834.571428571429" table:formula="of:=AVERAGE([.I177:.I183])" table:style-name="ce15">
            <text:p>10835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10-11T00:00:00" table:style-name="ce14">
            <text:p>11-10-2023</text:p>
          </table:table-cell>
          <table:table-cell office:value-type="string" office:string-value="October" table:formula="of:=TEXT([.A178]; &quot;mmmm&quot;)" table:style-name="ce14">
            <text:p>October</text:p>
          </table:table-cell>
          <table:table-cell office:value-type="string" office:string-value="2023-10" table:formula="of:=TEXT([.A178]; &quot;yyyy-mm&quot;)" table:style-name="ce14">
            <text:p>2023-10</text:p>
          </table:table-cell>
          <table:table-cell office:value-type="float" office:value="65" table:style-name="ce9">
            <text:p>65</text:p>
          </table:table-cell>
          <table:table-cell office:value-type="float" office:value="83" table:style-name="ce9">
            <text:p>83</text:p>
          </table:table-cell>
          <table:table-cell office:value-type="float" office:value="65" table:style-name="ce9">
            <text:p>65</text:p>
          </table:table-cell>
          <table:table-cell office:value-type="float" office:value="10960" table:style-name="ce9">
            <text:p>10960</text:p>
          </table:table-cell>
          <table:table-cell office:value-type="float" office:value="266" table:style-name="ce9">
            <text:p>266</text:p>
          </table:table-cell>
          <table:table-cell office:value-type="float" office:value="11043" table:formula="of:=SUM([.G178]+[.E178])" table:style-name="ce15">
            <text:p>11043</text:p>
          </table:table-cell>
          <table:table-cell office:value-type="float" office:value="-201" table:formula="of:=[.F178]-[.H178]" table:style-name="ce15">
            <text:p>-201</text:p>
          </table:table-cell>
          <table:table-cell office:value-type="percentage" office:value="2.6260979806212079E-3" table:formula="of:=([.I179]-[.I178])/[.I178]" table:style-name="ce16">
            <text:p>0%</text:p>
          </table:table-cell>
          <table:table-cell office:value-type="string" office:string-value="Valid" table:formula="of:=IF([.F178]&lt;=[.E178]; &quot;Valid&quot;; &quot;Invalid&quot;)" table:style-name="ce17">
            <text:p>Valid</text:p>
          </table:table-cell>
          <table:table-cell office:value-type="string" office:string-value="Valid" table:formula="of:=IF([.H178]&lt;=[.G178]; &quot;Valid&quot;; &quot;Invalid&quot;)" table:style-name="ce17">
            <text:p>Valid</text:p>
          </table:table-cell>
          <table:table-cell office:value-type="string" office:string-value="Stable/Reducing" table:formula="of:=IF([.J178]&gt;0; &quot;Increasing Pressure&quot;; &quot;Stable/Reducing&quot;)" table:style-name="ce18">
            <text:p>Stable/Reducing</text:p>
          </table:table-cell>
          <table:table-cell office:value-type="float" office:value="4.092307692307692" table:formula="of:=IFERROR([.H178]/[.F178]; 0)" table:style-name="ce17">
            <text:p>4.092307692</text:p>
          </table:table-cell>
          <table:table-cell office:value-type="float" office:value="10764.714285714286" table:formula="of:=AVERAGE([.I178:.I184])" table:style-name="ce15">
            <text:p>10765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10-12T00:00:00" table:style-name="ce14">
            <text:p>12-10-2023</text:p>
          </table:table-cell>
          <table:table-cell office:value-type="string" office:string-value="October" table:formula="of:=TEXT([.A179]; &quot;mmmm&quot;)" table:style-name="ce14">
            <text:p>October</text:p>
          </table:table-cell>
          <table:table-cell office:value-type="string" office:string-value="2023-10" table:formula="of:=TEXT([.A179]; &quot;yyyy-mm&quot;)" table:style-name="ce14">
            <text:p>2023-10</text:p>
          </table:table-cell>
          <table:table-cell office:value-type="float" office:value="38" table:style-name="ce9">
            <text:p>38</text:p>
          </table:table-cell>
          <table:table-cell office:value-type="float" office:value="80" table:style-name="ce9">
            <text:p>80</text:p>
          </table:table-cell>
          <table:table-cell office:value-type="float" office:value="82" table:style-name="ce9">
            <text:p>82</text:p>
          </table:table-cell>
          <table:table-cell office:value-type="float" office:value="10992" table:style-name="ce9">
            <text:p>10992</text:p>
          </table:table-cell>
          <table:table-cell office:value-type="float" office:value="398" table:style-name="ce9">
            <text:p>398</text:p>
          </table:table-cell>
          <table:table-cell office:value-type="float" office:value="11072" table:formula="of:=SUM([.G179]+[.E179])" table:style-name="ce15">
            <text:p>11072</text:p>
          </table:table-cell>
          <table:table-cell office:value-type="float" office:value="-316" table:formula="of:=[.F179]-[.H179]" table:style-name="ce15">
            <text:p>-316</text:p>
          </table:table-cell>
          <table:table-cell office:value-type="percentage" office:value="-3.784320809248555E-2" table:formula="of:=([.I180]-[.I179])/[.I179]" table:style-name="ce16">
            <text:p>-4%</text:p>
          </table:table-cell>
          <table:table-cell office:value-type="string" office:string-value="Invalid" table:formula="of:=IF([.F179]&lt;=[.E179]; &quot;Valid&quot;; &quot;Invalid&quot;)" table:style-name="ce17">
            <text:p>Invalid</text:p>
          </table:table-cell>
          <table:table-cell office:value-type="string" office:string-value="Valid" table:formula="of:=IF([.H179]&lt;=[.G179]; &quot;Valid&quot;; &quot;Invalid&quot;)" table:style-name="ce17">
            <text:p>Valid</text:p>
          </table:table-cell>
          <table:table-cell office:value-type="string" office:string-value="Stable/Reducing" table:formula="of:=IF([.J179]&gt;0; &quot;Increasing Pressure&quot;; &quot;Stable/Reducing&quot;)" table:style-name="ce18">
            <text:p>Stable/Reducing</text:p>
          </table:table-cell>
          <table:table-cell office:value-type="float" office:value="4.8536585365853657" table:formula="of:=IFERROR([.H179]/[.F179]; 0)" table:style-name="ce17">
            <text:p>4.853658537</text:p>
          </table:table-cell>
          <table:table-cell office:value-type="float" office:value="10573.142857142857" table:formula="of:=AVERAGE([.I179:.I185])" table:style-name="ce15">
            <text:p>10573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10-15T00:00:00" table:style-name="ce14">
            <text:p>15-10-2023</text:p>
          </table:table-cell>
          <table:table-cell office:value-type="string" office:string-value="October" table:formula="of:=TEXT([.A180]; &quot;mmmm&quot;)" table:style-name="ce14">
            <text:p>October</text:p>
          </table:table-cell>
          <table:table-cell office:value-type="string" office:string-value="2023-10" table:formula="of:=TEXT([.A180]; &quot;yyyy-mm&quot;)" table:style-name="ce14">
            <text:p>2023-10</text:p>
          </table:table-cell>
          <table:table-cell office:value-type="float" office:value="56" table:style-name="ce9">
            <text:p>56</text:p>
          </table:table-cell>
          <table:table-cell office:value-type="float" office:value="82" table:style-name="ce9">
            <text:p>82</text:p>
          </table:table-cell>
          <table:table-cell office:value-type="float" office:value="68" table:style-name="ce9">
            <text:p>68</text:p>
          </table:table-cell>
          <table:table-cell office:value-type="float" office:value="10571" table:style-name="ce9">
            <text:p>10571</text:p>
          </table:table-cell>
          <table:table-cell office:value-type="float" office:value="434" table:style-name="ce9">
            <text:p>434</text:p>
          </table:table-cell>
          <table:table-cell office:value-type="float" office:value="10653" table:formula="of:=SUM([.G180]+[.E180])" table:style-name="ce15">
            <text:p>10653</text:p>
          </table:table-cell>
          <table:table-cell office:value-type="float" office:value="-366" table:formula="of:=[.F180]-[.H180]" table:style-name="ce15">
            <text:p>-366</text:p>
          </table:table-cell>
          <table:table-cell office:value-type="percentage" office:value="7.4157514315216369E-3" table:formula="of:=([.I181]-[.I180])/[.I180]" table:style-name="ce16">
            <text:p>1%</text:p>
          </table:table-cell>
          <table:table-cell office:value-type="string" office:string-value="Valid" table:formula="of:=IF([.F180]&lt;=[.E180]; &quot;Valid&quot;; &quot;Invalid&quot;)" table:style-name="ce17">
            <text:p>Valid</text:p>
          </table:table-cell>
          <table:table-cell office:value-type="string" office:string-value="Valid" table:formula="of:=IF([.H180]&lt;=[.G180]; &quot;Valid&quot;; &quot;Invalid&quot;)" table:style-name="ce17">
            <text:p>Valid</text:p>
          </table:table-cell>
          <table:table-cell office:value-type="string" office:string-value="Stable/Reducing" table:formula="of:=IF([.J180]&gt;0; &quot;Increasing Pressure&quot;; &quot;Stable/Reducing&quot;)" table:style-name="ce18">
            <text:p>Stable/Reducing</text:p>
          </table:table-cell>
          <table:table-cell office:value-type="float" office:value="6.382352941176471" table:formula="of:=IFERROR([.H180]/[.F180]; 0)" table:style-name="ce17">
            <text:p>6.382352941</text:p>
          </table:table-cell>
          <table:table-cell office:value-type="float" office:value="10361.142857142857" table:formula="of:=AVERAGE([.I180:.I186])" table:style-name="ce15">
            <text:p>10361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10-16T00:00:00" table:style-name="ce14">
            <text:p>16-10-2023</text:p>
          </table:table-cell>
          <table:table-cell office:value-type="string" office:string-value="October" table:formula="of:=TEXT([.A181]; &quot;mmmm&quot;)" table:style-name="ce14">
            <text:p>October</text:p>
          </table:table-cell>
          <table:table-cell office:value-type="string" office:string-value="2023-10" table:formula="of:=TEXT([.A181]; &quot;yyyy-mm&quot;)" table:style-name="ce14">
            <text:p>2023-10</text:p>
          </table:table-cell>
          <table:table-cell office:value-type="float" office:value="74" table:style-name="ce9">
            <text:p>74</text:p>
          </table:table-cell>
          <table:table-cell office:value-type="float" office:value="103" table:style-name="ce9">
            <text:p>103</text:p>
          </table:table-cell>
          <table:table-cell office:value-type="float" office:value="80" table:style-name="ce9">
            <text:p>80</text:p>
          </table:table-cell>
          <table:table-cell office:value-type="float" office:value="10629" table:style-name="ce9">
            <text:p>10629</text:p>
          </table:table-cell>
          <table:table-cell office:value-type="float" office:value="331" table:style-name="ce9">
            <text:p>331</text:p>
          </table:table-cell>
          <table:table-cell office:value-type="float" office:value="10732" table:formula="of:=SUM([.G181]+[.E181])" table:style-name="ce15">
            <text:p>10732</text:p>
          </table:table-cell>
          <table:table-cell office:value-type="float" office:value="-251" table:formula="of:=[.F181]-[.H181]" table:style-name="ce15">
            <text:p>-251</text:p>
          </table:table-cell>
          <table:table-cell office:value-type="percentage" office:value="4.6589638464405515E-4" table:formula="of:=([.I182]-[.I181])/[.I181]" table:style-name="ce16">
            <text:p>0%</text:p>
          </table:table-cell>
          <table:table-cell office:value-type="string" office:string-value="Valid" table:formula="of:=IF([.F181]&lt;=[.E181]; &quot;Valid&quot;; &quot;Invalid&quot;)" table:style-name="ce17">
            <text:p>Valid</text:p>
          </table:table-cell>
          <table:table-cell office:value-type="string" office:string-value="Valid" table:formula="of:=IF([.H181]&lt;=[.G181]; &quot;Valid&quot;; &quot;Invalid&quot;)" table:style-name="ce17">
            <text:p>Valid</text:p>
          </table:table-cell>
          <table:table-cell office:value-type="string" office:string-value="Stable/Reducing" table:formula="of:=IF([.J181]&gt;0; &quot;Increasing Pressure&quot;; &quot;Stable/Reducing&quot;)" table:style-name="ce18">
            <text:p>Stable/Reducing</text:p>
          </table:table-cell>
          <table:table-cell office:value-type="float" office:value="4.1375000000000002" table:formula="of:=IFERROR([.H181]/[.F181]; 0)" table:style-name="ce17">
            <text:p>4.1375</text:p>
          </table:table-cell>
          <table:table-cell office:value-type="float" office:value="10198.428571428571" table:formula="of:=AVERAGE([.I181:.I187])" table:style-name="ce15">
            <text:p>10198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10-17T00:00:00" table:style-name="ce14">
            <text:p>17-10-2023</text:p>
          </table:table-cell>
          <table:table-cell office:value-type="string" office:string-value="October" table:formula="of:=TEXT([.A182]; &quot;mmmm&quot;)" table:style-name="ce14">
            <text:p>October</text:p>
          </table:table-cell>
          <table:table-cell office:value-type="string" office:string-value="2023-10" table:formula="of:=TEXT([.A182]; &quot;yyyy-mm&quot;)" table:style-name="ce14">
            <text:p>2023-10</text:p>
          </table:table-cell>
          <table:table-cell office:value-type="float" office:value="68" table:style-name="ce9">
            <text:p>68</text:p>
          </table:table-cell>
          <table:table-cell office:value-type="float" office:value="107" table:style-name="ce9">
            <text:p>107</text:p>
          </table:table-cell>
          <table:table-cell office:value-type="float" office:value="102" table:style-name="ce9">
            <text:p>102</text:p>
          </table:table-cell>
          <table:table-cell office:value-type="float" office:value="10630" table:style-name="ce9">
            <text:p>10630</text:p>
          </table:table-cell>
          <table:table-cell office:value-type="float" office:value="315" table:style-name="ce9">
            <text:p>315</text:p>
          </table:table-cell>
          <table:table-cell office:value-type="float" office:value="10737" table:formula="of:=SUM([.G182]+[.E182])" table:style-name="ce15">
            <text:p>10737</text:p>
          </table:table-cell>
          <table:table-cell office:value-type="float" office:value="-213" table:formula="of:=[.F182]-[.H182]" table:style-name="ce15">
            <text:p>-213</text:p>
          </table:table-cell>
          <table:table-cell office:value-type="percentage" office:value="-9.4998602961721152E-3" table:formula="of:=([.I183]-[.I182])/[.I182]" table:style-name="ce16">
            <text:p>-1%</text:p>
          </table:table-cell>
          <table:table-cell office:value-type="string" office:string-value="Valid" table:formula="of:=IF([.F182]&lt;=[.E182]; &quot;Valid&quot;; &quot;Invalid&quot;)" table:style-name="ce17">
            <text:p>Valid</text:p>
          </table:table-cell>
          <table:table-cell office:value-type="string" office:string-value="Valid" table:formula="of:=IF([.H182]&lt;=[.G182]; &quot;Valid&quot;; &quot;Invalid&quot;)" table:style-name="ce17">
            <text:p>Valid</text:p>
          </table:table-cell>
          <table:table-cell office:value-type="string" office:string-value="Stable/Reducing" table:formula="of:=IF([.J182]&gt;0; &quot;Increasing Pressure&quot;; &quot;Stable/Reducing&quot;)" table:style-name="ce18">
            <text:p>Stable/Reducing</text:p>
          </table:table-cell>
          <table:table-cell office:value-type="float" office:value="3.0882352941176472" table:formula="of:=IFERROR([.H182]/[.F182]; 0)" table:style-name="ce17">
            <text:p>3.088235294</text:p>
          </table:table-cell>
          <table:table-cell office:value-type="float" office:value="10010.285714285714" table:formula="of:=AVERAGE([.I182:.I188])" table:style-name="ce15">
            <text:p>10010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10-18T00:00:00" table:style-name="ce14">
            <text:p>18-10-2023</text:p>
          </table:table-cell>
          <table:table-cell office:value-type="string" office:string-value="October" table:formula="of:=TEXT([.A183]; &quot;mmmm&quot;)" table:style-name="ce14">
            <text:p>October</text:p>
          </table:table-cell>
          <table:table-cell office:value-type="string" office:string-value="2023-10" table:formula="of:=TEXT([.A183]; &quot;yyyy-mm&quot;)" table:style-name="ce14">
            <text:p>2023-10</text:p>
          </table:table-cell>
          <table:table-cell office:value-type="float" office:value="92" table:style-name="ce9">
            <text:p>92</text:p>
          </table:table-cell>
          <table:table-cell office:value-type="float" office:value="124" table:style-name="ce9">
            <text:p>124</text:p>
          </table:table-cell>
          <table:table-cell office:value-type="float" office:value="93" table:style-name="ce9">
            <text:p>93</text:p>
          </table:table-cell>
          <table:table-cell office:value-type="float" office:value="10511" table:style-name="ce9">
            <text:p>10511</text:p>
          </table:table-cell>
          <table:table-cell office:value-type="float" office:value="393" table:style-name="ce9">
            <text:p>393</text:p>
          </table:table-cell>
          <table:table-cell office:value-type="float" office:value="10635" table:formula="of:=SUM([.G183]+[.E183])" table:style-name="ce15">
            <text:p>10635</text:p>
          </table:table-cell>
          <table:table-cell office:value-type="float" office:value="-300" table:formula="of:=[.F183]-[.H183]" table:style-name="ce15">
            <text:p>-300</text:p>
          </table:table-cell>
          <table:table-cell office:value-type="percentage" office:value="-1.4480488951574989E-2" table:formula="of:=([.I184]-[.I183])/[.I183]" table:style-name="ce16">
            <text:p>-1%</text:p>
          </table:table-cell>
          <table:table-cell office:value-type="string" office:string-value="Valid" table:formula="of:=IF([.F183]&lt;=[.E183]; &quot;Valid&quot;; &quot;Invalid&quot;)" table:style-name="ce17">
            <text:p>Valid</text:p>
          </table:table-cell>
          <table:table-cell office:value-type="string" office:string-value="Valid" table:formula="of:=IF([.H183]&lt;=[.G183]; &quot;Valid&quot;; &quot;Invalid&quot;)" table:style-name="ce17">
            <text:p>Valid</text:p>
          </table:table-cell>
          <table:table-cell office:value-type="string" office:string-value="Stable/Reducing" table:formula="of:=IF([.J183]&gt;0; &quot;Increasing Pressure&quot;; &quot;Stable/Reducing&quot;)" table:style-name="ce18">
            <text:p>Stable/Reducing</text:p>
          </table:table-cell>
          <table:table-cell office:value-type="float" office:value="4.225806451612903" table:formula="of:=IFERROR([.H183]/[.F183]; 0)" table:style-name="ce17">
            <text:p>4.225806452</text:p>
          </table:table-cell>
          <table:table-cell office:value-type="float" office:value="9809.5714285714294" table:formula="of:=AVERAGE([.I183:.I189])" table:style-name="ce15">
            <text:p>9810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10-19T00:00:00" table:style-name="ce14">
            <text:p>19-10-2023</text:p>
          </table:table-cell>
          <table:table-cell office:value-type="string" office:string-value="October" table:formula="of:=TEXT([.A184]; &quot;mmmm&quot;)" table:style-name="ce14">
            <text:p>October</text:p>
          </table:table-cell>
          <table:table-cell office:value-type="string" office:string-value="2023-10" table:formula="of:=TEXT([.A184]; &quot;yyyy-mm&quot;)" table:style-name="ce14">
            <text:p>2023-10</text:p>
          </table:table-cell>
          <table:table-cell office:value-type="float" office:value="113" table:style-name="ce9">
            <text:p>113</text:p>
          </table:table-cell>
          <table:table-cell office:value-type="float" office:value="162" table:style-name="ce9">
            <text:p>162</text:p>
          </table:table-cell>
          <table:table-cell office:value-type="float" office:value="107" table:style-name="ce9">
            <text:p>107</text:p>
          </table:table-cell>
          <table:table-cell office:value-type="float" office:value="10319" table:style-name="ce9">
            <text:p>10319</text:p>
          </table:table-cell>
          <table:table-cell office:value-type="float" office:value="406" table:style-name="ce9">
            <text:p>406</text:p>
          </table:table-cell>
          <table:table-cell office:value-type="float" office:value="10481" table:formula="of:=SUM([.G184]+[.E184])" table:style-name="ce15">
            <text:p>10481</text:p>
          </table:table-cell>
          <table:table-cell office:value-type="float" office:value="-299" table:formula="of:=[.F184]-[.H184]" table:style-name="ce15">
            <text:p>-299</text:p>
          </table:table-cell>
          <table:table-cell office:value-type="percentage" office:value="-7.432496899150845E-2" table:formula="of:=([.I185]-[.I184])/[.I184]" table:style-name="ce16">
            <text:p>-7%</text:p>
          </table:table-cell>
          <table:table-cell office:value-type="string" office:string-value="Valid" table:formula="of:=IF([.F184]&lt;=[.E184]; &quot;Valid&quot;; &quot;Invalid&quot;)" table:style-name="ce17">
            <text:p>Valid</text:p>
          </table:table-cell>
          <table:table-cell office:value-type="string" office:string-value="Valid" table:formula="of:=IF([.H184]&lt;=[.G184]; &quot;Valid&quot;; &quot;Invalid&quot;)" table:style-name="ce17">
            <text:p>Valid</text:p>
          </table:table-cell>
          <table:table-cell office:value-type="string" office:string-value="Stable/Reducing" table:formula="of:=IF([.J184]&gt;0; &quot;Increasing Pressure&quot;; &quot;Stable/Reducing&quot;)" table:style-name="ce18">
            <text:p>Stable/Reducing</text:p>
          </table:table-cell>
          <table:table-cell office:value-type="float" office:value="3.7943925233644862" table:formula="of:=IFERROR([.H184]/[.F184]; 0)" table:style-name="ce17">
            <text:p>3.794392523</text:p>
          </table:table-cell>
          <table:table-cell office:value-type="float" office:value="9576" table:formula="of:=AVERAGE([.I184:.I190])" table:style-name="ce15">
            <text:p>9576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10-22T00:00:00" table:style-name="ce14">
            <text:p>22-10-2023</text:p>
          </table:table-cell>
          <table:table-cell office:value-type="string" office:string-value="October" table:formula="of:=TEXT([.A185]; &quot;mmmm&quot;)" table:style-name="ce14">
            <text:p>October</text:p>
          </table:table-cell>
          <table:table-cell office:value-type="string" office:string-value="2023-10" table:formula="of:=TEXT([.A185]; &quot;yyyy-mm&quot;)" table:style-name="ce14">
            <text:p>2023-10</text:p>
          </table:table-cell>
          <table:table-cell office:value-type="float" office:value="106" table:style-name="ce9">
            <text:p>106</text:p>
          </table:table-cell>
          <table:table-cell office:value-type="float" office:value="196" table:style-name="ce9">
            <text:p>196</text:p>
          </table:table-cell>
          <table:table-cell office:value-type="float" office:value="131" table:style-name="ce9">
            <text:p>131</text:p>
          </table:table-cell>
          <table:table-cell office:value-type="float" office:value="9506" table:style-name="ce9">
            <text:p>9506</text:p>
          </table:table-cell>
          <table:table-cell office:value-type="float" office:value="454" table:style-name="ce9">
            <text:p>454</text:p>
          </table:table-cell>
          <table:table-cell office:value-type="float" office:value="9702" table:formula="of:=SUM([.G185]+[.E185])" table:style-name="ce15">
            <text:p>9702</text:p>
          </table:table-cell>
          <table:table-cell office:value-type="float" office:value="-323" table:formula="of:=[.F185]-[.H185]" table:style-name="ce15">
            <text:p>-323</text:p>
          </table:table-cell>
          <table:table-cell office:value-type="percentage" office:value="-1.1750154607297465E-2" table:formula="of:=([.I186]-[.I185])/[.I185]" table:style-name="ce16">
            <text:p>-1%</text:p>
          </table:table-cell>
          <table:table-cell office:value-type="string" office:string-value="Valid" table:formula="of:=IF([.F185]&lt;=[.E185]; &quot;Valid&quot;; &quot;Invalid&quot;)" table:style-name="ce17">
            <text:p>Valid</text:p>
          </table:table-cell>
          <table:table-cell office:value-type="string" office:string-value="Valid" table:formula="of:=IF([.H185]&lt;=[.G185]; &quot;Valid&quot;; &quot;Invalid&quot;)" table:style-name="ce17">
            <text:p>Valid</text:p>
          </table:table-cell>
          <table:table-cell office:value-type="string" office:string-value="Stable/Reducing" table:formula="of:=IF([.J185]&gt;0; &quot;Increasing Pressure&quot;; &quot;Stable/Reducing&quot;)" table:style-name="ce18">
            <text:p>Stable/Reducing</text:p>
          </table:table-cell>
          <table:table-cell office:value-type="float" office:value="3.4656488549618323" table:formula="of:=IFERROR([.H185]/[.F185]; 0)" table:style-name="ce17">
            <text:p>3.465648855</text:p>
          </table:table-cell>
          <table:table-cell office:value-type="float" office:value="9375.4285714285706" table:formula="of:=AVERAGE([.I185:.I191])" table:style-name="ce15">
            <text:p>9375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10-23T00:00:00" table:style-name="ce14">
            <text:p>23-10-2023</text:p>
          </table:table-cell>
          <table:table-cell office:value-type="string" office:string-value="October" table:formula="of:=TEXT([.A186]; &quot;mmmm&quot;)" table:style-name="ce14">
            <text:p>October</text:p>
          </table:table-cell>
          <table:table-cell office:value-type="string" office:string-value="2023-10" table:formula="of:=TEXT([.A186]; &quot;yyyy-mm&quot;)" table:style-name="ce14">
            <text:p>2023-10</text:p>
          </table:table-cell>
          <table:table-cell office:value-type="float" office:value="86" table:style-name="ce9">
            <text:p>86</text:p>
          </table:table-cell>
          <table:table-cell office:value-type="float" office:value="152" table:style-name="ce9">
            <text:p>152</text:p>
          </table:table-cell>
          <table:table-cell office:value-type="float" office:value="168" table:style-name="ce9">
            <text:p>168</text:p>
          </table:table-cell>
          <table:table-cell office:value-type="float" office:value="9436" table:style-name="ce9">
            <text:p>9436</text:p>
          </table:table-cell>
          <table:table-cell office:value-type="float" office:value="327" table:style-name="ce9">
            <text:p>327</text:p>
          </table:table-cell>
          <table:table-cell office:value-type="float" office:value="9588" table:formula="of:=SUM([.G186]+[.E186])" table:style-name="ce15">
            <text:p>9588</text:p>
          </table:table-cell>
          <table:table-cell office:value-type="float" office:value="-159" table:formula="of:=[.F186]-[.H186]" table:style-name="ce15">
            <text:p>-159</text:p>
          </table:table-cell>
          <table:table-cell office:value-type="percentage" office:value="-7.7179808093450148E-3" table:formula="of:=([.I187]-[.I186])/[.I186]" table:style-name="ce16">
            <text:p>-1%</text:p>
          </table:table-cell>
          <table:table-cell office:value-type="string" office:string-value="Invalid" table:formula="of:=IF([.F186]&lt;=[.E186]; &quot;Valid&quot;; &quot;Invalid&quot;)" table:style-name="ce17">
            <text:p>Invalid</text:p>
          </table:table-cell>
          <table:table-cell office:value-type="string" office:string-value="Valid" table:formula="of:=IF([.H186]&lt;=[.G186]; &quot;Valid&quot;; &quot;Invalid&quot;)" table:style-name="ce17">
            <text:p>Valid</text:p>
          </table:table-cell>
          <table:table-cell office:value-type="string" office:string-value="Stable/Reducing" table:formula="of:=IF([.J186]&gt;0; &quot;Increasing Pressure&quot;; &quot;Stable/Reducing&quot;)" table:style-name="ce18">
            <text:p>Stable/Reducing</text:p>
          </table:table-cell>
          <table:table-cell office:value-type="float" office:value="1.9464285714285714" table:formula="of:=IFERROR([.H186]/[.F186]; 0)" table:style-name="ce17">
            <text:p>1.946428571</text:p>
          </table:table-cell>
          <table:table-cell office:value-type="float" office:value="9293" table:formula="of:=AVERAGE([.I186:.I192])" table:style-name="ce15">
            <text:p>9293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10-24T00:00:00" table:style-name="ce14">
            <text:p>24-10-2023</text:p>
          </table:table-cell>
          <table:table-cell office:value-type="string" office:string-value="October" table:formula="of:=TEXT([.A187]; &quot;mmmm&quot;)" table:style-name="ce14">
            <text:p>October</text:p>
          </table:table-cell>
          <table:table-cell office:value-type="string" office:string-value="2023-10" table:formula="of:=TEXT([.A187]; &quot;yyyy-mm&quot;)" table:style-name="ce14">
            <text:p>2023-10</text:p>
          </table:table-cell>
          <table:table-cell office:value-type="float" office:value="84" table:style-name="ce9">
            <text:p>84</text:p>
          </table:table-cell>
          <table:table-cell office:value-type="float" office:value="118" table:style-name="ce9">
            <text:p>118</text:p>
          </table:table-cell>
          <table:table-cell office:value-type="float" office:value="136" table:style-name="ce9">
            <text:p>136</text:p>
          </table:table-cell>
          <table:table-cell office:value-type="float" office:value="9396" table:style-name="ce9">
            <text:p>9396</text:p>
          </table:table-cell>
          <table:table-cell office:value-type="float" office:value="300" table:style-name="ce9">
            <text:p>300</text:p>
          </table:table-cell>
          <table:table-cell office:value-type="float" office:value="9514" table:formula="of:=SUM([.G187]+[.E187])" table:style-name="ce15">
            <text:p>9514</text:p>
          </table:table-cell>
          <table:table-cell office:value-type="float" office:value="-164" table:formula="of:=[.F187]-[.H187]" table:style-name="ce15">
            <text:p>-164</text:p>
          </table:table-cell>
          <table:table-cell office:value-type="percentage" office:value="-1.0405717889426109E-2" table:formula="of:=([.I188]-[.I187])/[.I187]" table:style-name="ce16">
            <text:p>-1%</text:p>
          </table:table-cell>
          <table:table-cell office:value-type="string" office:string-value="Invalid" table:formula="of:=IF([.F187]&lt;=[.E187]; &quot;Valid&quot;; &quot;Invalid&quot;)" table:style-name="ce17">
            <text:p>Invalid</text:p>
          </table:table-cell>
          <table:table-cell office:value-type="string" office:string-value="Valid" table:formula="of:=IF([.H187]&lt;=[.G187]; &quot;Valid&quot;; &quot;Invalid&quot;)" table:style-name="ce17">
            <text:p>Valid</text:p>
          </table:table-cell>
          <table:table-cell office:value-type="string" office:string-value="Stable/Reducing" table:formula="of:=IF([.J187]&gt;0; &quot;Increasing Pressure&quot;; &quot;Stable/Reducing&quot;)" table:style-name="ce18">
            <text:p>Stable/Reducing</text:p>
          </table:table-cell>
          <table:table-cell office:value-type="float" office:value="2.2058823529411766" table:formula="of:=IFERROR([.H187]/[.F187]; 0)" table:style-name="ce17">
            <text:p>2.205882353</text:p>
          </table:table-cell>
          <table:table-cell office:value-type="float" office:value="9278.2857142857138" table:formula="of:=AVERAGE([.I187:.I193])" table:style-name="ce15">
            <text:p>9278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10-25T00:00:00" table:style-name="ce14">
            <text:p>25-10-2023</text:p>
          </table:table-cell>
          <table:table-cell office:value-type="string" office:string-value="October" table:formula="of:=TEXT([.A188]; &quot;mmmm&quot;)" table:style-name="ce14">
            <text:p>October</text:p>
          </table:table-cell>
          <table:table-cell office:value-type="string" office:string-value="2023-10" table:formula="of:=TEXT([.A188]; &quot;yyyy-mm&quot;)" table:style-name="ce14">
            <text:p>2023-10</text:p>
          </table:table-cell>
          <table:table-cell office:value-type="float" office:value="59" table:style-name="ce9">
            <text:p>59</text:p>
          </table:table-cell>
          <table:table-cell office:value-type="float" office:value="64" table:style-name="ce9">
            <text:p>64</text:p>
          </table:table-cell>
          <table:table-cell office:value-type="float" office:value="117" table:style-name="ce9">
            <text:p>117</text:p>
          </table:table-cell>
          <table:table-cell office:value-type="float" office:value="9351" table:style-name="ce9">
            <text:p>9351</text:p>
          </table:table-cell>
          <table:table-cell office:value-type="float" office:value="293" table:style-name="ce9">
            <text:p>293</text:p>
          </table:table-cell>
          <table:table-cell office:value-type="float" office:value="9415" table:formula="of:=SUM([.G188]+[.E188])" table:style-name="ce15">
            <text:p>9415</text:p>
          </table:table-cell>
          <table:table-cell office:value-type="float" office:value="-176" table:formula="of:=[.F188]-[.H188]" table:style-name="ce15">
            <text:p>-176</text:p>
          </table:table-cell>
          <table:table-cell office:value-type="percentage" office:value="-8.8157195963887418E-3" table:formula="of:=([.I189]-[.I188])/[.I188]" table:style-name="ce16">
            <text:p>-1%</text:p>
          </table:table-cell>
          <table:table-cell office:value-type="string" office:string-value="Invalid" table:formula="of:=IF([.F188]&lt;=[.E188]; &quot;Valid&quot;; &quot;Invalid&quot;)" table:style-name="ce17">
            <text:p>Invalid</text:p>
          </table:table-cell>
          <table:table-cell office:value-type="string" office:string-value="Valid" table:formula="of:=IF([.H188]&lt;=[.G188]; &quot;Valid&quot;; &quot;Invalid&quot;)" table:style-name="ce17">
            <text:p>Valid</text:p>
          </table:table-cell>
          <table:table-cell office:value-type="string" office:string-value="Stable/Reducing" table:formula="of:=IF([.J188]&gt;0; &quot;Increasing Pressure&quot;; &quot;Stable/Reducing&quot;)" table:style-name="ce18">
            <text:p>Stable/Reducing</text:p>
          </table:table-cell>
          <table:table-cell office:value-type="float" office:value="2.5042735042735043" table:formula="of:=IFERROR([.H188]/[.F188]; 0)" table:style-name="ce17">
            <text:p>2.504273504</text:p>
          </table:table-cell>
          <table:table-cell office:value-type="float" office:value="9297.7142857142862" table:formula="of:=AVERAGE([.I188:.I194])" table:style-name="ce15">
            <text:p>9298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10-26T00:00:00" table:style-name="ce14">
            <text:p>26-10-2023</text:p>
          </table:table-cell>
          <table:table-cell office:value-type="string" office:string-value="October" table:formula="of:=TEXT([.A189]; &quot;mmmm&quot;)" table:style-name="ce14">
            <text:p>October</text:p>
          </table:table-cell>
          <table:table-cell office:value-type="string" office:string-value="2023-10" table:formula="of:=TEXT([.A189]; &quot;yyyy-mm&quot;)" table:style-name="ce14">
            <text:p>2023-10</text:p>
          </table:table-cell>
          <table:table-cell office:value-type="float" office:value="62" table:style-name="ce9">
            <text:p>62</text:p>
          </table:table-cell>
          <table:table-cell office:value-type="float" office:value="97" table:style-name="ce9">
            <text:p>97</text:p>
          </table:table-cell>
          <table:table-cell office:value-type="float" office:value="52" table:style-name="ce9">
            <text:p>52</text:p>
          </table:table-cell>
          <table:table-cell office:value-type="float" office:value="9235" table:style-name="ce9">
            <text:p>9235</text:p>
          </table:table-cell>
          <table:table-cell office:value-type="float" office:value="390" table:style-name="ce9">
            <text:p>390</text:p>
          </table:table-cell>
          <table:table-cell office:value-type="float" office:value="9332" table:formula="of:=SUM([.G189]+[.E189])" table:style-name="ce15">
            <text:p>9332</text:p>
          </table:table-cell>
          <table:table-cell office:value-type="float" office:value="-338" table:formula="of:=[.F189]-[.H189]" table:style-name="ce15">
            <text:p>-338</text:p>
          </table:table-cell>
          <table:table-cell office:value-type="percentage" office:value="-3.5576510930132879E-2" table:formula="of:=([.I190]-[.I189])/[.I189]" table:style-name="ce16">
            <text:p>-4%</text:p>
          </table:table-cell>
          <table:table-cell office:value-type="string" office:string-value="Valid" table:formula="of:=IF([.F189]&lt;=[.E189]; &quot;Valid&quot;; &quot;Invalid&quot;)" table:style-name="ce17">
            <text:p>Valid</text:p>
          </table:table-cell>
          <table:table-cell office:value-type="string" office:string-value="Valid" table:formula="of:=IF([.H189]&lt;=[.G189]; &quot;Valid&quot;; &quot;Invalid&quot;)" table:style-name="ce17">
            <text:p>Valid</text:p>
          </table:table-cell>
          <table:table-cell office:value-type="string" office:string-value="Stable/Reducing" table:formula="of:=IF([.J189]&gt;0; &quot;Increasing Pressure&quot;; &quot;Stable/Reducing&quot;)" table:style-name="ce18">
            <text:p>Stable/Reducing</text:p>
          </table:table-cell>
          <table:table-cell office:value-type="float" office:value="7.5" table:formula="of:=IFERROR([.H189]/[.F189]; 0)" table:style-name="ce17">
            <text:p>7.5</text:p>
          </table:table-cell>
          <table:table-cell office:value-type="float" office:value="9310.2857142857138" table:formula="of:=AVERAGE([.I189:.I195])" table:style-name="ce15">
            <text:p>9310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10-29T00:00:00" table:style-name="ce14">
            <text:p>29-10-2023</text:p>
          </table:table-cell>
          <table:table-cell office:value-type="string" office:string-value="October" table:formula="of:=TEXT([.A190]; &quot;mmmm&quot;)" table:style-name="ce14">
            <text:p>October</text:p>
          </table:table-cell>
          <table:table-cell office:value-type="string" office:string-value="2023-10" table:formula="of:=TEXT([.A190]; &quot;yyyy-mm&quot;)" table:style-name="ce14">
            <text:p>2023-10</text:p>
          </table:table-cell>
          <table:table-cell office:value-type="float" office:value="91" table:style-name="ce9">
            <text:p>91</text:p>
          </table:table-cell>
          <table:table-cell office:value-type="float" office:value="75" table:style-name="ce9">
            <text:p>75</text:p>
          </table:table-cell>
          <table:table-cell office:value-type="float" office:value="97" table:style-name="ce9">
            <text:p>97</text:p>
          </table:table-cell>
          <table:table-cell office:value-type="float" office:value="8925" table:style-name="ce9">
            <text:p>8925</text:p>
          </table:table-cell>
          <table:table-cell office:value-type="float" office:value="418" table:style-name="ce9">
            <text:p>418</text:p>
          </table:table-cell>
          <table:table-cell office:value-type="float" office:value="9000" table:formula="of:=SUM([.G190]+[.E190])" table:style-name="ce15">
            <text:p>9000</text:p>
          </table:table-cell>
          <table:table-cell office:value-type="float" office:value="-321" table:formula="of:=[.F190]-[.H190]" table:style-name="ce15">
            <text:p>-321</text:p>
          </table:table-cell>
          <table:table-cell office:value-type="percentage" office:value="8.5555555555555558E-3" table:formula="of:=([.I191]-[.I190])/[.I190]" table:style-name="ce16">
            <text:p>1%</text:p>
          </table:table-cell>
          <table:table-cell office:value-type="string" office:string-value="Invalid" table:formula="of:=IF([.F190]&lt;=[.E190]; &quot;Valid&quot;; &quot;Invalid&quot;)" table:style-name="ce17">
            <text:p>Invalid</text:p>
          </table:table-cell>
          <table:table-cell office:value-type="string" office:string-value="Valid" table:formula="of:=IF([.H190]&lt;=[.G190]; &quot;Valid&quot;; &quot;Invalid&quot;)" table:style-name="ce17">
            <text:p>Valid</text:p>
          </table:table-cell>
          <table:table-cell office:value-type="string" office:string-value="Stable/Reducing" table:formula="of:=IF([.J190]&gt;0; &quot;Increasing Pressure&quot;; &quot;Stable/Reducing&quot;)" table:style-name="ce18">
            <text:p>Stable/Reducing</text:p>
          </table:table-cell>
          <table:table-cell office:value-type="float" office:value="4.3092783505154637" table:formula="of:=IFERROR([.H190]/[.F190]; 0)" table:style-name="ce17">
            <text:p>4.309278351</text:p>
          </table:table-cell>
          <table:table-cell office:value-type="float" office:value="9337" table:formula="of:=AVERAGE([.I190:.I196])" table:style-name="ce15">
            <text:p>9337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10-30T00:00:00" table:style-name="ce14">
            <text:p>30-10-2023</text:p>
          </table:table-cell>
          <table:table-cell office:value-type="string" office:string-value="October" table:formula="of:=TEXT([.A191]; &quot;mmmm&quot;)" table:style-name="ce14">
            <text:p>October</text:p>
          </table:table-cell>
          <table:table-cell office:value-type="string" office:string-value="2023-10" table:formula="of:=TEXT([.A191]; &quot;yyyy-mm&quot;)" table:style-name="ce14">
            <text:p>2023-10</text:p>
          </table:table-cell>
          <table:table-cell office:value-type="float" office:value="29" table:style-name="ce9">
            <text:p>29</text:p>
          </table:table-cell>
          <table:table-cell office:value-type="float" office:value="51" table:style-name="ce9">
            <text:p>51</text:p>
          </table:table-cell>
          <table:table-cell office:value-type="float" office:value="11" table:style-name="ce9">
            <text:p>11</text:p>
          </table:table-cell>
          <table:table-cell office:value-type="float" office:value="9026" table:style-name="ce9">
            <text:p>9026</text:p>
          </table:table-cell>
          <table:table-cell office:value-type="float" office:value="278" table:style-name="ce9">
            <text:p>278</text:p>
          </table:table-cell>
          <table:table-cell office:value-type="float" office:value="9077" table:formula="of:=SUM([.G191]+[.E191])" table:style-name="ce15">
            <text:p>9077</text:p>
          </table:table-cell>
          <table:table-cell office:value-type="float" office:value="-267" table:formula="of:=[.F191]-[.H191]" table:style-name="ce15">
            <text:p>-267</text:p>
          </table:table-cell>
          <table:table-cell office:value-type="percentage" office:value="5.2880907788917042E-3" table:formula="of:=([.I192]-[.I191])/[.I191]" table:style-name="ce16">
            <text:p>1%</text:p>
          </table:table-cell>
          <table:table-cell office:value-type="string" office:string-value="Valid" table:formula="of:=IF([.F191]&lt;=[.E191]; &quot;Valid&quot;; &quot;Invalid&quot;)" table:style-name="ce17">
            <text:p>Valid</text:p>
          </table:table-cell>
          <table:table-cell office:value-type="string" office:string-value="Valid" table:formula="of:=IF([.H191]&lt;=[.G191]; &quot;Valid&quot;; &quot;Invalid&quot;)" table:style-name="ce17">
            <text:p>Valid</text:p>
          </table:table-cell>
          <table:table-cell office:value-type="string" office:string-value="Stable/Reducing" table:formula="of:=IF([.J191]&gt;0; &quot;Increasing Pressure&quot;; &quot;Stable/Reducing&quot;)" table:style-name="ce18">
            <text:p>Stable/Reducing</text:p>
          </table:table-cell>
          <table:table-cell office:value-type="float" office:value="25.272727272727273" table:formula="of:=IFERROR([.H191]/[.F191]; 0)" table:style-name="ce17">
            <text:p>25.27272727</text:p>
          </table:table-cell>
          <table:table-cell office:value-type="float" office:value="9439.1428571428569" table:formula="of:=AVERAGE([.I191:.I197])" table:style-name="ce15">
            <text:p>9439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10-31T00:00:00" table:style-name="ce14">
            <text:p>31-10-2023</text:p>
          </table:table-cell>
          <table:table-cell office:value-type="string" office:string-value="October" table:formula="of:=TEXT([.A192]; &quot;mmmm&quot;)" table:style-name="ce14">
            <text:p>October</text:p>
          </table:table-cell>
          <table:table-cell office:value-type="string" office:string-value="2023-10" table:formula="of:=TEXT([.A192]; &quot;yyyy-mm&quot;)" table:style-name="ce14">
            <text:p>2023-10</text:p>
          </table:table-cell>
          <table:table-cell office:value-type="float" office:value="33" table:style-name="ce9">
            <text:p>33</text:p>
          </table:table-cell>
          <table:table-cell office:value-type="float" office:value="53" table:style-name="ce9">
            <text:p>53</text:p>
          </table:table-cell>
          <table:table-cell office:value-type="float" office:value="34" table:style-name="ce9">
            <text:p>34</text:p>
          </table:table-cell>
          <table:table-cell office:value-type="float" office:value="9072" table:style-name="ce9">
            <text:p>9072</text:p>
          </table:table-cell>
          <table:table-cell office:value-type="float" office:value="295" table:style-name="ce9">
            <text:p>295</text:p>
          </table:table-cell>
          <table:table-cell office:value-type="float" office:value="9125" table:formula="of:=SUM([.G192]+[.E192])" table:style-name="ce15">
            <text:p>9125</text:p>
          </table:table-cell>
          <table:table-cell office:value-type="float" office:value="-261" table:formula="of:=[.F192]-[.H192]" table:style-name="ce15">
            <text:p>-261</text:p>
          </table:table-cell>
          <table:table-cell office:value-type="percentage" office:value="3.9452054794520547E-2" table:formula="of:=([.I193]-[.I192])/[.I192]" table:style-name="ce16">
            <text:p>4%</text:p>
          </table:table-cell>
          <table:table-cell office:value-type="string" office:string-value="Valid" table:formula="of:=IF([.F192]&lt;=[.E192]; &quot;Valid&quot;; &quot;Invalid&quot;)" table:style-name="ce17">
            <text:p>Valid</text:p>
          </table:table-cell>
          <table:table-cell office:value-type="string" office:string-value="Valid" table:formula="of:=IF([.H192]&lt;=[.G192]; &quot;Valid&quot;; &quot;Invalid&quot;)" table:style-name="ce17">
            <text:p>Valid</text:p>
          </table:table-cell>
          <table:table-cell office:value-type="string" office:string-value="Stable/Reducing" table:formula="of:=IF([.J192]&gt;0; &quot;Increasing Pressure&quot;; &quot;Stable/Reducing&quot;)" table:style-name="ce18">
            <text:p>Stable/Reducing</text:p>
          </table:table-cell>
          <table:table-cell office:value-type="float" office:value="8.6764705882352935" table:formula="of:=IFERROR([.H192]/[.F192]; 0)" table:style-name="ce17">
            <text:p>8.676470588</text:p>
          </table:table-cell>
          <table:table-cell office:value-type="float" office:value="9551" table:formula="of:=AVERAGE([.I192:.I198])" table:style-name="ce15">
            <text:p>9551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11-01T00:00:00" table:style-name="ce14">
            <text:p>01-11-2023</text:p>
          </table:table-cell>
          <table:table-cell office:value-type="string" office:string-value="November" table:formula="of:=TEXT([.A193]; &quot;mmmm&quot;)" table:style-name="ce14">
            <text:p>November</text:p>
          </table:table-cell>
          <table:table-cell office:value-type="string" office:string-value="2023-11" table:formula="of:=TEXT([.A193]; &quot;yyyy-mm&quot;)" table:style-name="ce14">
            <text:p>2023-11</text:p>
          </table:table-cell>
          <table:table-cell office:value-type="float" office:value="132" table:style-name="ce9">
            <text:p>132</text:p>
          </table:table-cell>
          <table:table-cell office:value-type="float" office:value="235" table:style-name="ce9">
            <text:p>235</text:p>
          </table:table-cell>
          <table:table-cell office:value-type="float" office:value="197" table:style-name="ce9">
            <text:p>197</text:p>
          </table:table-cell>
          <table:table-cell office:value-type="float" office:value="9250" table:style-name="ce9">
            <text:p>9250</text:p>
          </table:table-cell>
          <table:table-cell office:value-type="float" office:value="279" table:style-name="ce9">
            <text:p>279</text:p>
          </table:table-cell>
          <table:table-cell office:value-type="float" office:value="9485" table:formula="of:=SUM([.G193]+[.E193])" table:style-name="ce15">
            <text:p>9485</text:p>
          </table:table-cell>
          <table:table-cell office:value-type="float" office:value="-82" table:formula="of:=[.F193]-[.H193]" table:style-name="ce15">
            <text:p>-82</text:p>
          </table:table-cell>
          <table:table-cell office:value-type="percentage" office:value="1.739588824459673E-2" table:formula="of:=([.I194]-[.I193])/[.I193]" table:style-name="ce16">
            <text:p>2%</text:p>
          </table:table-cell>
          <table:table-cell office:value-type="string" office:string-value="Valid" table:formula="of:=IF([.F193]&lt;=[.E193]; &quot;Valid&quot;; &quot;Invalid&quot;)" table:style-name="ce17">
            <text:p>Valid</text:p>
          </table:table-cell>
          <table:table-cell office:value-type="string" office:string-value="Valid" table:formula="of:=IF([.H193]&lt;=[.G193]; &quot;Valid&quot;; &quot;Invalid&quot;)" table:style-name="ce17">
            <text:p>Valid</text:p>
          </table:table-cell>
          <table:table-cell office:value-type="string" office:string-value="Stable/Reducing" table:formula="of:=IF([.J193]&gt;0; &quot;Increasing Pressure&quot;; &quot;Stable/Reducing&quot;)" table:style-name="ce18">
            <text:p>Stable/Reducing</text:p>
          </table:table-cell>
          <table:table-cell office:value-type="float" office:value="1.4162436548223349" table:formula="of:=IFERROR([.H193]/[.F193]; 0)" table:style-name="ce17">
            <text:p>1.416243655</text:p>
          </table:table-cell>
          <table:table-cell office:value-type="float" office:value="9624.1428571428569" table:formula="of:=AVERAGE([.I193:.I199])" table:style-name="ce15">
            <text:p>9624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11-02T00:00:00" table:style-name="ce14">
            <text:p>02-11-2023</text:p>
          </table:table-cell>
          <table:table-cell office:value-type="string" office:string-value="November" table:formula="of:=TEXT([.A194]; &quot;mmmm&quot;)" table:style-name="ce14">
            <text:p>November</text:p>
          </table:table-cell>
          <table:table-cell office:value-type="string" office:string-value="2023-11" table:formula="of:=TEXT([.A194]; &quot;yyyy-mm&quot;)" table:style-name="ce14">
            <text:p>2023-11</text:p>
          </table:table-cell>
          <table:table-cell office:value-type="float" office:value="174" table:style-name="ce9">
            <text:p>174</text:p>
          </table:table-cell>
          <table:table-cell office:value-type="float" office:value="208" table:style-name="ce9">
            <text:p>208</text:p>
          </table:table-cell>
          <table:table-cell office:value-type="float" office:value="256" table:style-name="ce9">
            <text:p>256</text:p>
          </table:table-cell>
          <table:table-cell office:value-type="float" office:value="9442" table:style-name="ce9">
            <text:p>9442</text:p>
          </table:table-cell>
          <table:table-cell office:value-type="float" office:value="330" table:style-name="ce9">
            <text:p>330</text:p>
          </table:table-cell>
          <table:table-cell office:value-type="float" office:value="9650" table:formula="of:=SUM([.G194]+[.E194])" table:style-name="ce15">
            <text:p>9650</text:p>
          </table:table-cell>
          <table:table-cell office:value-type="float" office:value="-74" table:formula="of:=[.F194]-[.H194]" table:style-name="ce15">
            <text:p>-74</text:p>
          </table:table-cell>
          <table:table-cell office:value-type="percentage" office:value="-1.5233160621761659E-2" table:formula="of:=([.I195]-[.I194])/[.I194]" table:style-name="ce16">
            <text:p>-2%</text:p>
          </table:table-cell>
          <table:table-cell office:value-type="string" office:string-value="Invalid" table:formula="of:=IF([.F194]&lt;=[.E194]; &quot;Valid&quot;; &quot;Invalid&quot;)" table:style-name="ce17">
            <text:p>Invalid</text:p>
          </table:table-cell>
          <table:table-cell office:value-type="string" office:string-value="Valid" table:formula="of:=IF([.H194]&lt;=[.G194]; &quot;Valid&quot;; &quot;Invalid&quot;)" table:style-name="ce17">
            <text:p>Valid</text:p>
          </table:table-cell>
          <table:table-cell office:value-type="string" office:string-value="Stable/Reducing" table:formula="of:=IF([.J194]&gt;0; &quot;Increasing Pressure&quot;; &quot;Stable/Reducing&quot;)" table:style-name="ce18">
            <text:p>Stable/Reducing</text:p>
          </table:table-cell>
          <table:table-cell office:value-type="float" office:value="1.2890625" table:formula="of:=IFERROR([.H194]/[.F194]; 0)" table:style-name="ce17">
            <text:p>1.2890625</text:p>
          </table:table-cell>
          <table:table-cell office:value-type="float" office:value="9652.4285714285706" table:formula="of:=AVERAGE([.I194:.I200])" table:style-name="ce15">
            <text:p>9652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11-05T00:00:00" table:style-name="ce14">
            <text:p>05-11-2023</text:p>
          </table:table-cell>
          <table:table-cell office:value-type="string" office:string-value="November" table:formula="of:=TEXT([.A195]; &quot;mmmm&quot;)" table:style-name="ce14">
            <text:p>November</text:p>
          </table:table-cell>
          <table:table-cell office:value-type="string" office:string-value="2023-11" table:formula="of:=TEXT([.A195]; &quot;yyyy-mm&quot;)" table:style-name="ce14">
            <text:p>2023-11</text:p>
          </table:table-cell>
          <table:table-cell office:value-type="float" office:value="123" table:style-name="ce9">
            <text:p>123</text:p>
          </table:table-cell>
          <table:table-cell office:value-type="float" office:value="230" table:style-name="ce9">
            <text:p>230</text:p>
          </table:table-cell>
          <table:table-cell office:value-type="float" office:value="167" table:style-name="ce9">
            <text:p>167</text:p>
          </table:table-cell>
          <table:table-cell office:value-type="float" office:value="9273" table:style-name="ce9">
            <text:p>9273</text:p>
          </table:table-cell>
          <table:table-cell office:value-type="float" office:value="370" table:style-name="ce9">
            <text:p>370</text:p>
          </table:table-cell>
          <table:table-cell office:value-type="float" office:value="9503" table:formula="of:=SUM([.G195]+[.E195])" table:style-name="ce15">
            <text:p>9503</text:p>
          </table:table-cell>
          <table:table-cell office:value-type="float" office:value="-203" table:formula="of:=[.F195]-[.H195]" table:style-name="ce15">
            <text:p>-203</text:p>
          </table:table-cell>
          <table:table-cell office:value-type="percentage" office:value="1.6836788382616015E-3" table:formula="of:=([.I196]-[.I195])/[.I195]" table:style-name="ce16">
            <text:p>0%</text:p>
          </table:table-cell>
          <table:table-cell office:value-type="string" office:string-value="Valid" table:formula="of:=IF([.F195]&lt;=[.E195]; &quot;Valid&quot;; &quot;Invalid&quot;)" table:style-name="ce17">
            <text:p>Valid</text:p>
          </table:table-cell>
          <table:table-cell office:value-type="string" office:string-value="Valid" table:formula="of:=IF([.H195]&lt;=[.G195]; &quot;Valid&quot;; &quot;Invalid&quot;)" table:style-name="ce17">
            <text:p>Valid</text:p>
          </table:table-cell>
          <table:table-cell office:value-type="string" office:string-value="Stable/Reducing" table:formula="of:=IF([.J195]&gt;0; &quot;Increasing Pressure&quot;; &quot;Stable/Reducing&quot;)" table:style-name="ce18">
            <text:p>Stable/Reducing</text:p>
          </table:table-cell>
          <table:table-cell office:value-type="float" office:value="2.215568862275449" table:formula="of:=IFERROR([.H195]/[.F195]; 0)" table:style-name="ce17">
            <text:p>2.215568862</text:p>
          </table:table-cell>
          <table:table-cell office:value-type="float" office:value="9680.4285714285706" table:formula="of:=AVERAGE([.I195:.I201])" table:style-name="ce15">
            <text:p>9680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11-06T00:00:00" table:style-name="ce14">
            <text:p>06-11-2023</text:p>
          </table:table-cell>
          <table:table-cell office:value-type="string" office:string-value="November" table:formula="of:=TEXT([.A196]; &quot;mmmm&quot;)" table:style-name="ce14">
            <text:p>November</text:p>
          </table:table-cell>
          <table:table-cell office:value-type="string" office:string-value="2023-11" table:formula="of:=TEXT([.A196]; &quot;yyyy-mm&quot;)" table:style-name="ce14">
            <text:p>2023-11</text:p>
          </table:table-cell>
          <table:table-cell office:value-type="float" office:value="123" table:style-name="ce9">
            <text:p>123</text:p>
          </table:table-cell>
          <table:table-cell office:value-type="float" office:value="233" table:style-name="ce9">
            <text:p>233</text:p>
          </table:table-cell>
          <table:table-cell office:value-type="float" office:value="159" table:style-name="ce9">
            <text:p>159</text:p>
          </table:table-cell>
          <table:table-cell office:value-type="float" office:value="9286" table:style-name="ce9">
            <text:p>9286</text:p>
          </table:table-cell>
          <table:table-cell office:value-type="float" office:value="316" table:style-name="ce9">
            <text:p>316</text:p>
          </table:table-cell>
          <table:table-cell office:value-type="float" office:value="9519" table:formula="of:=SUM([.G196]+[.E196])" table:style-name="ce15">
            <text:p>9519</text:p>
          </table:table-cell>
          <table:table-cell office:value-type="float" office:value="-157" table:formula="of:=[.F196]-[.H196]" table:style-name="ce15">
            <text:p>-157</text:p>
          </table:table-cell>
          <table:table-cell office:value-type="percentage" office:value="2.0590398151066287E-2" table:formula="of:=([.I197]-[.I196])/[.I196]" table:style-name="ce16">
            <text:p>2%</text:p>
          </table:table-cell>
          <table:table-cell office:value-type="string" office:string-value="Valid" table:formula="of:=IF([.F196]&lt;=[.E196]; &quot;Valid&quot;; &quot;Invalid&quot;)" table:style-name="ce17">
            <text:p>Valid</text:p>
          </table:table-cell>
          <table:table-cell office:value-type="string" office:string-value="Valid" table:formula="of:=IF([.H196]&lt;=[.G196]; &quot;Valid&quot;; &quot;Invalid&quot;)" table:style-name="ce17">
            <text:p>Valid</text:p>
          </table:table-cell>
          <table:table-cell office:value-type="string" office:string-value="Stable/Reducing" table:formula="of:=IF([.J196]&gt;0; &quot;Increasing Pressure&quot;; &quot;Stable/Reducing&quot;)" table:style-name="ce18">
            <text:p>Stable/Reducing</text:p>
          </table:table-cell>
          <table:table-cell office:value-type="float" office:value="1.9874213836477987" table:formula="of:=IFERROR([.H196]/[.F196]; 0)" table:style-name="ce17">
            <text:p>1.987421384</text:p>
          </table:table-cell>
          <table:table-cell office:value-type="float" office:value="9739.8571428571431" table:formula="of:=AVERAGE([.I196:.I202])" table:style-name="ce15">
            <text:p>9740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11-07T00:00:00" table:style-name="ce14">
            <text:p>07-11-2023</text:p>
          </table:table-cell>
          <table:table-cell office:value-type="string" office:string-value="November" table:formula="of:=TEXT([.A197]; &quot;mmmm&quot;)" table:style-name="ce14">
            <text:p>November</text:p>
          </table:table-cell>
          <table:table-cell office:value-type="string" office:string-value="2023-11" table:formula="of:=TEXT([.A197]; &quot;yyyy-mm&quot;)" table:style-name="ce14">
            <text:p>2023-11</text:p>
          </table:table-cell>
          <table:table-cell office:value-type="float" office:value="141" table:style-name="ce9">
            <text:p>141</text:p>
          </table:table-cell>
          <table:table-cell office:value-type="float" office:value="232" table:style-name="ce9">
            <text:p>232</text:p>
          </table:table-cell>
          <table:table-cell office:value-type="float" office:value="188" table:style-name="ce9">
            <text:p>188</text:p>
          </table:table-cell>
          <table:table-cell office:value-type="float" office:value="9483" table:style-name="ce9">
            <text:p>9483</text:p>
          </table:table-cell>
          <table:table-cell office:value-type="float" office:value="231" table:style-name="ce9">
            <text:p>231</text:p>
          </table:table-cell>
          <table:table-cell office:value-type="float" office:value="9715" table:formula="of:=SUM([.G197]+[.E197])" table:style-name="ce15">
            <text:p>9715</text:p>
          </table:table-cell>
          <table:table-cell office:value-type="float" office:value="-43" table:formula="of:=[.F197]-[.H197]" table:style-name="ce15">
            <text:p>-43</text:p>
          </table:table-cell>
          <table:table-cell office:value-type="percentage" office:value="1.4925373134328358E-2" table:formula="of:=([.I198]-[.I197])/[.I197]" table:style-name="ce16">
            <text:p>1%</text:p>
          </table:table-cell>
          <table:table-cell office:value-type="string" office:string-value="Valid" table:formula="of:=IF([.F197]&lt;=[.E197]; &quot;Valid&quot;; &quot;Invalid&quot;)" table:style-name="ce17">
            <text:p>Valid</text:p>
          </table:table-cell>
          <table:table-cell office:value-type="string" office:string-value="Valid" table:formula="of:=IF([.H197]&lt;=[.G197]; &quot;Valid&quot;; &quot;Invalid&quot;)" table:style-name="ce17">
            <text:p>Valid</text:p>
          </table:table-cell>
          <table:table-cell office:value-type="string" office:string-value="Stable/Reducing" table:formula="of:=IF([.J197]&gt;0; &quot;Increasing Pressure&quot;; &quot;Stable/Reducing&quot;)" table:style-name="ce18">
            <text:p>Stable/Reducing</text:p>
          </table:table-cell>
          <table:table-cell office:value-type="float" office:value="1.2287234042553192" table:formula="of:=IFERROR([.H197]/[.F197]; 0)" table:style-name="ce17">
            <text:p>1.228723404</text:p>
          </table:table-cell>
          <table:table-cell office:value-type="float" office:value="9799.7142857142862" table:formula="of:=AVERAGE([.I197:.I203])" table:style-name="ce15">
            <text:p>9800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11-08T00:00:00" table:style-name="ce14">
            <text:p>08-11-2023</text:p>
          </table:table-cell>
          <table:table-cell office:value-type="string" office:string-value="November" table:formula="of:=TEXT([.A198]; &quot;mmmm&quot;)" table:style-name="ce14">
            <text:p>November</text:p>
          </table:table-cell>
          <table:table-cell office:value-type="string" office:string-value="2023-11" table:formula="of:=TEXT([.A198]; &quot;yyyy-mm&quot;)" table:style-name="ce14">
            <text:p>2023-11</text:p>
          </table:table-cell>
          <table:table-cell office:value-type="float" office:value="158" table:style-name="ce9">
            <text:p>158</text:p>
          </table:table-cell>
          <table:table-cell office:value-type="float" office:value="226" table:style-name="ce9">
            <text:p>226</text:p>
          </table:table-cell>
          <table:table-cell office:value-type="float" office:value="191" table:style-name="ce9">
            <text:p>191</text:p>
          </table:table-cell>
          <table:table-cell office:value-type="float" office:value="9634" table:style-name="ce9">
            <text:p>9634</text:p>
          </table:table-cell>
          <table:table-cell office:value-type="float" office:value="310" table:style-name="ce9">
            <text:p>310</text:p>
          </table:table-cell>
          <table:table-cell office:value-type="float" office:value="9860" table:formula="of:=SUM([.G198]+[.E198])" table:style-name="ce15">
            <text:p>9860</text:p>
          </table:table-cell>
          <table:table-cell office:value-type="float" office:value="-119" table:formula="of:=[.F198]-[.H198]" table:style-name="ce15">
            <text:p>-119</text:p>
          </table:table-cell>
          <table:table-cell office:value-type="percentage" office:value="-2.2616632860040568E-2" table:formula="of:=([.I199]-[.I198])/[.I198]" table:style-name="ce16">
            <text:p>-2%</text:p>
          </table:table-cell>
          <table:table-cell office:value-type="string" office:string-value="Valid" table:formula="of:=IF([.F198]&lt;=[.E198]; &quot;Valid&quot;; &quot;Invalid&quot;)" table:style-name="ce17">
            <text:p>Valid</text:p>
          </table:table-cell>
          <table:table-cell office:value-type="string" office:string-value="Valid" table:formula="of:=IF([.H198]&lt;=[.G198]; &quot;Valid&quot;; &quot;Invalid&quot;)" table:style-name="ce17">
            <text:p>Valid</text:p>
          </table:table-cell>
          <table:table-cell office:value-type="string" office:string-value="Stable/Reducing" table:formula="of:=IF([.J198]&gt;0; &quot;Increasing Pressure&quot;; &quot;Stable/Reducing&quot;)" table:style-name="ce18">
            <text:p>Stable/Reducing</text:p>
          </table:table-cell>
          <table:table-cell office:value-type="float" office:value="1.6230366492146597" table:formula="of:=IFERROR([.H198]/[.F198]; 0)" table:style-name="ce17">
            <text:p>1.623036649</text:p>
          </table:table-cell>
          <table:table-cell office:value-type="float" office:value="9806.2857142857138" table:formula="of:=AVERAGE([.I198:.I204])" table:style-name="ce15">
            <text:p>9806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11-12T00:00:00" table:style-name="ce14">
            <text:p>12-11-2023</text:p>
          </table:table-cell>
          <table:table-cell office:value-type="string" office:string-value="November" table:formula="of:=TEXT([.A199]; &quot;mmmm&quot;)" table:style-name="ce14">
            <text:p>November</text:p>
          </table:table-cell>
          <table:table-cell office:value-type="string" office:string-value="2023-11" table:formula="of:=TEXT([.A199]; &quot;yyyy-mm&quot;)" table:style-name="ce14">
            <text:p>2023-11</text:p>
          </table:table-cell>
          <table:table-cell office:value-type="float" office:value="96" table:style-name="ce9">
            <text:p>96</text:p>
          </table:table-cell>
          <table:table-cell office:value-type="float" office:value="160" table:style-name="ce9">
            <text:p>160</text:p>
          </table:table-cell>
          <table:table-cell office:value-type="float" office:value="233" table:style-name="ce9">
            <text:p>233</text:p>
          </table:table-cell>
          <table:table-cell office:value-type="float" office:value="9477" table:style-name="ce9">
            <text:p>9477</text:p>
          </table:table-cell>
          <table:table-cell office:value-type="float" office:value="313" table:style-name="ce9">
            <text:p>313</text:p>
          </table:table-cell>
          <table:table-cell office:value-type="float" office:value="9637" table:formula="of:=SUM([.G199]+[.E199])" table:style-name="ce15">
            <text:p>9637</text:p>
          </table:table-cell>
          <table:table-cell office:value-type="float" office:value="-80" table:formula="of:=[.F199]-[.H199]" table:style-name="ce15">
            <text:p>-80</text:p>
          </table:table-cell>
          <table:table-cell office:value-type="percentage" office:value="4.7732696897374704E-3" table:formula="of:=([.I200]-[.I199])/[.I199]" table:style-name="ce16">
            <text:p>0%</text:p>
          </table:table-cell>
          <table:table-cell office:value-type="string" office:string-value="Invalid" table:formula="of:=IF([.F199]&lt;=[.E199]; &quot;Valid&quot;; &quot;Invalid&quot;)" table:style-name="ce17">
            <text:p>Invalid</text:p>
          </table:table-cell>
          <table:table-cell office:value-type="string" office:string-value="Valid" table:formula="of:=IF([.H199]&lt;=[.G199]; &quot;Valid&quot;; &quot;Invalid&quot;)" table:style-name="ce17">
            <text:p>Valid</text:p>
          </table:table-cell>
          <table:table-cell office:value-type="string" office:string-value="Stable/Reducing" table:formula="of:=IF([.J199]&gt;0; &quot;Increasing Pressure&quot;; &quot;Stable/Reducing&quot;)" table:style-name="ce18">
            <text:p>Stable/Reducing</text:p>
          </table:table-cell>
          <table:table-cell office:value-type="float" office:value="1.3433476394849786" table:formula="of:=IFERROR([.H199]/[.F199]; 0)" table:style-name="ce17">
            <text:p>1.343347639</text:p>
          </table:table-cell>
          <table:table-cell office:value-type="float" office:value="9801" table:formula="of:=AVERAGE([.I199:.I205])" table:style-name="ce15">
            <text:p>9801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11-13T00:00:00" table:style-name="ce14">
            <text:p>13-11-2023</text:p>
          </table:table-cell>
          <table:table-cell office:value-type="string" office:string-value="November" table:formula="of:=TEXT([.A200]; &quot;mmmm&quot;)" table:style-name="ce14">
            <text:p>November</text:p>
          </table:table-cell>
          <table:table-cell office:value-type="string" office:string-value="2023-11" table:formula="of:=TEXT([.A200]; &quot;yyyy-mm&quot;)" table:style-name="ce14">
            <text:p>2023-11</text:p>
          </table:table-cell>
          <table:table-cell office:value-type="float" office:value="141" table:style-name="ce9">
            <text:p>141</text:p>
          </table:table-cell>
          <table:table-cell office:value-type="float" office:value="173" table:style-name="ce9">
            <text:p>173</text:p>
          </table:table-cell>
          <table:table-cell office:value-type="float" office:value="129" table:style-name="ce9">
            <text:p>129</text:p>
          </table:table-cell>
          <table:table-cell office:value-type="float" office:value="9510" table:style-name="ce9">
            <text:p>9510</text:p>
          </table:table-cell>
          <table:table-cell office:value-type="float" office:value="287" table:style-name="ce9">
            <text:p>287</text:p>
          </table:table-cell>
          <table:table-cell office:value-type="float" office:value="9683" table:formula="of:=SUM([.G200]+[.E200])" table:style-name="ce15">
            <text:p>9683</text:p>
          </table:table-cell>
          <table:table-cell office:value-type="float" office:value="-158" table:formula="of:=[.F200]-[.H200]" table:style-name="ce15">
            <text:p>-158</text:p>
          </table:table-cell>
          <table:table-cell office:value-type="percentage" office:value="1.6833625942373233E-2" table:formula="of:=([.I201]-[.I200])/[.I200]" table:style-name="ce16">
            <text:p>2%</text:p>
          </table:table-cell>
          <table:table-cell office:value-type="string" office:string-value="Valid" table:formula="of:=IF([.F200]&lt;=[.E200]; &quot;Valid&quot;; &quot;Invalid&quot;)" table:style-name="ce17">
            <text:p>Valid</text:p>
          </table:table-cell>
          <table:table-cell office:value-type="string" office:string-value="Valid" table:formula="of:=IF([.H200]&lt;=[.G200]; &quot;Valid&quot;; &quot;Invalid&quot;)" table:style-name="ce17">
            <text:p>Valid</text:p>
          </table:table-cell>
          <table:table-cell office:value-type="string" office:string-value="Stable/Reducing" table:formula="of:=IF([.J200]&gt;0; &quot;Increasing Pressure&quot;; &quot;Stable/Reducing&quot;)" table:style-name="ce18">
            <text:p>Stable/Reducing</text:p>
          </table:table-cell>
          <table:table-cell office:value-type="float" office:value="2.2248062015503876" table:formula="of:=IFERROR([.H200]/[.F200]; 0)" table:style-name="ce17">
            <text:p>2.224806202</text:p>
          </table:table-cell>
          <table:table-cell office:value-type="float" office:value="9860" table:formula="of:=AVERAGE([.I200:.I206])" table:style-name="ce15">
            <text:p>9860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11-14T00:00:00" table:style-name="ce14">
            <text:p>14-11-2023</text:p>
          </table:table-cell>
          <table:table-cell office:value-type="string" office:string-value="November" table:formula="of:=TEXT([.A201]; &quot;mmmm&quot;)" table:style-name="ce14">
            <text:p>November</text:p>
          </table:table-cell>
          <table:table-cell office:value-type="string" office:string-value="2023-11" table:formula="of:=TEXT([.A201]; &quot;yyyy-mm&quot;)" table:style-name="ce14">
            <text:p>2023-11</text:p>
          </table:table-cell>
          <table:table-cell office:value-type="float" office:value="116" table:style-name="ce9">
            <text:p>116</text:p>
          </table:table-cell>
          <table:table-cell office:value-type="float" office:value="181" table:style-name="ce9">
            <text:p>181</text:p>
          </table:table-cell>
          <table:table-cell office:value-type="float" office:value="182" table:style-name="ce9">
            <text:p>182</text:p>
          </table:table-cell>
          <table:table-cell office:value-type="float" office:value="9665" table:style-name="ce9">
            <text:p>9665</text:p>
          </table:table-cell>
          <table:table-cell office:value-type="float" office:value="247" table:style-name="ce9">
            <text:p>247</text:p>
          </table:table-cell>
          <table:table-cell office:value-type="float" office:value="9846" table:formula="of:=SUM([.G201]+[.E201])" table:style-name="ce15">
            <text:p>9846</text:p>
          </table:table-cell>
          <table:table-cell office:value-type="float" office:value="-65" table:formula="of:=[.F201]-[.H201]" table:style-name="ce15">
            <text:p>-65</text:p>
          </table:table-cell>
          <table:table-cell office:value-type="percentage" office:value="7.4141783465366644E-3" table:formula="of:=([.I202]-[.I201])/[.I201]" table:style-name="ce16">
            <text:p>1%</text:p>
          </table:table-cell>
          <table:table-cell office:value-type="string" office:string-value="Invalid" table:formula="of:=IF([.F201]&lt;=[.E201]; &quot;Valid&quot;; &quot;Invalid&quot;)" table:style-name="ce17">
            <text:p>Invalid</text:p>
          </table:table-cell>
          <table:table-cell office:value-type="string" office:string-value="Valid" table:formula="of:=IF([.H201]&lt;=[.G201]; &quot;Valid&quot;; &quot;Invalid&quot;)" table:style-name="ce17">
            <text:p>Valid</text:p>
          </table:table-cell>
          <table:table-cell office:value-type="string" office:string-value="Stable/Reducing" table:formula="of:=IF([.J201]&gt;0; &quot;Increasing Pressure&quot;; &quot;Stable/Reducing&quot;)" table:style-name="ce18">
            <text:p>Stable/Reducing</text:p>
          </table:table-cell>
          <table:table-cell office:value-type="float" office:value="1.3571428571428572" table:formula="of:=IFERROR([.H201]/[.F201]; 0)" table:style-name="ce17">
            <text:p>1.357142857</text:p>
          </table:table-cell>
          <table:table-cell office:value-type="float" office:value="9914.7142857142862" table:formula="of:=AVERAGE([.I201:.I207])" table:style-name="ce15">
            <text:p>9915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11-15T00:00:00" table:style-name="ce14">
            <text:p>15-11-2023</text:p>
          </table:table-cell>
          <table:table-cell office:value-type="string" office:string-value="November" table:formula="of:=TEXT([.A202]; &quot;mmmm&quot;)" table:style-name="ce14">
            <text:p>November</text:p>
          </table:table-cell>
          <table:table-cell office:value-type="string" office:string-value="2023-11" table:formula="of:=TEXT([.A202]; &quot;yyyy-mm&quot;)" table:style-name="ce14">
            <text:p>2023-11</text:p>
          </table:table-cell>
          <table:table-cell office:value-type="float" office:value="150" table:style-name="ce9">
            <text:p>150</text:p>
          </table:table-cell>
          <table:table-cell office:value-type="float" office:value="157" table:style-name="ce9">
            <text:p>157</text:p>
          </table:table-cell>
          <table:table-cell office:value-type="float" office:value="201" table:style-name="ce9">
            <text:p>201</text:p>
          </table:table-cell>
          <table:table-cell office:value-type="float" office:value="9762" table:style-name="ce9">
            <text:p>9762</text:p>
          </table:table-cell>
          <table:table-cell office:value-type="float" office:value="316" table:style-name="ce9">
            <text:p>316</text:p>
          </table:table-cell>
          <table:table-cell office:value-type="float" office:value="9919" table:formula="of:=SUM([.G202]+[.E202])" table:style-name="ce15">
            <text:p>9919</text:p>
          </table:table-cell>
          <table:table-cell office:value-type="float" office:value="-115" table:formula="of:=[.F202]-[.H202]" table:style-name="ce15">
            <text:p>-115</text:p>
          </table:table-cell>
          <table:table-cell office:value-type="percentage" office:value="1.9155156769835669E-3" table:formula="of:=([.I203]-[.I202])/[.I202]" table:style-name="ce16">
            <text:p>0%</text:p>
          </table:table-cell>
          <table:table-cell office:value-type="string" office:string-value="Invalid" table:formula="of:=IF([.F202]&lt;=[.E202]; &quot;Valid&quot;; &quot;Invalid&quot;)" table:style-name="ce17">
            <text:p>Invalid</text:p>
          </table:table-cell>
          <table:table-cell office:value-type="string" office:string-value="Valid" table:formula="of:=IF([.H202]&lt;=[.G202]; &quot;Valid&quot;; &quot;Invalid&quot;)" table:style-name="ce17">
            <text:p>Valid</text:p>
          </table:table-cell>
          <table:table-cell office:value-type="string" office:string-value="Stable/Reducing" table:formula="of:=IF([.J202]&gt;0; &quot;Increasing Pressure&quot;; &quot;Stable/Reducing&quot;)" table:style-name="ce18">
            <text:p>Stable/Reducing</text:p>
          </table:table-cell>
          <table:table-cell office:value-type="float" office:value="1.572139303482587" table:formula="of:=IFERROR([.H202]/[.F202]; 0)" table:style-name="ce17">
            <text:p>1.572139303</text:p>
          </table:table-cell>
          <table:table-cell office:value-type="float" office:value="9942.5714285714294" table:formula="of:=AVERAGE([.I202:.I208])" table:style-name="ce15">
            <text:p>9943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11-16T00:00:00" table:style-name="ce14">
            <text:p>16-11-2023</text:p>
          </table:table-cell>
          <table:table-cell office:value-type="string" office:string-value="November" table:formula="of:=TEXT([.A203]; &quot;mmmm&quot;)" table:style-name="ce14">
            <text:p>November</text:p>
          </table:table-cell>
          <table:table-cell office:value-type="string" office:string-value="2023-11" table:formula="of:=TEXT([.A203]; &quot;yyyy-mm&quot;)" table:style-name="ce14">
            <text:p>2023-11</text:p>
          </table:table-cell>
          <table:table-cell office:value-type="float" office:value="80" table:style-name="ce9">
            <text:p>80</text:p>
          </table:table-cell>
          <table:table-cell office:value-type="float" office:value="176" table:style-name="ce9">
            <text:p>176</text:p>
          </table:table-cell>
          <table:table-cell office:value-type="float" office:value="125" table:style-name="ce9">
            <text:p>125</text:p>
          </table:table-cell>
          <table:table-cell office:value-type="float" office:value="9762" table:style-name="ce9">
            <text:p>9762</text:p>
          </table:table-cell>
          <table:table-cell office:value-type="float" office:value="374" table:style-name="ce9">
            <text:p>374</text:p>
          </table:table-cell>
          <table:table-cell office:value-type="float" office:value="9938" table:formula="of:=SUM([.G203]+[.E203])" table:style-name="ce15">
            <text:p>9938</text:p>
          </table:table-cell>
          <table:table-cell office:value-type="float" office:value="-249" table:formula="of:=[.F203]-[.H203]" table:style-name="ce15">
            <text:p>-249</text:p>
          </table:table-cell>
          <table:table-cell office:value-type="percentage" office:value="-1.7810424632722883E-2" table:formula="of:=([.I204]-[.I203])/[.I203]" table:style-name="ce16">
            <text:p>-2%</text:p>
          </table:table-cell>
          <table:table-cell office:value-type="string" office:string-value="Valid" table:formula="of:=IF([.F203]&lt;=[.E203]; &quot;Valid&quot;; &quot;Invalid&quot;)" table:style-name="ce17">
            <text:p>Valid</text:p>
          </table:table-cell>
          <table:table-cell office:value-type="string" office:string-value="Valid" table:formula="of:=IF([.H203]&lt;=[.G203]; &quot;Valid&quot;; &quot;Invalid&quot;)" table:style-name="ce17">
            <text:p>Valid</text:p>
          </table:table-cell>
          <table:table-cell office:value-type="string" office:string-value="Stable/Reducing" table:formula="of:=IF([.J203]&gt;0; &quot;Increasing Pressure&quot;; &quot;Stable/Reducing&quot;)" table:style-name="ce18">
            <text:p>Stable/Reducing</text:p>
          </table:table-cell>
          <table:table-cell office:value-type="float" office:value="2.992" table:formula="of:=IFERROR([.H203]/[.F203]; 0)" table:style-name="ce17">
            <text:p>2.992</text:p>
          </table:table-cell>
          <table:table-cell office:value-type="float" office:value="9983.4285714285706" table:formula="of:=AVERAGE([.I203:.I209])" table:style-name="ce15">
            <text:p>9983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11-19T00:00:00" table:style-name="ce14">
            <text:p>19-11-2023</text:p>
          </table:table-cell>
          <table:table-cell office:value-type="string" office:string-value="November" table:formula="of:=TEXT([.A204]; &quot;mmmm&quot;)" table:style-name="ce14">
            <text:p>November</text:p>
          </table:table-cell>
          <table:table-cell office:value-type="string" office:string-value="2023-11" table:formula="of:=TEXT([.A204]; &quot;yyyy-mm&quot;)" table:style-name="ce14">
            <text:p>2023-11</text:p>
          </table:table-cell>
          <table:table-cell office:value-type="float" office:value="116" table:style-name="ce9">
            <text:p>116</text:p>
          </table:table-cell>
          <table:table-cell office:value-type="float" office:value="188" table:style-name="ce9">
            <text:p>188</text:p>
          </table:table-cell>
          <table:table-cell office:value-type="float" office:value="164" table:style-name="ce9">
            <text:p>164</text:p>
          </table:table-cell>
          <table:table-cell office:value-type="float" office:value="9573" table:style-name="ce9">
            <text:p>9573</text:p>
          </table:table-cell>
          <table:table-cell office:value-type="float" office:value="435" table:style-name="ce9">
            <text:p>435</text:p>
          </table:table-cell>
          <table:table-cell office:value-type="float" office:value="9761" table:formula="of:=SUM([.G204]+[.E204])" table:style-name="ce15">
            <text:p>9761</text:p>
          </table:table-cell>
          <table:table-cell office:value-type="float" office:value="-271" table:formula="of:=[.F204]-[.H204]" table:style-name="ce15">
            <text:p>-271</text:p>
          </table:table-cell>
          <table:table-cell office:value-type="percentage" office:value="6.3518082163712738E-3" table:formula="of:=([.I205]-[.I204])/[.I204]" table:style-name="ce16">
            <text:p>1%</text:p>
          </table:table-cell>
          <table:table-cell office:value-type="string" office:string-value="Valid" table:formula="of:=IF([.F204]&lt;=[.E204]; &quot;Valid&quot;; &quot;Invalid&quot;)" table:style-name="ce17">
            <text:p>Valid</text:p>
          </table:table-cell>
          <table:table-cell office:value-type="string" office:string-value="Valid" table:formula="of:=IF([.H204]&lt;=[.G204]; &quot;Valid&quot;; &quot;Invalid&quot;)" table:style-name="ce17">
            <text:p>Valid</text:p>
          </table:table-cell>
          <table:table-cell office:value-type="string" office:string-value="Stable/Reducing" table:formula="of:=IF([.J204]&gt;0; &quot;Increasing Pressure&quot;; &quot;Stable/Reducing&quot;)" table:style-name="ce18">
            <text:p>Stable/Reducing</text:p>
          </table:table-cell>
          <table:table-cell office:value-type="float" office:value="2.6524390243902438" table:formula="of:=IFERROR([.H204]/[.F204]; 0)" table:style-name="ce17">
            <text:p>2.652439024</text:p>
          </table:table-cell>
          <table:table-cell office:value-type="float" office:value="10038.857142857143" table:formula="of:=AVERAGE([.I204:.I210])" table:style-name="ce15">
            <text:p>10039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11-20T00:00:00" table:style-name="ce14">
            <text:p>20-11-2023</text:p>
          </table:table-cell>
          <table:table-cell office:value-type="string" office:string-value="November" table:formula="of:=TEXT([.A205]; &quot;mmmm&quot;)" table:style-name="ce14">
            <text:p>November</text:p>
          </table:table-cell>
          <table:table-cell office:value-type="string" office:string-value="2023-11" table:formula="of:=TEXT([.A205]; &quot;yyyy-mm&quot;)" table:style-name="ce14">
            <text:p>2023-11</text:p>
          </table:table-cell>
          <table:table-cell office:value-type="float" office:value="105" table:style-name="ce9">
            <text:p>105</text:p>
          </table:table-cell>
          <table:table-cell office:value-type="float" office:value="185" table:style-name="ce9">
            <text:p>185</text:p>
          </table:table-cell>
          <table:table-cell office:value-type="float" office:value="158" table:style-name="ce9">
            <text:p>158</text:p>
          </table:table-cell>
          <table:table-cell office:value-type="float" office:value="9638" table:style-name="ce9">
            <text:p>9638</text:p>
          </table:table-cell>
          <table:table-cell office:value-type="float" office:value="298" table:style-name="ce9">
            <text:p>298</text:p>
          </table:table-cell>
          <table:table-cell office:value-type="float" office:value="9823" table:formula="of:=SUM([.G205]+[.E205])" table:style-name="ce15">
            <text:p>9823</text:p>
          </table:table-cell>
          <table:table-cell office:value-type="float" office:value="-140" table:formula="of:=[.F205]-[.H205]" table:style-name="ce15">
            <text:p>-140</text:p>
          </table:table-cell>
          <table:table-cell office:value-type="percentage" office:value="2.3109029827954802E-2" table:formula="of:=([.I206]-[.I205])/[.I205]" table:style-name="ce16">
            <text:p>2%</text:p>
          </table:table-cell>
          <table:table-cell office:value-type="string" office:string-value="Valid" table:formula="of:=IF([.F205]&lt;=[.E205]; &quot;Valid&quot;; &quot;Invalid&quot;)" table:style-name="ce17">
            <text:p>Valid</text:p>
          </table:table-cell>
          <table:table-cell office:value-type="string" office:string-value="Valid" table:formula="of:=IF([.H205]&lt;=[.G205]; &quot;Valid&quot;; &quot;Invalid&quot;)" table:style-name="ce17">
            <text:p>Valid</text:p>
          </table:table-cell>
          <table:table-cell office:value-type="string" office:string-value="Stable/Reducing" table:formula="of:=IF([.J205]&gt;0; &quot;Increasing Pressure&quot;; &quot;Stable/Reducing&quot;)" table:style-name="ce18">
            <text:p>Stable/Reducing</text:p>
          </table:table-cell>
          <table:table-cell office:value-type="float" office:value="1.8860759493670887" table:formula="of:=IFERROR([.H205]/[.F205]; 0)" table:style-name="ce17">
            <text:p>1.886075949</text:p>
          </table:table-cell>
          <table:table-cell office:value-type="float" office:value="10145.142857142857" table:formula="of:=AVERAGE([.I205:.I211])" table:style-name="ce15">
            <text:p>10145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11-21T00:00:00" table:style-name="ce14">
            <text:p>21-11-2023</text:p>
          </table:table-cell>
          <table:table-cell office:value-type="string" office:string-value="November" table:formula="of:=TEXT([.A206]; &quot;mmmm&quot;)" table:style-name="ce14">
            <text:p>November</text:p>
          </table:table-cell>
          <table:table-cell office:value-type="string" office:string-value="2023-11" table:formula="of:=TEXT([.A206]; &quot;yyyy-mm&quot;)" table:style-name="ce14">
            <text:p>2023-11</text:p>
          </table:table-cell>
          <table:table-cell office:value-type="float" office:value="136" table:style-name="ce9">
            <text:p>136</text:p>
          </table:table-cell>
          <table:table-cell office:value-type="float" office:value="246" table:style-name="ce9">
            <text:p>246</text:p>
          </table:table-cell>
          <table:table-cell office:value-type="float" office:value="123" table:style-name="ce9">
            <text:p>123</text:p>
          </table:table-cell>
          <table:table-cell office:value-type="float" office:value="9804" table:style-name="ce9">
            <text:p>9804</text:p>
          </table:table-cell>
          <table:table-cell office:value-type="float" office:value="250" table:style-name="ce9">
            <text:p>250</text:p>
          </table:table-cell>
          <table:table-cell office:value-type="float" office:value="10050" table:formula="of:=SUM([.G206]+[.E206])" table:style-name="ce15">
            <text:p>10050</text:p>
          </table:table-cell>
          <table:table-cell office:value-type="float" office:value="-127" table:formula="of:=[.F206]-[.H206]" table:style-name="ce15">
            <text:p>-127</text:p>
          </table:table-cell>
          <table:table-cell office:value-type="percentage" office:value="1.5920398009950248E-3" table:formula="of:=([.I207]-[.I206])/[.I206]" table:style-name="ce16">
            <text:p>0%</text:p>
          </table:table-cell>
          <table:table-cell office:value-type="string" office:string-value="Valid" table:formula="of:=IF([.F206]&lt;=[.E206]; &quot;Valid&quot;; &quot;Invalid&quot;)" table:style-name="ce17">
            <text:p>Valid</text:p>
          </table:table-cell>
          <table:table-cell office:value-type="string" office:string-value="Valid" table:formula="of:=IF([.H206]&lt;=[.G206]; &quot;Valid&quot;; &quot;Invalid&quot;)" table:style-name="ce17">
            <text:p>Valid</text:p>
          </table:table-cell>
          <table:table-cell office:value-type="string" office:string-value="Stable/Reducing" table:formula="of:=IF([.J206]&gt;0; &quot;Increasing Pressure&quot;; &quot;Stable/Reducing&quot;)" table:style-name="ce18">
            <text:p>Stable/Reducing</text:p>
          </table:table-cell>
          <table:table-cell office:value-type="float" office:value="2.0325203252032522" table:formula="of:=IFERROR([.H206]/[.F206]; 0)" table:style-name="ce17">
            <text:p>2.032520325</text:p>
          </table:table-cell>
          <table:table-cell office:value-type="float" office:value="10264.714285714286" table:formula="of:=AVERAGE([.I206:.I212])" table:style-name="ce15">
            <text:p>10265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11-23T00:00:00" table:style-name="ce14">
            <text:p>23-11-2023</text:p>
          </table:table-cell>
          <table:table-cell office:value-type="string" office:string-value="November" table:formula="of:=TEXT([.A207]; &quot;mmmm&quot;)" table:style-name="ce14">
            <text:p>November</text:p>
          </table:table-cell>
          <table:table-cell office:value-type="string" office:string-value="2023-11" table:formula="of:=TEXT([.A207]; &quot;yyyy-mm&quot;)" table:style-name="ce14">
            <text:p>2023-11</text:p>
          </table:table-cell>
          <table:table-cell office:value-type="float" office:value="128" table:style-name="ce9">
            <text:p>128</text:p>
          </table:table-cell>
          <table:table-cell office:value-type="float" office:value="228" table:style-name="ce9">
            <text:p>228</text:p>
          </table:table-cell>
          <table:table-cell office:value-type="float" office:value="177" table:style-name="ce9">
            <text:p>177</text:p>
          </table:table-cell>
          <table:table-cell office:value-type="float" office:value="9838" table:style-name="ce9">
            <text:p>9838</text:p>
          </table:table-cell>
          <table:table-cell office:value-type="float" office:value="283" table:style-name="ce9">
            <text:p>283</text:p>
          </table:table-cell>
          <table:table-cell office:value-type="float" office:value="10066" table:formula="of:=SUM([.G207]+[.E207])" table:style-name="ce15">
            <text:p>10066</text:p>
          </table:table-cell>
          <table:table-cell office:value-type="float" office:value="-106" table:formula="of:=[.F207]-[.H207]" table:style-name="ce15">
            <text:p>-106</text:p>
          </table:table-cell>
          <table:table-cell office:value-type="percentage" office:value="-2.4836081859725811E-3" table:formula="of:=([.I208]-[.I207])/[.I207]" table:style-name="ce16">
            <text:p>0%</text:p>
          </table:table-cell>
          <table:table-cell office:value-type="string" office:string-value="Valid" table:formula="of:=IF([.F207]&lt;=[.E207]; &quot;Valid&quot;; &quot;Invalid&quot;)" table:style-name="ce17">
            <text:p>Valid</text:p>
          </table:table-cell>
          <table:table-cell office:value-type="string" office:string-value="Valid" table:formula="of:=IF([.H207]&lt;=[.G207]; &quot;Valid&quot;; &quot;Invalid&quot;)" table:style-name="ce17">
            <text:p>Valid</text:p>
          </table:table-cell>
          <table:table-cell office:value-type="string" office:string-value="Stable/Reducing" table:formula="of:=IF([.J207]&gt;0; &quot;Increasing Pressure&quot;; &quot;Stable/Reducing&quot;)" table:style-name="ce18">
            <text:p>Stable/Reducing</text:p>
          </table:table-cell>
          <table:table-cell office:value-type="float" office:value="1.5988700564971752" table:formula="of:=IFERROR([.H207]/[.F207]; 0)" table:style-name="ce17">
            <text:p>1.598870056</text:p>
          </table:table-cell>
          <table:table-cell office:value-type="float" office:value="10373.857142857143" table:formula="of:=AVERAGE([.I207:.I213])" table:style-name="ce15">
            <text:p>10374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11-26T00:00:00" table:style-name="ce14">
            <text:p>26-11-2023</text:p>
          </table:table-cell>
          <table:table-cell office:value-type="string" office:string-value="November" table:formula="of:=TEXT([.A208]; &quot;mmmm&quot;)" table:style-name="ce14">
            <text:p>November</text:p>
          </table:table-cell>
          <table:table-cell office:value-type="string" office:string-value="2023-11" table:formula="of:=TEXT([.A208]; &quot;yyyy-mm&quot;)" table:style-name="ce14">
            <text:p>2023-11</text:p>
          </table:table-cell>
          <table:table-cell office:value-type="float" office:value="90" table:style-name="ce9">
            <text:p>90</text:p>
          </table:table-cell>
          <table:table-cell office:value-type="float" office:value="196" table:style-name="ce9">
            <text:p>196</text:p>
          </table:table-cell>
          <table:table-cell office:value-type="float" office:value="205" table:style-name="ce9">
            <text:p>205</text:p>
          </table:table-cell>
          <table:table-cell office:value-type="float" office:value="9845" table:style-name="ce9">
            <text:p>9845</text:p>
          </table:table-cell>
          <table:table-cell office:value-type="float" office:value="312" table:style-name="ce9">
            <text:p>312</text:p>
          </table:table-cell>
          <table:table-cell office:value-type="float" office:value="10041" table:formula="of:=SUM([.G208]+[.E208])" table:style-name="ce15">
            <text:p>10041</text:p>
          </table:table-cell>
          <table:table-cell office:value-type="float" office:value="-107" table:formula="of:=[.F208]-[.H208]" table:style-name="ce15">
            <text:p>-107</text:p>
          </table:table-cell>
          <table:table-cell office:value-type="percentage" office:value="1.6333034558310925E-2" table:formula="of:=([.I209]-[.I208])/[.I208]" table:style-name="ce16">
            <text:p>2%</text:p>
          </table:table-cell>
          <table:table-cell office:value-type="string" office:string-value="Invalid" table:formula="of:=IF([.F208]&lt;=[.E208]; &quot;Valid&quot;; &quot;Invalid&quot;)" table:style-name="ce17">
            <text:p>Invalid</text:p>
          </table:table-cell>
          <table:table-cell office:value-type="string" office:string-value="Valid" table:formula="of:=IF([.H208]&lt;=[.G208]; &quot;Valid&quot;; &quot;Invalid&quot;)" table:style-name="ce17">
            <text:p>Valid</text:p>
          </table:table-cell>
          <table:table-cell office:value-type="string" office:string-value="Stable/Reducing" table:formula="of:=IF([.J208]&gt;0; &quot;Increasing Pressure&quot;; &quot;Stable/Reducing&quot;)" table:style-name="ce18">
            <text:p>Stable/Reducing</text:p>
          </table:table-cell>
          <table:table-cell office:value-type="float" office:value="1.5219512195121951" table:formula="of:=IFERROR([.H208]/[.F208]; 0)" table:style-name="ce17">
            <text:p>1.52195122</text:p>
          </table:table-cell>
          <table:table-cell office:value-type="float" office:value="10484.857142857143" table:formula="of:=AVERAGE([.I208:.I214])" table:style-name="ce15">
            <text:p>10485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11-27T00:00:00" table:style-name="ce14">
            <text:p>27-11-2023</text:p>
          </table:table-cell>
          <table:table-cell office:value-type="string" office:string-value="November" table:formula="of:=TEXT([.A209]; &quot;mmmm&quot;)" table:style-name="ce14">
            <text:p>November</text:p>
          </table:table-cell>
          <table:table-cell office:value-type="string" office:string-value="2023-11" table:formula="of:=TEXT([.A209]; &quot;yyyy-mm&quot;)" table:style-name="ce14">
            <text:p>2023-11</text:p>
          </table:table-cell>
          <table:table-cell office:value-type="float" office:value="56" table:style-name="ce9">
            <text:p>56</text:p>
          </table:table-cell>
          <table:table-cell office:value-type="float" office:value="82" table:style-name="ce9">
            <text:p>82</text:p>
          </table:table-cell>
          <table:table-cell office:value-type="float" office:value="68" table:style-name="ce9">
            <text:p>68</text:p>
          </table:table-cell>
          <table:table-cell office:value-type="float" office:value="10123" table:style-name="ce9">
            <text:p>10123</text:p>
          </table:table-cell>
          <table:table-cell office:value-type="float" office:value="214" table:style-name="ce9">
            <text:p>214</text:p>
          </table:table-cell>
          <table:table-cell office:value-type="float" office:value="10205" table:formula="of:=SUM([.G209]+[.E209])" table:style-name="ce15">
            <text:p>10205</text:p>
          </table:table-cell>
          <table:table-cell office:value-type="float" office:value="-146" table:formula="of:=[.F209]-[.H209]" table:style-name="ce15">
            <text:p>-146</text:p>
          </table:table-cell>
          <table:table-cell office:value-type="percentage" office:value="1.1856932876041157E-2" table:formula="of:=([.I210]-[.I209])/[.I209]" table:style-name="ce16">
            <text:p>1%</text:p>
          </table:table-cell>
          <table:table-cell office:value-type="string" office:string-value="Valid" table:formula="of:=IF([.F209]&lt;=[.E209]; &quot;Valid&quot;; &quot;Invalid&quot;)" table:style-name="ce17">
            <text:p>Valid</text:p>
          </table:table-cell>
          <table:table-cell office:value-type="string" office:string-value="Valid" table:formula="of:=IF([.H209]&lt;=[.G209]; &quot;Valid&quot;; &quot;Invalid&quot;)" table:style-name="ce17">
            <text:p>Valid</text:p>
          </table:table-cell>
          <table:table-cell office:value-type="string" office:string-value="Stable/Reducing" table:formula="of:=IF([.J209]&gt;0; &quot;Increasing Pressure&quot;; &quot;Stable/Reducing&quot;)" table:style-name="ce18">
            <text:p>Stable/Reducing</text:p>
          </table:table-cell>
          <table:table-cell office:value-type="float" office:value="3.1470588235294117" table:formula="of:=IFERROR([.H209]/[.F209]; 0)" table:style-name="ce17">
            <text:p>3.147058824</text:p>
          </table:table-cell>
          <table:table-cell office:value-type="float" office:value="10620.571428571429" table:formula="of:=AVERAGE([.I209:.I215])" table:style-name="ce15">
            <text:p>10621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11-28T00:00:00" table:style-name="ce14">
            <text:p>28-11-2023</text:p>
          </table:table-cell>
          <table:table-cell office:value-type="string" office:string-value="November" table:formula="of:=TEXT([.A210]; &quot;mmmm&quot;)" table:style-name="ce14">
            <text:p>November</text:p>
          </table:table-cell>
          <table:table-cell office:value-type="string" office:string-value="2023-11" table:formula="of:=TEXT([.A210]; &quot;yyyy-mm&quot;)" table:style-name="ce14">
            <text:p>2023-11</text:p>
          </table:table-cell>
          <table:table-cell office:value-type="float" office:value="74" table:style-name="ce9">
            <text:p>74</text:p>
          </table:table-cell>
          <table:table-cell office:value-type="float" office:value="103" table:style-name="ce9">
            <text:p>103</text:p>
          </table:table-cell>
          <table:table-cell office:value-type="float" office:value="80" table:style-name="ce9">
            <text:p>80</text:p>
          </table:table-cell>
          <table:table-cell office:value-type="float" office:value="10223" table:style-name="ce9">
            <text:p>10223</text:p>
          </table:table-cell>
          <table:table-cell office:value-type="float" office:value="223" table:style-name="ce9">
            <text:p>223</text:p>
          </table:table-cell>
          <table:table-cell office:value-type="float" office:value="10326" table:formula="of:=SUM([.G210]+[.E210])" table:style-name="ce15">
            <text:p>10326</text:p>
          </table:table-cell>
          <table:table-cell office:value-type="float" office:value="-143" table:formula="of:=[.F210]-[.H210]" table:style-name="ce15">
            <text:p>-143</text:p>
          </table:table-cell>
          <table:table-cell office:value-type="percentage" office:value="1.7334882820065855E-2" table:formula="of:=([.I211]-[.I210])/[.I210]" table:style-name="ce16">
            <text:p>2%</text:p>
          </table:table-cell>
          <table:table-cell office:value-type="string" office:string-value="Valid" table:formula="of:=IF([.F210]&lt;=[.E210]; &quot;Valid&quot;; &quot;Invalid&quot;)" table:style-name="ce17">
            <text:p>Valid</text:p>
          </table:table-cell>
          <table:table-cell office:value-type="string" office:string-value="Valid" table:formula="of:=IF([.H210]&lt;=[.G210]; &quot;Valid&quot;; &quot;Invalid&quot;)" table:style-name="ce17">
            <text:p>Valid</text:p>
          </table:table-cell>
          <table:table-cell office:value-type="string" office:string-value="Stable/Reducing" table:formula="of:=IF([.J210]&gt;0; &quot;Increasing Pressure&quot;; &quot;Stable/Reducing&quot;)" table:style-name="ce18">
            <text:p>Stable/Reducing</text:p>
          </table:table-cell>
          <table:table-cell office:value-type="float" office:value="2.7875000000000001" table:formula="of:=IFERROR([.H210]/[.F210]; 0)" table:style-name="ce17">
            <text:p>2.7875</text:p>
          </table:table-cell>
          <table:table-cell office:value-type="float" office:value="10743.428571428571" table:formula="of:=AVERAGE([.I210:.I216])" table:style-name="ce15">
            <text:p>10743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11-29T00:00:00" table:style-name="ce14">
            <text:p>29-11-2023</text:p>
          </table:table-cell>
          <table:table-cell office:value-type="string" office:string-value="November" table:formula="of:=TEXT([.A211]; &quot;mmmm&quot;)" table:style-name="ce14">
            <text:p>November</text:p>
          </table:table-cell>
          <table:table-cell office:value-type="string" office:string-value="2023-11" table:formula="of:=TEXT([.A211]; &quot;yyyy-mm&quot;)" table:style-name="ce14">
            <text:p>2023-11</text:p>
          </table:table-cell>
          <table:table-cell office:value-type="float" office:value="68" table:style-name="ce9">
            <text:p>68</text:p>
          </table:table-cell>
          <table:table-cell office:value-type="float" office:value="107" table:style-name="ce9">
            <text:p>107</text:p>
          </table:table-cell>
          <table:table-cell office:value-type="float" office:value="102" table:style-name="ce9">
            <text:p>102</text:p>
          </table:table-cell>
          <table:table-cell office:value-type="float" office:value="10398" table:style-name="ce9">
            <text:p>10398</text:p>
          </table:table-cell>
          <table:table-cell office:value-type="float" office:value="284" table:style-name="ce9">
            <text:p>284</text:p>
          </table:table-cell>
          <table:table-cell office:value-type="float" office:value="10505" table:formula="of:=SUM([.G211]+[.E211])" table:style-name="ce15">
            <text:p>10505</text:p>
          </table:table-cell>
          <table:table-cell office:value-type="float" office:value="-182" table:formula="of:=[.F211]-[.H211]" table:style-name="ce15">
            <text:p>-182</text:p>
          </table:table-cell>
          <table:table-cell office:value-type="percentage" office:value="1.4754878629224179E-2" table:formula="of:=([.I212]-[.I211])/[.I211]" table:style-name="ce16">
            <text:p>1%</text:p>
          </table:table-cell>
          <table:table-cell office:value-type="string" office:string-value="Valid" table:formula="of:=IF([.F211]&lt;=[.E211]; &quot;Valid&quot;; &quot;Invalid&quot;)" table:style-name="ce17">
            <text:p>Valid</text:p>
          </table:table-cell>
          <table:table-cell office:value-type="string" office:string-value="Valid" table:formula="of:=IF([.H211]&lt;=[.G211]; &quot;Valid&quot;; &quot;Invalid&quot;)" table:style-name="ce17">
            <text:p>Valid</text:p>
          </table:table-cell>
          <table:table-cell office:value-type="string" office:string-value="Stable/Reducing" table:formula="of:=IF([.J211]&gt;0; &quot;Increasing Pressure&quot;; &quot;Stable/Reducing&quot;)" table:style-name="ce18">
            <text:p>Stable/Reducing</text:p>
          </table:table-cell>
          <table:table-cell office:value-type="float" office:value="2.784313725490196" table:formula="of:=IFERROR([.H211]/[.F211]; 0)" table:style-name="ce17">
            <text:p>2.784313725</text:p>
          </table:table-cell>
          <table:table-cell office:value-type="float" office:value="10858.142857142857" table:formula="of:=AVERAGE([.I211:.I217])" table:style-name="ce15">
            <text:p>10858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11-30T00:00:00" table:style-name="ce14">
            <text:p>30-11-2023</text:p>
          </table:table-cell>
          <table:table-cell office:value-type="string" office:string-value="November" table:formula="of:=TEXT([.A212]; &quot;mmmm&quot;)" table:style-name="ce14">
            <text:p>November</text:p>
          </table:table-cell>
          <table:table-cell office:value-type="string" office:string-value="2023-11" table:formula="of:=TEXT([.A212]; &quot;yyyy-mm&quot;)" table:style-name="ce14">
            <text:p>2023-11</text:p>
          </table:table-cell>
          <table:table-cell office:value-type="float" office:value="92" table:style-name="ce9">
            <text:p>92</text:p>
          </table:table-cell>
          <table:table-cell office:value-type="float" office:value="124" table:style-name="ce9">
            <text:p>124</text:p>
          </table:table-cell>
          <table:table-cell office:value-type="float" office:value="93" table:style-name="ce9">
            <text:p>93</text:p>
          </table:table-cell>
          <table:table-cell office:value-type="float" office:value="10536" table:style-name="ce9">
            <text:p>10536</text:p>
          </table:table-cell>
          <table:table-cell office:value-type="float" office:value="320" table:style-name="ce9">
            <text:p>320</text:p>
          </table:table-cell>
          <table:table-cell office:value-type="float" office:value="10660" table:formula="of:=SUM([.G212]+[.E212])" table:style-name="ce15">
            <text:p>10660</text:p>
          </table:table-cell>
          <table:table-cell office:value-type="float" office:value="-227" table:formula="of:=[.F212]-[.H212]" table:style-name="ce15">
            <text:p>-227</text:p>
          </table:table-cell>
          <table:table-cell office:value-type="percentage" office:value="1.4446529080675423E-2" table:formula="of:=([.I213]-[.I212])/[.I212]" table:style-name="ce16">
            <text:p>1%</text:p>
          </table:table-cell>
          <table:table-cell office:value-type="string" office:string-value="Valid" table:formula="of:=IF([.F212]&lt;=[.E212]; &quot;Valid&quot;; &quot;Invalid&quot;)" table:style-name="ce17">
            <text:p>Valid</text:p>
          </table:table-cell>
          <table:table-cell office:value-type="string" office:string-value="Valid" table:formula="of:=IF([.H212]&lt;=[.G212]; &quot;Valid&quot;; &quot;Invalid&quot;)" table:style-name="ce17">
            <text:p>Valid</text:p>
          </table:table-cell>
          <table:table-cell office:value-type="string" office:string-value="Stable/Reducing" table:formula="of:=IF([.J212]&gt;0; &quot;Increasing Pressure&quot;; &quot;Stable/Reducing&quot;)" table:style-name="ce18">
            <text:p>Stable/Reducing</text:p>
          </table:table-cell>
          <table:table-cell office:value-type="float" office:value="3.4408602150537635" table:formula="of:=IFERROR([.H212]/[.F212]; 0)" table:style-name="ce17">
            <text:p>3.440860215</text:p>
          </table:table-cell>
          <table:table-cell office:value-type="float" office:value="10942.714285714286" table:formula="of:=AVERAGE([.I212:.I218])" table:style-name="ce15">
            <text:p>10943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12-03T00:00:00" table:style-name="ce14">
            <text:p>03-12-2023</text:p>
          </table:table-cell>
          <table:table-cell office:value-type="string" office:string-value="December" table:formula="of:=TEXT([.A213]; &quot;mmmm&quot;)" table:style-name="ce14">
            <text:p>December</text:p>
          </table:table-cell>
          <table:table-cell office:value-type="string" office:string-value="2023-12" table:formula="of:=TEXT([.A213]; &quot;yyyy-mm&quot;)" table:style-name="ce14">
            <text:p>2023-12</text:p>
          </table:table-cell>
          <table:table-cell office:value-type="float" office:value="132" table:style-name="ce9">
            <text:p>132</text:p>
          </table:table-cell>
          <table:table-cell office:value-type="float" office:value="235" table:style-name="ce9">
            <text:p>235</text:p>
          </table:table-cell>
          <table:table-cell office:value-type="float" office:value="197" table:style-name="ce9">
            <text:p>197</text:p>
          </table:table-cell>
          <table:table-cell office:value-type="float" office:value="10579" table:style-name="ce9">
            <text:p>10579</text:p>
          </table:table-cell>
          <table:table-cell office:value-type="float" office:value="417" table:style-name="ce9">
            <text:p>417</text:p>
          </table:table-cell>
          <table:table-cell office:value-type="float" office:value="10814" table:formula="of:=SUM([.G213]+[.E213])" table:style-name="ce15">
            <text:p>10814</text:p>
          </table:table-cell>
          <table:table-cell office:value-type="float" office:value="-220" table:formula="of:=[.F213]-[.H213]" table:style-name="ce15">
            <text:p>-220</text:p>
          </table:table-cell>
          <table:table-cell office:value-type="percentage" office:value="2.6817088958757166E-3" table:formula="of:=([.I214]-[.I213])/[.I213]" table:style-name="ce16">
            <text:p>0%</text:p>
          </table:table-cell>
          <table:table-cell office:value-type="string" office:string-value="Valid" table:formula="of:=IF([.F213]&lt;=[.E213]; &quot;Valid&quot;; &quot;Invalid&quot;)" table:style-name="ce17">
            <text:p>Valid</text:p>
          </table:table-cell>
          <table:table-cell office:value-type="string" office:string-value="Valid" table:formula="of:=IF([.H213]&lt;=[.G213]; &quot;Valid&quot;; &quot;Invalid&quot;)" table:style-name="ce17">
            <text:p>Valid</text:p>
          </table:table-cell>
          <table:table-cell office:value-type="string" office:string-value="Stable/Reducing" table:formula="of:=IF([.J213]&gt;0; &quot;Increasing Pressure&quot;; &quot;Stable/Reducing&quot;)" table:style-name="ce18">
            <text:p>Stable/Reducing</text:p>
          </table:table-cell>
          <table:table-cell office:value-type="float" office:value="2.1167512690355328" table:formula="of:=IFERROR([.H213]/[.F213]; 0)" table:style-name="ce17">
            <text:p>2.116751269</text:p>
          </table:table-cell>
          <table:table-cell office:value-type="float" office:value="11013.857142857143" table:formula="of:=AVERAGE([.I213:.I219])" table:style-name="ce15">
            <text:p>11014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12-04T00:00:00" table:style-name="ce14">
            <text:p>04-12-2023</text:p>
          </table:table-cell>
          <table:table-cell office:value-type="string" office:string-value="December" table:formula="of:=TEXT([.A214]; &quot;mmmm&quot;)" table:style-name="ce14">
            <text:p>December</text:p>
          </table:table-cell>
          <table:table-cell office:value-type="string" office:string-value="2023-12" table:formula="of:=TEXT([.A214]; &quot;yyyy-mm&quot;)" table:style-name="ce14">
            <text:p>2023-12</text:p>
          </table:table-cell>
          <table:table-cell office:value-type="float" office:value="174" table:style-name="ce9">
            <text:p>174</text:p>
          </table:table-cell>
          <table:table-cell office:value-type="float" office:value="208" table:style-name="ce9">
            <text:p>208</text:p>
          </table:table-cell>
          <table:table-cell office:value-type="float" office:value="256" table:style-name="ce9">
            <text:p>256</text:p>
          </table:table-cell>
          <table:table-cell office:value-type="float" office:value="10635" table:style-name="ce9">
            <text:p>10635</text:p>
          </table:table-cell>
          <table:table-cell office:value-type="float" office:value="273" table:style-name="ce9">
            <text:p>273</text:p>
          </table:table-cell>
          <table:table-cell office:value-type="float" office:value="10843" table:formula="of:=SUM([.G214]+[.E214])" table:style-name="ce15">
            <text:p>10843</text:p>
          </table:table-cell>
          <table:table-cell office:value-type="float" office:value="-17" table:formula="of:=[.F214]-[.H214]" table:style-name="ce15">
            <text:p>-17</text:p>
          </table:table-cell>
          <table:table-cell office:value-type="percentage" office:value="1.3649359033477819E-2" table:formula="of:=([.I215]-[.I214])/[.I214]" table:style-name="ce16">
            <text:p>1%</text:p>
          </table:table-cell>
          <table:table-cell office:value-type="string" office:string-value="Invalid" table:formula="of:=IF([.F214]&lt;=[.E214]; &quot;Valid&quot;; &quot;Invalid&quot;)" table:style-name="ce17">
            <text:p>Invalid</text:p>
          </table:table-cell>
          <table:table-cell office:value-type="string" office:string-value="Valid" table:formula="of:=IF([.H214]&lt;=[.G214]; &quot;Valid&quot;; &quot;Invalid&quot;)" table:style-name="ce17">
            <text:p>Valid</text:p>
          </table:table-cell>
          <table:table-cell office:value-type="string" office:string-value="Stable/Reducing" table:formula="of:=IF([.J214]&gt;0; &quot;Increasing Pressure&quot;; &quot;Stable/Reducing&quot;)" table:style-name="ce18">
            <text:p>Stable/Reducing</text:p>
          </table:table-cell>
          <table:table-cell office:value-type="float" office:value="1.06640625" table:formula="of:=IFERROR([.H214]/[.F214]; 0)" table:style-name="ce17">
            <text:p>1.06640625</text:p>
          </table:table-cell>
          <table:table-cell office:value-type="float" office:value="11076.142857142857" table:formula="of:=AVERAGE([.I214:.I220])" table:style-name="ce15">
            <text:p>11076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12-05T00:00:00" table:style-name="ce14">
            <text:p>05-12-2023</text:p>
          </table:table-cell>
          <table:table-cell office:value-type="string" office:string-value="December" table:formula="of:=TEXT([.A215]; &quot;mmmm&quot;)" table:style-name="ce14">
            <text:p>December</text:p>
          </table:table-cell>
          <table:table-cell office:value-type="string" office:string-value="2023-12" table:formula="of:=TEXT([.A215]; &quot;yyyy-mm&quot;)" table:style-name="ce14">
            <text:p>2023-12</text:p>
          </table:table-cell>
          <table:table-cell office:value-type="float" office:value="123" table:style-name="ce9">
            <text:p>123</text:p>
          </table:table-cell>
          <table:table-cell office:value-type="float" office:value="230" table:style-name="ce9">
            <text:p>230</text:p>
          </table:table-cell>
          <table:table-cell office:value-type="float" office:value="167" table:style-name="ce9">
            <text:p>167</text:p>
          </table:table-cell>
          <table:table-cell office:value-type="float" office:value="10761" table:style-name="ce9">
            <text:p>10761</text:p>
          </table:table-cell>
          <table:table-cell office:value-type="float" office:value="261" table:style-name="ce9">
            <text:p>261</text:p>
          </table:table-cell>
          <table:table-cell office:value-type="float" office:value="10991" table:formula="of:=SUM([.G215]+[.E215])" table:style-name="ce15">
            <text:p>10991</text:p>
          </table:table-cell>
          <table:table-cell office:value-type="float" office:value="-94" table:formula="of:=[.F215]-[.H215]" table:style-name="ce15">
            <text:p>-94</text:p>
          </table:table-cell>
          <table:table-cell office:value-type="percentage" office:value="6.73278136657265E-3" table:formula="of:=([.I216]-[.I215])/[.I215]" table:style-name="ce16">
            <text:p>1%</text:p>
          </table:table-cell>
          <table:table-cell office:value-type="string" office:string-value="Valid" table:formula="of:=IF([.F215]&lt;=[.E215]; &quot;Valid&quot;; &quot;Invalid&quot;)" table:style-name="ce17">
            <text:p>Valid</text:p>
          </table:table-cell>
          <table:table-cell office:value-type="string" office:string-value="Valid" table:formula="of:=IF([.H215]&lt;=[.G215]; &quot;Valid&quot;; &quot;Invalid&quot;)" table:style-name="ce17">
            <text:p>Valid</text:p>
          </table:table-cell>
          <table:table-cell office:value-type="string" office:string-value="Stable/Reducing" table:formula="of:=IF([.J215]&gt;0; &quot;Increasing Pressure&quot;; &quot;Stable/Reducing&quot;)" table:style-name="ce18">
            <text:p>Stable/Reducing</text:p>
          </table:table-cell>
          <table:table-cell office:value-type="float" office:value="1.562874251497006" table:formula="of:=IFERROR([.H215]/[.F215]; 0)" table:style-name="ce17">
            <text:p>1.562874251</text:p>
          </table:table-cell>
          <table:table-cell office:value-type="float" office:value="11151.857142857143" table:formula="of:=AVERAGE([.I215:.I221])" table:style-name="ce15">
            <text:p>11152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12-06T00:00:00" table:style-name="ce14">
            <text:p>06-12-2023</text:p>
          </table:table-cell>
          <table:table-cell office:value-type="string" office:string-value="December" table:formula="of:=TEXT([.A216]; &quot;mmmm&quot;)" table:style-name="ce14">
            <text:p>December</text:p>
          </table:table-cell>
          <table:table-cell office:value-type="string" office:string-value="2023-12" table:formula="of:=TEXT([.A216]; &quot;yyyy-mm&quot;)" table:style-name="ce14">
            <text:p>2023-12</text:p>
          </table:table-cell>
          <table:table-cell office:value-type="float" office:value="123" table:style-name="ce9">
            <text:p>123</text:p>
          </table:table-cell>
          <table:table-cell office:value-type="float" office:value="233" table:style-name="ce9">
            <text:p>233</text:p>
          </table:table-cell>
          <table:table-cell office:value-type="float" office:value="159" table:style-name="ce9">
            <text:p>159</text:p>
          </table:table-cell>
          <table:table-cell office:value-type="float" office:value="10832" table:style-name="ce9">
            <text:p>10832</text:p>
          </table:table-cell>
          <table:table-cell office:value-type="float" office:value="376" table:style-name="ce9">
            <text:p>376</text:p>
          </table:table-cell>
          <table:table-cell office:value-type="float" office:value="11065" table:formula="of:=SUM([.G216]+[.E216])" table:style-name="ce15">
            <text:p>11065</text:p>
          </table:table-cell>
          <table:table-cell office:value-type="float" office:value="-217" table:formula="of:=[.F216]-[.H216]" table:style-name="ce15">
            <text:p>-217</text:p>
          </table:table-cell>
          <table:table-cell office:value-type="percentage" office:value="5.7840036150022594E-3" table:formula="of:=([.I217]-[.I216])/[.I216]" table:style-name="ce16">
            <text:p>1%</text:p>
          </table:table-cell>
          <table:table-cell office:value-type="string" office:string-value="Valid" table:formula="of:=IF([.F216]&lt;=[.E216]; &quot;Valid&quot;; &quot;Invalid&quot;)" table:style-name="ce17">
            <text:p>Valid</text:p>
          </table:table-cell>
          <table:table-cell office:value-type="string" office:string-value="Valid" table:formula="of:=IF([.H216]&lt;=[.G216]; &quot;Valid&quot;; &quot;Invalid&quot;)" table:style-name="ce17">
            <text:p>Valid</text:p>
          </table:table-cell>
          <table:table-cell office:value-type="string" office:string-value="Stable/Reducing" table:formula="of:=IF([.J216]&gt;0; &quot;Increasing Pressure&quot;; &quot;Stable/Reducing&quot;)" table:style-name="ce18">
            <text:p>Stable/Reducing</text:p>
          </table:table-cell>
          <table:table-cell office:value-type="float" office:value="2.3647798742138364" table:formula="of:=IFERROR([.H216]/[.F216]; 0)" table:style-name="ce17">
            <text:p>2.364779874</text:p>
          </table:table-cell>
          <table:table-cell office:value-type="float" office:value="11210.142857142857" table:formula="of:=AVERAGE([.I216:.I222])" table:style-name="ce15">
            <text:p>11210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12-07T00:00:00" table:style-name="ce14">
            <text:p>07-12-2023</text:p>
          </table:table-cell>
          <table:table-cell office:value-type="string" office:string-value="December" table:formula="of:=TEXT([.A217]; &quot;mmmm&quot;)" table:style-name="ce14">
            <text:p>December</text:p>
          </table:table-cell>
          <table:table-cell office:value-type="string" office:string-value="2023-12" table:formula="of:=TEXT([.A217]; &quot;yyyy-mm&quot;)" table:style-name="ce14">
            <text:p>2023-12</text:p>
          </table:table-cell>
          <table:table-cell office:value-type="float" office:value="141" table:style-name="ce9">
            <text:p>141</text:p>
          </table:table-cell>
          <table:table-cell office:value-type="float" office:value="232" table:style-name="ce9">
            <text:p>232</text:p>
          </table:table-cell>
          <table:table-cell office:value-type="float" office:value="188" table:style-name="ce9">
            <text:p>188</text:p>
          </table:table-cell>
          <table:table-cell office:value-type="float" office:value="10897" table:style-name="ce9">
            <text:p>10897</text:p>
          </table:table-cell>
          <table:table-cell office:value-type="float" office:value="466" table:style-name="ce9">
            <text:p>466</text:p>
          </table:table-cell>
          <table:table-cell office:value-type="float" office:value="11129" table:formula="of:=SUM([.G217]+[.E217])" table:style-name="ce15">
            <text:p>11129</text:p>
          </table:table-cell>
          <table:table-cell office:value-type="float" office:value="-278" table:formula="of:=[.F217]-[.H217]" table:style-name="ce15">
            <text:p>-278</text:p>
          </table:table-cell>
          <table:table-cell office:value-type="percentage" office:value="-2.8753706532482701E-3" table:formula="of:=([.I218]-[.I217])/[.I217]" table:style-name="ce16">
            <text:p>0%</text:p>
          </table:table-cell>
          <table:table-cell office:value-type="string" office:string-value="Valid" table:formula="of:=IF([.F217]&lt;=[.E217]; &quot;Valid&quot;; &quot;Invalid&quot;)" table:style-name="ce17">
            <text:p>Valid</text:p>
          </table:table-cell>
          <table:table-cell office:value-type="string" office:string-value="Valid" table:formula="of:=IF([.H217]&lt;=[.G217]; &quot;Valid&quot;; &quot;Invalid&quot;)" table:style-name="ce17">
            <text:p>Valid</text:p>
          </table:table-cell>
          <table:table-cell office:value-type="string" office:string-value="Stable/Reducing" table:formula="of:=IF([.J217]&gt;0; &quot;Increasing Pressure&quot;; &quot;Stable/Reducing&quot;)" table:style-name="ce18">
            <text:p>Stable/Reducing</text:p>
          </table:table-cell>
          <table:table-cell office:value-type="float" office:value="2.478723404255319" table:formula="of:=IFERROR([.H217]/[.F217]; 0)" table:style-name="ce17">
            <text:p>2.478723404</text:p>
          </table:table-cell>
          <table:table-cell office:value-type="float" office:value="11239.142857142857" table:formula="of:=AVERAGE([.I217:.I223])" table:style-name="ce15">
            <text:p>11239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12-10T00:00:00" table:style-name="ce14">
            <text:p>10-12-2023</text:p>
          </table:table-cell>
          <table:table-cell office:value-type="string" office:string-value="December" table:formula="of:=TEXT([.A218]; &quot;mmmm&quot;)" table:style-name="ce14">
            <text:p>December</text:p>
          </table:table-cell>
          <table:table-cell office:value-type="string" office:string-value="2023-12" table:formula="of:=TEXT([.A218]; &quot;yyyy-mm&quot;)" table:style-name="ce14">
            <text:p>2023-12</text:p>
          </table:table-cell>
          <table:table-cell office:value-type="float" office:value="158" table:style-name="ce9">
            <text:p>158</text:p>
          </table:table-cell>
          <table:table-cell office:value-type="float" office:value="226" table:style-name="ce9">
            <text:p>226</text:p>
          </table:table-cell>
          <table:table-cell office:value-type="float" office:value="191" table:style-name="ce9">
            <text:p>191</text:p>
          </table:table-cell>
          <table:table-cell office:value-type="float" office:value="10871" table:style-name="ce9">
            <text:p>10871</text:p>
          </table:table-cell>
          <table:table-cell office:value-type="float" office:value="411" table:style-name="ce9">
            <text:p>411</text:p>
          </table:table-cell>
          <table:table-cell office:value-type="float" office:value="11097" table:formula="of:=SUM([.G218]+[.E218])" table:style-name="ce15">
            <text:p>11097</text:p>
          </table:table-cell>
          <table:table-cell office:value-type="float" office:value="-220" table:formula="of:=[.F218]-[.H218]" table:style-name="ce15">
            <text:p>-220</text:p>
          </table:table-cell>
          <table:table-cell office:value-type="percentage" office:value="5.4969811660809231E-3" table:formula="of:=([.I219]-[.I218])/[.I218]" table:style-name="ce16">
            <text:p>1%</text:p>
          </table:table-cell>
          <table:table-cell office:value-type="string" office:string-value="Valid" table:formula="of:=IF([.F218]&lt;=[.E218]; &quot;Valid&quot;; &quot;Invalid&quot;)" table:style-name="ce17">
            <text:p>Valid</text:p>
          </table:table-cell>
          <table:table-cell office:value-type="string" office:string-value="Valid" table:formula="of:=IF([.H218]&lt;=[.G218]; &quot;Valid&quot;; &quot;Invalid&quot;)" table:style-name="ce17">
            <text:p>Valid</text:p>
          </table:table-cell>
          <table:table-cell office:value-type="string" office:string-value="Stable/Reducing" table:formula="of:=IF([.J218]&gt;0; &quot;Increasing Pressure&quot;; &quot;Stable/Reducing&quot;)" table:style-name="ce18">
            <text:p>Stable/Reducing</text:p>
          </table:table-cell>
          <table:table-cell office:value-type="float" office:value="2.1518324607329844" table:formula="of:=IFERROR([.H218]/[.F218]; 0)" table:style-name="ce17">
            <text:p>2.151832461</text:p>
          </table:table-cell>
          <table:table-cell office:value-type="float" office:value="11268.857142857143" table:formula="of:=AVERAGE([.I218:.I224])" table:style-name="ce15">
            <text:p>11269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12-11T00:00:00" table:style-name="ce14">
            <text:p>11-12-2023</text:p>
          </table:table-cell>
          <table:table-cell office:value-type="string" office:string-value="December" table:formula="of:=TEXT([.A219]; &quot;mmmm&quot;)" table:style-name="ce14">
            <text:p>December</text:p>
          </table:table-cell>
          <table:table-cell office:value-type="string" office:string-value="2023-12" table:formula="of:=TEXT([.A219]; &quot;yyyy-mm&quot;)" table:style-name="ce14">
            <text:p>2023-12</text:p>
          </table:table-cell>
          <table:table-cell office:value-type="float" office:value="96" table:style-name="ce9">
            <text:p>96</text:p>
          </table:table-cell>
          <table:table-cell office:value-type="float" office:value="160" table:style-name="ce9">
            <text:p>160</text:p>
          </table:table-cell>
          <table:table-cell office:value-type="float" office:value="233" table:style-name="ce9">
            <text:p>233</text:p>
          </table:table-cell>
          <table:table-cell office:value-type="float" office:value="10998" table:style-name="ce9">
            <text:p>10998</text:p>
          </table:table-cell>
          <table:table-cell office:value-type="float" office:value="304" table:style-name="ce9">
            <text:p>304</text:p>
          </table:table-cell>
          <table:table-cell office:value-type="float" office:value="11158" table:formula="of:=SUM([.G219]+[.E219])" table:style-name="ce15">
            <text:p>11158</text:p>
          </table:table-cell>
          <table:table-cell office:value-type="float" office:value="-71" table:formula="of:=[.F219]-[.H219]" table:style-name="ce15">
            <text:p>-71</text:p>
          </table:table-cell>
          <table:table-cell office:value-type="percentage" office:value="8.2452052339128876E-3" table:formula="of:=([.I220]-[.I219])/[.I219]" table:style-name="ce16">
            <text:p>1%</text:p>
          </table:table-cell>
          <table:table-cell office:value-type="string" office:string-value="Invalid" table:formula="of:=IF([.F219]&lt;=[.E219]; &quot;Valid&quot;; &quot;Invalid&quot;)" table:style-name="ce17">
            <text:p>Invalid</text:p>
          </table:table-cell>
          <table:table-cell office:value-type="string" office:string-value="Valid" table:formula="of:=IF([.H219]&lt;=[.G219]; &quot;Valid&quot;; &quot;Invalid&quot;)" table:style-name="ce17">
            <text:p>Valid</text:p>
          </table:table-cell>
          <table:table-cell office:value-type="string" office:string-value="Stable/Reducing" table:formula="of:=IF([.J219]&gt;0; &quot;Increasing Pressure&quot;; &quot;Stable/Reducing&quot;)" table:style-name="ce18">
            <text:p>Stable/Reducing</text:p>
          </table:table-cell>
          <table:table-cell office:value-type="float" office:value="1.3047210300429184" table:formula="of:=IFERROR([.H219]/[.F219]; 0)" table:style-name="ce17">
            <text:p>1.30472103</text:p>
          </table:table-cell>
          <table:table-cell office:value-type="float" office:value="11323" table:formula="of:=AVERAGE([.I219:.I225])" table:style-name="ce15">
            <text:p>11323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12-12T00:00:00" table:style-name="ce14">
            <text:p>12-12-2023</text:p>
          </table:table-cell>
          <table:table-cell office:value-type="string" office:string-value="December" table:formula="of:=TEXT([.A220]; &quot;mmmm&quot;)" table:style-name="ce14">
            <text:p>December</text:p>
          </table:table-cell>
          <table:table-cell office:value-type="string" office:string-value="2023-12" table:formula="of:=TEXT([.A220]; &quot;yyyy-mm&quot;)" table:style-name="ce14">
            <text:p>2023-12</text:p>
          </table:table-cell>
          <table:table-cell office:value-type="float" office:value="141" table:style-name="ce9">
            <text:p>141</text:p>
          </table:table-cell>
          <table:table-cell office:value-type="float" office:value="173" table:style-name="ce9">
            <text:p>173</text:p>
          </table:table-cell>
          <table:table-cell office:value-type="float" office:value="129" table:style-name="ce9">
            <text:p>129</text:p>
          </table:table-cell>
          <table:table-cell office:value-type="float" office:value="11077" table:style-name="ce9">
            <text:p>11077</text:p>
          </table:table-cell>
          <table:table-cell office:value-type="float" office:value="259" table:style-name="ce9">
            <text:p>259</text:p>
          </table:table-cell>
          <table:table-cell office:value-type="float" office:value="11250" table:formula="of:=SUM([.G220]+[.E220])" table:style-name="ce15">
            <text:p>11250</text:p>
          </table:table-cell>
          <table:table-cell office:value-type="float" office:value="-130" table:formula="of:=[.F220]-[.H220]" table:style-name="ce15">
            <text:p>-130</text:p>
          </table:table-cell>
          <table:table-cell office:value-type="percentage" office:value="1.0933333333333333E-2" table:formula="of:=([.I221]-[.I220])/[.I220]" table:style-name="ce16">
            <text:p>1%</text:p>
          </table:table-cell>
          <table:table-cell office:value-type="string" office:string-value="Valid" table:formula="of:=IF([.F220]&lt;=[.E220]; &quot;Valid&quot;; &quot;Invalid&quot;)" table:style-name="ce17">
            <text:p>Valid</text:p>
          </table:table-cell>
          <table:table-cell office:value-type="string" office:string-value="Valid" table:formula="of:=IF([.H220]&lt;=[.G220]; &quot;Valid&quot;; &quot;Invalid&quot;)" table:style-name="ce17">
            <text:p>Valid</text:p>
          </table:table-cell>
          <table:table-cell office:value-type="string" office:string-value="Stable/Reducing" table:formula="of:=IF([.J220]&gt;0; &quot;Increasing Pressure&quot;; &quot;Stable/Reducing&quot;)" table:style-name="ce18">
            <text:p>Stable/Reducing</text:p>
          </table:table-cell>
          <table:table-cell office:value-type="float" office:value="2.0077519379844961" table:formula="of:=IFERROR([.H220]/[.F220]; 0)" table:style-name="ce17">
            <text:p>2.007751938</text:p>
          </table:table-cell>
          <table:table-cell office:value-type="float" office:value="11409.285714285714" table:formula="of:=AVERAGE([.I220:.I226])" table:style-name="ce15">
            <text:p>11409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12-13T00:00:00" table:style-name="ce14">
            <text:p>13-12-2023</text:p>
          </table:table-cell>
          <table:table-cell office:value-type="string" office:string-value="December" table:formula="of:=TEXT([.A221]; &quot;mmmm&quot;)" table:style-name="ce14">
            <text:p>December</text:p>
          </table:table-cell>
          <table:table-cell office:value-type="string" office:string-value="2023-12" table:formula="of:=TEXT([.A221]; &quot;yyyy-mm&quot;)" table:style-name="ce14">
            <text:p>2023-12</text:p>
          </table:table-cell>
          <table:table-cell office:value-type="float" office:value="116" table:style-name="ce9">
            <text:p>116</text:p>
          </table:table-cell>
          <table:table-cell office:value-type="float" office:value="181" table:style-name="ce9">
            <text:p>181</text:p>
          </table:table-cell>
          <table:table-cell office:value-type="float" office:value="182" table:style-name="ce9">
            <text:p>182</text:p>
          </table:table-cell>
          <table:table-cell office:value-type="float" office:value="11192" table:style-name="ce9">
            <text:p>11192</text:p>
          </table:table-cell>
          <table:table-cell office:value-type="float" office:value="335" table:style-name="ce9">
            <text:p>335</text:p>
          </table:table-cell>
          <table:table-cell office:value-type="float" office:value="11373" table:formula="of:=SUM([.G221]+[.E221])" table:style-name="ce15">
            <text:p>11373</text:p>
          </table:table-cell>
          <table:table-cell office:value-type="float" office:value="-153" table:formula="of:=[.F221]-[.H221]" table:style-name="ce15">
            <text:p>-153</text:p>
          </table:table-cell>
          <table:table-cell office:value-type="percentage" office:value="2.2861162402180602E-3" table:formula="of:=([.I222]-[.I221])/[.I221]" table:style-name="ce16">
            <text:p>0%</text:p>
          </table:table-cell>
          <table:table-cell office:value-type="string" office:string-value="Invalid" table:formula="of:=IF([.F221]&lt;=[.E221]; &quot;Valid&quot;; &quot;Invalid&quot;)" table:style-name="ce17">
            <text:p>Invalid</text:p>
          </table:table-cell>
          <table:table-cell office:value-type="string" office:string-value="Valid" table:formula="of:=IF([.H221]&lt;=[.G221]; &quot;Valid&quot;; &quot;Invalid&quot;)" table:style-name="ce17">
            <text:p>Valid</text:p>
          </table:table-cell>
          <table:table-cell office:value-type="string" office:string-value="Stable/Reducing" table:formula="of:=IF([.J221]&gt;0; &quot;Increasing Pressure&quot;; &quot;Stable/Reducing&quot;)" table:style-name="ce18">
            <text:p>Stable/Reducing</text:p>
          </table:table-cell>
          <table:table-cell office:value-type="float" office:value="1.8406593406593406" table:formula="of:=IFERROR([.H221]/[.F221]; 0)" table:style-name="ce17">
            <text:p>1.840659341</text:p>
          </table:table-cell>
          <table:table-cell office:value-type="float" office:value="11459.714285714286" table:formula="of:=AVERAGE([.I221:.I227])" table:style-name="ce15">
            <text:p>11460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12-14T00:00:00" table:style-name="ce14">
            <text:p>14-12-2023</text:p>
          </table:table-cell>
          <table:table-cell office:value-type="string" office:string-value="December" table:formula="of:=TEXT([.A222]; &quot;mmmm&quot;)" table:style-name="ce14">
            <text:p>December</text:p>
          </table:table-cell>
          <table:table-cell office:value-type="string" office:string-value="2023-12" table:formula="of:=TEXT([.A222]; &quot;yyyy-mm&quot;)" table:style-name="ce14">
            <text:p>2023-12</text:p>
          </table:table-cell>
          <table:table-cell office:value-type="float" office:value="150" table:style-name="ce9">
            <text:p>150</text:p>
          </table:table-cell>
          <table:table-cell office:value-type="float" office:value="157" table:style-name="ce9">
            <text:p>157</text:p>
          </table:table-cell>
          <table:table-cell office:value-type="float" office:value="201" table:style-name="ce9">
            <text:p>201</text:p>
          </table:table-cell>
          <table:table-cell office:value-type="float" office:value="11242" table:style-name="ce9">
            <text:p>11242</text:p>
          </table:table-cell>
          <table:table-cell office:value-type="float" office:value="396" table:style-name="ce9">
            <text:p>396</text:p>
          </table:table-cell>
          <table:table-cell office:value-type="float" office:value="11399" table:formula="of:=SUM([.G222]+[.E222])" table:style-name="ce15">
            <text:p>11399</text:p>
          </table:table-cell>
          <table:table-cell office:value-type="float" office:value="-195" table:formula="of:=[.F222]-[.H222]" table:style-name="ce15">
            <text:p>-195</text:p>
          </table:table-cell>
          <table:table-cell office:value-type="percentage" office:value="-1.149223616106676E-2" table:formula="of:=([.I223]-[.I222])/[.I222]" table:style-name="ce16">
            <text:p>-1%</text:p>
          </table:table-cell>
          <table:table-cell office:value-type="string" office:string-value="Invalid" table:formula="of:=IF([.F222]&lt;=[.E222]; &quot;Valid&quot;; &quot;Invalid&quot;)" table:style-name="ce17">
            <text:p>Invalid</text:p>
          </table:table-cell>
          <table:table-cell office:value-type="string" office:string-value="Valid" table:formula="of:=IF([.H222]&lt;=[.G222]; &quot;Valid&quot;; &quot;Invalid&quot;)" table:style-name="ce17">
            <text:p>Valid</text:p>
          </table:table-cell>
          <table:table-cell office:value-type="string" office:string-value="Stable/Reducing" table:formula="of:=IF([.J222]&gt;0; &quot;Increasing Pressure&quot;; &quot;Stable/Reducing&quot;)" table:style-name="ce18">
            <text:p>Stable/Reducing</text:p>
          </table:table-cell>
          <table:table-cell office:value-type="float" office:value="1.9701492537313432" table:formula="of:=IFERROR([.H222]/[.F222]; 0)" table:style-name="ce17">
            <text:p>1.970149254</text:p>
          </table:table-cell>
          <table:table-cell office:value-type="float" office:value="11455" table:formula="of:=AVERAGE([.I222:.I228])" table:style-name="ce15">
            <text:p>11455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12-17T00:00:00" table:style-name="ce14">
            <text:p>17-12-2023</text:p>
          </table:table-cell>
          <table:table-cell office:value-type="string" office:string-value="December" table:formula="of:=TEXT([.A223]; &quot;mmmm&quot;)" table:style-name="ce14">
            <text:p>December</text:p>
          </table:table-cell>
          <table:table-cell office:value-type="string" office:string-value="2023-12" table:formula="of:=TEXT([.A223]; &quot;yyyy-mm&quot;)" table:style-name="ce14">
            <text:p>2023-12</text:p>
          </table:table-cell>
          <table:table-cell office:value-type="float" office:value="80" table:style-name="ce9">
            <text:p>80</text:p>
          </table:table-cell>
          <table:table-cell office:value-type="float" office:value="176" table:style-name="ce9">
            <text:p>176</text:p>
          </table:table-cell>
          <table:table-cell office:value-type="float" office:value="125" table:style-name="ce9">
            <text:p>125</text:p>
          </table:table-cell>
          <table:table-cell office:value-type="float" office:value="11092" table:style-name="ce9">
            <text:p>11092</text:p>
          </table:table-cell>
          <table:table-cell office:value-type="float" office:value="456" table:style-name="ce9">
            <text:p>456</text:p>
          </table:table-cell>
          <table:table-cell office:value-type="float" office:value="11268" table:formula="of:=SUM([.G223]+[.E223])" table:style-name="ce15">
            <text:p>11268</text:p>
          </table:table-cell>
          <table:table-cell office:value-type="float" office:value="-331" table:formula="of:=[.F223]-[.H223]" table:style-name="ce15">
            <text:p>-331</text:p>
          </table:table-cell>
          <table:table-cell office:value-type="percentage" office:value="6.1235356762513312E-3" table:formula="of:=([.I224]-[.I223])/[.I223]" table:style-name="ce16">
            <text:p>1%</text:p>
          </table:table-cell>
          <table:table-cell office:value-type="string" office:string-value="Valid" table:formula="of:=IF([.F223]&lt;=[.E223]; &quot;Valid&quot;; &quot;Invalid&quot;)" table:style-name="ce17">
            <text:p>Valid</text:p>
          </table:table-cell>
          <table:table-cell office:value-type="string" office:string-value="Valid" table:formula="of:=IF([.H223]&lt;=[.G223]; &quot;Valid&quot;; &quot;Invalid&quot;)" table:style-name="ce17">
            <text:p>Valid</text:p>
          </table:table-cell>
          <table:table-cell office:value-type="string" office:string-value="Stable/Reducing" table:formula="of:=IF([.J223]&gt;0; &quot;Increasing Pressure&quot;; &quot;Stable/Reducing&quot;)" table:style-name="ce18">
            <text:p>Stable/Reducing</text:p>
          </table:table-cell>
          <table:table-cell office:value-type="float" office:value="3.6480000000000001" table:formula="of:=IFERROR([.H223]/[.F223]; 0)" table:style-name="ce17">
            <text:p>3.648</text:p>
          </table:table-cell>
          <table:table-cell office:value-type="float" office:value="11440.714285714286" table:formula="of:=AVERAGE([.I223:.I229])" table:style-name="ce15">
            <text:p>11441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12-18T00:00:00" table:style-name="ce14">
            <text:p>18-12-2023</text:p>
          </table:table-cell>
          <table:table-cell office:value-type="string" office:string-value="December" table:formula="of:=TEXT([.A224]; &quot;mmmm&quot;)" table:style-name="ce14">
            <text:p>December</text:p>
          </table:table-cell>
          <table:table-cell office:value-type="string" office:string-value="2023-12" table:formula="of:=TEXT([.A224]; &quot;yyyy-mm&quot;)" table:style-name="ce14">
            <text:p>2023-12</text:p>
          </table:table-cell>
          <table:table-cell office:value-type="float" office:value="116" table:style-name="ce9">
            <text:p>116</text:p>
          </table:table-cell>
          <table:table-cell office:value-type="float" office:value="188" table:style-name="ce9">
            <text:p>188</text:p>
          </table:table-cell>
          <table:table-cell office:value-type="float" office:value="164" table:style-name="ce9">
            <text:p>164</text:p>
          </table:table-cell>
          <table:table-cell office:value-type="float" office:value="11149" table:style-name="ce9">
            <text:p>11149</text:p>
          </table:table-cell>
          <table:table-cell office:value-type="float" office:value="364" table:style-name="ce9">
            <text:p>364</text:p>
          </table:table-cell>
          <table:table-cell office:value-type="float" office:value="11337" table:formula="of:=SUM([.G224]+[.E224])" table:style-name="ce15">
            <text:p>11337</text:p>
          </table:table-cell>
          <table:table-cell office:value-type="float" office:value="-200" table:formula="of:=[.F224]-[.H224]" table:style-name="ce15">
            <text:p>-200</text:p>
          </table:table-cell>
          <table:table-cell office:value-type="percentage" office:value="1.2260739172620622E-2" table:formula="of:=([.I225]-[.I224])/[.I224]" table:style-name="ce16">
            <text:p>1%</text:p>
          </table:table-cell>
          <table:table-cell office:value-type="string" office:string-value="Valid" table:formula="of:=IF([.F224]&lt;=[.E224]; &quot;Valid&quot;; &quot;Invalid&quot;)" table:style-name="ce17">
            <text:p>Valid</text:p>
          </table:table-cell>
          <table:table-cell office:value-type="string" office:string-value="Valid" table:formula="of:=IF([.H224]&lt;=[.G224]; &quot;Valid&quot;; &quot;Invalid&quot;)" table:style-name="ce17">
            <text:p>Valid</text:p>
          </table:table-cell>
          <table:table-cell office:value-type="string" office:string-value="Stable/Reducing" table:formula="of:=IF([.J224]&gt;0; &quot;Increasing Pressure&quot;; &quot;Stable/Reducing&quot;)" table:style-name="ce18">
            <text:p>Stable/Reducing</text:p>
          </table:table-cell>
          <table:table-cell office:value-type="float" office:value="2.2195121951219514" table:formula="of:=IFERROR([.H224]/[.F224]; 0)" table:style-name="ce17">
            <text:p>2.219512195</text:p>
          </table:table-cell>
          <table:table-cell office:value-type="float" office:value="11446.571428571429" table:formula="of:=AVERAGE([.I224:.I230])" table:style-name="ce15">
            <text:p>11447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12-19T00:00:00" table:style-name="ce14">
            <text:p>19-12-2023</text:p>
          </table:table-cell>
          <table:table-cell office:value-type="string" office:string-value="December" table:formula="of:=TEXT([.A225]; &quot;mmmm&quot;)" table:style-name="ce14">
            <text:p>December</text:p>
          </table:table-cell>
          <table:table-cell office:value-type="string" office:string-value="2023-12" table:formula="of:=TEXT([.A225]; &quot;yyyy-mm&quot;)" table:style-name="ce14">
            <text:p>2023-12</text:p>
          </table:table-cell>
          <table:table-cell office:value-type="float" office:value="105" table:style-name="ce9">
            <text:p>105</text:p>
          </table:table-cell>
          <table:table-cell office:value-type="float" office:value="185" table:style-name="ce9">
            <text:p>185</text:p>
          </table:table-cell>
          <table:table-cell office:value-type="float" office:value="158" table:style-name="ce9">
            <text:p>158</text:p>
          </table:table-cell>
          <table:table-cell office:value-type="float" office:value="11291" table:style-name="ce9">
            <text:p>11291</text:p>
          </table:table-cell>
          <table:table-cell office:value-type="float" office:value="272" table:style-name="ce9">
            <text:p>272</text:p>
          </table:table-cell>
          <table:table-cell office:value-type="float" office:value="11476" table:formula="of:=SUM([.G225]+[.E225])" table:style-name="ce15">
            <text:p>11476</text:p>
          </table:table-cell>
          <table:table-cell office:value-type="float" office:value="-114" table:formula="of:=[.F225]-[.H225]" table:style-name="ce15">
            <text:p>-114</text:p>
          </table:table-cell>
          <table:table-cell office:value-type="percentage" office:value="2.4921575461833392E-2" table:formula="of:=([.I226]-[.I225])/[.I225]" table:style-name="ce16">
            <text:p>2%</text:p>
          </table:table-cell>
          <table:table-cell office:value-type="string" office:string-value="Valid" table:formula="of:=IF([.F225]&lt;=[.E225]; &quot;Valid&quot;; &quot;Invalid&quot;)" table:style-name="ce17">
            <text:p>Valid</text:p>
          </table:table-cell>
          <table:table-cell office:value-type="string" office:string-value="Valid" table:formula="of:=IF([.H225]&lt;=[.G225]; &quot;Valid&quot;; &quot;Invalid&quot;)" table:style-name="ce17">
            <text:p>Valid</text:p>
          </table:table-cell>
          <table:table-cell office:value-type="string" office:string-value="Stable/Reducing" table:formula="of:=IF([.J225]&gt;0; &quot;Increasing Pressure&quot;; &quot;Stable/Reducing&quot;)" table:style-name="ce18">
            <text:p>Stable/Reducing</text:p>
          </table:table-cell>
          <table:table-cell office:value-type="float" office:value="1.7215189873417722" table:formula="of:=IFERROR([.H225]/[.F225]; 0)" table:style-name="ce17">
            <text:p>1.721518987</text:p>
          </table:table-cell>
          <table:table-cell office:value-type="float" office:value="11446.571428571429" table:formula="of:=AVERAGE([.I225:.I231])" table:style-name="ce15">
            <text:p>11447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12-20T00:00:00" table:style-name="ce14">
            <text:p>20-12-2023</text:p>
          </table:table-cell>
          <table:table-cell office:value-type="string" office:string-value="December" table:formula="of:=TEXT([.A226]; &quot;mmmm&quot;)" table:style-name="ce14">
            <text:p>December</text:p>
          </table:table-cell>
          <table:table-cell office:value-type="string" office:string-value="2023-12" table:formula="of:=TEXT([.A226]; &quot;yyyy-mm&quot;)" table:style-name="ce14">
            <text:p>2023-12</text:p>
          </table:table-cell>
          <table:table-cell office:value-type="float" office:value="136" table:style-name="ce9">
            <text:p>136</text:p>
          </table:table-cell>
          <table:table-cell office:value-type="float" office:value="246" table:style-name="ce9">
            <text:p>246</text:p>
          </table:table-cell>
          <table:table-cell office:value-type="float" office:value="123" table:style-name="ce9">
            <text:p>123</text:p>
          </table:table-cell>
          <table:table-cell office:value-type="float" office:value="11516" table:style-name="ce9">
            <text:p>11516</text:p>
          </table:table-cell>
          <table:table-cell office:value-type="float" office:value="390" table:style-name="ce9">
            <text:p>390</text:p>
          </table:table-cell>
          <table:table-cell office:value-type="float" office:value="11762" table:formula="of:=SUM([.G226]+[.E226])" table:style-name="ce15">
            <text:p>11762</text:p>
          </table:table-cell>
          <table:table-cell office:value-type="float" office:value="-267" table:formula="of:=[.F226]-[.H226]" table:style-name="ce15">
            <text:p>-267</text:p>
          </table:table-cell>
          <table:table-cell office:value-type="percentage" office:value="-1.3518109165107975E-2" table:formula="of:=([.I227]-[.I226])/[.I226]" table:style-name="ce16">
            <text:p>-1%</text:p>
          </table:table-cell>
          <table:table-cell office:value-type="string" office:string-value="Valid" table:formula="of:=IF([.F226]&lt;=[.E226]; &quot;Valid&quot;; &quot;Invalid&quot;)" table:style-name="ce17">
            <text:p>Valid</text:p>
          </table:table-cell>
          <table:table-cell office:value-type="string" office:string-value="Valid" table:formula="of:=IF([.H226]&lt;=[.G226]; &quot;Valid&quot;; &quot;Invalid&quot;)" table:style-name="ce17">
            <text:p>Valid</text:p>
          </table:table-cell>
          <table:table-cell office:value-type="string" office:string-value="Stable/Reducing" table:formula="of:=IF([.J226]&gt;0; &quot;Increasing Pressure&quot;; &quot;Stable/Reducing&quot;)" table:style-name="ce18">
            <text:p>Stable/Reducing</text:p>
          </table:table-cell>
          <table:table-cell office:value-type="float" office:value="3.1707317073170733" table:formula="of:=IFERROR([.H226]/[.F226]; 0)" table:style-name="ce17">
            <text:p>3.170731707</text:p>
          </table:table-cell>
          <table:table-cell office:value-type="float" office:value="11377.714285714286" table:formula="of:=AVERAGE([.I226:.I232])" table:style-name="ce15">
            <text:p>11378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12-21T00:00:00" table:style-name="ce14">
            <text:p>21-12-2023</text:p>
          </table:table-cell>
          <table:table-cell office:value-type="string" office:string-value="December" table:formula="of:=TEXT([.A227]; &quot;mmmm&quot;)" table:style-name="ce14">
            <text:p>December</text:p>
          </table:table-cell>
          <table:table-cell office:value-type="string" office:string-value="2023-12" table:formula="of:=TEXT([.A227]; &quot;yyyy-mm&quot;)" table:style-name="ce14">
            <text:p>2023-12</text:p>
          </table:table-cell>
          <table:table-cell office:value-type="float" office:value="128" table:style-name="ce9">
            <text:p>128</text:p>
          </table:table-cell>
          <table:table-cell office:value-type="float" office:value="228" table:style-name="ce9">
            <text:p>228</text:p>
          </table:table-cell>
          <table:table-cell office:value-type="float" office:value="177" table:style-name="ce9">
            <text:p>177</text:p>
          </table:table-cell>
          <table:table-cell office:value-type="float" office:value="11375" table:style-name="ce9">
            <text:p>11375</text:p>
          </table:table-cell>
          <table:table-cell office:value-type="float" office:value="497" table:style-name="ce9">
            <text:p>497</text:p>
          </table:table-cell>
          <table:table-cell office:value-type="float" office:value="11603" table:formula="of:=SUM([.G227]+[.E227])" table:style-name="ce15">
            <text:p>11603</text:p>
          </table:table-cell>
          <table:table-cell office:value-type="float" office:value="-320" table:formula="of:=[.F227]-[.H227]" table:style-name="ce15">
            <text:p>-320</text:p>
          </table:table-cell>
          <table:table-cell office:value-type="percentage" office:value="-2.2666551753856762E-2" table:formula="of:=([.I228]-[.I227])/[.I227]" table:style-name="ce16">
            <text:p>-2%</text:p>
          </table:table-cell>
          <table:table-cell office:value-type="string" office:string-value="Valid" table:formula="of:=IF([.F227]&lt;=[.E227]; &quot;Valid&quot;; &quot;Invalid&quot;)" table:style-name="ce17">
            <text:p>Valid</text:p>
          </table:table-cell>
          <table:table-cell office:value-type="string" office:string-value="Valid" table:formula="of:=IF([.H227]&lt;=[.G227]; &quot;Valid&quot;; &quot;Invalid&quot;)" table:style-name="ce17">
            <text:p>Valid</text:p>
          </table:table-cell>
          <table:table-cell office:value-type="string" office:string-value="Stable/Reducing" table:formula="of:=IF([.J227]&gt;0; &quot;Increasing Pressure&quot;; &quot;Stable/Reducing&quot;)" table:style-name="ce18">
            <text:p>Stable/Reducing</text:p>
          </table:table-cell>
          <table:table-cell office:value-type="float" office:value="2.8079096045197742" table:formula="of:=IFERROR([.H227]/[.F227]; 0)" table:style-name="ce17">
            <text:p>2.807909605</text:p>
          </table:table-cell>
          <table:table-cell office:value-type="float" office:value="11259.142857142857" table:formula="of:=AVERAGE([.I227:.I233])" table:style-name="ce15">
            <text:p>11259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12-25T00:00:00" table:style-name="ce14">
            <text:p>25-12-2023</text:p>
          </table:table-cell>
          <table:table-cell office:value-type="string" office:string-value="December" table:formula="of:=TEXT([.A228]; &quot;mmmm&quot;)" table:style-name="ce14">
            <text:p>December</text:p>
          </table:table-cell>
          <table:table-cell office:value-type="string" office:string-value="2023-12" table:formula="of:=TEXT([.A228]; &quot;yyyy-mm&quot;)" table:style-name="ce14">
            <text:p>2023-12</text:p>
          </table:table-cell>
          <table:table-cell office:value-type="float" office:value="90" table:style-name="ce9">
            <text:p>90</text:p>
          </table:table-cell>
          <table:table-cell office:value-type="float" office:value="196" table:style-name="ce9">
            <text:p>196</text:p>
          </table:table-cell>
          <table:table-cell office:value-type="float" office:value="205" table:style-name="ce9">
            <text:p>205</text:p>
          </table:table-cell>
          <table:table-cell office:value-type="float" office:value="11144" table:style-name="ce9">
            <text:p>11144</text:p>
          </table:table-cell>
          <table:table-cell office:value-type="float" office:value="347" table:style-name="ce9">
            <text:p>347</text:p>
          </table:table-cell>
          <table:table-cell office:value-type="float" office:value="11340" table:formula="of:=SUM([.G228]+[.E228])" table:style-name="ce15">
            <text:p>11340</text:p>
          </table:table-cell>
          <table:table-cell office:value-type="float" office:value="-142" table:formula="of:=[.F228]-[.H228]" table:style-name="ce15">
            <text:p>-142</text:p>
          </table:table-cell>
          <table:table-cell office:value-type="percentage" office:value="-3.6155202821869488E-3" table:formula="of:=([.I229]-[.I228])/[.I228]" table:style-name="ce16">
            <text:p>0%</text:p>
          </table:table-cell>
          <table:table-cell office:value-type="string" office:string-value="Invalid" table:formula="of:=IF([.F228]&lt;=[.E228]; &quot;Valid&quot;; &quot;Invalid&quot;)" table:style-name="ce17">
            <text:p>Invalid</text:p>
          </table:table-cell>
          <table:table-cell office:value-type="string" office:string-value="Valid" table:formula="of:=IF([.H228]&lt;=[.G228]; &quot;Valid&quot;; &quot;Invalid&quot;)" table:style-name="ce17">
            <text:p>Valid</text:p>
          </table:table-cell>
          <table:table-cell office:value-type="string" office:string-value="Stable/Reducing" table:formula="of:=IF([.J228]&gt;0; &quot;Increasing Pressure&quot;; &quot;Stable/Reducing&quot;)" table:style-name="ce18">
            <text:p>Stable/Reducing</text:p>
          </table:table-cell>
          <table:table-cell office:value-type="float" office:value="1.6926829268292682" table:formula="of:=IFERROR([.H228]/[.F228]; 0)" table:style-name="ce17">
            <text:p>1.692682927</text:p>
          </table:table-cell>
          <table:table-cell office:value-type="float" office:value="11160.714285714286" table:formula="of:=AVERAGE([.I228:.I234])" table:style-name="ce15">
            <text:p>11161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12-26T00:00:00" table:style-name="ce14">
            <text:p>26-12-2023</text:p>
          </table:table-cell>
          <table:table-cell office:value-type="string" office:string-value="December" table:formula="of:=TEXT([.A229]; &quot;mmmm&quot;)" table:style-name="ce14">
            <text:p>December</text:p>
          </table:table-cell>
          <table:table-cell office:value-type="string" office:string-value="2023-12" table:formula="of:=TEXT([.A229]; &quot;yyyy-mm&quot;)" table:style-name="ce14">
            <text:p>2023-12</text:p>
          </table:table-cell>
          <table:table-cell office:value-type="float" office:value="56" table:style-name="ce9">
            <text:p>56</text:p>
          </table:table-cell>
          <table:table-cell office:value-type="float" office:value="82" table:style-name="ce9">
            <text:p>82</text:p>
          </table:table-cell>
          <table:table-cell office:value-type="float" office:value="68" table:style-name="ce9">
            <text:p>68</text:p>
          </table:table-cell>
          <table:table-cell office:value-type="float" office:value="11217" table:style-name="ce9">
            <text:p>11217</text:p>
          </table:table-cell>
          <table:table-cell office:value-type="float" office:value="288" table:style-name="ce9">
            <text:p>288</text:p>
          </table:table-cell>
          <table:table-cell office:value-type="float" office:value="11299" table:formula="of:=SUM([.G229]+[.E229])" table:style-name="ce15">
            <text:p>11299</text:p>
          </table:table-cell>
          <table:table-cell office:value-type="float" office:value="-220" table:formula="of:=[.F229]-[.H229]" table:style-name="ce15">
            <text:p>-220</text:p>
          </table:table-cell>
          <table:table-cell office:value-type="percentage" office:value="8.8503407381184177E-4" table:formula="of:=([.I230]-[.I229])/[.I229]" table:style-name="ce16">
            <text:p>0%</text:p>
          </table:table-cell>
          <table:table-cell office:value-type="string" office:string-value="Valid" table:formula="of:=IF([.F229]&lt;=[.E229]; &quot;Valid&quot;; &quot;Invalid&quot;)" table:style-name="ce17">
            <text:p>Valid</text:p>
          </table:table-cell>
          <table:table-cell office:value-type="string" office:string-value="Valid" table:formula="of:=IF([.H229]&lt;=[.G229]; &quot;Valid&quot;; &quot;Invalid&quot;)" table:style-name="ce17">
            <text:p>Valid</text:p>
          </table:table-cell>
          <table:table-cell office:value-type="string" office:string-value="Stable/Reducing" table:formula="of:=IF([.J229]&gt;0; &quot;Increasing Pressure&quot;; &quot;Stable/Reducing&quot;)" table:style-name="ce18">
            <text:p>Stable/Reducing</text:p>
          </table:table-cell>
          <table:table-cell office:value-type="float" office:value="4.2352941176470589" table:formula="of:=IFERROR([.H229]/[.F229]; 0)" table:style-name="ce17">
            <text:p>4.235294118</text:p>
          </table:table-cell>
          <table:table-cell office:value-type="float" office:value="11070.714285714286" table:formula="of:=AVERAGE([.I229:.I235])" table:style-name="ce15">
            <text:p>11071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12-27T00:00:00" table:style-name="ce14">
            <text:p>27-12-2023</text:p>
          </table:table-cell>
          <table:table-cell office:value-type="string" office:string-value="December" table:formula="of:=TEXT([.A230]; &quot;mmmm&quot;)" table:style-name="ce14">
            <text:p>December</text:p>
          </table:table-cell>
          <table:table-cell office:value-type="string" office:string-value="2023-12" table:formula="of:=TEXT([.A230]; &quot;yyyy-mm&quot;)" table:style-name="ce14">
            <text:p>2023-12</text:p>
          </table:table-cell>
          <table:table-cell office:value-type="float" office:value="74" table:style-name="ce9">
            <text:p>74</text:p>
          </table:table-cell>
          <table:table-cell office:value-type="float" office:value="103" table:style-name="ce9">
            <text:p>103</text:p>
          </table:table-cell>
          <table:table-cell office:value-type="float" office:value="80" table:style-name="ce9">
            <text:p>80</text:p>
          </table:table-cell>
          <table:table-cell office:value-type="float" office:value="11206" table:style-name="ce9">
            <text:p>11206</text:p>
          </table:table-cell>
          <table:table-cell office:value-type="float" office:value="335" table:style-name="ce9">
            <text:p>335</text:p>
          </table:table-cell>
          <table:table-cell office:value-type="float" office:value="11309" table:formula="of:=SUM([.G230]+[.E230])" table:style-name="ce15">
            <text:p>11309</text:p>
          </table:table-cell>
          <table:table-cell office:value-type="float" office:value="-255" table:formula="of:=[.F230]-[.H230]" table:style-name="ce15">
            <text:p>-255</text:p>
          </table:table-cell>
          <table:table-cell office:value-type="percentage" office:value="2.4759041471394466E-3" table:formula="of:=([.I231]-[.I230])/[.I230]" table:style-name="ce16">
            <text:p>0%</text:p>
          </table:table-cell>
          <table:table-cell office:value-type="string" office:string-value="Valid" table:formula="of:=IF([.F230]&lt;=[.E230]; &quot;Valid&quot;; &quot;Invalid&quot;)" table:style-name="ce17">
            <text:p>Valid</text:p>
          </table:table-cell>
          <table:table-cell office:value-type="string" office:string-value="Valid" table:formula="of:=IF([.H230]&lt;=[.G230]; &quot;Valid&quot;; &quot;Invalid&quot;)" table:style-name="ce17">
            <text:p>Valid</text:p>
          </table:table-cell>
          <table:table-cell office:value-type="string" office:string-value="Stable/Reducing" table:formula="of:=IF([.J230]&gt;0; &quot;Increasing Pressure&quot;; &quot;Stable/Reducing&quot;)" table:style-name="ce18">
            <text:p>Stable/Reducing</text:p>
          </table:table-cell>
          <table:table-cell office:value-type="float" office:value="4.1875" table:formula="of:=IFERROR([.H230]/[.F230]; 0)" table:style-name="ce17">
            <text:p>4.1875</text:p>
          </table:table-cell>
          <table:table-cell office:value-type="float" office:value="10854.857142857143" table:formula="of:=AVERAGE([.I230:.I236])" table:style-name="ce15">
            <text:p>10855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3-12-28T00:00:00" table:style-name="ce14">
            <text:p>28-12-2023</text:p>
          </table:table-cell>
          <table:table-cell office:value-type="string" office:string-value="December" table:formula="of:=TEXT([.A231]; &quot;mmmm&quot;)" table:style-name="ce14">
            <text:p>December</text:p>
          </table:table-cell>
          <table:table-cell office:value-type="string" office:string-value="2023-12" table:formula="of:=TEXT([.A231]; &quot;yyyy-mm&quot;)" table:style-name="ce14">
            <text:p>2023-12</text:p>
          </table:table-cell>
          <table:table-cell office:value-type="float" office:value="68" table:style-name="ce9">
            <text:p>68</text:p>
          </table:table-cell>
          <table:table-cell office:value-type="float" office:value="107" table:style-name="ce9">
            <text:p>107</text:p>
          </table:table-cell>
          <table:table-cell office:value-type="float" office:value="102" table:style-name="ce9">
            <text:p>102</text:p>
          </table:table-cell>
          <table:table-cell office:value-type="float" office:value="11230" table:style-name="ce9">
            <text:p>11230</text:p>
          </table:table-cell>
          <table:table-cell office:value-type="float" office:value="357" table:style-name="ce9">
            <text:p>357</text:p>
          </table:table-cell>
          <table:table-cell office:value-type="float" office:value="11337" table:formula="of:=SUM([.G231]+[.E231])" table:style-name="ce15">
            <text:p>11337</text:p>
          </table:table-cell>
          <table:table-cell office:value-type="float" office:value="-255" table:formula="of:=[.F231]-[.H231]" table:style-name="ce15">
            <text:p>-255</text:p>
          </table:table-cell>
          <table:table-cell office:value-type="percentage" office:value="-3.0254917526682544E-2" table:formula="of:=([.I232]-[.I231])/[.I231]" table:style-name="ce16">
            <text:p>-3%</text:p>
          </table:table-cell>
          <table:table-cell office:value-type="string" office:string-value="Valid" table:formula="of:=IF([.F231]&lt;=[.E231]; &quot;Valid&quot;; &quot;Invalid&quot;)" table:style-name="ce17">
            <text:p>Valid</text:p>
          </table:table-cell>
          <table:table-cell office:value-type="string" office:string-value="Valid" table:formula="of:=IF([.H231]&lt;=[.G231]; &quot;Valid&quot;; &quot;Invalid&quot;)" table:style-name="ce17">
            <text:p>Valid</text:p>
          </table:table-cell>
          <table:table-cell office:value-type="string" office:string-value="Stable/Reducing" table:formula="of:=IF([.J231]&gt;0; &quot;Increasing Pressure&quot;; &quot;Stable/Reducing&quot;)" table:style-name="ce18">
            <text:p>Stable/Reducing</text:p>
          </table:table-cell>
          <table:table-cell office:value-type="float" office:value="3.5" table:formula="of:=IFERROR([.H231]/[.F231]; 0)" table:style-name="ce17">
            <text:p>3.5</text:p>
          </table:table-cell>
          <table:table-cell office:value-type="float" office:value="10629.857142857143" table:formula="of:=AVERAGE([.I231:.I237])" table:style-name="ce15">
            <text:p>10630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1-01T00:00:00" table:style-name="ce14">
            <text:p>01-01-2024</text:p>
          </table:table-cell>
          <table:table-cell office:value-type="string" office:string-value="January" table:formula="of:=TEXT([.A232]; &quot;mmmm&quot;)" table:style-name="ce14">
            <text:p>January</text:p>
          </table:table-cell>
          <table:table-cell office:value-type="string" office:string-value="2024-01" table:formula="of:=TEXT([.A232]; &quot;yyyy-mm&quot;)" table:style-name="ce14">
            <text:p>2024-01</text:p>
          </table:table-cell>
          <table:table-cell office:value-type="float" office:value="92" table:style-name="ce9">
            <text:p>92</text:p>
          </table:table-cell>
          <table:table-cell office:value-type="float" office:value="124" table:style-name="ce9">
            <text:p>124</text:p>
          </table:table-cell>
          <table:table-cell office:value-type="float" office:value="93" table:style-name="ce9">
            <text:p>93</text:p>
          </table:table-cell>
          <table:table-cell office:value-type="float" office:value="10870" table:style-name="ce9">
            <text:p>10870</text:p>
          </table:table-cell>
          <table:table-cell office:value-type="float" office:value="290" table:style-name="ce9">
            <text:p>290</text:p>
          </table:table-cell>
          <table:table-cell office:value-type="float" office:value="10994" table:formula="of:=SUM([.G232]+[.E232])" table:style-name="ce15">
            <text:p>10994</text:p>
          </table:table-cell>
          <table:table-cell office:value-type="float" office:value="-197" table:formula="of:=[.F232]-[.H232]" table:style-name="ce15">
            <text:p>-197</text:p>
          </table:table-cell>
          <table:table-cell office:value-type="percentage" office:value="-5.639439694378752E-3" table:formula="of:=([.I233]-[.I232])/[.I232]" table:style-name="ce16">
            <text:p>-1%</text:p>
          </table:table-cell>
          <table:table-cell office:value-type="string" office:string-value="Valid" table:formula="of:=IF([.F232]&lt;=[.E232]; &quot;Valid&quot;; &quot;Invalid&quot;)" table:style-name="ce17">
            <text:p>Valid</text:p>
          </table:table-cell>
          <table:table-cell office:value-type="string" office:string-value="Valid" table:formula="of:=IF([.H232]&lt;=[.G232]; &quot;Valid&quot;; &quot;Invalid&quot;)" table:style-name="ce17">
            <text:p>Valid</text:p>
          </table:table-cell>
          <table:table-cell office:value-type="string" office:string-value="Stable/Reducing" table:formula="of:=IF([.J232]&gt;0; &quot;Increasing Pressure&quot;; &quot;Stable/Reducing&quot;)" table:style-name="ce18">
            <text:p>Stable/Reducing</text:p>
          </table:table-cell>
          <table:table-cell office:value-type="float" office:value="3.118279569892473" table:formula="of:=IFERROR([.H232]/[.F232]; 0)" table:style-name="ce17">
            <text:p>3.11827957</text:p>
          </table:table-cell>
          <table:table-cell office:value-type="float" office:value="10354.285714285714" table:formula="of:=AVERAGE([.I232:.I238])" table:style-name="ce15">
            <text:p>10354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1-02T00:00:00" table:style-name="ce14">
            <text:p>02-01-2024</text:p>
          </table:table-cell>
          <table:table-cell office:value-type="string" office:string-value="January" table:formula="of:=TEXT([.A233]; &quot;mmmm&quot;)" table:style-name="ce14">
            <text:p>January</text:p>
          </table:table-cell>
          <table:table-cell office:value-type="string" office:string-value="2024-01" table:formula="of:=TEXT([.A233]; &quot;yyyy-mm&quot;)" table:style-name="ce14">
            <text:p>2024-01</text:p>
          </table:table-cell>
          <table:table-cell office:value-type="float" office:value="113" table:style-name="ce9">
            <text:p>113</text:p>
          </table:table-cell>
          <table:table-cell office:value-type="float" office:value="162" table:style-name="ce9">
            <text:p>162</text:p>
          </table:table-cell>
          <table:table-cell office:value-type="float" office:value="107" table:style-name="ce9">
            <text:p>107</text:p>
          </table:table-cell>
          <table:table-cell office:value-type="float" office:value="10770" table:style-name="ce9">
            <text:p>10770</text:p>
          </table:table-cell>
          <table:table-cell office:value-type="float" office:value="316" table:style-name="ce9">
            <text:p>316</text:p>
          </table:table-cell>
          <table:table-cell office:value-type="float" office:value="10932" table:formula="of:=SUM([.G233]+[.E233])" table:style-name="ce15">
            <text:p>10932</text:p>
          </table:table-cell>
          <table:table-cell office:value-type="float" office:value="-209" table:formula="of:=[.F233]-[.H233]" table:style-name="ce15">
            <text:p>-209</text:p>
          </table:table-cell>
          <table:table-cell office:value-type="percentage" office:value="-1.6465422612513721E-3" table:formula="of:=([.I234]-[.I233])/[.I233]" table:style-name="ce16">
            <text:p>0%</text:p>
          </table:table-cell>
          <table:table-cell office:value-type="string" office:string-value="Valid" table:formula="of:=IF([.F233]&lt;=[.E233]; &quot;Valid&quot;; &quot;Invalid&quot;)" table:style-name="ce17">
            <text:p>Valid</text:p>
          </table:table-cell>
          <table:table-cell office:value-type="string" office:string-value="Valid" table:formula="of:=IF([.H233]&lt;=[.G233]; &quot;Valid&quot;; &quot;Invalid&quot;)" table:style-name="ce17">
            <text:p>Valid</text:p>
          </table:table-cell>
          <table:table-cell office:value-type="string" office:string-value="Stable/Reducing" table:formula="of:=IF([.J233]&gt;0; &quot;Increasing Pressure&quot;; &quot;Stable/Reducing&quot;)" table:style-name="ce18">
            <text:p>Stable/Reducing</text:p>
          </table:table-cell>
          <table:table-cell office:value-type="float" office:value="2.9532710280373831" table:formula="of:=IFERROR([.H233]/[.F233]; 0)" table:style-name="ce17">
            <text:p>2.953271028</text:p>
          </table:table-cell>
          <table:table-cell office:value-type="float" office:value="10100.714285714286" table:formula="of:=AVERAGE([.I233:.I239])" table:style-name="ce15">
            <text:p>10101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1-03T00:00:00" table:style-name="ce14">
            <text:p>03-01-2024</text:p>
          </table:table-cell>
          <table:table-cell office:value-type="string" office:string-value="January" table:formula="of:=TEXT([.A234]; &quot;mmmm&quot;)" table:style-name="ce14">
            <text:p>January</text:p>
          </table:table-cell>
          <table:table-cell office:value-type="string" office:string-value="2024-01" table:formula="of:=TEXT([.A234]; &quot;yyyy-mm&quot;)" table:style-name="ce14">
            <text:p>2024-01</text:p>
          </table:table-cell>
          <table:table-cell office:value-type="float" office:value="106" table:style-name="ce9">
            <text:p>106</text:p>
          </table:table-cell>
          <table:table-cell office:value-type="float" office:value="196" table:style-name="ce9">
            <text:p>196</text:p>
          </table:table-cell>
          <table:table-cell office:value-type="float" office:value="131" table:style-name="ce9">
            <text:p>131</text:p>
          </table:table-cell>
          <table:table-cell office:value-type="float" office:value="10718" table:style-name="ce9">
            <text:p>10718</text:p>
          </table:table-cell>
          <table:table-cell office:value-type="float" office:value="263" table:style-name="ce9">
            <text:p>263</text:p>
          </table:table-cell>
          <table:table-cell office:value-type="float" office:value="10914" table:formula="of:=SUM([.G234]+[.E234])" table:style-name="ce15">
            <text:p>10914</text:p>
          </table:table-cell>
          <table:table-cell office:value-type="float" office:value="-132" table:formula="of:=[.F234]-[.H234]" table:style-name="ce15">
            <text:p>-132</text:p>
          </table:table-cell>
          <table:table-cell office:value-type="percentage" office:value="-1.8691588785046728E-2" table:formula="of:=([.I235]-[.I234])/[.I234]" table:style-name="ce16">
            <text:p>-2%</text:p>
          </table:table-cell>
          <table:table-cell office:value-type="string" office:string-value="Valid" table:formula="of:=IF([.F234]&lt;=[.E234]; &quot;Valid&quot;; &quot;Invalid&quot;)" table:style-name="ce17">
            <text:p>Valid</text:p>
          </table:table-cell>
          <table:table-cell office:value-type="string" office:string-value="Valid" table:formula="of:=IF([.H234]&lt;=[.G234]; &quot;Valid&quot;; &quot;Invalid&quot;)" table:style-name="ce17">
            <text:p>Valid</text:p>
          </table:table-cell>
          <table:table-cell office:value-type="string" office:string-value="Stable/Reducing" table:formula="of:=IF([.J234]&gt;0; &quot;Increasing Pressure&quot;; &quot;Stable/Reducing&quot;)" table:style-name="ce18">
            <text:p>Stable/Reducing</text:p>
          </table:table-cell>
          <table:table-cell office:value-type="float" office:value="2.0076335877862594" table:formula="of:=IFERROR([.H234]/[.F234]; 0)" table:style-name="ce17">
            <text:p>2.007633588</text:p>
          </table:table-cell>
          <table:table-cell office:value-type="float" office:value="9807.5714285714294" table:formula="of:=AVERAGE([.I234:.I240])" table:style-name="ce15">
            <text:p>9808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1-04T00:00:00" table:style-name="ce14">
            <text:p>04-01-2024</text:p>
          </table:table-cell>
          <table:table-cell office:value-type="string" office:string-value="January" table:formula="of:=TEXT([.A235]; &quot;mmmm&quot;)" table:style-name="ce14">
            <text:p>January</text:p>
          </table:table-cell>
          <table:table-cell office:value-type="string" office:string-value="2024-01" table:formula="of:=TEXT([.A235]; &quot;yyyy-mm&quot;)" table:style-name="ce14">
            <text:p>2024-01</text:p>
          </table:table-cell>
          <table:table-cell office:value-type="float" office:value="86" table:style-name="ce9">
            <text:p>86</text:p>
          </table:table-cell>
          <table:table-cell office:value-type="float" office:value="152" table:style-name="ce9">
            <text:p>152</text:p>
          </table:table-cell>
          <table:table-cell office:value-type="float" office:value="168" table:style-name="ce9">
            <text:p>168</text:p>
          </table:table-cell>
          <table:table-cell office:value-type="float" office:value="10558" table:style-name="ce9">
            <text:p>10558</text:p>
          </table:table-cell>
          <table:table-cell office:value-type="float" office:value="362" table:style-name="ce9">
            <text:p>362</text:p>
          </table:table-cell>
          <table:table-cell office:value-type="float" office:value="10710" table:formula="of:=SUM([.G235]+[.E235])" table:style-name="ce15">
            <text:p>10710</text:p>
          </table:table-cell>
          <table:table-cell office:value-type="float" office:value="-194" table:formula="of:=[.F235]-[.H235]" table:style-name="ce15">
            <text:p>-194</text:p>
          </table:table-cell>
          <table:table-cell office:value-type="percentage" office:value="-8.6087768440709617E-2" table:formula="of:=([.I236]-[.I235])/[.I235]" table:style-name="ce16">
            <text:p>-9%</text:p>
          </table:table-cell>
          <table:table-cell office:value-type="string" office:string-value="Invalid" table:formula="of:=IF([.F235]&lt;=[.E235]; &quot;Valid&quot;; &quot;Invalid&quot;)" table:style-name="ce17">
            <text:p>Invalid</text:p>
          </table:table-cell>
          <table:table-cell office:value-type="string" office:string-value="Valid" table:formula="of:=IF([.H235]&lt;=[.G235]; &quot;Valid&quot;; &quot;Invalid&quot;)" table:style-name="ce17">
            <text:p>Valid</text:p>
          </table:table-cell>
          <table:table-cell office:value-type="string" office:string-value="Stable/Reducing" table:formula="of:=IF([.J235]&gt;0; &quot;Increasing Pressure&quot;; &quot;Stable/Reducing&quot;)" table:style-name="ce18">
            <text:p>Stable/Reducing</text:p>
          </table:table-cell>
          <table:table-cell office:value-type="float" office:value="2.1547619047619047" table:formula="of:=IFERROR([.H235]/[.F235]; 0)" table:style-name="ce17">
            <text:p>2.154761905</text:p>
          </table:table-cell>
          <table:table-cell office:value-type="float" office:value="9403.5714285714294" table:formula="of:=AVERAGE([.I235:.I241])" table:style-name="ce15">
            <text:p>9404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1-07T00:00:00" table:style-name="ce14">
            <text:p>07-01-2024</text:p>
          </table:table-cell>
          <table:table-cell office:value-type="string" office:string-value="January" table:formula="of:=TEXT([.A236]; &quot;mmmm&quot;)" table:style-name="ce14">
            <text:p>January</text:p>
          </table:table-cell>
          <table:table-cell office:value-type="string" office:string-value="2024-01" table:formula="of:=TEXT([.A236]; &quot;yyyy-mm&quot;)" table:style-name="ce14">
            <text:p>2024-01</text:p>
          </table:table-cell>
          <table:table-cell office:value-type="float" office:value="84" table:style-name="ce9">
            <text:p>84</text:p>
          </table:table-cell>
          <table:table-cell office:value-type="float" office:value="118" table:style-name="ce9">
            <text:p>118</text:p>
          </table:table-cell>
          <table:table-cell office:value-type="float" office:value="136" table:style-name="ce9">
            <text:p>136</text:p>
          </table:table-cell>
          <table:table-cell office:value-type="float" office:value="9670" table:style-name="ce9">
            <text:p>9670</text:p>
          </table:table-cell>
          <table:table-cell office:value-type="float" office:value="367" table:style-name="ce9">
            <text:p>367</text:p>
          </table:table-cell>
          <table:table-cell office:value-type="float" office:value="9788" table:formula="of:=SUM([.G236]+[.E236])" table:style-name="ce15">
            <text:p>9788</text:p>
          </table:table-cell>
          <table:table-cell office:value-type="float" office:value="-231" table:formula="of:=[.F236]-[.H236]" table:style-name="ce15">
            <text:p>-231</text:p>
          </table:table-cell>
          <table:table-cell office:value-type="percentage" office:value="-5.5169595422966894E-3" table:formula="of:=([.I237]-[.I236])/[.I236]" table:style-name="ce16">
            <text:p>-1%</text:p>
          </table:table-cell>
          <table:table-cell office:value-type="string" office:string-value="Invalid" table:formula="of:=IF([.F236]&lt;=[.E236]; &quot;Valid&quot;; &quot;Invalid&quot;)" table:style-name="ce17">
            <text:p>Invalid</text:p>
          </table:table-cell>
          <table:table-cell office:value-type="string" office:string-value="Valid" table:formula="of:=IF([.H236]&lt;=[.G236]; &quot;Valid&quot;; &quot;Invalid&quot;)" table:style-name="ce17">
            <text:p>Valid</text:p>
          </table:table-cell>
          <table:table-cell office:value-type="string" office:string-value="Stable/Reducing" table:formula="of:=IF([.J236]&gt;0; &quot;Increasing Pressure&quot;; &quot;Stable/Reducing&quot;)" table:style-name="ce18">
            <text:p>Stable/Reducing</text:p>
          </table:table-cell>
          <table:table-cell office:value-type="float" office:value="2.6985294117647061" table:formula="of:=IFERROR([.H236]/[.F236]; 0)" table:style-name="ce17">
            <text:p>2.698529412</text:p>
          </table:table-cell>
          <table:table-cell office:value-type="float" office:value="9042.4285714285706" table:formula="of:=AVERAGE([.I236:.I242])" table:style-name="ce15">
            <text:p>9042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1-08T00:00:00" table:style-name="ce14">
            <text:p>08-01-2024</text:p>
          </table:table-cell>
          <table:table-cell office:value-type="string" office:string-value="January" table:formula="of:=TEXT([.A237]; &quot;mmmm&quot;)" table:style-name="ce14">
            <text:p>January</text:p>
          </table:table-cell>
          <table:table-cell office:value-type="string" office:string-value="2024-01" table:formula="of:=TEXT([.A237]; &quot;yyyy-mm&quot;)" table:style-name="ce14">
            <text:p>2024-01</text:p>
          </table:table-cell>
          <table:table-cell office:value-type="float" office:value="59" table:style-name="ce9">
            <text:p>59</text:p>
          </table:table-cell>
          <table:table-cell office:value-type="float" office:value="64" table:style-name="ce9">
            <text:p>64</text:p>
          </table:table-cell>
          <table:table-cell office:value-type="float" office:value="117" table:style-name="ce9">
            <text:p>117</text:p>
          </table:table-cell>
          <table:table-cell office:value-type="float" office:value="9670" table:style-name="ce9">
            <text:p>9670</text:p>
          </table:table-cell>
          <table:table-cell office:value-type="float" office:value="367" table:style-name="ce9">
            <text:p>367</text:p>
          </table:table-cell>
          <table:table-cell office:value-type="float" office:value="9734" table:formula="of:=SUM([.G237]+[.E237])" table:style-name="ce15">
            <text:p>9734</text:p>
          </table:table-cell>
          <table:table-cell office:value-type="float" office:value="-250" table:formula="of:=[.F237]-[.H237]" table:style-name="ce15">
            <text:p>-250</text:p>
          </table:table-cell>
          <table:table-cell office:value-type="percentage" office:value="-3.3490856790630776E-2" table:formula="of:=([.I238]-[.I237])/[.I237]" table:style-name="ce16">
            <text:p>-3%</text:p>
          </table:table-cell>
          <table:table-cell office:value-type="string" office:string-value="Invalid" table:formula="of:=IF([.F237]&lt;=[.E237]; &quot;Valid&quot;; &quot;Invalid&quot;)" table:style-name="ce17">
            <text:p>Invalid</text:p>
          </table:table-cell>
          <table:table-cell office:value-type="string" office:string-value="Valid" table:formula="of:=IF([.H237]&lt;=[.G237]; &quot;Valid&quot;; &quot;Invalid&quot;)" table:style-name="ce17">
            <text:p>Valid</text:p>
          </table:table-cell>
          <table:table-cell office:value-type="string" office:string-value="Stable/Reducing" table:formula="of:=IF([.J237]&gt;0; &quot;Increasing Pressure&quot;; &quot;Stable/Reducing&quot;)" table:style-name="ce18">
            <text:p>Stable/Reducing</text:p>
          </table:table-cell>
          <table:table-cell office:value-type="float" office:value="3.1367521367521367" table:formula="of:=IFERROR([.H237]/[.F237]; 0)" table:style-name="ce17">
            <text:p>3.136752137</text:p>
          </table:table-cell>
          <table:table-cell office:value-type="float" office:value="8822.4285714285706" table:formula="of:=AVERAGE([.I237:.I243])" table:style-name="ce15">
            <text:p>8822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1-09T00:00:00" table:style-name="ce14">
            <text:p>09-01-2024</text:p>
          </table:table-cell>
          <table:table-cell office:value-type="string" office:string-value="January" table:formula="of:=TEXT([.A238]; &quot;mmmm&quot;)" table:style-name="ce14">
            <text:p>January</text:p>
          </table:table-cell>
          <table:table-cell office:value-type="string" office:string-value="2024-01" table:formula="of:=TEXT([.A238]; &quot;yyyy-mm&quot;)" table:style-name="ce14">
            <text:p>2024-01</text:p>
          </table:table-cell>
          <table:table-cell office:value-type="float" office:value="62" table:style-name="ce9">
            <text:p>62</text:p>
          </table:table-cell>
          <table:table-cell office:value-type="float" office:value="97" table:style-name="ce9">
            <text:p>97</text:p>
          </table:table-cell>
          <table:table-cell office:value-type="float" office:value="52" table:style-name="ce9">
            <text:p>52</text:p>
          </table:table-cell>
          <table:table-cell office:value-type="float" office:value="9311" table:style-name="ce9">
            <text:p>9311</text:p>
          </table:table-cell>
          <table:table-cell office:value-type="float" office:value="286" table:style-name="ce9">
            <text:p>286</text:p>
          </table:table-cell>
          <table:table-cell office:value-type="float" office:value="9408" table:formula="of:=SUM([.G238]+[.E238])" table:style-name="ce15">
            <text:p>9408</text:p>
          </table:table-cell>
          <table:table-cell office:value-type="float" office:value="-234" table:formula="of:=[.F238]-[.H238]" table:style-name="ce15">
            <text:p>-234</text:p>
          </table:table-cell>
          <table:table-cell office:value-type="percentage" office:value="-2.0089285714285716E-2" table:formula="of:=([.I239]-[.I238])/[.I238]" table:style-name="ce16">
            <text:p>-2%</text:p>
          </table:table-cell>
          <table:table-cell office:value-type="string" office:string-value="Valid" table:formula="of:=IF([.F238]&lt;=[.E238]; &quot;Valid&quot;; &quot;Invalid&quot;)" table:style-name="ce17">
            <text:p>Valid</text:p>
          </table:table-cell>
          <table:table-cell office:value-type="string" office:string-value="Valid" table:formula="of:=IF([.H238]&lt;=[.G238]; &quot;Valid&quot;; &quot;Invalid&quot;)" table:style-name="ce17">
            <text:p>Valid</text:p>
          </table:table-cell>
          <table:table-cell office:value-type="string" office:string-value="Stable/Reducing" table:formula="of:=IF([.J238]&gt;0; &quot;Increasing Pressure&quot;; &quot;Stable/Reducing&quot;)" table:style-name="ce18">
            <text:p>Stable/Reducing</text:p>
          </table:table-cell>
          <table:table-cell office:value-type="float" office:value="5.5" table:formula="of:=IFERROR([.H238]/[.F238]; 0)" table:style-name="ce17">
            <text:p>5.5</text:p>
          </table:table-cell>
          <table:table-cell office:value-type="float" office:value="8607.5714285714294" table:formula="of:=AVERAGE([.I238:.I244])" table:style-name="ce15">
            <text:p>8608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1-10T00:00:00" table:style-name="ce14">
            <text:p>10-01-2024</text:p>
          </table:table-cell>
          <table:table-cell office:value-type="string" office:string-value="January" table:formula="of:=TEXT([.A239]; &quot;mmmm&quot;)" table:style-name="ce14">
            <text:p>January</text:p>
          </table:table-cell>
          <table:table-cell office:value-type="string" office:string-value="2024-01" table:formula="of:=TEXT([.A239]; &quot;yyyy-mm&quot;)" table:style-name="ce14">
            <text:p>2024-01</text:p>
          </table:table-cell>
          <table:table-cell office:value-type="float" office:value="91" table:style-name="ce9">
            <text:p>91</text:p>
          </table:table-cell>
          <table:table-cell office:value-type="float" office:value="75" table:style-name="ce9">
            <text:p>75</text:p>
          </table:table-cell>
          <table:table-cell office:value-type="float" office:value="97" table:style-name="ce9">
            <text:p>97</text:p>
          </table:table-cell>
          <table:table-cell office:value-type="float" office:value="9144" table:style-name="ce9">
            <text:p>9144</text:p>
          </table:table-cell>
          <table:table-cell office:value-type="float" office:value="349" table:style-name="ce9">
            <text:p>349</text:p>
          </table:table-cell>
          <table:table-cell office:value-type="float" office:value="9219" table:formula="of:=SUM([.G239]+[.E239])" table:style-name="ce15">
            <text:p>9219</text:p>
          </table:table-cell>
          <table:table-cell office:value-type="float" office:value="-252" table:formula="of:=[.F239]-[.H239]" table:style-name="ce15">
            <text:p>-252</text:p>
          </table:table-cell>
          <table:table-cell office:value-type="percentage" office:value="-3.6771884152294175E-2" table:formula="of:=([.I240]-[.I239])/[.I239]" table:style-name="ce16">
            <text:p>-4%</text:p>
          </table:table-cell>
          <table:table-cell office:value-type="string" office:string-value="Invalid" table:formula="of:=IF([.F239]&lt;=[.E239]; &quot;Valid&quot;; &quot;Invalid&quot;)" table:style-name="ce17">
            <text:p>Invalid</text:p>
          </table:table-cell>
          <table:table-cell office:value-type="string" office:string-value="Valid" table:formula="of:=IF([.H239]&lt;=[.G239]; &quot;Valid&quot;; &quot;Invalid&quot;)" table:style-name="ce17">
            <text:p>Valid</text:p>
          </table:table-cell>
          <table:table-cell office:value-type="string" office:string-value="Stable/Reducing" table:formula="of:=IF([.J239]&gt;0; &quot;Increasing Pressure&quot;; &quot;Stable/Reducing&quot;)" table:style-name="ce18">
            <text:p>Stable/Reducing</text:p>
          </table:table-cell>
          <table:table-cell office:value-type="float" office:value="3.597938144329897" table:formula="of:=IFERROR([.H239]/[.F239]; 0)" table:style-name="ce17">
            <text:p>3.597938144</text:p>
          </table:table-cell>
          <table:table-cell office:value-type="float" office:value="8429.1428571428569" table:formula="of:=AVERAGE([.I239:.I245])" table:style-name="ce15">
            <text:p>8429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1-11T00:00:00" table:style-name="ce14">
            <text:p>11-01-2024</text:p>
          </table:table-cell>
          <table:table-cell office:value-type="string" office:string-value="January" table:formula="of:=TEXT([.A240]; &quot;mmmm&quot;)" table:style-name="ce14">
            <text:p>January</text:p>
          </table:table-cell>
          <table:table-cell office:value-type="string" office:string-value="2024-01" table:formula="of:=TEXT([.A240]; &quot;yyyy-mm&quot;)" table:style-name="ce14">
            <text:p>2024-01</text:p>
          </table:table-cell>
          <table:table-cell office:value-type="float" office:value="29" table:style-name="ce9">
            <text:p>29</text:p>
          </table:table-cell>
          <table:table-cell office:value-type="float" office:value="51" table:style-name="ce9">
            <text:p>51</text:p>
          </table:table-cell>
          <table:table-cell office:value-type="float" office:value="11" table:style-name="ce9">
            <text:p>11</text:p>
          </table:table-cell>
          <table:table-cell office:value-type="float" office:value="8829" table:style-name="ce9">
            <text:p>8829</text:p>
          </table:table-cell>
          <table:table-cell office:value-type="float" office:value="476" table:style-name="ce9">
            <text:p>476</text:p>
          </table:table-cell>
          <table:table-cell office:value-type="float" office:value="8880" table:formula="of:=SUM([.G240]+[.E240])" table:style-name="ce15">
            <text:p>8880</text:p>
          </table:table-cell>
          <table:table-cell office:value-type="float" office:value="-465" table:formula="of:=[.F240]-[.H240]" table:style-name="ce15">
            <text:p>-465</text:p>
          </table:table-cell>
          <table:table-cell office:value-type="percentage" office:value="-8.9414414414414417E-2" table:formula="of:=([.I241]-[.I240])/[.I240]" table:style-name="ce16">
            <text:p>-9%</text:p>
          </table:table-cell>
          <table:table-cell office:value-type="string" office:string-value="Valid" table:formula="of:=IF([.F240]&lt;=[.E240]; &quot;Valid&quot;; &quot;Invalid&quot;)" table:style-name="ce17">
            <text:p>Valid</text:p>
          </table:table-cell>
          <table:table-cell office:value-type="string" office:string-value="Valid" table:formula="of:=IF([.H240]&lt;=[.G240]; &quot;Valid&quot;; &quot;Invalid&quot;)" table:style-name="ce17">
            <text:p>Valid</text:p>
          </table:table-cell>
          <table:table-cell office:value-type="string" office:string-value="Stable/Reducing" table:formula="of:=IF([.J240]&gt;0; &quot;Increasing Pressure&quot;; &quot;Stable/Reducing&quot;)" table:style-name="ce18">
            <text:p>Stable/Reducing</text:p>
          </table:table-cell>
          <table:table-cell office:value-type="float" office:value="43.272727272727273" table:formula="of:=IFERROR([.H240]/[.F240]; 0)" table:style-name="ce17">
            <text:p>43.27272727</text:p>
          </table:table-cell>
          <table:table-cell office:value-type="float" office:value="8291.2857142857138" table:formula="of:=AVERAGE([.I240:.I246])" table:style-name="ce15">
            <text:p>8291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1-15T00:00:00" table:style-name="ce14">
            <text:p>15-01-2024</text:p>
          </table:table-cell>
          <table:table-cell office:value-type="string" office:string-value="January" table:formula="of:=TEXT([.A241]; &quot;mmmm&quot;)" table:style-name="ce14">
            <text:p>January</text:p>
          </table:table-cell>
          <table:table-cell office:value-type="string" office:string-value="2024-01" table:formula="of:=TEXT([.A241]; &quot;yyyy-mm&quot;)" table:style-name="ce14">
            <text:p>2024-01</text:p>
          </table:table-cell>
          <table:table-cell office:value-type="float" office:value="33" table:style-name="ce9">
            <text:p>33</text:p>
          </table:table-cell>
          <table:table-cell office:value-type="float" office:value="53" table:style-name="ce9">
            <text:p>53</text:p>
          </table:table-cell>
          <table:table-cell office:value-type="float" office:value="34" table:style-name="ce9">
            <text:p>34</text:p>
          </table:table-cell>
          <table:table-cell office:value-type="float" office:value="8033" table:style-name="ce9">
            <text:p>8033</text:p>
          </table:table-cell>
          <table:table-cell office:value-type="float" office:value="234" table:style-name="ce9">
            <text:p>234</text:p>
          </table:table-cell>
          <table:table-cell office:value-type="float" office:value="8086" table:formula="of:=SUM([.G241]+[.E241])" table:style-name="ce15">
            <text:p>8086</text:p>
          </table:table-cell>
          <table:table-cell office:value-type="float" office:value="-200" table:formula="of:=[.F241]-[.H241]" table:style-name="ce15">
            <text:p>-200</text:p>
          </table:table-cell>
          <table:table-cell office:value-type="percentage" office:value="1.1872372000989364E-2" table:formula="of:=([.I242]-[.I241])/[.I241]" table:style-name="ce16">
            <text:p>1%</text:p>
          </table:table-cell>
          <table:table-cell office:value-type="string" office:string-value="Valid" table:formula="of:=IF([.F241]&lt;=[.E241]; &quot;Valid&quot;; &quot;Invalid&quot;)" table:style-name="ce17">
            <text:p>Valid</text:p>
          </table:table-cell>
          <table:table-cell office:value-type="string" office:string-value="Valid" table:formula="of:=IF([.H241]&lt;=[.G241]; &quot;Valid&quot;; &quot;Invalid&quot;)" table:style-name="ce17">
            <text:p>Valid</text:p>
          </table:table-cell>
          <table:table-cell office:value-type="string" office:string-value="Stable/Reducing" table:formula="of:=IF([.J241]&gt;0; &quot;Increasing Pressure&quot;; &quot;Stable/Reducing&quot;)" table:style-name="ce18">
            <text:p>Stable/Reducing</text:p>
          </table:table-cell>
          <table:table-cell office:value-type="float" office:value="6.882352941176471" table:formula="of:=IFERROR([.H241]/[.F241]; 0)" table:style-name="ce17">
            <text:p>6.882352941</text:p>
          </table:table-cell>
          <table:table-cell office:value-type="float" office:value="8217.1428571428569" table:formula="of:=AVERAGE([.I241:.I247])" table:style-name="ce15">
            <text:p>8217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1-16T00:00:00" table:style-name="ce14">
            <text:p>16-01-2024</text:p>
          </table:table-cell>
          <table:table-cell office:value-type="string" office:string-value="January" table:formula="of:=TEXT([.A242]; &quot;mmmm&quot;)" table:style-name="ce14">
            <text:p>January</text:p>
          </table:table-cell>
          <table:table-cell office:value-type="string" office:string-value="2024-01" table:formula="of:=TEXT([.A242]; &quot;yyyy-mm&quot;)" table:style-name="ce14">
            <text:p>2024-01</text:p>
          </table:table-cell>
          <table:table-cell office:value-type="float" office:value="32" table:style-name="ce9">
            <text:p>32</text:p>
          </table:table-cell>
          <table:table-cell office:value-type="float" office:value="49" table:style-name="ce9">
            <text:p>49</text:p>
          </table:table-cell>
          <table:table-cell office:value-type="float" office:value="39" table:style-name="ce9">
            <text:p>39</text:p>
          </table:table-cell>
          <table:table-cell office:value-type="float" office:value="8133" table:style-name="ce9">
            <text:p>8133</text:p>
          </table:table-cell>
          <table:table-cell office:value-type="float" office:value="188" table:style-name="ce9">
            <text:p>188</text:p>
          </table:table-cell>
          <table:table-cell office:value-type="float" office:value="8182" table:formula="of:=SUM([.G242]+[.E242])" table:style-name="ce15">
            <text:p>8182</text:p>
          </table:table-cell>
          <table:table-cell office:value-type="float" office:value="-149" table:formula="of:=[.F242]-[.H242]" table:style-name="ce15">
            <text:p>-149</text:p>
          </table:table-cell>
          <table:table-cell office:value-type="percentage" office:value="8.0664874113908578E-3" table:formula="of:=([.I243]-[.I242])/[.I242]" table:style-name="ce16">
            <text:p>1%</text:p>
          </table:table-cell>
          <table:table-cell office:value-type="string" office:string-value="Valid" table:formula="of:=IF([.F242]&lt;=[.E242]; &quot;Valid&quot;; &quot;Invalid&quot;)" table:style-name="ce17">
            <text:p>Valid</text:p>
          </table:table-cell>
          <table:table-cell office:value-type="string" office:string-value="Valid" table:formula="of:=IF([.H242]&lt;=[.G242]; &quot;Valid&quot;; &quot;Invalid&quot;)" table:style-name="ce17">
            <text:p>Valid</text:p>
          </table:table-cell>
          <table:table-cell office:value-type="string" office:string-value="Stable/Reducing" table:formula="of:=IF([.J242]&gt;0; &quot;Increasing Pressure&quot;; &quot;Stable/Reducing&quot;)" table:style-name="ce18">
            <text:p>Stable/Reducing</text:p>
          </table:table-cell>
          <table:table-cell office:value-type="float" office:value="4.8205128205128203" table:formula="of:=IFERROR([.H242]/[.F242]; 0)" table:style-name="ce17">
            <text:p>4.820512821</text:p>
          </table:table-cell>
          <table:table-cell office:value-type="float" office:value="8263.1428571428569" table:formula="of:=AVERAGE([.I242:.I248])" table:style-name="ce15">
            <text:p>8263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1-17T00:00:00" table:style-name="ce14">
            <text:p>17-01-2024</text:p>
          </table:table-cell>
          <table:table-cell office:value-type="string" office:string-value="January" table:formula="of:=TEXT([.A243]; &quot;mmmm&quot;)" table:style-name="ce14">
            <text:p>January</text:p>
          </table:table-cell>
          <table:table-cell office:value-type="string" office:string-value="2024-01" table:formula="of:=TEXT([.A243]; &quot;yyyy-mm&quot;)" table:style-name="ce14">
            <text:p>2024-01</text:p>
          </table:table-cell>
          <table:table-cell office:value-type="float" office:value="80" table:style-name="ce9">
            <text:p>80</text:p>
          </table:table-cell>
          <table:table-cell office:value-type="float" office:value="176" table:style-name="ce9">
            <text:p>176</text:p>
          </table:table-cell>
          <table:table-cell office:value-type="float" office:value="125" table:style-name="ce9">
            <text:p>125</text:p>
          </table:table-cell>
          <table:table-cell office:value-type="float" office:value="8072" table:style-name="ce9">
            <text:p>8072</text:p>
          </table:table-cell>
          <table:table-cell office:value-type="float" office:value="353" table:style-name="ce9">
            <text:p>353</text:p>
          </table:table-cell>
          <table:table-cell office:value-type="float" office:value="8248" table:formula="of:=SUM([.G243]+[.E243])" table:style-name="ce15">
            <text:p>8248</text:p>
          </table:table-cell>
          <table:table-cell office:value-type="float" office:value="-228" table:formula="of:=[.F243]-[.H243]" table:style-name="ce15">
            <text:p>-228</text:p>
          </table:table-cell>
          <table:table-cell office:value-type="percentage" office:value="-2.1823472356935015E-3" table:formula="of:=([.I244]-[.I243])/[.I243]" table:style-name="ce16">
            <text:p>0%</text:p>
          </table:table-cell>
          <table:table-cell office:value-type="string" office:string-value="Valid" table:formula="of:=IF([.F243]&lt;=[.E243]; &quot;Valid&quot;; &quot;Invalid&quot;)" table:style-name="ce17">
            <text:p>Valid</text:p>
          </table:table-cell>
          <table:table-cell office:value-type="string" office:string-value="Valid" table:formula="of:=IF([.H243]&lt;=[.G243]; &quot;Valid&quot;; &quot;Invalid&quot;)" table:style-name="ce17">
            <text:p>Valid</text:p>
          </table:table-cell>
          <table:table-cell office:value-type="string" office:string-value="Stable/Reducing" table:formula="of:=IF([.J243]&gt;0; &quot;Increasing Pressure&quot;; &quot;Stable/Reducing&quot;)" table:style-name="ce18">
            <text:p>Stable/Reducing</text:p>
          </table:table-cell>
          <table:table-cell office:value-type="float" office:value="2.8239999999999998" table:formula="of:=IFERROR([.H243]/[.F243]; 0)" table:style-name="ce17">
            <text:p>2.824</text:p>
          </table:table-cell>
          <table:table-cell office:value-type="float" office:value="8289.8571428571431" table:formula="of:=AVERAGE([.I243:.I249])" table:style-name="ce15">
            <text:p>8290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1-18T00:00:00" table:style-name="ce14">
            <text:p>18-01-2024</text:p>
          </table:table-cell>
          <table:table-cell office:value-type="string" office:string-value="January" table:formula="of:=TEXT([.A244]; &quot;mmmm&quot;)" table:style-name="ce14">
            <text:p>January</text:p>
          </table:table-cell>
          <table:table-cell office:value-type="string" office:string-value="2024-01" table:formula="of:=TEXT([.A244]; &quot;yyyy-mm&quot;)" table:style-name="ce14">
            <text:p>2024-01</text:p>
          </table:table-cell>
          <table:table-cell office:value-type="float" office:value="116" table:style-name="ce9">
            <text:p>116</text:p>
          </table:table-cell>
          <table:table-cell office:value-type="float" office:value="188" table:style-name="ce9">
            <text:p>188</text:p>
          </table:table-cell>
          <table:table-cell office:value-type="float" office:value="164" table:style-name="ce9">
            <text:p>164</text:p>
          </table:table-cell>
          <table:table-cell office:value-type="float" office:value="8042" table:style-name="ce9">
            <text:p>8042</text:p>
          </table:table-cell>
          <table:table-cell office:value-type="float" office:value="359" table:style-name="ce9">
            <text:p>359</text:p>
          </table:table-cell>
          <table:table-cell office:value-type="float" office:value="8230" table:formula="of:=SUM([.G244]+[.E244])" table:style-name="ce15">
            <text:p>8230</text:p>
          </table:table-cell>
          <table:table-cell office:value-type="float" office:value="-195" table:formula="of:=[.F244]-[.H244]" table:style-name="ce15">
            <text:p>-195</text:p>
          </table:table-cell>
          <table:table-cell office:value-type="percentage" office:value="-8.6269744835965976E-3" table:formula="of:=([.I245]-[.I244])/[.I244]" table:style-name="ce16">
            <text:p>-1%</text:p>
          </table:table-cell>
          <table:table-cell office:value-type="string" office:string-value="Valid" table:formula="of:=IF([.F244]&lt;=[.E244]; &quot;Valid&quot;; &quot;Invalid&quot;)" table:style-name="ce17">
            <text:p>Valid</text:p>
          </table:table-cell>
          <table:table-cell office:value-type="string" office:string-value="Valid" table:formula="of:=IF([.H244]&lt;=[.G244]; &quot;Valid&quot;; &quot;Invalid&quot;)" table:style-name="ce17">
            <text:p>Valid</text:p>
          </table:table-cell>
          <table:table-cell office:value-type="string" office:string-value="Stable/Reducing" table:formula="of:=IF([.J244]&gt;0; &quot;Increasing Pressure&quot;; &quot;Stable/Reducing&quot;)" table:style-name="ce18">
            <text:p>Stable/Reducing</text:p>
          </table:table-cell>
          <table:table-cell office:value-type="float" office:value="2.1890243902439024" table:formula="of:=IFERROR([.H244]/[.F244]; 0)" table:style-name="ce17">
            <text:p>2.18902439</text:p>
          </table:table-cell>
          <table:table-cell office:value-type="float" office:value="8291.7142857142862" table:formula="of:=AVERAGE([.I244:.I250])" table:style-name="ce15">
            <text:p>8292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1-21T00:00:00" table:style-name="ce14">
            <text:p>21-01-2024</text:p>
          </table:table-cell>
          <table:table-cell office:value-type="string" office:string-value="January" table:formula="of:=TEXT([.A245]; &quot;mmmm&quot;)" table:style-name="ce14">
            <text:p>January</text:p>
          </table:table-cell>
          <table:table-cell office:value-type="string" office:string-value="2024-01" table:formula="of:=TEXT([.A245]; &quot;yyyy-mm&quot;)" table:style-name="ce14">
            <text:p>2024-01</text:p>
          </table:table-cell>
          <table:table-cell office:value-type="float" office:value="105" table:style-name="ce9">
            <text:p>105</text:p>
          </table:table-cell>
          <table:table-cell office:value-type="float" office:value="185" table:style-name="ce9">
            <text:p>185</text:p>
          </table:table-cell>
          <table:table-cell office:value-type="float" office:value="158" table:style-name="ce9">
            <text:p>158</text:p>
          </table:table-cell>
          <table:table-cell office:value-type="float" office:value="7974" table:style-name="ce9">
            <text:p>7974</text:p>
          </table:table-cell>
          <table:table-cell office:value-type="float" office:value="371" table:style-name="ce9">
            <text:p>371</text:p>
          </table:table-cell>
          <table:table-cell office:value-type="float" office:value="8159" table:formula="of:=SUM([.G245]+[.E245])" table:style-name="ce15">
            <text:p>8159</text:p>
          </table:table-cell>
          <table:table-cell office:value-type="float" office:value="-213" table:formula="of:=[.F245]-[.H245]" table:style-name="ce15">
            <text:p>-213</text:p>
          </table:table-cell>
          <table:table-cell office:value-type="percentage" office:value="1.1643583772521142E-2" table:formula="of:=([.I246]-[.I245])/[.I245]" table:style-name="ce16">
            <text:p>1%</text:p>
          </table:table-cell>
          <table:table-cell office:value-type="string" office:string-value="Valid" table:formula="of:=IF([.F245]&lt;=[.E245]; &quot;Valid&quot;; &quot;Invalid&quot;)" table:style-name="ce17">
            <text:p>Valid</text:p>
          </table:table-cell>
          <table:table-cell office:value-type="string" office:string-value="Valid" table:formula="of:=IF([.H245]&lt;=[.G245]; &quot;Valid&quot;; &quot;Invalid&quot;)" table:style-name="ce17">
            <text:p>Valid</text:p>
          </table:table-cell>
          <table:table-cell office:value-type="string" office:string-value="Stable/Reducing" table:formula="of:=IF([.J245]&gt;0; &quot;Increasing Pressure&quot;; &quot;Stable/Reducing&quot;)" table:style-name="ce18">
            <text:p>Stable/Reducing</text:p>
          </table:table-cell>
          <table:table-cell office:value-type="float" office:value="2.3481012658227849" table:formula="of:=IFERROR([.H245]/[.F245]; 0)" table:style-name="ce17">
            <text:p>2.348101266</text:p>
          </table:table-cell>
          <table:table-cell office:value-type="float" office:value="8305.8571428571431" table:formula="of:=AVERAGE([.I245:.I251])" table:style-name="ce15">
            <text:p>8306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1-22T00:00:00" table:style-name="ce14">
            <text:p>22-01-2024</text:p>
          </table:table-cell>
          <table:table-cell office:value-type="string" office:string-value="January" table:formula="of:=TEXT([.A246]; &quot;mmmm&quot;)" table:style-name="ce14">
            <text:p>January</text:p>
          </table:table-cell>
          <table:table-cell office:value-type="string" office:string-value="2024-01" table:formula="of:=TEXT([.A246]; &quot;yyyy-mm&quot;)" table:style-name="ce14">
            <text:p>2024-01</text:p>
          </table:table-cell>
          <table:table-cell office:value-type="float" office:value="136" table:style-name="ce9">
            <text:p>136</text:p>
          </table:table-cell>
          <table:table-cell office:value-type="float" office:value="246" table:style-name="ce9">
            <text:p>246</text:p>
          </table:table-cell>
          <table:table-cell office:value-type="float" office:value="123" table:style-name="ce9">
            <text:p>123</text:p>
          </table:table-cell>
          <table:table-cell office:value-type="float" office:value="8008" table:style-name="ce9">
            <text:p>8008</text:p>
          </table:table-cell>
          <table:table-cell office:value-type="float" office:value="222" table:style-name="ce9">
            <text:p>222</text:p>
          </table:table-cell>
          <table:table-cell office:value-type="float" office:value="8254" table:formula="of:=SUM([.G246]+[.E246])" table:style-name="ce15">
            <text:p>8254</text:p>
          </table:table-cell>
          <table:table-cell office:value-type="float" office:value="-99" table:formula="of:=[.F246]-[.H246]" table:style-name="ce15">
            <text:p>-99</text:p>
          </table:table-cell>
          <table:table-cell office:value-type="percentage" office:value="1.2963411679185849E-2" table:formula="of:=([.I247]-[.I246])/[.I246]" table:style-name="ce16">
            <text:p>1%</text:p>
          </table:table-cell>
          <table:table-cell office:value-type="string" office:string-value="Valid" table:formula="of:=IF([.F246]&lt;=[.E246]; &quot;Valid&quot;; &quot;Invalid&quot;)" table:style-name="ce17">
            <text:p>Valid</text:p>
          </table:table-cell>
          <table:table-cell office:value-type="string" office:string-value="Valid" table:formula="of:=IF([.H246]&lt;=[.G246]; &quot;Valid&quot;; &quot;Invalid&quot;)" table:style-name="ce17">
            <text:p>Valid</text:p>
          </table:table-cell>
          <table:table-cell office:value-type="string" office:string-value="Stable/Reducing" table:formula="of:=IF([.J246]&gt;0; &quot;Increasing Pressure&quot;; &quot;Stable/Reducing&quot;)" table:style-name="ce18">
            <text:p>Stable/Reducing</text:p>
          </table:table-cell>
          <table:table-cell office:value-type="float" office:value="1.8048780487804879" table:formula="of:=IFERROR([.H246]/[.F246]; 0)" table:style-name="ce17">
            <text:p>1.804878049</text:p>
          </table:table-cell>
          <table:table-cell office:value-type="float" office:value="8337.4285714285706" table:formula="of:=AVERAGE([.I246:.I252])" table:style-name="ce15">
            <text:p>8337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1-23T00:00:00" table:style-name="ce14">
            <text:p>23-01-2024</text:p>
          </table:table-cell>
          <table:table-cell office:value-type="string" office:string-value="January" table:formula="of:=TEXT([.A247]; &quot;mmmm&quot;)" table:style-name="ce14">
            <text:p>January</text:p>
          </table:table-cell>
          <table:table-cell office:value-type="string" office:string-value="2024-01" table:formula="of:=TEXT([.A247]; &quot;yyyy-mm&quot;)" table:style-name="ce14">
            <text:p>2024-01</text:p>
          </table:table-cell>
          <table:table-cell office:value-type="float" office:value="128" table:style-name="ce9">
            <text:p>128</text:p>
          </table:table-cell>
          <table:table-cell office:value-type="float" office:value="228" table:style-name="ce9">
            <text:p>228</text:p>
          </table:table-cell>
          <table:table-cell office:value-type="float" office:value="177" table:style-name="ce9">
            <text:p>177</text:p>
          </table:table-cell>
          <table:table-cell office:value-type="float" office:value="8133" table:style-name="ce9">
            <text:p>8133</text:p>
          </table:table-cell>
          <table:table-cell office:value-type="float" office:value="202" table:style-name="ce9">
            <text:p>202</text:p>
          </table:table-cell>
          <table:table-cell office:value-type="float" office:value="8361" table:formula="of:=SUM([.G247]+[.E247])" table:style-name="ce15">
            <text:p>8361</text:p>
          </table:table-cell>
          <table:table-cell office:value-type="float" office:value="-25" table:formula="of:=[.F247]-[.H247]" table:style-name="ce15">
            <text:p>-25</text:p>
          </table:table-cell>
          <table:table-cell office:value-type="percentage" office:value="5.6213371606267191E-3" table:formula="of:=([.I248]-[.I247])/[.I247]" table:style-name="ce16">
            <text:p>1%</text:p>
          </table:table-cell>
          <table:table-cell office:value-type="string" office:string-value="Valid" table:formula="of:=IF([.F247]&lt;=[.E247]; &quot;Valid&quot;; &quot;Invalid&quot;)" table:style-name="ce17">
            <text:p>Valid</text:p>
          </table:table-cell>
          <table:table-cell office:value-type="string" office:string-value="Valid" table:formula="of:=IF([.H247]&lt;=[.G247]; &quot;Valid&quot;; &quot;Invalid&quot;)" table:style-name="ce17">
            <text:p>Valid</text:p>
          </table:table-cell>
          <table:table-cell office:value-type="string" office:string-value="Stable/Reducing" table:formula="of:=IF([.J247]&gt;0; &quot;Increasing Pressure&quot;; &quot;Stable/Reducing&quot;)" table:style-name="ce18">
            <text:p>Stable/Reducing</text:p>
          </table:table-cell>
          <table:table-cell office:value-type="float" office:value="1.1412429378531073" table:formula="of:=IFERROR([.H247]/[.F247]; 0)" table:style-name="ce17">
            <text:p>1.141242938</text:p>
          </table:table-cell>
          <table:table-cell office:value-type="float" office:value="8391.1428571428569" table:formula="of:=AVERAGE([.I247:.I253])" table:style-name="ce15">
            <text:p>8391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1-24T00:00:00" table:style-name="ce14">
            <text:p>24-01-2024</text:p>
          </table:table-cell>
          <table:table-cell office:value-type="string" office:string-value="January" table:formula="of:=TEXT([.A248]; &quot;mmmm&quot;)" table:style-name="ce14">
            <text:p>January</text:p>
          </table:table-cell>
          <table:table-cell office:value-type="string" office:string-value="2024-01" table:formula="of:=TEXT([.A248]; &quot;yyyy-mm&quot;)" table:style-name="ce14">
            <text:p>2024-01</text:p>
          </table:table-cell>
          <table:table-cell office:value-type="float" office:value="90" table:style-name="ce9">
            <text:p>90</text:p>
          </table:table-cell>
          <table:table-cell office:value-type="float" office:value="196" table:style-name="ce9">
            <text:p>196</text:p>
          </table:table-cell>
          <table:table-cell office:value-type="float" office:value="205" table:style-name="ce9">
            <text:p>205</text:p>
          </table:table-cell>
          <table:table-cell office:value-type="float" office:value="8212" table:style-name="ce9">
            <text:p>8212</text:p>
          </table:table-cell>
          <table:table-cell office:value-type="float" office:value="243" table:style-name="ce9">
            <text:p>243</text:p>
          </table:table-cell>
          <table:table-cell office:value-type="float" office:value="8408" table:formula="of:=SUM([.G248]+[.E248])" table:style-name="ce15">
            <text:p>8408</text:p>
          </table:table-cell>
          <table:table-cell office:value-type="float" office:value="-38" table:formula="of:=[.F248]-[.H248]" table:style-name="ce15">
            <text:p>-38</text:p>
          </table:table-cell>
          <table:table-cell office:value-type="percentage" office:value="-4.6384395813510943E-3" table:formula="of:=([.I249]-[.I248])/[.I248]" table:style-name="ce16">
            <text:p>0%</text:p>
          </table:table-cell>
          <table:table-cell office:value-type="string" office:string-value="Invalid" table:formula="of:=IF([.F248]&lt;=[.E248]; &quot;Valid&quot;; &quot;Invalid&quot;)" table:style-name="ce17">
            <text:p>Invalid</text:p>
          </table:table-cell>
          <table:table-cell office:value-type="string" office:string-value="Valid" table:formula="of:=IF([.H248]&lt;=[.G248]; &quot;Valid&quot;; &quot;Invalid&quot;)" table:style-name="ce17">
            <text:p>Valid</text:p>
          </table:table-cell>
          <table:table-cell office:value-type="string" office:string-value="Stable/Reducing" table:formula="of:=IF([.J248]&gt;0; &quot;Increasing Pressure&quot;; &quot;Stable/Reducing&quot;)" table:style-name="ce18">
            <text:p>Stable/Reducing</text:p>
          </table:table-cell>
          <table:table-cell office:value-type="float" office:value="1.1853658536585365" table:formula="of:=IFERROR([.H248]/[.F248]; 0)" table:style-name="ce17">
            <text:p>1.185365854</text:p>
          </table:table-cell>
          <table:table-cell office:value-type="float" office:value="8408.8571428571431" table:formula="of:=AVERAGE([.I248:.I254])" table:style-name="ce15">
            <text:p>8409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1-25T00:00:00" table:style-name="ce14">
            <text:p>25-01-2024</text:p>
          </table:table-cell>
          <table:table-cell office:value-type="string" office:string-value="January" table:formula="of:=TEXT([.A249]; &quot;mmmm&quot;)" table:style-name="ce14">
            <text:p>January</text:p>
          </table:table-cell>
          <table:table-cell office:value-type="string" office:string-value="2024-01" table:formula="of:=TEXT([.A249]; &quot;yyyy-mm&quot;)" table:style-name="ce14">
            <text:p>2024-01</text:p>
          </table:table-cell>
          <table:table-cell office:value-type="float" office:value="102" table:style-name="ce9">
            <text:p>102</text:p>
          </table:table-cell>
          <table:table-cell office:value-type="float" office:value="189" table:style-name="ce9">
            <text:p>189</text:p>
          </table:table-cell>
          <table:table-cell office:value-type="float" office:value="155" table:style-name="ce9">
            <text:p>155</text:p>
          </table:table-cell>
          <table:table-cell office:value-type="float" office:value="8180" table:style-name="ce9">
            <text:p>8180</text:p>
          </table:table-cell>
          <table:table-cell office:value-type="float" office:value="293" table:style-name="ce9">
            <text:p>293</text:p>
          </table:table-cell>
          <table:table-cell office:value-type="float" office:value="8369" table:formula="of:=SUM([.G249]+[.E249])" table:style-name="ce15">
            <text:p>8369</text:p>
          </table:table-cell>
          <table:table-cell office:value-type="float" office:value="-138" table:formula="of:=[.F249]-[.H249]" table:style-name="ce15">
            <text:p>-138</text:p>
          </table:table-cell>
          <table:table-cell office:value-type="percentage" office:value="-1.2904767594694706E-2" table:formula="of:=([.I250]-[.I249])/[.I249]" table:style-name="ce16">
            <text:p>-1%</text:p>
          </table:table-cell>
          <table:table-cell office:value-type="string" office:string-value="Valid" table:formula="of:=IF([.F249]&lt;=[.E249]; &quot;Valid&quot;; &quot;Invalid&quot;)" table:style-name="ce17">
            <text:p>Valid</text:p>
          </table:table-cell>
          <table:table-cell office:value-type="string" office:string-value="Valid" table:formula="of:=IF([.H249]&lt;=[.G249]; &quot;Valid&quot;; &quot;Invalid&quot;)" table:style-name="ce17">
            <text:p>Valid</text:p>
          </table:table-cell>
          <table:table-cell office:value-type="string" office:string-value="Stable/Reducing" table:formula="of:=IF([.J249]&gt;0; &quot;Increasing Pressure&quot;; &quot;Stable/Reducing&quot;)" table:style-name="ce18">
            <text:p>Stable/Reducing</text:p>
          </table:table-cell>
          <table:table-cell office:value-type="float" office:value="1.8903225806451613" table:formula="of:=IFERROR([.H249]/[.F249]; 0)" table:style-name="ce17">
            <text:p>1.890322581</text:p>
          </table:table-cell>
          <table:table-cell office:value-type="float" office:value="8399.7142857142862" table:formula="of:=AVERAGE([.I249:.I255])" table:style-name="ce15">
            <text:p>8400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1-28T00:00:00" table:style-name="ce14">
            <text:p>28-01-2024</text:p>
          </table:table-cell>
          <table:table-cell office:value-type="string" office:string-value="January" table:formula="of:=TEXT([.A250]; &quot;mmmm&quot;)" table:style-name="ce14">
            <text:p>January</text:p>
          </table:table-cell>
          <table:table-cell office:value-type="string" office:string-value="2024-01" table:formula="of:=TEXT([.A250]; &quot;yyyy-mm&quot;)" table:style-name="ce14">
            <text:p>2024-01</text:p>
          </table:table-cell>
          <table:table-cell office:value-type="float" office:value="120" table:style-name="ce9">
            <text:p>120</text:p>
          </table:table-cell>
          <table:table-cell office:value-type="float" office:value="257" table:style-name="ce9">
            <text:p>257</text:p>
          </table:table-cell>
          <table:table-cell office:value-type="float" office:value="126" table:style-name="ce9">
            <text:p>126</text:p>
          </table:table-cell>
          <table:table-cell office:value-type="float" office:value="8004" table:style-name="ce9">
            <text:p>8004</text:p>
          </table:table-cell>
          <table:table-cell office:value-type="float" office:value="307" table:style-name="ce9">
            <text:p>307</text:p>
          </table:table-cell>
          <table:table-cell office:value-type="float" office:value="8261" table:formula="of:=SUM([.G250]+[.E250])" table:style-name="ce15">
            <text:p>8261</text:p>
          </table:table-cell>
          <table:table-cell office:value-type="float" office:value="-181" table:formula="of:=[.F250]-[.H250]" table:style-name="ce15">
            <text:p>-181</text:p>
          </table:table-cell>
          <table:table-cell office:value-type="percentage" office:value="8.2314489771214139E-3" table:formula="of:=([.I251]-[.I250])/[.I250]" table:style-name="ce16">
            <text:p>1%</text:p>
          </table:table-cell>
          <table:table-cell office:value-type="string" office:string-value="Valid" table:formula="of:=IF([.F250]&lt;=[.E250]; &quot;Valid&quot;; &quot;Invalid&quot;)" table:style-name="ce17">
            <text:p>Valid</text:p>
          </table:table-cell>
          <table:table-cell office:value-type="string" office:string-value="Valid" table:formula="of:=IF([.H250]&lt;=[.G250]; &quot;Valid&quot;; &quot;Invalid&quot;)" table:style-name="ce17">
            <text:p>Valid</text:p>
          </table:table-cell>
          <table:table-cell office:value-type="string" office:string-value="Stable/Reducing" table:formula="of:=IF([.J250]&gt;0; &quot;Increasing Pressure&quot;; &quot;Stable/Reducing&quot;)" table:style-name="ce18">
            <text:p>Stable/Reducing</text:p>
          </table:table-cell>
          <table:table-cell office:value-type="float" office:value="2.4365079365079363" table:formula="of:=IFERROR([.H250]/[.F250]; 0)" table:style-name="ce17">
            <text:p>2.436507937</text:p>
          </table:table-cell>
          <table:table-cell office:value-type="float" office:value="8395.2857142857138" table:formula="of:=AVERAGE([.I250:.I256])" table:style-name="ce15">
            <text:p>8395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1-29T00:00:00" table:style-name="ce14">
            <text:p>29-01-2024</text:p>
          </table:table-cell>
          <table:table-cell office:value-type="string" office:string-value="January" table:formula="of:=TEXT([.A251]; &quot;mmmm&quot;)" table:style-name="ce14">
            <text:p>January</text:p>
          </table:table-cell>
          <table:table-cell office:value-type="string" office:string-value="2024-01" table:formula="of:=TEXT([.A251]; &quot;yyyy-mm&quot;)" table:style-name="ce14">
            <text:p>2024-01</text:p>
          </table:table-cell>
          <table:table-cell office:value-type="float" office:value="137" table:style-name="ce9">
            <text:p>137</text:p>
          </table:table-cell>
          <table:table-cell office:value-type="float" office:value="272" table:style-name="ce9">
            <text:p>272</text:p>
          </table:table-cell>
          <table:table-cell office:value-type="float" office:value="166" table:style-name="ce9">
            <text:p>166</text:p>
          </table:table-cell>
          <table:table-cell office:value-type="float" office:value="8057" table:style-name="ce9">
            <text:p>8057</text:p>
          </table:table-cell>
          <table:table-cell office:value-type="float" office:value="195" table:style-name="ce9">
            <text:p>195</text:p>
          </table:table-cell>
          <table:table-cell office:value-type="float" office:value="8329" table:formula="of:=SUM([.G251]+[.E251])" table:style-name="ce15">
            <text:p>8329</text:p>
          </table:table-cell>
          <table:table-cell office:value-type="float" office:value="-29" table:formula="of:=[.F251]-[.H251]" table:style-name="ce15">
            <text:p>-29</text:p>
          </table:table-cell>
          <table:table-cell office:value-type="percentage" office:value="6.123184055708969E-3" table:formula="of:=([.I252]-[.I251])/[.I251]" table:style-name="ce16">
            <text:p>1%</text:p>
          </table:table-cell>
          <table:table-cell office:value-type="string" office:string-value="Valid" table:formula="of:=IF([.F251]&lt;=[.E251]; &quot;Valid&quot;; &quot;Invalid&quot;)" table:style-name="ce17">
            <text:p>Valid</text:p>
          </table:table-cell>
          <table:table-cell office:value-type="string" office:string-value="Valid" table:formula="of:=IF([.H251]&lt;=[.G251]; &quot;Valid&quot;; &quot;Invalid&quot;)" table:style-name="ce17">
            <text:p>Valid</text:p>
          </table:table-cell>
          <table:table-cell office:value-type="string" office:string-value="Stable/Reducing" table:formula="of:=IF([.J251]&gt;0; &quot;Increasing Pressure&quot;; &quot;Stable/Reducing&quot;)" table:style-name="ce18">
            <text:p>Stable/Reducing</text:p>
          </table:table-cell>
          <table:table-cell office:value-type="float" office:value="1.1746987951807228" table:formula="of:=IFERROR([.H251]/[.F251]; 0)" table:style-name="ce17">
            <text:p>1.174698795</text:p>
          </table:table-cell>
          <table:table-cell office:value-type="float" office:value="8429.4285714285706" table:formula="of:=AVERAGE([.I251:.I257])" table:style-name="ce15">
            <text:p>8429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1-30T00:00:00" table:style-name="ce14">
            <text:p>30-01-2024</text:p>
          </table:table-cell>
          <table:table-cell office:value-type="string" office:string-value="January" table:formula="of:=TEXT([.A252]; &quot;mmmm&quot;)" table:style-name="ce14">
            <text:p>January</text:p>
          </table:table-cell>
          <table:table-cell office:value-type="string" office:string-value="2024-01" table:formula="of:=TEXT([.A252]; &quot;yyyy-mm&quot;)" table:style-name="ce14">
            <text:p>2024-01</text:p>
          </table:table-cell>
          <table:table-cell office:value-type="float" office:value="93" table:style-name="ce9">
            <text:p>93</text:p>
          </table:table-cell>
          <table:table-cell office:value-type="float" office:value="198" table:style-name="ce9">
            <text:p>198</text:p>
          </table:table-cell>
          <table:table-cell office:value-type="float" office:value="208" table:style-name="ce9">
            <text:p>208</text:p>
          </table:table-cell>
          <table:table-cell office:value-type="float" office:value="8182" table:style-name="ce9">
            <text:p>8182</text:p>
          </table:table-cell>
          <table:table-cell office:value-type="float" office:value="187" table:style-name="ce9">
            <text:p>187</text:p>
          </table:table-cell>
          <table:table-cell office:value-type="float" office:value="8380" table:formula="of:=SUM([.G252]+[.E252])" table:style-name="ce15">
            <text:p>8380</text:p>
          </table:table-cell>
          <table:table-cell office:value-type="float" office:value="21" table:formula="of:=[.F252]-[.H252]" table:style-name="ce15">
            <text:p>21</text:p>
          </table:table-cell>
          <table:table-cell office:value-type="percentage" office:value="2.9832935560859187E-2" table:formula="of:=([.I253]-[.I252])/[.I252]" table:style-name="ce16">
            <text:p>3%</text:p>
          </table:table-cell>
          <table:table-cell office:value-type="string" office:string-value="Invalid" table:formula="of:=IF([.F252]&lt;=[.E252]; &quot;Valid&quot;; &quot;Invalid&quot;)" table:style-name="ce17">
            <text:p>Invalid</text:p>
          </table:table-cell>
          <table:table-cell office:value-type="string" office:string-value="Valid" table:formula="of:=IF([.H252]&lt;=[.G252]; &quot;Valid&quot;; &quot;Invalid&quot;)" table:style-name="ce17">
            <text:p>Valid</text:p>
          </table:table-cell>
          <table:table-cell office:value-type="string" office:string-value="Increasing Pressure" table:formula="of:=IF([.J252]&gt;0; &quot;Increasing Pressure&quot;; &quot;Stable/Reducing&quot;)" table:style-name="ce18">
            <text:p>Increasing Pressure</text:p>
          </table:table-cell>
          <table:table-cell office:value-type="float" office:value="0.89903846153846156" table:formula="of:=IFERROR([.H252]/[.F252]; 0)" table:style-name="ce17">
            <text:p>0.899038462</text:p>
          </table:table-cell>
          <table:table-cell office:value-type="float" office:value="8470" table:formula="of:=AVERAGE([.I252:.I258])" table:style-name="ce15">
            <text:p>8470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1-31T00:00:00" table:style-name="ce14">
            <text:p>31-01-2024</text:p>
          </table:table-cell>
          <table:table-cell office:value-type="string" office:string-value="January" table:formula="of:=TEXT([.A253]; &quot;mmmm&quot;)" table:style-name="ce14">
            <text:p>January</text:p>
          </table:table-cell>
          <table:table-cell office:value-type="string" office:string-value="2024-01" table:formula="of:=TEXT([.A253]; &quot;yyyy-mm&quot;)" table:style-name="ce14">
            <text:p>2024-01</text:p>
          </table:table-cell>
          <table:table-cell office:value-type="float" office:value="203" table:style-name="ce9">
            <text:p>203</text:p>
          </table:table-cell>
          <table:table-cell office:value-type="float" office:value="477" table:style-name="ce9">
            <text:p>477</text:p>
          </table:table-cell>
          <table:table-cell office:value-type="float" office:value="258" table:style-name="ce9">
            <text:p>258</text:p>
          </table:table-cell>
          <table:table-cell office:value-type="float" office:value="8153" table:style-name="ce9">
            <text:p>8153</text:p>
          </table:table-cell>
          <table:table-cell office:value-type="float" office:value="266" table:style-name="ce9">
            <text:p>266</text:p>
          </table:table-cell>
          <table:table-cell office:value-type="float" office:value="8630" table:formula="of:=SUM([.G253]+[.E253])" table:style-name="ce15">
            <text:p>8630</text:p>
          </table:table-cell>
          <table:table-cell office:value-type="float" office:value="-8" table:formula="of:=[.F253]-[.H253]" table:style-name="ce15">
            <text:p>-8</text:p>
          </table:table-cell>
          <table:table-cell office:value-type="percentage" office:value="-1.6801853997682505E-2" table:formula="of:=([.I254]-[.I253])/[.I253]" table:style-name="ce16">
            <text:p>-2%</text:p>
          </table:table-cell>
          <table:table-cell office:value-type="string" office:string-value="Valid" table:formula="of:=IF([.F253]&lt;=[.E253]; &quot;Valid&quot;; &quot;Invalid&quot;)" table:style-name="ce17">
            <text:p>Valid</text:p>
          </table:table-cell>
          <table:table-cell office:value-type="string" office:string-value="Valid" table:formula="of:=IF([.H253]&lt;=[.G253]; &quot;Valid&quot;; &quot;Invalid&quot;)" table:style-name="ce17">
            <text:p>Valid</text:p>
          </table:table-cell>
          <table:table-cell office:value-type="string" office:string-value="Stable/Reducing" table:formula="of:=IF([.J253]&gt;0; &quot;Increasing Pressure&quot;; &quot;Stable/Reducing&quot;)" table:style-name="ce18">
            <text:p>Stable/Reducing</text:p>
          </table:table-cell>
          <table:table-cell office:value-type="float" office:value="1.0310077519379846" table:formula="of:=IFERROR([.H253]/[.F253]; 0)" table:style-name="ce17">
            <text:p>1.031007752</text:p>
          </table:table-cell>
          <table:table-cell office:value-type="float" office:value="8513.8571428571431" table:formula="of:=AVERAGE([.I253:.I259])" table:style-name="ce15">
            <text:p>8514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2-01T00:00:00" table:style-name="ce14">
            <text:p>01-02-2024</text:p>
          </table:table-cell>
          <table:table-cell office:value-type="string" office:string-value="February" table:formula="of:=TEXT([.A254]; &quot;mmmm&quot;)" table:style-name="ce14">
            <text:p>February</text:p>
          </table:table-cell>
          <table:table-cell office:value-type="string" office:string-value="2024-02" table:formula="of:=TEXT([.A254]; &quot;yyyy-mm&quot;)" table:style-name="ce14">
            <text:p>2024-02</text:p>
          </table:table-cell>
          <table:table-cell office:value-type="float" office:value="222" table:style-name="ce9">
            <text:p>222</text:p>
          </table:table-cell>
          <table:table-cell office:value-type="float" office:value="459" table:style-name="ce9">
            <text:p>459</text:p>
          </table:table-cell>
          <table:table-cell office:value-type="float" office:value="289" table:style-name="ce9">
            <text:p>289</text:p>
          </table:table-cell>
          <table:table-cell office:value-type="float" office:value="8026" table:style-name="ce9">
            <text:p>8026</text:p>
          </table:table-cell>
          <table:table-cell office:value-type="float" office:value="337" table:style-name="ce9">
            <text:p>337</text:p>
          </table:table-cell>
          <table:table-cell office:value-type="float" office:value="8485" table:formula="of:=SUM([.G254]+[.E254])" table:style-name="ce15">
            <text:p>8485</text:p>
          </table:table-cell>
          <table:table-cell office:value-type="float" office:value="-48" table:formula="of:=[.F254]-[.H254]" table:style-name="ce15">
            <text:p>-48</text:p>
          </table:table-cell>
          <table:table-cell office:value-type="percentage" office:value="-1.6617560400707131E-2" table:formula="of:=([.I255]-[.I254])/[.I254]" table:style-name="ce16">
            <text:p>-2%</text:p>
          </table:table-cell>
          <table:table-cell office:value-type="string" office:string-value="Valid" table:formula="of:=IF([.F254]&lt;=[.E254]; &quot;Valid&quot;; &quot;Invalid&quot;)" table:style-name="ce17">
            <text:p>Valid</text:p>
          </table:table-cell>
          <table:table-cell office:value-type="string" office:string-value="Valid" table:formula="of:=IF([.H254]&lt;=[.G254]; &quot;Valid&quot;; &quot;Invalid&quot;)" table:style-name="ce17">
            <text:p>Valid</text:p>
          </table:table-cell>
          <table:table-cell office:value-type="string" office:string-value="Stable/Reducing" table:formula="of:=IF([.J254]&gt;0; &quot;Increasing Pressure&quot;; &quot;Stable/Reducing&quot;)" table:style-name="ce18">
            <text:p>Stable/Reducing</text:p>
          </table:table-cell>
          <table:table-cell office:value-type="float" office:value="1.166089965397924" table:formula="of:=IFERROR([.H254]/[.F254]; 0)" table:style-name="ce17">
            <text:p>1.166089965</text:p>
          </table:table-cell>
          <table:table-cell office:value-type="float" office:value="8505.4285714285706" table:formula="of:=AVERAGE([.I254:.I260])" table:style-name="ce15">
            <text:p>8505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2-04T00:00:00" table:style-name="ce14">
            <text:p>04-02-2024</text:p>
          </table:table-cell>
          <table:table-cell office:value-type="string" office:string-value="February" table:formula="of:=TEXT([.A255]; &quot;mmmm&quot;)" table:style-name="ce14">
            <text:p>February</text:p>
          </table:table-cell>
          <table:table-cell office:value-type="string" office:string-value="2024-02" table:formula="of:=TEXT([.A255]; &quot;yyyy-mm&quot;)" table:style-name="ce14">
            <text:p>2024-02</text:p>
          </table:table-cell>
          <table:table-cell office:value-type="float" office:value="253" table:style-name="ce9">
            <text:p>253</text:p>
          </table:table-cell>
          <table:table-cell office:value-type="float" office:value="531" table:style-name="ce9">
            <text:p>531</text:p>
          </table:table-cell>
          <table:table-cell office:value-type="float" office:value="248" table:style-name="ce9">
            <text:p>248</text:p>
          </table:table-cell>
          <table:table-cell office:value-type="float" office:value="7813" table:style-name="ce9">
            <text:p>7813</text:p>
          </table:table-cell>
          <table:table-cell office:value-type="float" office:value="342" table:style-name="ce9">
            <text:p>342</text:p>
          </table:table-cell>
          <table:table-cell office:value-type="float" office:value="8344" table:formula="of:=SUM([.G255]+[.E255])" table:style-name="ce15">
            <text:p>8344</text:p>
          </table:table-cell>
          <table:table-cell office:value-type="float" office:value="-94" table:formula="of:=[.F255]-[.H255]" table:style-name="ce15">
            <text:p>-94</text:p>
          </table:table-cell>
          <table:table-cell office:value-type="percentage" office:value="-7.1907957813998084E-4" table:formula="of:=([.I256]-[.I255])/[.I255]" table:style-name="ce16">
            <text:p>0%</text:p>
          </table:table-cell>
          <table:table-cell office:value-type="string" office:string-value="Valid" table:formula="of:=IF([.F255]&lt;=[.E255]; &quot;Valid&quot;; &quot;Invalid&quot;)" table:style-name="ce17">
            <text:p>Valid</text:p>
          </table:table-cell>
          <table:table-cell office:value-type="string" office:string-value="Valid" table:formula="of:=IF([.H255]&lt;=[.G255]; &quot;Valid&quot;; &quot;Invalid&quot;)" table:style-name="ce17">
            <text:p>Valid</text:p>
          </table:table-cell>
          <table:table-cell office:value-type="string" office:string-value="Stable/Reducing" table:formula="of:=IF([.J255]&gt;0; &quot;Increasing Pressure&quot;; &quot;Stable/Reducing&quot;)" table:style-name="ce18">
            <text:p>Stable/Reducing</text:p>
          </table:table-cell>
          <table:table-cell office:value-type="float" office:value="1.3790322580645162" table:formula="of:=IFERROR([.H255]/[.F255]; 0)" table:style-name="ce17">
            <text:p>1.379032258</text:p>
          </table:table-cell>
          <table:table-cell office:value-type="float" office:value="8510.7142857142862" table:formula="of:=AVERAGE([.I255:.I261])" table:style-name="ce15">
            <text:p>8511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2-05T00:00:00" table:style-name="ce14">
            <text:p>05-02-2024</text:p>
          </table:table-cell>
          <table:table-cell office:value-type="string" office:string-value="February" table:formula="of:=TEXT([.A256]; &quot;mmmm&quot;)" table:style-name="ce14">
            <text:p>February</text:p>
          </table:table-cell>
          <table:table-cell office:value-type="string" office:string-value="2024-02" table:formula="of:=TEXT([.A256]; &quot;yyyy-mm&quot;)" table:style-name="ce14">
            <text:p>2024-02</text:p>
          </table:table-cell>
          <table:table-cell office:value-type="float" office:value="157" table:style-name="ce9">
            <text:p>157</text:p>
          </table:table-cell>
          <table:table-cell office:value-type="float" office:value="466" table:style-name="ce9">
            <text:p>466</text:p>
          </table:table-cell>
          <table:table-cell office:value-type="float" office:value="345" table:style-name="ce9">
            <text:p>345</text:p>
          </table:table-cell>
          <table:table-cell office:value-type="float" office:value="7872" table:style-name="ce9">
            <text:p>7872</text:p>
          </table:table-cell>
          <table:table-cell office:value-type="float" office:value="242" table:style-name="ce9">
            <text:p>242</text:p>
          </table:table-cell>
          <table:table-cell office:value-type="float" office:value="8338" table:formula="of:=SUM([.G256]+[.E256])" table:style-name="ce15">
            <text:p>8338</text:p>
          </table:table-cell>
          <table:table-cell office:value-type="float" office:value="103" table:formula="of:=[.F256]-[.H256]" table:style-name="ce15">
            <text:p>103</text:p>
          </table:table-cell>
          <table:table-cell office:value-type="percentage" office:value="1.9429119692971935E-2" table:formula="of:=([.I257]-[.I256])/[.I256]" table:style-name="ce16">
            <text:p>2%</text:p>
          </table:table-cell>
          <table:table-cell office:value-type="string" office:string-value="Valid" table:formula="of:=IF([.F256]&lt;=[.E256]; &quot;Valid&quot;; &quot;Invalid&quot;)" table:style-name="ce17">
            <text:p>Valid</text:p>
          </table:table-cell>
          <table:table-cell office:value-type="string" office:string-value="Valid" table:formula="of:=IF([.H256]&lt;=[.G256]; &quot;Valid&quot;; &quot;Invalid&quot;)" table:style-name="ce17">
            <text:p>Valid</text:p>
          </table:table-cell>
          <table:table-cell office:value-type="string" office:string-value="Increasing Pressure" table:formula="of:=IF([.J256]&gt;0; &quot;Increasing Pressure&quot;; &quot;Stable/Reducing&quot;)" table:style-name="ce18">
            <text:p>Increasing Pressure</text:p>
          </table:table-cell>
          <table:table-cell office:value-type="float" office:value="0.70144927536231882" table:formula="of:=IFERROR([.H256]/[.F256]; 0)" table:style-name="ce17">
            <text:p>0.701449275</text:p>
          </table:table-cell>
          <table:table-cell office:value-type="float" office:value="8564" table:formula="of:=AVERAGE([.I256:.I262])" table:style-name="ce15">
            <text:p>8564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2-06T00:00:00" table:style-name="ce14">
            <text:p>06-02-2024</text:p>
          </table:table-cell>
          <table:table-cell office:value-type="string" office:string-value="February" table:formula="of:=TEXT([.A257]; &quot;mmmm&quot;)" table:style-name="ce14">
            <text:p>February</text:p>
          </table:table-cell>
          <table:table-cell office:value-type="string" office:string-value="2024-02" table:formula="of:=TEXT([.A257]; &quot;yyyy-mm&quot;)" table:style-name="ce14">
            <text:p>2024-02</text:p>
          </table:table-cell>
          <table:table-cell office:value-type="float" office:value="291" table:style-name="ce9">
            <text:p>291</text:p>
          </table:table-cell>
          <table:table-cell office:value-type="float" office:value="455" table:style-name="ce9">
            <text:p>455</text:p>
          </table:table-cell>
          <table:table-cell office:value-type="float" office:value="323" table:style-name="ce9">
            <text:p>323</text:p>
          </table:table-cell>
          <table:table-cell office:value-type="float" office:value="8045" table:style-name="ce9">
            <text:p>8045</text:p>
          </table:table-cell>
          <table:table-cell office:value-type="float" office:value="178" table:style-name="ce9">
            <text:p>178</text:p>
          </table:table-cell>
          <table:table-cell office:value-type="float" office:value="8500" table:formula="of:=SUM([.G257]+[.E257])" table:style-name="ce15">
            <text:p>8500</text:p>
          </table:table-cell>
          <table:table-cell office:value-type="float" office:value="145" table:formula="of:=[.F257]-[.H257]" table:style-name="ce15">
            <text:p>145</text:p>
          </table:table-cell>
          <table:table-cell office:value-type="percentage" office:value="1.3294117647058824E-2" table:formula="of:=([.I258]-[.I257])/[.I257]" table:style-name="ce16">
            <text:p>1%</text:p>
          </table:table-cell>
          <table:table-cell office:value-type="string" office:string-value="Valid" table:formula="of:=IF([.F257]&lt;=[.E257]; &quot;Valid&quot;; &quot;Invalid&quot;)" table:style-name="ce17">
            <text:p>Valid</text:p>
          </table:table-cell>
          <table:table-cell office:value-type="string" office:string-value="Valid" table:formula="of:=IF([.H257]&lt;=[.G257]; &quot;Valid&quot;; &quot;Invalid&quot;)" table:style-name="ce17">
            <text:p>Valid</text:p>
          </table:table-cell>
          <table:table-cell office:value-type="string" office:string-value="Increasing Pressure" table:formula="of:=IF([.J257]&gt;0; &quot;Increasing Pressure&quot;; &quot;Stable/Reducing&quot;)" table:style-name="ce18">
            <text:p>Increasing Pressure</text:p>
          </table:table-cell>
          <table:table-cell office:value-type="float" office:value="0.55108359133126938" table:formula="of:=IFERROR([.H257]/[.F257]; 0)" table:style-name="ce17">
            <text:p>0.551083591</text:p>
          </table:table-cell>
          <table:table-cell office:value-type="float" office:value="8634.8571428571431" table:formula="of:=AVERAGE([.I257:.I263])" table:style-name="ce15">
            <text:p>8635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2-07T00:00:00" table:style-name="ce14">
            <text:p>07-02-2024</text:p>
          </table:table-cell>
          <table:table-cell office:value-type="string" office:string-value="February" table:formula="of:=TEXT([.A258]; &quot;mmmm&quot;)" table:style-name="ce14">
            <text:p>February</text:p>
          </table:table-cell>
          <table:table-cell office:value-type="string" office:string-value="2024-02" table:formula="of:=TEXT([.A258]; &quot;yyyy-mm&quot;)" table:style-name="ce14">
            <text:p>2024-02</text:p>
          </table:table-cell>
          <table:table-cell office:value-type="float" office:value="227" table:style-name="ce9">
            <text:p>227</text:p>
          </table:table-cell>
          <table:table-cell office:value-type="float" office:value="453" table:style-name="ce9">
            <text:p>453</text:p>
          </table:table-cell>
          <table:table-cell office:value-type="float" office:value="330" table:style-name="ce9">
            <text:p>330</text:p>
          </table:table-cell>
          <table:table-cell office:value-type="float" office:value="8160" table:style-name="ce9">
            <text:p>8160</text:p>
          </table:table-cell>
          <table:table-cell office:value-type="float" office:value="222" table:style-name="ce9">
            <text:p>222</text:p>
          </table:table-cell>
          <table:table-cell office:value-type="float" office:value="8613" table:formula="of:=SUM([.G258]+[.E258])" table:style-name="ce15">
            <text:p>8613</text:p>
          </table:table-cell>
          <table:table-cell office:value-type="float" office:value="108" table:formula="of:=[.F258]-[.H258]" table:style-name="ce15">
            <text:p>108</text:p>
          </table:table-cell>
          <table:table-cell office:value-type="percentage" office:value="8.5916637640775576E-3" table:formula="of:=([.I259]-[.I258])/[.I258]" table:style-name="ce16">
            <text:p>1%</text:p>
          </table:table-cell>
          <table:table-cell office:value-type="string" office:string-value="Valid" table:formula="of:=IF([.F258]&lt;=[.E258]; &quot;Valid&quot;; &quot;Invalid&quot;)" table:style-name="ce17">
            <text:p>Valid</text:p>
          </table:table-cell>
          <table:table-cell office:value-type="string" office:string-value="Valid" table:formula="of:=IF([.H258]&lt;=[.G258]; &quot;Valid&quot;; &quot;Invalid&quot;)" table:style-name="ce17">
            <text:p>Valid</text:p>
          </table:table-cell>
          <table:table-cell office:value-type="string" office:string-value="Increasing Pressure" table:formula="of:=IF([.J258]&gt;0; &quot;Increasing Pressure&quot;; &quot;Stable/Reducing&quot;)" table:style-name="ce18">
            <text:p>Increasing Pressure</text:p>
          </table:table-cell>
          <table:table-cell office:value-type="float" office:value="0.67272727272727273" table:formula="of:=IFERROR([.H258]/[.F258]; 0)" table:style-name="ce17">
            <text:p>0.672727273</text:p>
          </table:table-cell>
          <table:table-cell office:value-type="float" office:value="8702.1428571428569" table:formula="of:=AVERAGE([.I258:.I264])" table:style-name="ce15">
            <text:p>8702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2-08T00:00:00" table:style-name="ce14">
            <text:p>08-02-2024</text:p>
          </table:table-cell>
          <table:table-cell office:value-type="string" office:string-value="February" table:formula="of:=TEXT([.A259]; &quot;mmmm&quot;)" table:style-name="ce14">
            <text:p>February</text:p>
          </table:table-cell>
          <table:table-cell office:value-type="string" office:string-value="2024-02" table:formula="of:=TEXT([.A259]; &quot;yyyy-mm&quot;)" table:style-name="ce14">
            <text:p>2024-02</text:p>
          </table:table-cell>
          <table:table-cell office:value-type="float" office:value="298" table:style-name="ce9">
            <text:p>298</text:p>
          </table:table-cell>
          <table:table-cell office:value-type="float" office:value="499" table:style-name="ce9">
            <text:p>499</text:p>
          </table:table-cell>
          <table:table-cell office:value-type="float" office:value="358" table:style-name="ce9">
            <text:p>358</text:p>
          </table:table-cell>
          <table:table-cell office:value-type="float" office:value="8188" table:style-name="ce9">
            <text:p>8188</text:p>
          </table:table-cell>
          <table:table-cell office:value-type="float" office:value="315" table:style-name="ce9">
            <text:p>315</text:p>
          </table:table-cell>
          <table:table-cell office:value-type="float" office:value="8687" table:formula="of:=SUM([.G259]+[.E259])" table:style-name="ce15">
            <text:p>8687</text:p>
          </table:table-cell>
          <table:table-cell office:value-type="float" office:value="43" table:formula="of:=[.F259]-[.H259]" table:style-name="ce15">
            <text:p>43</text:p>
          </table:table-cell>
          <table:table-cell office:value-type="percentage" office:value="-1.3353286520087488E-2" table:formula="of:=([.I260]-[.I259])/[.I259]" table:style-name="ce16">
            <text:p>-1%</text:p>
          </table:table-cell>
          <table:table-cell office:value-type="string" office:string-value="Valid" table:formula="of:=IF([.F259]&lt;=[.E259]; &quot;Valid&quot;; &quot;Invalid&quot;)" table:style-name="ce17">
            <text:p>Valid</text:p>
          </table:table-cell>
          <table:table-cell office:value-type="string" office:string-value="Valid" table:formula="of:=IF([.H259]&lt;=[.G259]; &quot;Valid&quot;; &quot;Invalid&quot;)" table:style-name="ce17">
            <text:p>Valid</text:p>
          </table:table-cell>
          <table:table-cell office:value-type="string" office:string-value="Increasing Pressure" table:formula="of:=IF([.J259]&gt;0; &quot;Increasing Pressure&quot;; &quot;Stable/Reducing&quot;)" table:style-name="ce18">
            <text:p>Increasing Pressure</text:p>
          </table:table-cell>
          <table:table-cell office:value-type="float" office:value="0.87988826815642462" table:formula="of:=IFERROR([.H259]/[.F259]; 0)" table:style-name="ce17">
            <text:p>0.879888268</text:p>
          </table:table-cell>
          <table:table-cell office:value-type="float" office:value="8728.8571428571431" table:formula="of:=AVERAGE([.I259:.I265])" table:style-name="ce15">
            <text:p>8729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2-11T00:00:00" table:style-name="ce14">
            <text:p>11-02-2024</text:p>
          </table:table-cell>
          <table:table-cell office:value-type="string" office:string-value="February" table:formula="of:=TEXT([.A260]; &quot;mmmm&quot;)" table:style-name="ce14">
            <text:p>February</text:p>
          </table:table-cell>
          <table:table-cell office:value-type="string" office:string-value="2024-02" table:formula="of:=TEXT([.A260]; &quot;yyyy-mm&quot;)" table:style-name="ce14">
            <text:p>2024-02</text:p>
          </table:table-cell>
          <table:table-cell office:value-type="float" office:value="205" table:style-name="ce9">
            <text:p>205</text:p>
          </table:table-cell>
          <table:table-cell office:value-type="float" office:value="515" table:style-name="ce9">
            <text:p>515</text:p>
          </table:table-cell>
          <table:table-cell office:value-type="float" office:value="226" table:style-name="ce9">
            <text:p>226</text:p>
          </table:table-cell>
          <table:table-cell office:value-type="float" office:value="8056" table:style-name="ce9">
            <text:p>8056</text:p>
          </table:table-cell>
          <table:table-cell office:value-type="float" office:value="347" table:style-name="ce9">
            <text:p>347</text:p>
          </table:table-cell>
          <table:table-cell office:value-type="float" office:value="8571" table:formula="of:=SUM([.G260]+[.E260])" table:style-name="ce15">
            <text:p>8571</text:p>
          </table:table-cell>
          <table:table-cell office:value-type="float" office:value="-121" table:formula="of:=[.F260]-[.H260]" table:style-name="ce15">
            <text:p>-121</text:p>
          </table:table-cell>
          <table:table-cell office:value-type="percentage" office:value="-5.7169525142923812E-3" table:formula="of:=([.I261]-[.I260])/[.I260]" table:style-name="ce16">
            <text:p>-1%</text:p>
          </table:table-cell>
          <table:table-cell office:value-type="string" office:string-value="Valid" table:formula="of:=IF([.F260]&lt;=[.E260]; &quot;Valid&quot;; &quot;Invalid&quot;)" table:style-name="ce17">
            <text:p>Valid</text:p>
          </table:table-cell>
          <table:table-cell office:value-type="string" office:string-value="Valid" table:formula="of:=IF([.H260]&lt;=[.G260]; &quot;Valid&quot;; &quot;Invalid&quot;)" table:style-name="ce17">
            <text:p>Valid</text:p>
          </table:table-cell>
          <table:table-cell office:value-type="string" office:string-value="Stable/Reducing" table:formula="of:=IF([.J260]&gt;0; &quot;Increasing Pressure&quot;; &quot;Stable/Reducing&quot;)" table:style-name="ce18">
            <text:p>Stable/Reducing</text:p>
          </table:table-cell>
          <table:table-cell office:value-type="float" office:value="1.5353982300884956" table:formula="of:=IFERROR([.H260]/[.F260]; 0)" table:style-name="ce17">
            <text:p>1.53539823</text:p>
          </table:table-cell>
          <table:table-cell office:value-type="float" office:value="8756.8571428571431" table:formula="of:=AVERAGE([.I260:.I266])" table:style-name="ce15">
            <text:p>8757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2-12T00:00:00" table:style-name="ce14">
            <text:p>12-02-2024</text:p>
          </table:table-cell>
          <table:table-cell office:value-type="string" office:string-value="February" table:formula="of:=TEXT([.A261]; &quot;mmmm&quot;)" table:style-name="ce14">
            <text:p>February</text:p>
          </table:table-cell>
          <table:table-cell office:value-type="string" office:string-value="2024-02" table:formula="of:=TEXT([.A261]; &quot;yyyy-mm&quot;)" table:style-name="ce14">
            <text:p>2024-02</text:p>
          </table:table-cell>
          <table:table-cell office:value-type="float" office:value="213" table:style-name="ce9">
            <text:p>213</text:p>
          </table:table-cell>
          <table:table-cell office:value-type="float" office:value="430" table:style-name="ce9">
            <text:p>430</text:p>
          </table:table-cell>
          <table:table-cell office:value-type="float" office:value="440" table:style-name="ce9">
            <text:p>440</text:p>
          </table:table-cell>
          <table:table-cell office:value-type="float" office:value="8092" table:style-name="ce9">
            <text:p>8092</text:p>
          </table:table-cell>
          <table:table-cell office:value-type="float" office:value="234" table:style-name="ce9">
            <text:p>234</text:p>
          </table:table-cell>
          <table:table-cell office:value-type="float" office:value="8522" table:formula="of:=SUM([.G261]+[.E261])" table:style-name="ce15">
            <text:p>8522</text:p>
          </table:table-cell>
          <table:table-cell office:value-type="float" office:value="206" table:formula="of:=[.F261]-[.H261]" table:style-name="ce15">
            <text:p>206</text:p>
          </table:table-cell>
          <table:table-cell office:value-type="percentage" office:value="2.2881952593287961E-2" table:formula="of:=([.I262]-[.I261])/[.I261]" table:style-name="ce16">
            <text:p>2%</text:p>
          </table:table-cell>
          <table:table-cell office:value-type="string" office:string-value="Invalid" table:formula="of:=IF([.F261]&lt;=[.E261]; &quot;Valid&quot;; &quot;Invalid&quot;)" table:style-name="ce17">
            <text:p>Invalid</text:p>
          </table:table-cell>
          <table:table-cell office:value-type="string" office:string-value="Valid" table:formula="of:=IF([.H261]&lt;=[.G261]; &quot;Valid&quot;; &quot;Invalid&quot;)" table:style-name="ce17">
            <text:p>Valid</text:p>
          </table:table-cell>
          <table:table-cell office:value-type="string" office:string-value="Increasing Pressure" table:formula="of:=IF([.J261]&gt;0; &quot;Increasing Pressure&quot;; &quot;Stable/Reducing&quot;)" table:style-name="ce18">
            <text:p>Increasing Pressure</text:p>
          </table:table-cell>
          <table:table-cell office:value-type="float" office:value="0.53181818181818186" table:formula="of:=IFERROR([.H261]/[.F261]; 0)" table:style-name="ce17">
            <text:p>0.531818182</text:p>
          </table:table-cell>
          <table:table-cell office:value-type="float" office:value="8818.5714285714294" table:formula="of:=AVERAGE([.I261:.I267])" table:style-name="ce15">
            <text:p>8819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2-13T00:00:00" table:style-name="ce14">
            <text:p>13-02-2024</text:p>
          </table:table-cell>
          <table:table-cell office:value-type="string" office:string-value="February" table:formula="of:=TEXT([.A262]; &quot;mmmm&quot;)" table:style-name="ce14">
            <text:p>February</text:p>
          </table:table-cell>
          <table:table-cell office:value-type="string" office:string-value="2024-02" table:formula="of:=TEXT([.A262]; &quot;yyyy-mm&quot;)" table:style-name="ce14">
            <text:p>2024-02</text:p>
          </table:table-cell>
          <table:table-cell office:value-type="float" office:value="227" table:style-name="ce9">
            <text:p>227</text:p>
          </table:table-cell>
          <table:table-cell office:value-type="float" office:value="369" table:style-name="ce9">
            <text:p>369</text:p>
          </table:table-cell>
          <table:table-cell office:value-type="float" office:value="349" table:style-name="ce9">
            <text:p>349</text:p>
          </table:table-cell>
          <table:table-cell office:value-type="float" office:value="8348" table:style-name="ce9">
            <text:p>8348</text:p>
          </table:table-cell>
          <table:table-cell office:value-type="float" office:value="160" table:style-name="ce9">
            <text:p>160</text:p>
          </table:table-cell>
          <table:table-cell office:value-type="float" office:value="8717" table:formula="of:=SUM([.G262]+[.E262])" table:style-name="ce15">
            <text:p>8717</text:p>
          </table:table-cell>
          <table:table-cell office:value-type="float" office:value="189" table:formula="of:=[.F262]-[.H262]" table:style-name="ce15">
            <text:p>189</text:p>
          </table:table-cell>
          <table:table-cell office:value-type="percentage" office:value="1.3422048870024092E-2" table:formula="of:=([.I263]-[.I262])/[.I262]" table:style-name="ce16">
            <text:p>1%</text:p>
          </table:table-cell>
          <table:table-cell office:value-type="string" office:string-value="Valid" table:formula="of:=IF([.F262]&lt;=[.E262]; &quot;Valid&quot;; &quot;Invalid&quot;)" table:style-name="ce17">
            <text:p>Valid</text:p>
          </table:table-cell>
          <table:table-cell office:value-type="string" office:string-value="Valid" table:formula="of:=IF([.H262]&lt;=[.G262]; &quot;Valid&quot;; &quot;Invalid&quot;)" table:style-name="ce17">
            <text:p>Valid</text:p>
          </table:table-cell>
          <table:table-cell office:value-type="string" office:string-value="Increasing Pressure" table:formula="of:=IF([.J262]&gt;0; &quot;Increasing Pressure&quot;; &quot;Stable/Reducing&quot;)" table:style-name="ce18">
            <text:p>Increasing Pressure</text:p>
          </table:table-cell>
          <table:table-cell office:value-type="float" office:value="0.45845272206303728" table:formula="of:=IFERROR([.H262]/[.F262]; 0)" table:style-name="ce17">
            <text:p>0.458452722</text:p>
          </table:table-cell>
          <table:table-cell office:value-type="float" office:value="8887.8571428571431" table:formula="of:=AVERAGE([.I262:.I268])" table:style-name="ce15">
            <text:p>8888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2-14T00:00:00" table:style-name="ce14">
            <text:p>14-02-2024</text:p>
          </table:table-cell>
          <table:table-cell office:value-type="string" office:string-value="February" table:formula="of:=TEXT([.A263]; &quot;mmmm&quot;)" table:style-name="ce14">
            <text:p>February</text:p>
          </table:table-cell>
          <table:table-cell office:value-type="string" office:string-value="2024-02" table:formula="of:=TEXT([.A263]; &quot;yyyy-mm&quot;)" table:style-name="ce14">
            <text:p>2024-02</text:p>
          </table:table-cell>
          <table:table-cell office:value-type="float" office:value="185" table:style-name="ce9">
            <text:p>185</text:p>
          </table:table-cell>
          <table:table-cell office:value-type="float" office:value="322" table:style-name="ce9">
            <text:p>322</text:p>
          </table:table-cell>
          <table:table-cell office:value-type="float" office:value="272" table:style-name="ce9">
            <text:p>272</text:p>
          </table:table-cell>
          <table:table-cell office:value-type="float" office:value="8512" table:style-name="ce9">
            <text:p>8512</text:p>
          </table:table-cell>
          <table:table-cell office:value-type="float" office:value="230" table:style-name="ce9">
            <text:p>230</text:p>
          </table:table-cell>
          <table:table-cell office:value-type="float" office:value="8834" table:formula="of:=SUM([.G263]+[.E263])" table:style-name="ce15">
            <text:p>8834</text:p>
          </table:table-cell>
          <table:table-cell office:value-type="float" office:value="42" table:formula="of:=[.F263]-[.H263]" table:style-name="ce15">
            <text:p>42</text:p>
          </table:table-cell>
          <table:table-cell office:value-type="percentage" office:value="1.550826352728096E-2" table:formula="of:=([.I264]-[.I263])/[.I263]" table:style-name="ce16">
            <text:p>2%</text:p>
          </table:table-cell>
          <table:table-cell office:value-type="string" office:string-value="Valid" table:formula="of:=IF([.F263]&lt;=[.E263]; &quot;Valid&quot;; &quot;Invalid&quot;)" table:style-name="ce17">
            <text:p>Valid</text:p>
          </table:table-cell>
          <table:table-cell office:value-type="string" office:string-value="Valid" table:formula="of:=IF([.H263]&lt;=[.G263]; &quot;Valid&quot;; &quot;Invalid&quot;)" table:style-name="ce17">
            <text:p>Valid</text:p>
          </table:table-cell>
          <table:table-cell office:value-type="string" office:string-value="Increasing Pressure" table:formula="of:=IF([.J263]&gt;0; &quot;Increasing Pressure&quot;; &quot;Stable/Reducing&quot;)" table:style-name="ce18">
            <text:p>Increasing Pressure</text:p>
          </table:table-cell>
          <table:table-cell office:value-type="float" office:value="0.84558823529411764" table:formula="of:=IFERROR([.H263]/[.F263]; 0)" table:style-name="ce17">
            <text:p>0.845588235</text:p>
          </table:table-cell>
          <table:table-cell office:value-type="float" office:value="8912" table:formula="of:=AVERAGE([.I263:.I269])" table:style-name="ce15">
            <text:p>8912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2-15T00:00:00" table:style-name="ce14">
            <text:p>15-02-2024</text:p>
          </table:table-cell>
          <table:table-cell office:value-type="string" office:string-value="February" table:formula="of:=TEXT([.A264]; &quot;mmmm&quot;)" table:style-name="ce14">
            <text:p>February</text:p>
          </table:table-cell>
          <table:table-cell office:value-type="string" office:string-value="2024-02" table:formula="of:=TEXT([.A264]; &quot;yyyy-mm&quot;)" table:style-name="ce14">
            <text:p>2024-02</text:p>
          </table:table-cell>
          <table:table-cell office:value-type="float" office:value="333" table:style-name="ce9">
            <text:p>333</text:p>
          </table:table-cell>
          <table:table-cell office:value-type="float" office:value="508" table:style-name="ce9">
            <text:p>508</text:p>
          </table:table-cell>
          <table:table-cell office:value-type="float" office:value="272" table:style-name="ce9">
            <text:p>272</text:p>
          </table:table-cell>
          <table:table-cell office:value-type="float" office:value="8463" table:style-name="ce9">
            <text:p>8463</text:p>
          </table:table-cell>
          <table:table-cell office:value-type="float" office:value="312" table:style-name="ce9">
            <text:p>312</text:p>
          </table:table-cell>
          <table:table-cell office:value-type="float" office:value="8971" table:formula="of:=SUM([.G264]+[.E264])" table:style-name="ce15">
            <text:p>8971</text:p>
          </table:table-cell>
          <table:table-cell office:value-type="float" office:value="-40" table:formula="of:=[.F264]-[.H264]" table:style-name="ce15">
            <text:p>-40</text:p>
          </table:table-cell>
          <table:table-cell office:value-type="percentage" office:value="-1.9061420131534945E-2" table:formula="of:=([.I265]-[.I264])/[.I264]" table:style-name="ce16">
            <text:p>-2%</text:p>
          </table:table-cell>
          <table:table-cell office:value-type="string" office:string-value="Valid" table:formula="of:=IF([.F264]&lt;=[.E264]; &quot;Valid&quot;; &quot;Invalid&quot;)" table:style-name="ce17">
            <text:p>Valid</text:p>
          </table:table-cell>
          <table:table-cell office:value-type="string" office:string-value="Valid" table:formula="of:=IF([.H264]&lt;=[.G264]; &quot;Valid&quot;; &quot;Invalid&quot;)" table:style-name="ce17">
            <text:p>Valid</text:p>
          </table:table-cell>
          <table:table-cell office:value-type="string" office:string-value="Stable/Reducing" table:formula="of:=IF([.J264]&gt;0; &quot;Increasing Pressure&quot;; &quot;Stable/Reducing&quot;)" table:style-name="ce18">
            <text:p>Stable/Reducing</text:p>
          </table:table-cell>
          <table:table-cell office:value-type="float" office:value="1.1470588235294117" table:formula="of:=IFERROR([.H264]/[.F264]; 0)" table:style-name="ce17">
            <text:p>1.147058824</text:p>
          </table:table-cell>
          <table:table-cell office:value-type="float" office:value="8913.1428571428569" table:formula="of:=AVERAGE([.I264:.I270])" table:style-name="ce15">
            <text:p>8913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2-19T00:00:00" table:style-name="ce14">
            <text:p>19-02-2024</text:p>
          </table:table-cell>
          <table:table-cell office:value-type="string" office:string-value="February" table:formula="of:=TEXT([.A265]; &quot;mmmm&quot;)" table:style-name="ce14">
            <text:p>February</text:p>
          </table:table-cell>
          <table:table-cell office:value-type="string" office:string-value="2024-02" table:formula="of:=TEXT([.A265]; &quot;yyyy-mm&quot;)" table:style-name="ce14">
            <text:p>2024-02</text:p>
          </table:table-cell>
          <table:table-cell office:value-type="float" office:value="249" table:style-name="ce9">
            <text:p>249</text:p>
          </table:table-cell>
          <table:table-cell office:value-type="float" office:value="420" table:style-name="ce9">
            <text:p>420</text:p>
          </table:table-cell>
          <table:table-cell office:value-type="float" office:value="371" table:style-name="ce9">
            <text:p>371</text:p>
          </table:table-cell>
          <table:table-cell office:value-type="float" office:value="8380" table:style-name="ce9">
            <text:p>8380</text:p>
          </table:table-cell>
          <table:table-cell office:value-type="float" office:value="218" table:style-name="ce9">
            <text:p>218</text:p>
          </table:table-cell>
          <table:table-cell office:value-type="float" office:value="8800" table:formula="of:=SUM([.G265]+[.E265])" table:style-name="ce15">
            <text:p>8800</text:p>
          </table:table-cell>
          <table:table-cell office:value-type="float" office:value="153" table:formula="of:=[.F265]-[.H265]" table:style-name="ce15">
            <text:p>153</text:p>
          </table:table-cell>
          <table:table-cell office:value-type="percentage" office:value="9.4318181818181818E-3" table:formula="of:=([.I266]-[.I265])/[.I265]" table:style-name="ce16">
            <text:p>1%</text:p>
          </table:table-cell>
          <table:table-cell office:value-type="string" office:string-value="Valid" table:formula="of:=IF([.F265]&lt;=[.E265]; &quot;Valid&quot;; &quot;Invalid&quot;)" table:style-name="ce17">
            <text:p>Valid</text:p>
          </table:table-cell>
          <table:table-cell office:value-type="string" office:string-value="Valid" table:formula="of:=IF([.H265]&lt;=[.G265]; &quot;Valid&quot;; &quot;Invalid&quot;)" table:style-name="ce17">
            <text:p>Valid</text:p>
          </table:table-cell>
          <table:table-cell office:value-type="string" office:string-value="Increasing Pressure" table:formula="of:=IF([.J265]&gt;0; &quot;Increasing Pressure&quot;; &quot;Stable/Reducing&quot;)" table:style-name="ce18">
            <text:p>Increasing Pressure</text:p>
          </table:table-cell>
          <table:table-cell office:value-type="float" office:value="0.58760107816711593" table:formula="of:=IFERROR([.H265]/[.F265]; 0)" table:style-name="ce17">
            <text:p>0.587601078</text:p>
          </table:table-cell>
          <table:table-cell office:value-type="float" office:value="8920" table:formula="of:=AVERAGE([.I265:.I271])" table:style-name="ce15">
            <text:p>8920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2-20T00:00:00" table:style-name="ce14">
            <text:p>20-02-2024</text:p>
          </table:table-cell>
          <table:table-cell office:value-type="string" office:string-value="February" table:formula="of:=TEXT([.A266]; &quot;mmmm&quot;)" table:style-name="ce14">
            <text:p>February</text:p>
          </table:table-cell>
          <table:table-cell office:value-type="string" office:string-value="2024-02" table:formula="of:=TEXT([.A266]; &quot;yyyy-mm&quot;)" table:style-name="ce14">
            <text:p>2024-02</text:p>
          </table:table-cell>
          <table:table-cell office:value-type="float" office:value="149" table:style-name="ce9">
            <text:p>149</text:p>
          </table:table-cell>
          <table:table-cell office:value-type="float" office:value="395" table:style-name="ce9">
            <text:p>395</text:p>
          </table:table-cell>
          <table:table-cell office:value-type="float" office:value="273" table:style-name="ce9">
            <text:p>273</text:p>
          </table:table-cell>
          <table:table-cell office:value-type="float" office:value="8488" table:style-name="ce9">
            <text:p>8488</text:p>
          </table:table-cell>
          <table:table-cell office:value-type="float" office:value="192" table:style-name="ce9">
            <text:p>192</text:p>
          </table:table-cell>
          <table:table-cell office:value-type="float" office:value="8883" table:formula="of:=SUM([.G266]+[.E266])" table:style-name="ce15">
            <text:p>8883</text:p>
          </table:table-cell>
          <table:table-cell office:value-type="float" office:value="81" table:formula="of:=[.F266]-[.H266]" table:style-name="ce15">
            <text:p>81</text:p>
          </table:table-cell>
          <table:table-cell office:value-type="percentage" office:value="1.3508949679162444E-2" table:formula="of:=([.I267]-[.I266])/[.I266]" table:style-name="ce16">
            <text:p>1%</text:p>
          </table:table-cell>
          <table:table-cell office:value-type="string" office:string-value="Valid" table:formula="of:=IF([.F266]&lt;=[.E266]; &quot;Valid&quot;; &quot;Invalid&quot;)" table:style-name="ce17">
            <text:p>Valid</text:p>
          </table:table-cell>
          <table:table-cell office:value-type="string" office:string-value="Valid" table:formula="of:=IF([.H266]&lt;=[.G266]; &quot;Valid&quot;; &quot;Invalid&quot;)" table:style-name="ce17">
            <text:p>Valid</text:p>
          </table:table-cell>
          <table:table-cell office:value-type="string" office:string-value="Increasing Pressure" table:formula="of:=IF([.J266]&gt;0; &quot;Increasing Pressure&quot;; &quot;Stable/Reducing&quot;)" table:style-name="ce18">
            <text:p>Increasing Pressure</text:p>
          </table:table-cell>
          <table:table-cell office:value-type="float" office:value="0.70329670329670335" table:formula="of:=IFERROR([.H266]/[.F266]; 0)" table:style-name="ce17">
            <text:p>0.703296703</text:p>
          </table:table-cell>
          <table:table-cell office:value-type="float" office:value="8969.4285714285706" table:formula="of:=AVERAGE([.I266:.I272])" table:style-name="ce15">
            <text:p>8969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2-21T00:00:00" table:style-name="ce14">
            <text:p>21-02-2024</text:p>
          </table:table-cell>
          <table:table-cell office:value-type="string" office:string-value="February" table:formula="of:=TEXT([.A267]; &quot;mmmm&quot;)" table:style-name="ce14">
            <text:p>February</text:p>
          </table:table-cell>
          <table:table-cell office:value-type="string" office:string-value="2024-02" table:formula="of:=TEXT([.A267]; &quot;yyyy-mm&quot;)" table:style-name="ce14">
            <text:p>2024-02</text:p>
          </table:table-cell>
          <table:table-cell office:value-type="float" office:value="232" table:style-name="ce9">
            <text:p>232</text:p>
          </table:table-cell>
          <table:table-cell office:value-type="float" office:value="430" table:style-name="ce9">
            <text:p>430</text:p>
          </table:table-cell>
          <table:table-cell office:value-type="float" office:value="318" table:style-name="ce9">
            <text:p>318</text:p>
          </table:table-cell>
          <table:table-cell office:value-type="float" office:value="8573" table:style-name="ce9">
            <text:p>8573</text:p>
          </table:table-cell>
          <table:table-cell office:value-type="float" office:value="231" table:style-name="ce9">
            <text:p>231</text:p>
          </table:table-cell>
          <table:table-cell office:value-type="float" office:value="9003" table:formula="of:=SUM([.G267]+[.E267])" table:style-name="ce15">
            <text:p>9003</text:p>
          </table:table-cell>
          <table:table-cell office:value-type="float" office:value="87" table:formula="of:=[.F267]-[.H267]" table:style-name="ce15">
            <text:p>87</text:p>
          </table:table-cell>
          <table:table-cell office:value-type="percentage" office:value="4.442963456625569E-4" table:formula="of:=([.I268]-[.I267])/[.I267]" table:style-name="ce16">
            <text:p>0%</text:p>
          </table:table-cell>
          <table:table-cell office:value-type="string" office:string-value="Valid" table:formula="of:=IF([.F267]&lt;=[.E267]; &quot;Valid&quot;; &quot;Invalid&quot;)" table:style-name="ce17">
            <text:p>Valid</text:p>
          </table:table-cell>
          <table:table-cell office:value-type="string" office:string-value="Valid" table:formula="of:=IF([.H267]&lt;=[.G267]; &quot;Valid&quot;; &quot;Invalid&quot;)" table:style-name="ce17">
            <text:p>Valid</text:p>
          </table:table-cell>
          <table:table-cell office:value-type="string" office:string-value="Increasing Pressure" table:formula="of:=IF([.J267]&gt;0; &quot;Increasing Pressure&quot;; &quot;Stable/Reducing&quot;)" table:style-name="ce18">
            <text:p>Increasing Pressure</text:p>
          </table:table-cell>
          <table:table-cell office:value-type="float" office:value="0.72641509433962259" table:formula="of:=IFERROR([.H267]/[.F267]; 0)" table:style-name="ce17">
            <text:p>0.726415094</text:p>
          </table:table-cell>
          <table:table-cell office:value-type="float" office:value="9010.1428571428569" table:formula="of:=AVERAGE([.I267:.I273])" table:style-name="ce15">
            <text:p>9010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2-22T00:00:00" table:style-name="ce14">
            <text:p>22-02-2024</text:p>
          </table:table-cell>
          <table:table-cell office:value-type="string" office:string-value="February" table:formula="of:=TEXT([.A268]; &quot;mmmm&quot;)" table:style-name="ce14">
            <text:p>February</text:p>
          </table:table-cell>
          <table:table-cell office:value-type="string" office:string-value="2024-02" table:formula="of:=TEXT([.A268]; &quot;yyyy-mm&quot;)" table:style-name="ce14">
            <text:p>2024-02</text:p>
          </table:table-cell>
          <table:table-cell office:value-type="float" office:value="165" table:style-name="ce9">
            <text:p>165</text:p>
          </table:table-cell>
          <table:table-cell office:value-type="float" office:value="400" table:style-name="ce9">
            <text:p>400</text:p>
          </table:table-cell>
          <table:table-cell office:value-type="float" office:value="292" table:style-name="ce9">
            <text:p>292</text:p>
          </table:table-cell>
          <table:table-cell office:value-type="float" office:value="8607" table:style-name="ce9">
            <text:p>8607</text:p>
          </table:table-cell>
          <table:table-cell office:value-type="float" office:value="293" table:style-name="ce9">
            <text:p>293</text:p>
          </table:table-cell>
          <table:table-cell office:value-type="float" office:value="9007" table:formula="of:=SUM([.G268]+[.E268])" table:style-name="ce15">
            <text:p>9007</text:p>
          </table:table-cell>
          <table:table-cell office:value-type="float" office:value="-1" table:formula="of:=[.F268]-[.H268]" table:style-name="ce15">
            <text:p>-1</text:p>
          </table:table-cell>
          <table:table-cell office:value-type="percentage" office:value="-1.3433995781059176E-2" table:formula="of:=([.I269]-[.I268])/[.I268]" table:style-name="ce16">
            <text:p>-1%</text:p>
          </table:table-cell>
          <table:table-cell office:value-type="string" office:string-value="Valid" table:formula="of:=IF([.F268]&lt;=[.E268]; &quot;Valid&quot;; &quot;Invalid&quot;)" table:style-name="ce17">
            <text:p>Valid</text:p>
          </table:table-cell>
          <table:table-cell office:value-type="string" office:string-value="Valid" table:formula="of:=IF([.H268]&lt;=[.G268]; &quot;Valid&quot;; &quot;Invalid&quot;)" table:style-name="ce17">
            <text:p>Valid</text:p>
          </table:table-cell>
          <table:table-cell office:value-type="string" office:string-value="Stable/Reducing" table:formula="of:=IF([.J268]&gt;0; &quot;Increasing Pressure&quot;; &quot;Stable/Reducing&quot;)" table:style-name="ce18">
            <text:p>Stable/Reducing</text:p>
          </table:table-cell>
          <table:table-cell office:value-type="float" office:value="1.0034246575342465" table:formula="of:=IFERROR([.H268]/[.F268]; 0)" table:style-name="ce17">
            <text:p>1.003424658</text:p>
          </table:table-cell>
          <table:table-cell office:value-type="float" office:value="9018.5714285714294" table:formula="of:=AVERAGE([.I268:.I274])" table:style-name="ce15">
            <text:p>9019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2-25T00:00:00" table:style-name="ce14">
            <text:p>25-02-2024</text:p>
          </table:table-cell>
          <table:table-cell office:value-type="string" office:string-value="February" table:formula="of:=TEXT([.A269]; &quot;mmmm&quot;)" table:style-name="ce14">
            <text:p>February</text:p>
          </table:table-cell>
          <table:table-cell office:value-type="string" office:string-value="2024-02" table:formula="of:=TEXT([.A269]; &quot;yyyy-mm&quot;)" table:style-name="ce14">
            <text:p>2024-02</text:p>
          </table:table-cell>
          <table:table-cell office:value-type="float" office:value="244" table:style-name="ce9">
            <text:p>244</text:p>
          </table:table-cell>
          <table:table-cell office:value-type="float" office:value="482" table:style-name="ce9">
            <text:p>482</text:p>
          </table:table-cell>
          <table:table-cell office:value-type="float" office:value="366" table:style-name="ce9">
            <text:p>366</text:p>
          </table:table-cell>
          <table:table-cell office:value-type="float" office:value="8404" table:style-name="ce9">
            <text:p>8404</text:p>
          </table:table-cell>
          <table:table-cell office:value-type="float" office:value="329" table:style-name="ce9">
            <text:p>329</text:p>
          </table:table-cell>
          <table:table-cell office:value-type="float" office:value="8886" table:formula="of:=SUM([.G269]+[.E269])" table:style-name="ce15">
            <text:p>8886</text:p>
          </table:table-cell>
          <table:table-cell office:value-type="float" office:value="37" table:formula="of:=[.F269]-[.H269]" table:style-name="ce15">
            <text:p>37</text:p>
          </table:table-cell>
          <table:table-cell office:value-type="percentage" office:value="-4.9516092730137297E-3" table:formula="of:=([.I270]-[.I269])/[.I269]" table:style-name="ce16">
            <text:p>0%</text:p>
          </table:table-cell>
          <table:table-cell office:value-type="string" office:string-value="Valid" table:formula="of:=IF([.F269]&lt;=[.E269]; &quot;Valid&quot;; &quot;Invalid&quot;)" table:style-name="ce17">
            <text:p>Valid</text:p>
          </table:table-cell>
          <table:table-cell office:value-type="string" office:string-value="Valid" table:formula="of:=IF([.H269]&lt;=[.G269]; &quot;Valid&quot;; &quot;Invalid&quot;)" table:style-name="ce17">
            <text:p>Valid</text:p>
          </table:table-cell>
          <table:table-cell office:value-type="string" office:string-value="Increasing Pressure" table:formula="of:=IF([.J269]&gt;0; &quot;Increasing Pressure&quot;; &quot;Stable/Reducing&quot;)" table:style-name="ce18">
            <text:p>Increasing Pressure</text:p>
          </table:table-cell>
          <table:table-cell office:value-type="float" office:value="0.89890710382513661" table:formula="of:=IFERROR([.H269]/[.F269]; 0)" table:style-name="ce17">
            <text:p>0.898907104</text:p>
          </table:table-cell>
          <table:table-cell office:value-type="float" office:value="9041.7142857142862" table:formula="of:=AVERAGE([.I269:.I275])" table:style-name="ce15">
            <text:p>9042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2-26T00:00:00" table:style-name="ce14">
            <text:p>26-02-2024</text:p>
          </table:table-cell>
          <table:table-cell office:value-type="string" office:string-value="February" table:formula="of:=TEXT([.A270]; &quot;mmmm&quot;)" table:style-name="ce14">
            <text:p>February</text:p>
          </table:table-cell>
          <table:table-cell office:value-type="string" office:string-value="2024-02" table:formula="of:=TEXT([.A270]; &quot;yyyy-mm&quot;)" table:style-name="ce14">
            <text:p>2024-02</text:p>
          </table:table-cell>
          <table:table-cell office:value-type="float" office:value="199" table:style-name="ce9">
            <text:p>199</text:p>
          </table:table-cell>
          <table:table-cell office:value-type="float" office:value="438" table:style-name="ce9">
            <text:p>438</text:p>
          </table:table-cell>
          <table:table-cell office:value-type="float" office:value="326" table:style-name="ce9">
            <text:p>326</text:p>
          </table:table-cell>
          <table:table-cell office:value-type="float" office:value="8404" table:style-name="ce9">
            <text:p>8404</text:p>
          </table:table-cell>
          <table:table-cell office:value-type="float" office:value="329" table:style-name="ce9">
            <text:p>329</text:p>
          </table:table-cell>
          <table:table-cell office:value-type="float" office:value="8842" table:formula="of:=SUM([.G270]+[.E270])" table:style-name="ce15">
            <text:p>8842</text:p>
          </table:table-cell>
          <table:table-cell office:value-type="float" office:value="-3" table:formula="of:=[.F270]-[.H270]" table:style-name="ce15">
            <text:p>-3</text:p>
          </table:table-cell>
          <table:table-cell office:value-type="percentage" office:value="2.0018095453517303E-2" table:formula="of:=([.I271]-[.I270])/[.I270]" table:style-name="ce16">
            <text:p>2%</text:p>
          </table:table-cell>
          <table:table-cell office:value-type="string" office:string-value="Valid" table:formula="of:=IF([.F270]&lt;=[.E270]; &quot;Valid&quot;; &quot;Invalid&quot;)" table:style-name="ce17">
            <text:p>Valid</text:p>
          </table:table-cell>
          <table:table-cell office:value-type="string" office:string-value="Valid" table:formula="of:=IF([.H270]&lt;=[.G270]; &quot;Valid&quot;; &quot;Invalid&quot;)" table:style-name="ce17">
            <text:p>Valid</text:p>
          </table:table-cell>
          <table:table-cell office:value-type="string" office:string-value="Stable/Reducing" table:formula="of:=IF([.J270]&gt;0; &quot;Increasing Pressure&quot;; &quot;Stable/Reducing&quot;)" table:style-name="ce18">
            <text:p>Stable/Reducing</text:p>
          </table:table-cell>
          <table:table-cell office:value-type="float" office:value="1.00920245398773" table:formula="of:=IFERROR([.H270]/[.F270]; 0)" table:style-name="ce17">
            <text:p>1.009202454</text:p>
          </table:table-cell>
          <table:table-cell office:value-type="float" office:value="9096.8571428571431" table:formula="of:=AVERAGE([.I270:.I276])" table:style-name="ce15">
            <text:p>9097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2-27T00:00:00" table:style-name="ce14">
            <text:p>27-02-2024</text:p>
          </table:table-cell>
          <table:table-cell office:value-type="string" office:string-value="February" table:formula="of:=TEXT([.A271]; &quot;mmmm&quot;)" table:style-name="ce14">
            <text:p>February</text:p>
          </table:table-cell>
          <table:table-cell office:value-type="string" office:string-value="2024-02" table:formula="of:=TEXT([.A271]; &quot;yyyy-mm&quot;)" table:style-name="ce14">
            <text:p>2024-02</text:p>
          </table:table-cell>
          <table:table-cell office:value-type="float" office:value="197" table:style-name="ce9">
            <text:p>197</text:p>
          </table:table-cell>
          <table:table-cell office:value-type="float" office:value="369" table:style-name="ce9">
            <text:p>369</text:p>
          </table:table-cell>
          <table:table-cell office:value-type="float" office:value="306" table:style-name="ce9">
            <text:p>306</text:p>
          </table:table-cell>
          <table:table-cell office:value-type="float" office:value="8650" table:style-name="ce9">
            <text:p>8650</text:p>
          </table:table-cell>
          <table:table-cell office:value-type="float" office:value="206" table:style-name="ce9">
            <text:p>206</text:p>
          </table:table-cell>
          <table:table-cell office:value-type="float" office:value="9019" table:formula="of:=SUM([.G271]+[.E271])" table:style-name="ce15">
            <text:p>9019</text:p>
          </table:table-cell>
          <table:table-cell office:value-type="float" office:value="100" table:formula="of:=[.F271]-[.H271]" table:style-name="ce15">
            <text:p>100</text:p>
          </table:table-cell>
          <table:table-cell office:value-type="percentage" office:value="1.4081383745426322E-2" table:formula="of:=([.I272]-[.I271])/[.I271]" table:style-name="ce16">
            <text:p>1%</text:p>
          </table:table-cell>
          <table:table-cell office:value-type="string" office:string-value="Valid" table:formula="of:=IF([.F271]&lt;=[.E271]; &quot;Valid&quot;; &quot;Invalid&quot;)" table:style-name="ce17">
            <text:p>Valid</text:p>
          </table:table-cell>
          <table:table-cell office:value-type="string" office:string-value="Valid" table:formula="of:=IF([.H271]&lt;=[.G271]; &quot;Valid&quot;; &quot;Invalid&quot;)" table:style-name="ce17">
            <text:p>Valid</text:p>
          </table:table-cell>
          <table:table-cell office:value-type="string" office:string-value="Increasing Pressure" table:formula="of:=IF([.J271]&gt;0; &quot;Increasing Pressure&quot;; &quot;Stable/Reducing&quot;)" table:style-name="ce18">
            <text:p>Increasing Pressure</text:p>
          </table:table-cell>
          <table:table-cell office:value-type="float" office:value="0.67320261437908502" table:formula="of:=IFERROR([.H271]/[.F271]; 0)" table:style-name="ce17">
            <text:p>0.673202614</text:p>
          </table:table-cell>
          <table:table-cell office:value-type="float" office:value="9166.1428571428569" table:formula="of:=AVERAGE([.I271:.I277])" table:style-name="ce15">
            <text:p>9166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2-28T00:00:00" table:style-name="ce14">
            <text:p>28-02-2024</text:p>
          </table:table-cell>
          <table:table-cell office:value-type="string" office:string-value="February" table:formula="of:=TEXT([.A272]; &quot;mmmm&quot;)" table:style-name="ce14">
            <text:p>February</text:p>
          </table:table-cell>
          <table:table-cell office:value-type="string" office:string-value="2024-02" table:formula="of:=TEXT([.A272]; &quot;yyyy-mm&quot;)" table:style-name="ce14">
            <text:p>2024-02</text:p>
          </table:table-cell>
          <table:table-cell office:value-type="float" office:value="209" table:style-name="ce9">
            <text:p>209</text:p>
          </table:table-cell>
          <table:table-cell office:value-type="float" office:value="447" table:style-name="ce9">
            <text:p>447</text:p>
          </table:table-cell>
          <table:table-cell office:value-type="float" office:value="274" table:style-name="ce9">
            <text:p>274</text:p>
          </table:table-cell>
          <table:table-cell office:value-type="float" office:value="8699" table:style-name="ce9">
            <text:p>8699</text:p>
          </table:table-cell>
          <table:table-cell office:value-type="float" office:value="257" table:style-name="ce9">
            <text:p>257</text:p>
          </table:table-cell>
          <table:table-cell office:value-type="float" office:value="9146" table:formula="of:=SUM([.G272]+[.E272])" table:style-name="ce15">
            <text:p>9146</text:p>
          </table:table-cell>
          <table:table-cell office:value-type="float" office:value="17" table:formula="of:=[.F272]-[.H272]" table:style-name="ce15">
            <text:p>17</text:p>
          </table:table-cell>
          <table:table-cell office:value-type="percentage" office:value="2.4054231357970696E-3" table:formula="of:=([.I273]-[.I272])/[.I272]" table:style-name="ce16">
            <text:p>0%</text:p>
          </table:table-cell>
          <table:table-cell office:value-type="string" office:string-value="Valid" table:formula="of:=IF([.F272]&lt;=[.E272]; &quot;Valid&quot;; &quot;Invalid&quot;)" table:style-name="ce17">
            <text:p>Valid</text:p>
          </table:table-cell>
          <table:table-cell office:value-type="string" office:string-value="Valid" table:formula="of:=IF([.H272]&lt;=[.G272]; &quot;Valid&quot;; &quot;Invalid&quot;)" table:style-name="ce17">
            <text:p>Valid</text:p>
          </table:table-cell>
          <table:table-cell office:value-type="string" office:string-value="Increasing Pressure" table:formula="of:=IF([.J272]&gt;0; &quot;Increasing Pressure&quot;; &quot;Stable/Reducing&quot;)" table:style-name="ce18">
            <text:p>Increasing Pressure</text:p>
          </table:table-cell>
          <table:table-cell office:value-type="float" office:value="0.93795620437956206" table:formula="of:=IFERROR([.H272]/[.F272]; 0)" table:style-name="ce17">
            <text:p>0.937956204</text:p>
          </table:table-cell>
          <table:table-cell office:value-type="float" office:value="9210" table:formula="of:=AVERAGE([.I272:.I278])" table:style-name="ce15">
            <text:p>9210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2-29T00:00:00" table:style-name="ce14">
            <text:p>29-02-2024</text:p>
          </table:table-cell>
          <table:table-cell office:value-type="string" office:string-value="February" table:formula="of:=TEXT([.A273]; &quot;mmmm&quot;)" table:style-name="ce14">
            <text:p>February</text:p>
          </table:table-cell>
          <table:table-cell office:value-type="string" office:string-value="2024-02" table:formula="of:=TEXT([.A273]; &quot;yyyy-mm&quot;)" table:style-name="ce14">
            <text:p>2024-02</text:p>
          </table:table-cell>
          <table:table-cell office:value-type="float" office:value="262" table:style-name="ce9">
            <text:p>262</text:p>
          </table:table-cell>
          <table:table-cell office:value-type="float" office:value="444" table:style-name="ce9">
            <text:p>444</text:p>
          </table:table-cell>
          <table:table-cell office:value-type="float" office:value="354" table:style-name="ce9">
            <text:p>354</text:p>
          </table:table-cell>
          <table:table-cell office:value-type="float" office:value="8724" table:style-name="ce9">
            <text:p>8724</text:p>
          </table:table-cell>
          <table:table-cell office:value-type="float" office:value="299" table:style-name="ce9">
            <text:p>299</text:p>
          </table:table-cell>
          <table:table-cell office:value-type="float" office:value="9168" table:formula="of:=SUM([.G273]+[.E273])" table:style-name="ce15">
            <text:p>9168</text:p>
          </table:table-cell>
          <table:table-cell office:value-type="float" office:value="55" table:formula="of:=[.F273]-[.H273]" table:style-name="ce15">
            <text:p>55</text:p>
          </table:table-cell>
          <table:table-cell office:value-type="percentage" office:value="-1.1561954624781851E-2" table:formula="of:=([.I274]-[.I273])/[.I273]" table:style-name="ce16">
            <text:p>-1%</text:p>
          </table:table-cell>
          <table:table-cell office:value-type="string" office:string-value="Valid" table:formula="of:=IF([.F273]&lt;=[.E273]; &quot;Valid&quot;; &quot;Invalid&quot;)" table:style-name="ce17">
            <text:p>Valid</text:p>
          </table:table-cell>
          <table:table-cell office:value-type="string" office:string-value="Valid" table:formula="of:=IF([.H273]&lt;=[.G273]; &quot;Valid&quot;; &quot;Invalid&quot;)" table:style-name="ce17">
            <text:p>Valid</text:p>
          </table:table-cell>
          <table:table-cell office:value-type="string" office:string-value="Increasing Pressure" table:formula="of:=IF([.J273]&gt;0; &quot;Increasing Pressure&quot;; &quot;Stable/Reducing&quot;)" table:style-name="ce18">
            <text:p>Increasing Pressure</text:p>
          </table:table-cell>
          <table:table-cell office:value-type="float" office:value="0.84463276836158196" table:formula="of:=IFERROR([.H273]/[.F273]; 0)" table:style-name="ce17">
            <text:p>0.844632768</text:p>
          </table:table-cell>
          <table:table-cell office:value-type="float" office:value="9200.8571428571431" table:formula="of:=AVERAGE([.I273:.I279])" table:style-name="ce15">
            <text:p>9201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3-03T00:00:00" table:style-name="ce14">
            <text:p>03-03-2024</text:p>
          </table:table-cell>
          <table:table-cell office:value-type="string" office:string-value="March" table:formula="of:=TEXT([.A274]; &quot;mmmm&quot;)" table:style-name="ce14">
            <text:p>March</text:p>
          </table:table-cell>
          <table:table-cell office:value-type="string" office:string-value="2024-03" table:formula="of:=TEXT([.A274]; &quot;yyyy-mm&quot;)" table:style-name="ce14">
            <text:p>2024-03</text:p>
          </table:table-cell>
          <table:table-cell office:value-type="float" office:value="236" table:style-name="ce9">
            <text:p>236</text:p>
          </table:table-cell>
          <table:table-cell office:value-type="float" office:value="468" table:style-name="ce9">
            <text:p>468</text:p>
          </table:table-cell>
          <table:table-cell office:value-type="float" office:value="347" table:style-name="ce9">
            <text:p>347</text:p>
          </table:table-cell>
          <table:table-cell office:value-type="float" office:value="8594" table:style-name="ce9">
            <text:p>8594</text:p>
          </table:table-cell>
          <table:table-cell office:value-type="float" office:value="354" table:style-name="ce9">
            <text:p>354</text:p>
          </table:table-cell>
          <table:table-cell office:value-type="float" office:value="9062" table:formula="of:=SUM([.G274]+[.E274])" table:style-name="ce15">
            <text:p>9062</text:p>
          </table:table-cell>
          <table:table-cell office:value-type="float" office:value="-7" table:formula="of:=[.F274]-[.H274]" table:style-name="ce15">
            <text:p>-7</text:p>
          </table:table-cell>
          <table:table-cell office:value-type="percentage" office:value="1.1807548002648422E-2" table:formula="of:=([.I275]-[.I274])/[.I274]" table:style-name="ce16">
            <text:p>1%</text:p>
          </table:table-cell>
          <table:table-cell office:value-type="string" office:string-value="Valid" table:formula="of:=IF([.F274]&lt;=[.E274]; &quot;Valid&quot;; &quot;Invalid&quot;)" table:style-name="ce17">
            <text:p>Valid</text:p>
          </table:table-cell>
          <table:table-cell office:value-type="string" office:string-value="Valid" table:formula="of:=IF([.H274]&lt;=[.G274]; &quot;Valid&quot;; &quot;Invalid&quot;)" table:style-name="ce17">
            <text:p>Valid</text:p>
          </table:table-cell>
          <table:table-cell office:value-type="string" office:string-value="Stable/Reducing" table:formula="of:=IF([.J274]&gt;0; &quot;Increasing Pressure&quot;; &quot;Stable/Reducing&quot;)" table:style-name="ce18">
            <text:p>Stable/Reducing</text:p>
          </table:table-cell>
          <table:table-cell office:value-type="float" office:value="1.0201729106628241" table:formula="of:=IFERROR([.H274]/[.F274]; 0)" table:style-name="ce17">
            <text:p>1.020172911</text:p>
          </table:table-cell>
          <table:table-cell office:value-type="float" office:value="9190.1428571428569" table:formula="of:=AVERAGE([.I274:.I280])" table:style-name="ce15">
            <text:p>9190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3-04T00:00:00" table:style-name="ce14">
            <text:p>04-03-2024</text:p>
          </table:table-cell>
          <table:table-cell office:value-type="string" office:string-value="March" table:formula="of:=TEXT([.A275]; &quot;mmmm&quot;)" table:style-name="ce14">
            <text:p>March</text:p>
          </table:table-cell>
          <table:table-cell office:value-type="string" office:string-value="2024-03" table:formula="of:=TEXT([.A275]; &quot;yyyy-mm&quot;)" table:style-name="ce14">
            <text:p>2024-03</text:p>
          </table:table-cell>
          <table:table-cell office:value-type="float" office:value="225" table:style-name="ce9">
            <text:p>225</text:p>
          </table:table-cell>
          <table:table-cell office:value-type="float" office:value="509" table:style-name="ce9">
            <text:p>509</text:p>
          </table:table-cell>
          <table:table-cell office:value-type="float" office:value="340" table:style-name="ce9">
            <text:p>340</text:p>
          </table:table-cell>
          <table:table-cell office:value-type="float" office:value="8660" table:style-name="ce9">
            <text:p>8660</text:p>
          </table:table-cell>
          <table:table-cell office:value-type="float" office:value="229" table:style-name="ce9">
            <text:p>229</text:p>
          </table:table-cell>
          <table:table-cell office:value-type="float" office:value="9169" table:formula="of:=SUM([.G275]+[.E275])" table:style-name="ce15">
            <text:p>9169</text:p>
          </table:table-cell>
          <table:table-cell office:value-type="float" office:value="111" table:formula="of:=[.F275]-[.H275]" table:style-name="ce15">
            <text:p>111</text:p>
          </table:table-cell>
          <table:table-cell office:value-type="percentage" office:value="1.1233504198931181E-2" table:formula="of:=([.I276]-[.I275])/[.I275]" table:style-name="ce16">
            <text:p>1%</text:p>
          </table:table-cell>
          <table:table-cell office:value-type="string" office:string-value="Valid" table:formula="of:=IF([.F275]&lt;=[.E275]; &quot;Valid&quot;; &quot;Invalid&quot;)" table:style-name="ce17">
            <text:p>Valid</text:p>
          </table:table-cell>
          <table:table-cell office:value-type="string" office:string-value="Valid" table:formula="of:=IF([.H275]&lt;=[.G275]; &quot;Valid&quot;; &quot;Invalid&quot;)" table:style-name="ce17">
            <text:p>Valid</text:p>
          </table:table-cell>
          <table:table-cell office:value-type="string" office:string-value="Increasing Pressure" table:formula="of:=IF([.J275]&gt;0; &quot;Increasing Pressure&quot;; &quot;Stable/Reducing&quot;)" table:style-name="ce18">
            <text:p>Increasing Pressure</text:p>
          </table:table-cell>
          <table:table-cell office:value-type="float" office:value="0.67352941176470593" table:formula="of:=IFERROR([.H275]/[.F275]; 0)" table:style-name="ce17">
            <text:p>0.673529412</text:p>
          </table:table-cell>
          <table:table-cell office:value-type="float" office:value="9200.8571428571431" table:formula="of:=AVERAGE([.I275:.I281])" table:style-name="ce15">
            <text:p>9201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3-05T00:00:00" table:style-name="ce14">
            <text:p>05-03-2024</text:p>
          </table:table-cell>
          <table:table-cell office:value-type="string" office:string-value="March" table:formula="of:=TEXT([.A276]; &quot;mmmm&quot;)" table:style-name="ce14">
            <text:p>March</text:p>
          </table:table-cell>
          <table:table-cell office:value-type="string" office:string-value="2024-03" table:formula="of:=TEXT([.A276]; &quot;yyyy-mm&quot;)" table:style-name="ce14">
            <text:p>2024-03</text:p>
          </table:table-cell>
          <table:table-cell office:value-type="float" office:value="246" table:style-name="ce9">
            <text:p>246</text:p>
          </table:table-cell>
          <table:table-cell office:value-type="float" office:value="472" table:style-name="ce9">
            <text:p>472</text:p>
          </table:table-cell>
          <table:table-cell office:value-type="float" office:value="345" table:style-name="ce9">
            <text:p>345</text:p>
          </table:table-cell>
          <table:table-cell office:value-type="float" office:value="8800" table:style-name="ce9">
            <text:p>8800</text:p>
          </table:table-cell>
          <table:table-cell office:value-type="float" office:value="214" table:style-name="ce9">
            <text:p>214</text:p>
          </table:table-cell>
          <table:table-cell office:value-type="float" office:value="9272" table:formula="of:=SUM([.G276]+[.E276])" table:style-name="ce15">
            <text:p>9272</text:p>
          </table:table-cell>
          <table:table-cell office:value-type="float" office:value="131" table:formula="of:=[.F276]-[.H276]" table:style-name="ce15">
            <text:p>131</text:p>
          </table:table-cell>
          <table:table-cell office:value-type="percentage" office:value="5.9318377911993098E-3" table:formula="of:=([.I277]-[.I276])/[.I276]" table:style-name="ce16">
            <text:p>1%</text:p>
          </table:table-cell>
          <table:table-cell office:value-type="string" office:string-value="Valid" table:formula="of:=IF([.F276]&lt;=[.E276]; &quot;Valid&quot;; &quot;Invalid&quot;)" table:style-name="ce17">
            <text:p>Valid</text:p>
          </table:table-cell>
          <table:table-cell office:value-type="string" office:string-value="Valid" table:formula="of:=IF([.H276]&lt;=[.G276]; &quot;Valid&quot;; &quot;Invalid&quot;)" table:style-name="ce17">
            <text:p>Valid</text:p>
          </table:table-cell>
          <table:table-cell office:value-type="string" office:string-value="Increasing Pressure" table:formula="of:=IF([.J276]&gt;0; &quot;Increasing Pressure&quot;; &quot;Stable/Reducing&quot;)" table:style-name="ce18">
            <text:p>Increasing Pressure</text:p>
          </table:table-cell>
          <table:table-cell office:value-type="float" office:value="0.62028985507246381" table:formula="of:=IFERROR([.H276]/[.F276]; 0)" table:style-name="ce17">
            <text:p>0.620289855</text:p>
          </table:table-cell>
          <table:table-cell office:value-type="float" office:value="9202" table:formula="of:=AVERAGE([.I276:.I282])" table:style-name="ce15">
            <text:p>9202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3-06T00:00:00" table:style-name="ce14">
            <text:p>06-03-2024</text:p>
          </table:table-cell>
          <table:table-cell office:value-type="string" office:string-value="March" table:formula="of:=TEXT([.A277]; &quot;mmmm&quot;)" table:style-name="ce14">
            <text:p>March</text:p>
          </table:table-cell>
          <table:table-cell office:value-type="string" office:string-value="2024-03" table:formula="of:=TEXT([.A277]; &quot;yyyy-mm&quot;)" table:style-name="ce14">
            <text:p>2024-03</text:p>
          </table:table-cell>
          <table:table-cell office:value-type="float" office:value="230" table:style-name="ce9">
            <text:p>230</text:p>
          </table:table-cell>
          <table:table-cell office:value-type="float" office:value="457" table:style-name="ce9">
            <text:p>457</text:p>
          </table:table-cell>
          <table:table-cell office:value-type="float" office:value="277" table:style-name="ce9">
            <text:p>277</text:p>
          </table:table-cell>
          <table:table-cell office:value-type="float" office:value="8870" table:style-name="ce9">
            <text:p>8870</text:p>
          </table:table-cell>
          <table:table-cell office:value-type="float" office:value="232" table:style-name="ce9">
            <text:p>232</text:p>
          </table:table-cell>
          <table:table-cell office:value-type="float" office:value="9327" table:formula="of:=SUM([.G277]+[.E277])" table:style-name="ce15">
            <text:p>9327</text:p>
          </table:table-cell>
          <table:table-cell office:value-type="float" office:value="45" table:formula="of:=[.F277]-[.H277]" table:style-name="ce15">
            <text:p>45</text:p>
          </table:table-cell>
          <table:table-cell office:value-type="percentage" office:value="-1.0721561059290233E-4" table:formula="of:=([.I278]-[.I277])/[.I277]" table:style-name="ce16">
            <text:p>0%</text:p>
          </table:table-cell>
          <table:table-cell office:value-type="string" office:string-value="Valid" table:formula="of:=IF([.F277]&lt;=[.E277]; &quot;Valid&quot;; &quot;Invalid&quot;)" table:style-name="ce17">
            <text:p>Valid</text:p>
          </table:table-cell>
          <table:table-cell office:value-type="string" office:string-value="Valid" table:formula="of:=IF([.H277]&lt;=[.G277]; &quot;Valid&quot;; &quot;Invalid&quot;)" table:style-name="ce17">
            <text:p>Valid</text:p>
          </table:table-cell>
          <table:table-cell office:value-type="string" office:string-value="Increasing Pressure" table:formula="of:=IF([.J277]&gt;0; &quot;Increasing Pressure&quot;; &quot;Stable/Reducing&quot;)" table:style-name="ce18">
            <text:p>Increasing Pressure</text:p>
          </table:table-cell>
          <table:table-cell office:value-type="float" office:value="0.83754512635379064" table:formula="of:=IFERROR([.H277]/[.F277]; 0)" table:style-name="ce17">
            <text:p>0.837545126</text:p>
          </table:table-cell>
          <table:table-cell office:value-type="float" office:value="9162.5714285714294" table:formula="of:=AVERAGE([.I277:.I283])" table:style-name="ce15">
            <text:p>9163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3-07T00:00:00" table:style-name="ce14">
            <text:p>07-03-2024</text:p>
          </table:table-cell>
          <table:table-cell office:value-type="string" office:string-value="March" table:formula="of:=TEXT([.A278]; &quot;mmmm&quot;)" table:style-name="ce14">
            <text:p>March</text:p>
          </table:table-cell>
          <table:table-cell office:value-type="string" office:string-value="2024-03" table:formula="of:=TEXT([.A278]; &quot;yyyy-mm&quot;)" table:style-name="ce14">
            <text:p>2024-03</text:p>
          </table:table-cell>
          <table:table-cell office:value-type="float" office:value="181" table:style-name="ce9">
            <text:p>181</text:p>
          </table:table-cell>
          <table:table-cell office:value-type="float" office:value="424" table:style-name="ce9">
            <text:p>424</text:p>
          </table:table-cell>
          <table:table-cell office:value-type="float" office:value="328" table:style-name="ce9">
            <text:p>328</text:p>
          </table:table-cell>
          <table:table-cell office:value-type="float" office:value="8902" table:style-name="ce9">
            <text:p>8902</text:p>
          </table:table-cell>
          <table:table-cell office:value-type="float" office:value="305" table:style-name="ce9">
            <text:p>305</text:p>
          </table:table-cell>
          <table:table-cell office:value-type="float" office:value="9326" table:formula="of:=SUM([.G278]+[.E278])" table:style-name="ce15">
            <text:p>9326</text:p>
          </table:table-cell>
          <table:table-cell office:value-type="float" office:value="23" table:formula="of:=[.F278]-[.H278]" table:style-name="ce15">
            <text:p>23</text:p>
          </table:table-cell>
          <table:table-cell office:value-type="percentage" office:value="-2.6163414111087281E-2" table:formula="of:=([.I279]-[.I278])/[.I278]" table:style-name="ce16">
            <text:p>-3%</text:p>
          </table:table-cell>
          <table:table-cell office:value-type="string" office:string-value="Valid" table:formula="of:=IF([.F278]&lt;=[.E278]; &quot;Valid&quot;; &quot;Invalid&quot;)" table:style-name="ce17">
            <text:p>Valid</text:p>
          </table:table-cell>
          <table:table-cell office:value-type="string" office:string-value="Valid" table:formula="of:=IF([.H278]&lt;=[.G278]; &quot;Valid&quot;; &quot;Invalid&quot;)" table:style-name="ce17">
            <text:p>Valid</text:p>
          </table:table-cell>
          <table:table-cell office:value-type="string" office:string-value="Increasing Pressure" table:formula="of:=IF([.J278]&gt;0; &quot;Increasing Pressure&quot;; &quot;Stable/Reducing&quot;)" table:style-name="ce18">
            <text:p>Increasing Pressure</text:p>
          </table:table-cell>
          <table:table-cell office:value-type="float" office:value="0.92987804878048785" table:formula="of:=IFERROR([.H278]/[.F278]; 0)" table:style-name="ce17">
            <text:p>0.929878049</text:p>
          </table:table-cell>
          <table:table-cell office:value-type="float" office:value="9063.4285714285706" table:formula="of:=AVERAGE([.I278:.I284])" table:style-name="ce15">
            <text:p>9063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3-10T00:00:00" table:style-name="ce14">
            <text:p>10-03-2024</text:p>
          </table:table-cell>
          <table:table-cell office:value-type="string" office:string-value="March" table:formula="of:=TEXT([.A279]; &quot;mmmm&quot;)" table:style-name="ce14">
            <text:p>March</text:p>
          </table:table-cell>
          <table:table-cell office:value-type="string" office:string-value="2024-03" table:formula="of:=TEXT([.A279]; &quot;yyyy-mm&quot;)" table:style-name="ce14">
            <text:p>2024-03</text:p>
          </table:table-cell>
          <table:table-cell office:value-type="float" office:value="190" table:style-name="ce9">
            <text:p>190</text:p>
          </table:table-cell>
          <table:table-cell office:value-type="float" office:value="368" table:style-name="ce9">
            <text:p>368</text:p>
          </table:table-cell>
          <table:table-cell office:value-type="float" office:value="326" table:style-name="ce9">
            <text:p>326</text:p>
          </table:table-cell>
          <table:table-cell office:value-type="float" office:value="8714" table:style-name="ce9">
            <text:p>8714</text:p>
          </table:table-cell>
          <table:table-cell office:value-type="float" office:value="373" table:style-name="ce9">
            <text:p>373</text:p>
          </table:table-cell>
          <table:table-cell office:value-type="float" office:value="9082" table:formula="of:=SUM([.G279]+[.E279])" table:style-name="ce15">
            <text:p>9082</text:p>
          </table:table-cell>
          <table:table-cell office:value-type="float" office:value="-47" table:formula="of:=[.F279]-[.H279]" table:style-name="ce15">
            <text:p>-47</text:p>
          </table:table-cell>
          <table:table-cell office:value-type="percentage" office:value="1.2111869632239595E-3" table:formula="of:=([.I280]-[.I279])/[.I279]" table:style-name="ce16">
            <text:p>0%</text:p>
          </table:table-cell>
          <table:table-cell office:value-type="string" office:string-value="Valid" table:formula="of:=IF([.F279]&lt;=[.E279]; &quot;Valid&quot;; &quot;Invalid&quot;)" table:style-name="ce17">
            <text:p>Valid</text:p>
          </table:table-cell>
          <table:table-cell office:value-type="string" office:string-value="Valid" table:formula="of:=IF([.H279]&lt;=[.G279]; &quot;Valid&quot;; &quot;Invalid&quot;)" table:style-name="ce17">
            <text:p>Valid</text:p>
          </table:table-cell>
          <table:table-cell office:value-type="string" office:string-value="Stable/Reducing" table:formula="of:=IF([.J279]&gt;0; &quot;Increasing Pressure&quot;; &quot;Stable/Reducing&quot;)" table:style-name="ce18">
            <text:p>Stable/Reducing</text:p>
          </table:table-cell>
          <table:table-cell office:value-type="float" office:value="1.1441717791411044" table:formula="of:=IFERROR([.H279]/[.F279]; 0)" table:style-name="ce17">
            <text:p>1.144171779</text:p>
          </table:table-cell>
          <table:table-cell office:value-type="float" office:value="8956.2857142857138" table:formula="of:=AVERAGE([.I279:.I285])" table:style-name="ce15">
            <text:p>8956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3-11T00:00:00" table:style-name="ce14">
            <text:p>11-03-2024</text:p>
          </table:table-cell>
          <table:table-cell office:value-type="string" office:string-value="March" table:formula="of:=TEXT([.A280]; &quot;mmmm&quot;)" table:style-name="ce14">
            <text:p>March</text:p>
          </table:table-cell>
          <table:table-cell office:value-type="string" office:string-value="2024-03" table:formula="of:=TEXT([.A280]; &quot;yyyy-mm&quot;)" table:style-name="ce14">
            <text:p>2024-03</text:p>
          </table:table-cell>
          <table:table-cell office:value-type="float" office:value="178" table:style-name="ce9">
            <text:p>178</text:p>
          </table:table-cell>
          <table:table-cell office:value-type="float" office:value="336" table:style-name="ce9">
            <text:p>336</text:p>
          </table:table-cell>
          <table:table-cell office:value-type="float" office:value="290" table:style-name="ce9">
            <text:p>290</text:p>
          </table:table-cell>
          <table:table-cell office:value-type="float" office:value="8757" table:style-name="ce9">
            <text:p>8757</text:p>
          </table:table-cell>
          <table:table-cell office:value-type="float" office:value="253" table:style-name="ce9">
            <text:p>253</text:p>
          </table:table-cell>
          <table:table-cell office:value-type="float" office:value="9093" table:formula="of:=SUM([.G280]+[.E280])" table:style-name="ce15">
            <text:p>9093</text:p>
          </table:table-cell>
          <table:table-cell office:value-type="float" office:value="37" table:formula="of:=[.F280]-[.H280]" table:style-name="ce15">
            <text:p>37</text:p>
          </table:table-cell>
          <table:table-cell office:value-type="percentage" office:value="4.8388870559771249E-3" table:formula="of:=([.I281]-[.I280])/[.I280]" table:style-name="ce16">
            <text:p>0%</text:p>
          </table:table-cell>
          <table:table-cell office:value-type="string" office:string-value="Valid" table:formula="of:=IF([.F280]&lt;=[.E280]; &quot;Valid&quot;; &quot;Invalid&quot;)" table:style-name="ce17">
            <text:p>Valid</text:p>
          </table:table-cell>
          <table:table-cell office:value-type="string" office:string-value="Valid" table:formula="of:=IF([.H280]&lt;=[.G280]; &quot;Valid&quot;; &quot;Invalid&quot;)" table:style-name="ce17">
            <text:p>Valid</text:p>
          </table:table-cell>
          <table:table-cell office:value-type="string" office:string-value="Increasing Pressure" table:formula="of:=IF([.J280]&gt;0; &quot;Increasing Pressure&quot;; &quot;Stable/Reducing&quot;)" table:style-name="ce18">
            <text:p>Increasing Pressure</text:p>
          </table:table-cell>
          <table:table-cell office:value-type="float" office:value="0.87241379310344824" table:formula="of:=IFERROR([.H280]/[.F280]; 0)" table:style-name="ce17">
            <text:p>0.872413793</text:p>
          </table:table-cell>
          <table:table-cell office:value-type="float" office:value="8886.2857142857138" table:formula="of:=AVERAGE([.I280:.I286])" table:style-name="ce15">
            <text:p>8886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3-12T00:00:00" table:style-name="ce14">
            <text:p>12-03-2024</text:p>
          </table:table-cell>
          <table:table-cell office:value-type="string" office:string-value="March" table:formula="of:=TEXT([.A281]; &quot;mmmm&quot;)" table:style-name="ce14">
            <text:p>March</text:p>
          </table:table-cell>
          <table:table-cell office:value-type="string" office:string-value="2024-03" table:formula="of:=TEXT([.A281]; &quot;yyyy-mm&quot;)" table:style-name="ce14">
            <text:p>2024-03</text:p>
          </table:table-cell>
          <table:table-cell office:value-type="float" office:value="154" table:style-name="ce9">
            <text:p>154</text:p>
          </table:table-cell>
          <table:table-cell office:value-type="float" office:value="294" table:style-name="ce9">
            <text:p>294</text:p>
          </table:table-cell>
          <table:table-cell office:value-type="float" office:value="290" table:style-name="ce9">
            <text:p>290</text:p>
          </table:table-cell>
          <table:table-cell office:value-type="float" office:value="8843" table:style-name="ce9">
            <text:p>8843</text:p>
          </table:table-cell>
          <table:table-cell office:value-type="float" office:value="213" table:style-name="ce9">
            <text:p>213</text:p>
          </table:table-cell>
          <table:table-cell office:value-type="float" office:value="9137" table:formula="of:=SUM([.G281]+[.E281])" table:style-name="ce15">
            <text:p>9137</text:p>
          </table:table-cell>
          <table:table-cell office:value-type="float" office:value="77" table:formula="of:=[.F281]-[.H281]" table:style-name="ce15">
            <text:p>77</text:p>
          </table:table-cell>
          <table:table-cell office:value-type="percentage" office:value="4.3778045310276896E-3" table:formula="of:=([.I282]-[.I281])/[.I281]" table:style-name="ce16">
            <text:p>0%</text:p>
          </table:table-cell>
          <table:table-cell office:value-type="string" office:string-value="Valid" table:formula="of:=IF([.F281]&lt;=[.E281]; &quot;Valid&quot;; &quot;Invalid&quot;)" table:style-name="ce17">
            <text:p>Valid</text:p>
          </table:table-cell>
          <table:table-cell office:value-type="string" office:string-value="Valid" table:formula="of:=IF([.H281]&lt;=[.G281]; &quot;Valid&quot;; &quot;Invalid&quot;)" table:style-name="ce17">
            <text:p>Valid</text:p>
          </table:table-cell>
          <table:table-cell office:value-type="string" office:string-value="Increasing Pressure" table:formula="of:=IF([.J281]&gt;0; &quot;Increasing Pressure&quot;; &quot;Stable/Reducing&quot;)" table:style-name="ce18">
            <text:p>Increasing Pressure</text:p>
          </table:table-cell>
          <table:table-cell office:value-type="float" office:value="0.73448275862068968" table:formula="of:=IFERROR([.H281]/[.F281]; 0)" table:style-name="ce17">
            <text:p>0.734482759</text:p>
          </table:table-cell>
          <table:table-cell office:value-type="float" office:value="8808.1428571428569" table:formula="of:=AVERAGE([.I281:.I287])" table:style-name="ce15">
            <text:p>8808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3-13T00:00:00" table:style-name="ce14">
            <text:p>13-03-2024</text:p>
          </table:table-cell>
          <table:table-cell office:value-type="string" office:string-value="March" table:formula="of:=TEXT([.A282]; &quot;mmmm&quot;)" table:style-name="ce14">
            <text:p>March</text:p>
          </table:table-cell>
          <table:table-cell office:value-type="string" office:string-value="2024-03" table:formula="of:=TEXT([.A282]; &quot;yyyy-mm&quot;)" table:style-name="ce14">
            <text:p>2024-03</text:p>
          </table:table-cell>
          <table:table-cell office:value-type="float" office:value="165" table:style-name="ce9">
            <text:p>165</text:p>
          </table:table-cell>
          <table:table-cell office:value-type="float" office:value="358" table:style-name="ce9">
            <text:p>358</text:p>
          </table:table-cell>
          <table:table-cell office:value-type="float" office:value="167" table:style-name="ce9">
            <text:p>167</text:p>
          </table:table-cell>
          <table:table-cell office:value-type="float" office:value="8819" table:style-name="ce9">
            <text:p>8819</text:p>
          </table:table-cell>
          <table:table-cell office:value-type="float" office:value="239" table:style-name="ce9">
            <text:p>239</text:p>
          </table:table-cell>
          <table:table-cell office:value-type="float" office:value="9177" table:formula="of:=SUM([.G282]+[.E282])" table:style-name="ce15">
            <text:p>9177</text:p>
          </table:table-cell>
          <table:table-cell office:value-type="float" office:value="-72" table:formula="of:=[.F282]-[.H282]" table:style-name="ce15">
            <text:p>-72</text:p>
          </table:table-cell>
          <table:table-cell office:value-type="percentage" office:value="-1.9723221096218806E-2" table:formula="of:=([.I283]-[.I282])/[.I282]" table:style-name="ce16">
            <text:p>-2%</text:p>
          </table:table-cell>
          <table:table-cell office:value-type="string" office:string-value="Valid" table:formula="of:=IF([.F282]&lt;=[.E282]; &quot;Valid&quot;; &quot;Invalid&quot;)" table:style-name="ce17">
            <text:p>Valid</text:p>
          </table:table-cell>
          <table:table-cell office:value-type="string" office:string-value="Valid" table:formula="of:=IF([.H282]&lt;=[.G282]; &quot;Valid&quot;; &quot;Invalid&quot;)" table:style-name="ce17">
            <text:p>Valid</text:p>
          </table:table-cell>
          <table:table-cell office:value-type="string" office:string-value="Stable/Reducing" table:formula="of:=IF([.J282]&gt;0; &quot;Increasing Pressure&quot;; &quot;Stable/Reducing&quot;)" table:style-name="ce18">
            <text:p>Stable/Reducing</text:p>
          </table:table-cell>
          <table:table-cell office:value-type="float" office:value="1.4311377245508983" table:formula="of:=IFERROR([.H282]/[.F282]; 0)" table:style-name="ce17">
            <text:p>1.431137725</text:p>
          </table:table-cell>
          <table:table-cell office:value-type="float" office:value="8724.7142857142862" table:formula="of:=AVERAGE([.I282:.I288])" table:style-name="ce15">
            <text:p>8725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3-14T00:00:00" table:style-name="ce14">
            <text:p>14-03-2024</text:p>
          </table:table-cell>
          <table:table-cell office:value-type="string" office:string-value="March" table:formula="of:=TEXT([.A283]; &quot;mmmm&quot;)" table:style-name="ce14">
            <text:p>March</text:p>
          </table:table-cell>
          <table:table-cell office:value-type="string" office:string-value="2024-03" table:formula="of:=TEXT([.A283]; &quot;yyyy-mm&quot;)" table:style-name="ce14">
            <text:p>2024-03</text:p>
          </table:table-cell>
          <table:table-cell office:value-type="float" office:value="166" table:style-name="ce9">
            <text:p>166</text:p>
          </table:table-cell>
          <table:table-cell office:value-type="float" office:value="301" table:style-name="ce9">
            <text:p>301</text:p>
          </table:table-cell>
          <table:table-cell office:value-type="float" office:value="252" table:style-name="ce9">
            <text:p>252</text:p>
          </table:table-cell>
          <table:table-cell office:value-type="float" office:value="8695" table:style-name="ce9">
            <text:p>8695</text:p>
          </table:table-cell>
          <table:table-cell office:value-type="float" office:value="310" table:style-name="ce9">
            <text:p>310</text:p>
          </table:table-cell>
          <table:table-cell office:value-type="float" office:value="8996" table:formula="of:=SUM([.G283]+[.E283])" table:style-name="ce15">
            <text:p>8996</text:p>
          </table:table-cell>
          <table:table-cell office:value-type="float" office:value="-58" table:formula="of:=[.F283]-[.H283]" table:style-name="ce15">
            <text:p>-58</text:p>
          </table:table-cell>
          <table:table-cell office:value-type="percentage" office:value="-4.0351267229879945E-2" table:formula="of:=([.I284]-[.I283])/[.I283]" table:style-name="ce16">
            <text:p>-4%</text:p>
          </table:table-cell>
          <table:table-cell office:value-type="string" office:string-value="Valid" table:formula="of:=IF([.F283]&lt;=[.E283]; &quot;Valid&quot;; &quot;Invalid&quot;)" table:style-name="ce17">
            <text:p>Valid</text:p>
          </table:table-cell>
          <table:table-cell office:value-type="string" office:string-value="Valid" table:formula="of:=IF([.H283]&lt;=[.G283]; &quot;Valid&quot;; &quot;Invalid&quot;)" table:style-name="ce17">
            <text:p>Valid</text:p>
          </table:table-cell>
          <table:table-cell office:value-type="string" office:string-value="Stable/Reducing" table:formula="of:=IF([.J283]&gt;0; &quot;Increasing Pressure&quot;; &quot;Stable/Reducing&quot;)" table:style-name="ce18">
            <text:p>Stable/Reducing</text:p>
          </table:table-cell>
          <table:table-cell office:value-type="float" office:value="1.2301587301587302" table:formula="of:=IFERROR([.H283]/[.F283]; 0)" table:style-name="ce17">
            <text:p>1.23015873</text:p>
          </table:table-cell>
          <table:table-cell office:value-type="float" office:value="8579.8571428571431" table:formula="of:=AVERAGE([.I283:.I289])" table:style-name="ce15">
            <text:p>8580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3-17T00:00:00" table:style-name="ce14">
            <text:p>17-03-2024</text:p>
          </table:table-cell>
          <table:table-cell office:value-type="string" office:string-value="March" table:formula="of:=TEXT([.A284]; &quot;mmmm&quot;)" table:style-name="ce14">
            <text:p>March</text:p>
          </table:table-cell>
          <table:table-cell office:value-type="string" office:string-value="2024-03" table:formula="of:=TEXT([.A284]; &quot;yyyy-mm&quot;)" table:style-name="ce14">
            <text:p>2024-03</text:p>
          </table:table-cell>
          <table:table-cell office:value-type="float" office:value="127" table:style-name="ce9">
            <text:p>127</text:p>
          </table:table-cell>
          <table:table-cell office:value-type="float" office:value="260" table:style-name="ce9">
            <text:p>260</text:p>
          </table:table-cell>
          <table:table-cell office:value-type="float" office:value="259" table:style-name="ce9">
            <text:p>259</text:p>
          </table:table-cell>
          <table:table-cell office:value-type="float" office:value="8373" table:style-name="ce9">
            <text:p>8373</text:p>
          </table:table-cell>
          <table:table-cell office:value-type="float" office:value="342" table:style-name="ce9">
            <text:p>342</text:p>
          </table:table-cell>
          <table:table-cell office:value-type="float" office:value="8633" table:formula="of:=SUM([.G284]+[.E284])" table:style-name="ce15">
            <text:p>8633</text:p>
          </table:table-cell>
          <table:table-cell office:value-type="float" office:value="-83" table:formula="of:=[.F284]-[.H284]" table:style-name="ce15">
            <text:p>-83</text:p>
          </table:table-cell>
          <table:table-cell office:value-type="percentage" office:value="-6.6025715278582187E-3" table:formula="of:=([.I285]-[.I284])/[.I284]" table:style-name="ce16">
            <text:p>-1%</text:p>
          </table:table-cell>
          <table:table-cell office:value-type="string" office:string-value="Valid" table:formula="of:=IF([.F284]&lt;=[.E284]; &quot;Valid&quot;; &quot;Invalid&quot;)" table:style-name="ce17">
            <text:p>Valid</text:p>
          </table:table-cell>
          <table:table-cell office:value-type="string" office:string-value="Valid" table:formula="of:=IF([.H284]&lt;=[.G284]; &quot;Valid&quot;; &quot;Invalid&quot;)" table:style-name="ce17">
            <text:p>Valid</text:p>
          </table:table-cell>
          <table:table-cell office:value-type="string" office:string-value="Stable/Reducing" table:formula="of:=IF([.J284]&gt;0; &quot;Increasing Pressure&quot;; &quot;Stable/Reducing&quot;)" table:style-name="ce18">
            <text:p>Stable/Reducing</text:p>
          </table:table-cell>
          <table:table-cell office:value-type="float" office:value="1.3204633204633205" table:formula="of:=IFERROR([.H284]/[.F284]; 0)" table:style-name="ce17">
            <text:p>1.32046332</text:p>
          </table:table-cell>
          <table:table-cell office:value-type="float" office:value="8457.7142857142862" table:formula="of:=AVERAGE([.I284:.I290])" table:style-name="ce15">
            <text:p>8458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3-18T00:00:00" table:style-name="ce14">
            <text:p>18-03-2024</text:p>
          </table:table-cell>
          <table:table-cell office:value-type="string" office:string-value="March" table:formula="of:=TEXT([.A285]; &quot;mmmm&quot;)" table:style-name="ce14">
            <text:p>March</text:p>
          </table:table-cell>
          <table:table-cell office:value-type="string" office:string-value="2024-03" table:formula="of:=TEXT([.A285]; &quot;yyyy-mm&quot;)" table:style-name="ce14">
            <text:p>2024-03</text:p>
          </table:table-cell>
          <table:table-cell office:value-type="float" office:value="123" table:style-name="ce9">
            <text:p>123</text:p>
          </table:table-cell>
          <table:table-cell office:value-type="float" office:value="243" table:style-name="ce9">
            <text:p>243</text:p>
          </table:table-cell>
          <table:table-cell office:value-type="float" office:value="188" table:style-name="ce9">
            <text:p>188</text:p>
          </table:table-cell>
          <table:table-cell office:value-type="float" office:value="8333" table:style-name="ce9">
            <text:p>8333</text:p>
          </table:table-cell>
          <table:table-cell office:value-type="float" office:value="283" table:style-name="ce9">
            <text:p>283</text:p>
          </table:table-cell>
          <table:table-cell office:value-type="float" office:value="8576" table:formula="of:=SUM([.G285]+[.E285])" table:style-name="ce15">
            <text:p>8576</text:p>
          </table:table-cell>
          <table:table-cell office:value-type="float" office:value="-95" table:formula="of:=[.F285]-[.H285]" table:style-name="ce15">
            <text:p>-95</text:p>
          </table:table-cell>
          <table:table-cell office:value-type="percentage" office:value="1.8656716417910447E-3" table:formula="of:=([.I286]-[.I285])/[.I285]" table:style-name="ce16">
            <text:p>0%</text:p>
          </table:table-cell>
          <table:table-cell office:value-type="string" office:string-value="Valid" table:formula="of:=IF([.F285]&lt;=[.E285]; &quot;Valid&quot;; &quot;Invalid&quot;)" table:style-name="ce17">
            <text:p>Valid</text:p>
          </table:table-cell>
          <table:table-cell office:value-type="string" office:string-value="Valid" table:formula="of:=IF([.H285]&lt;=[.G285]; &quot;Valid&quot;; &quot;Invalid&quot;)" table:style-name="ce17">
            <text:p>Valid</text:p>
          </table:table-cell>
          <table:table-cell office:value-type="string" office:string-value="Stable/Reducing" table:formula="of:=IF([.J285]&gt;0; &quot;Increasing Pressure&quot;; &quot;Stable/Reducing&quot;)" table:style-name="ce18">
            <text:p>Stable/Reducing</text:p>
          </table:table-cell>
          <table:table-cell office:value-type="float" office:value="1.5053191489361701" table:formula="of:=IFERROR([.H285]/[.F285]; 0)" table:style-name="ce17">
            <text:p>1.505319149</text:p>
          </table:table-cell>
          <table:table-cell office:value-type="float" office:value="8395.1428571428569" table:formula="of:=AVERAGE([.I285:.I291])" table:style-name="ce15">
            <text:p>8395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3-19T00:00:00" table:style-name="ce14">
            <text:p>19-03-2024</text:p>
          </table:table-cell>
          <table:table-cell office:value-type="string" office:string-value="March" table:formula="of:=TEXT([.A286]; &quot;mmmm&quot;)" table:style-name="ce14">
            <text:p>March</text:p>
          </table:table-cell>
          <table:table-cell office:value-type="string" office:string-value="2024-03" table:formula="of:=TEXT([.A286]; &quot;yyyy-mm&quot;)" table:style-name="ce14">
            <text:p>2024-03</text:p>
          </table:table-cell>
          <table:table-cell office:value-type="float" office:value="99" table:style-name="ce9">
            <text:p>99</text:p>
          </table:table-cell>
          <table:table-cell office:value-type="float" office:value="202" table:style-name="ce9">
            <text:p>202</text:p>
          </table:table-cell>
          <table:table-cell office:value-type="float" office:value="256" table:style-name="ce9">
            <text:p>256</text:p>
          </table:table-cell>
          <table:table-cell office:value-type="float" office:value="8390" table:style-name="ce9">
            <text:p>8390</text:p>
          </table:table-cell>
          <table:table-cell office:value-type="float" office:value="197" table:style-name="ce9">
            <text:p>197</text:p>
          </table:table-cell>
          <table:table-cell office:value-type="float" office:value="8592" table:formula="of:=SUM([.G286]+[.E286])" table:style-name="ce15">
            <text:p>8592</text:p>
          </table:table-cell>
          <table:table-cell office:value-type="float" office:value="59" table:formula="of:=[.F286]-[.H286]" table:style-name="ce15">
            <text:p>59</text:p>
          </table:table-cell>
          <table:table-cell office:value-type="percentage" office:value="-5.3538175046554939E-3" table:formula="of:=([.I287]-[.I286])/[.I286]" table:style-name="ce16">
            <text:p>-1%</text:p>
          </table:table-cell>
          <table:table-cell office:value-type="string" office:string-value="Invalid" table:formula="of:=IF([.F286]&lt;=[.E286]; &quot;Valid&quot;; &quot;Invalid&quot;)" table:style-name="ce17">
            <text:p>Invalid</text:p>
          </table:table-cell>
          <table:table-cell office:value-type="string" office:string-value="Valid" table:formula="of:=IF([.H286]&lt;=[.G286]; &quot;Valid&quot;; &quot;Invalid&quot;)" table:style-name="ce17">
            <text:p>Valid</text:p>
          </table:table-cell>
          <table:table-cell office:value-type="string" office:string-value="Increasing Pressure" table:formula="of:=IF([.J286]&gt;0; &quot;Increasing Pressure&quot;; &quot;Stable/Reducing&quot;)" table:style-name="ce18">
            <text:p>Increasing Pressure</text:p>
          </table:table-cell>
          <table:table-cell office:value-type="float" office:value="0.76953125" table:formula="of:=IFERROR([.H286]/[.F286]; 0)" table:style-name="ce17">
            <text:p>0.76953125</text:p>
          </table:table-cell>
          <table:table-cell office:value-type="float" office:value="8338.5714285714294" table:formula="of:=AVERAGE([.I286:.I292])" table:style-name="ce15">
            <text:p>8339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3-20T00:00:00" table:style-name="ce14">
            <text:p>20-03-2024</text:p>
          </table:table-cell>
          <table:table-cell office:value-type="string" office:string-value="March" table:formula="of:=TEXT([.A287]; &quot;mmmm&quot;)" table:style-name="ce14">
            <text:p>March</text:p>
          </table:table-cell>
          <table:table-cell office:value-type="string" office:string-value="2024-03" table:formula="of:=TEXT([.A287]; &quot;yyyy-mm&quot;)" table:style-name="ce14">
            <text:p>2024-03</text:p>
          </table:table-cell>
          <table:table-cell office:value-type="float" office:value="91" table:style-name="ce9">
            <text:p>91</text:p>
          </table:table-cell>
          <table:table-cell office:value-type="float" office:value="181" table:style-name="ce9">
            <text:p>181</text:p>
          </table:table-cell>
          <table:table-cell office:value-type="float" office:value="174" table:style-name="ce9">
            <text:p>174</text:p>
          </table:table-cell>
          <table:table-cell office:value-type="float" office:value="8365" table:style-name="ce9">
            <text:p>8365</text:p>
          </table:table-cell>
          <table:table-cell office:value-type="float" office:value="227" table:style-name="ce9">
            <text:p>227</text:p>
          </table:table-cell>
          <table:table-cell office:value-type="float" office:value="8546" table:formula="of:=SUM([.G287]+[.E287])" table:style-name="ce15">
            <text:p>8546</text:p>
          </table:table-cell>
          <table:table-cell office:value-type="float" office:value="-53" table:formula="of:=[.F287]-[.H287]" table:style-name="ce15">
            <text:p>-53</text:p>
          </table:table-cell>
          <table:table-cell office:value-type="percentage" office:value="8.1909665340510179E-4" table:formula="of:=([.I288]-[.I287])/[.I287]" table:style-name="ce16">
            <text:p>0%</text:p>
          </table:table-cell>
          <table:table-cell office:value-type="string" office:string-value="Valid" table:formula="of:=IF([.F287]&lt;=[.E287]; &quot;Valid&quot;; &quot;Invalid&quot;)" table:style-name="ce17">
            <text:p>Valid</text:p>
          </table:table-cell>
          <table:table-cell office:value-type="string" office:string-value="Valid" table:formula="of:=IF([.H287]&lt;=[.G287]; &quot;Valid&quot;; &quot;Invalid&quot;)" table:style-name="ce17">
            <text:p>Valid</text:p>
          </table:table-cell>
          <table:table-cell office:value-type="string" office:string-value="Stable/Reducing" table:formula="of:=IF([.J287]&gt;0; &quot;Increasing Pressure&quot;; &quot;Stable/Reducing&quot;)" table:style-name="ce18">
            <text:p>Stable/Reducing</text:p>
          </table:table-cell>
          <table:table-cell office:value-type="float" office:value="1.3045977011494252" table:formula="of:=IFERROR([.H287]/[.F287]; 0)" table:style-name="ce17">
            <text:p>1.304597701</text:p>
          </table:table-cell>
          <table:table-cell office:value-type="float" office:value="8261.1428571428569" table:formula="of:=AVERAGE([.I287:.I293])" table:style-name="ce15">
            <text:p>8261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3-21T00:00:00" table:style-name="ce14">
            <text:p>21-03-2024</text:p>
          </table:table-cell>
          <table:table-cell office:value-type="string" office:string-value="March" table:formula="of:=TEXT([.A288]; &quot;mmmm&quot;)" table:style-name="ce14">
            <text:p>March</text:p>
          </table:table-cell>
          <table:table-cell office:value-type="string" office:string-value="2024-03" table:formula="of:=TEXT([.A288]; &quot;yyyy-mm&quot;)" table:style-name="ce14">
            <text:p>2024-03</text:p>
          </table:table-cell>
          <table:table-cell office:value-type="float" office:value="132" table:style-name="ce9">
            <text:p>132</text:p>
          </table:table-cell>
          <table:table-cell office:value-type="float" office:value="261" table:style-name="ce9">
            <text:p>261</text:p>
          </table:table-cell>
          <table:table-cell office:value-type="float" office:value="141" table:style-name="ce9">
            <text:p>141</text:p>
          </table:table-cell>
          <table:table-cell office:value-type="float" office:value="8292" table:style-name="ce9">
            <text:p>8292</text:p>
          </table:table-cell>
          <table:table-cell office:value-type="float" office:value="235" table:style-name="ce9">
            <text:p>235</text:p>
          </table:table-cell>
          <table:table-cell office:value-type="float" office:value="8553" table:formula="of:=SUM([.G288]+[.E288])" table:style-name="ce15">
            <text:p>8553</text:p>
          </table:table-cell>
          <table:table-cell office:value-type="float" office:value="-94" table:formula="of:=[.F288]-[.H288]" table:style-name="ce15">
            <text:p>-94</text:p>
          </table:table-cell>
          <table:table-cell office:value-type="percentage" office:value="-4.5598035776920377E-2" table:formula="of:=([.I289]-[.I288])/[.I288]" table:style-name="ce16">
            <text:p>-5%</text:p>
          </table:table-cell>
          <table:table-cell office:value-type="string" office:string-value="Valid" table:formula="of:=IF([.F288]&lt;=[.E288]; &quot;Valid&quot;; &quot;Invalid&quot;)" table:style-name="ce17">
            <text:p>Valid</text:p>
          </table:table-cell>
          <table:table-cell office:value-type="string" office:string-value="Valid" table:formula="of:=IF([.H288]&lt;=[.G288]; &quot;Valid&quot;; &quot;Invalid&quot;)" table:style-name="ce17">
            <text:p>Valid</text:p>
          </table:table-cell>
          <table:table-cell office:value-type="string" office:string-value="Stable/Reducing" table:formula="of:=IF([.J288]&gt;0; &quot;Increasing Pressure&quot;; &quot;Stable/Reducing&quot;)" table:style-name="ce18">
            <text:p>Stable/Reducing</text:p>
          </table:table-cell>
          <table:table-cell office:value-type="float" office:value="1.6666666666666667" table:formula="of:=IFERROR([.H288]/[.F288]; 0)" table:style-name="ce17">
            <text:p>1.666666667</text:p>
          </table:table-cell>
          <table:table-cell office:value-type="float" office:value="8113.2857142857147" table:formula="of:=AVERAGE([.I288:.I294])" table:style-name="ce15">
            <text:p>8113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3-24T00:00:00" table:style-name="ce14">
            <text:p>24-03-2024</text:p>
          </table:table-cell>
          <table:table-cell office:value-type="string" office:string-value="March" table:formula="of:=TEXT([.A289]; &quot;mmmm&quot;)" table:style-name="ce14">
            <text:p>March</text:p>
          </table:table-cell>
          <table:table-cell office:value-type="string" office:string-value="2024-03" table:formula="of:=TEXT([.A289]; &quot;yyyy-mm&quot;)" table:style-name="ce14">
            <text:p>2024-03</text:p>
          </table:table-cell>
          <table:table-cell office:value-type="float" office:value="124" table:style-name="ce9">
            <text:p>124</text:p>
          </table:table-cell>
          <table:table-cell office:value-type="float" office:value="264" table:style-name="ce9">
            <text:p>264</text:p>
          </table:table-cell>
          <table:table-cell office:value-type="float" office:value="221" table:style-name="ce9">
            <text:p>221</text:p>
          </table:table-cell>
          <table:table-cell office:value-type="float" office:value="7899" table:style-name="ce9">
            <text:p>7899</text:p>
          </table:table-cell>
          <table:table-cell office:value-type="float" office:value="373" table:style-name="ce9">
            <text:p>373</text:p>
          </table:table-cell>
          <table:table-cell office:value-type="float" office:value="8163" table:formula="of:=SUM([.G289]+[.E289])" table:style-name="ce15">
            <text:p>8163</text:p>
          </table:table-cell>
          <table:table-cell office:value-type="float" office:value="-152" table:formula="of:=[.F289]-[.H289]" table:style-name="ce15">
            <text:p>-152</text:p>
          </table:table-cell>
          <table:table-cell office:value-type="percentage" office:value="-2.6950875903466861E-3" table:formula="of:=([.I290]-[.I289])/[.I289]" table:style-name="ce16">
            <text:p>0%</text:p>
          </table:table-cell>
          <table:table-cell office:value-type="string" office:string-value="Valid" table:formula="of:=IF([.F289]&lt;=[.E289]; &quot;Valid&quot;; &quot;Invalid&quot;)" table:style-name="ce17">
            <text:p>Valid</text:p>
          </table:table-cell>
          <table:table-cell office:value-type="string" office:string-value="Valid" table:formula="of:=IF([.H289]&lt;=[.G289]; &quot;Valid&quot;; &quot;Invalid&quot;)" table:style-name="ce17">
            <text:p>Valid</text:p>
          </table:table-cell>
          <table:table-cell office:value-type="string" office:string-value="Stable/Reducing" table:formula="of:=IF([.J289]&gt;0; &quot;Increasing Pressure&quot;; &quot;Stable/Reducing&quot;)" table:style-name="ce18">
            <text:p>Stable/Reducing</text:p>
          </table:table-cell>
          <table:table-cell office:value-type="float" office:value="1.6877828054298643" table:formula="of:=IFERROR([.H289]/[.F289]; 0)" table:style-name="ce17">
            <text:p>1.687782805</text:p>
          </table:table-cell>
          <table:table-cell office:value-type="float" office:value="7963.7142857142853" table:formula="of:=AVERAGE([.I289:.I295])" table:style-name="ce15">
            <text:p>7964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3-25T00:00:00" table:style-name="ce14">
            <text:p>25-03-2024</text:p>
          </table:table-cell>
          <table:table-cell office:value-type="string" office:string-value="March" table:formula="of:=TEXT([.A290]; &quot;mmmm&quot;)" table:style-name="ce14">
            <text:p>March</text:p>
          </table:table-cell>
          <table:table-cell office:value-type="string" office:string-value="2024-03" table:formula="of:=TEXT([.A290]; &quot;yyyy-mm&quot;)" table:style-name="ce14">
            <text:p>2024-03</text:p>
          </table:table-cell>
          <table:table-cell office:value-type="float" office:value="128" table:style-name="ce9">
            <text:p>128</text:p>
          </table:table-cell>
          <table:table-cell office:value-type="float" office:value="242" table:style-name="ce9">
            <text:p>242</text:p>
          </table:table-cell>
          <table:table-cell office:value-type="float" office:value="224" table:style-name="ce9">
            <text:p>224</text:p>
          </table:table-cell>
          <table:table-cell office:value-type="float" office:value="7899" table:style-name="ce9">
            <text:p>7899</text:p>
          </table:table-cell>
          <table:table-cell office:value-type="float" office:value="229" table:style-name="ce9">
            <text:p>229</text:p>
          </table:table-cell>
          <table:table-cell office:value-type="float" office:value="8141" table:formula="of:=SUM([.G290]+[.E290])" table:style-name="ce15">
            <text:p>8141</text:p>
          </table:table-cell>
          <table:table-cell office:value-type="float" office:value="-5" table:formula="of:=[.F290]-[.H290]" table:style-name="ce15">
            <text:p>-5</text:p>
          </table:table-cell>
          <table:table-cell office:value-type="percentage" office:value="6.6330917577693159E-3" table:formula="of:=([.I291]-[.I290])/[.I290]" table:style-name="ce16">
            <text:p>1%</text:p>
          </table:table-cell>
          <table:table-cell office:value-type="string" office:string-value="Valid" table:formula="of:=IF([.F290]&lt;=[.E290]; &quot;Valid&quot;; &quot;Invalid&quot;)" table:style-name="ce17">
            <text:p>Valid</text:p>
          </table:table-cell>
          <table:table-cell office:value-type="string" office:string-value="Valid" table:formula="of:=IF([.H290]&lt;=[.G290]; &quot;Valid&quot;; &quot;Invalid&quot;)" table:style-name="ce17">
            <text:p>Valid</text:p>
          </table:table-cell>
          <table:table-cell office:value-type="string" office:string-value="Stable/Reducing" table:formula="of:=IF([.J290]&gt;0; &quot;Increasing Pressure&quot;; &quot;Stable/Reducing&quot;)" table:style-name="ce18">
            <text:p>Stable/Reducing</text:p>
          </table:table-cell>
          <table:table-cell office:value-type="float" office:value="1.0223214285714286" table:formula="of:=IFERROR([.H290]/[.F290]; 0)" table:style-name="ce17">
            <text:p>1.022321429</text:p>
          </table:table-cell>
          <table:table-cell office:value-type="float" office:value="7879" table:formula="of:=AVERAGE([.I290:.I296])" table:style-name="ce15">
            <text:p>7879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3-26T00:00:00" table:style-name="ce14">
            <text:p>26-03-2024</text:p>
          </table:table-cell>
          <table:table-cell office:value-type="string" office:string-value="March" table:formula="of:=TEXT([.A291]; &quot;mmmm&quot;)" table:style-name="ce14">
            <text:p>March</text:p>
          </table:table-cell>
          <table:table-cell office:value-type="string" office:string-value="2024-03" table:formula="of:=TEXT([.A291]; &quot;yyyy-mm&quot;)" table:style-name="ce14">
            <text:p>2024-03</text:p>
          </table:table-cell>
          <table:table-cell office:value-type="float" office:value="187" table:style-name="ce9">
            <text:p>187</text:p>
          </table:table-cell>
          <table:table-cell office:value-type="float" office:value="276" table:style-name="ce9">
            <text:p>276</text:p>
          </table:table-cell>
          <table:table-cell office:value-type="float" office:value="200" table:style-name="ce9">
            <text:p>200</text:p>
          </table:table-cell>
          <table:table-cell office:value-type="float" office:value="7919" table:style-name="ce9">
            <text:p>7919</text:p>
          </table:table-cell>
          <table:table-cell office:value-type="float" office:value="208" table:style-name="ce9">
            <text:p>208</text:p>
          </table:table-cell>
          <table:table-cell office:value-type="float" office:value="8195" table:formula="of:=SUM([.G291]+[.E291])" table:style-name="ce15">
            <text:p>8195</text:p>
          </table:table-cell>
          <table:table-cell office:value-type="float" office:value="-8" table:formula="of:=[.F291]-[.H291]" table:style-name="ce15">
            <text:p>-8</text:p>
          </table:table-cell>
          <table:table-cell office:value-type="percentage" office:value="-1.8303843807199512E-3" table:formula="of:=([.I292]-[.I291])/[.I291]" table:style-name="ce16">
            <text:p>0%</text:p>
          </table:table-cell>
          <table:table-cell office:value-type="string" office:string-value="Valid" table:formula="of:=IF([.F291]&lt;=[.E291]; &quot;Valid&quot;; &quot;Invalid&quot;)" table:style-name="ce17">
            <text:p>Valid</text:p>
          </table:table-cell>
          <table:table-cell office:value-type="string" office:string-value="Valid" table:formula="of:=IF([.H291]&lt;=[.G291]; &quot;Valid&quot;; &quot;Invalid&quot;)" table:style-name="ce17">
            <text:p>Valid</text:p>
          </table:table-cell>
          <table:table-cell office:value-type="string" office:string-value="Stable/Reducing" table:formula="of:=IF([.J291]&gt;0; &quot;Increasing Pressure&quot;; &quot;Stable/Reducing&quot;)" table:style-name="ce18">
            <text:p>Stable/Reducing</text:p>
          </table:table-cell>
          <table:table-cell office:value-type="float" office:value="1.04" table:formula="of:=IFERROR([.H291]/[.F291]; 0)" table:style-name="ce17">
            <text:p>1.04</text:p>
          </table:table-cell>
          <table:table-cell office:value-type="float" office:value="7798.2857142857147" table:formula="of:=AVERAGE([.I291:.I297])" table:style-name="ce15">
            <text:p>7798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3-27T00:00:00" table:style-name="ce14">
            <text:p>27-03-2024</text:p>
          </table:table-cell>
          <table:table-cell office:value-type="string" office:string-value="March" table:formula="of:=TEXT([.A292]; &quot;mmmm&quot;)" table:style-name="ce14">
            <text:p>March</text:p>
          </table:table-cell>
          <table:table-cell office:value-type="string" office:string-value="2024-03" table:formula="of:=TEXT([.A292]; &quot;yyyy-mm&quot;)" table:style-name="ce14">
            <text:p>2024-03</text:p>
          </table:table-cell>
          <table:table-cell office:value-type="float" office:value="129" table:style-name="ce9">
            <text:p>129</text:p>
          </table:table-cell>
          <table:table-cell office:value-type="float" office:value="287" table:style-name="ce9">
            <text:p>287</text:p>
          </table:table-cell>
          <table:table-cell office:value-type="float" office:value="185" table:style-name="ce9">
            <text:p>185</text:p>
          </table:table-cell>
          <table:table-cell office:value-type="float" office:value="7893" table:style-name="ce9">
            <text:p>7893</text:p>
          </table:table-cell>
          <table:table-cell office:value-type="float" office:value="215" table:style-name="ce9">
            <text:p>215</text:p>
          </table:table-cell>
          <table:table-cell office:value-type="float" office:value="8180" table:formula="of:=SUM([.G292]+[.E292])" table:style-name="ce15">
            <text:p>8180</text:p>
          </table:table-cell>
          <table:table-cell office:value-type="float" office:value="-30" table:formula="of:=[.F292]-[.H292]" table:style-name="ce15">
            <text:p>-30</text:p>
          </table:table-cell>
          <table:table-cell office:value-type="percentage" office:value="-1.5892420537897311E-2" table:formula="of:=([.I293]-[.I292])/[.I292]" table:style-name="ce16">
            <text:p>-2%</text:p>
          </table:table-cell>
          <table:table-cell office:value-type="string" office:string-value="Valid" table:formula="of:=IF([.F292]&lt;=[.E292]; &quot;Valid&quot;; &quot;Invalid&quot;)" table:style-name="ce17">
            <text:p>Valid</text:p>
          </table:table-cell>
          <table:table-cell office:value-type="string" office:string-value="Valid" table:formula="of:=IF([.H292]&lt;=[.G292]; &quot;Valid&quot;; &quot;Invalid&quot;)" table:style-name="ce17">
            <text:p>Valid</text:p>
          </table:table-cell>
          <table:table-cell office:value-type="string" office:string-value="Stable/Reducing" table:formula="of:=IF([.J292]&gt;0; &quot;Increasing Pressure&quot;; &quot;Stable/Reducing&quot;)" table:style-name="ce18">
            <text:p>Stable/Reducing</text:p>
          </table:table-cell>
          <table:table-cell office:value-type="float" office:value="1.1621621621621621" table:formula="of:=IFERROR([.H292]/[.F292]; 0)" table:style-name="ce17">
            <text:p>1.162162162</text:p>
          </table:table-cell>
          <table:table-cell office:value-type="float" office:value="7705.1428571428569" table:formula="of:=AVERAGE([.I292:.I298])" table:style-name="ce15">
            <text:p>7705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3-28T00:00:00" table:style-name="ce14">
            <text:p>28-03-2024</text:p>
          </table:table-cell>
          <table:table-cell office:value-type="string" office:string-value="March" table:formula="of:=TEXT([.A293]; &quot;mmmm&quot;)" table:style-name="ce14">
            <text:p>March</text:p>
          </table:table-cell>
          <table:table-cell office:value-type="string" office:string-value="2024-03" table:formula="of:=TEXT([.A293]; &quot;yyyy-mm&quot;)" table:style-name="ce14">
            <text:p>2024-03</text:p>
          </table:table-cell>
          <table:table-cell office:value-type="float" office:value="161" table:style-name="ce9">
            <text:p>161</text:p>
          </table:table-cell>
          <table:table-cell office:value-type="float" office:value="288" table:style-name="ce9">
            <text:p>288</text:p>
          </table:table-cell>
          <table:table-cell office:value-type="float" office:value="248" table:style-name="ce9">
            <text:p>248</text:p>
          </table:table-cell>
          <table:table-cell office:value-type="float" office:value="7762" table:style-name="ce9">
            <text:p>7762</text:p>
          </table:table-cell>
          <table:table-cell office:value-type="float" office:value="360" table:style-name="ce9">
            <text:p>360</text:p>
          </table:table-cell>
          <table:table-cell office:value-type="float" office:value="8050" table:formula="of:=SUM([.G293]+[.E293])" table:style-name="ce15">
            <text:p>8050</text:p>
          </table:table-cell>
          <table:table-cell office:value-type="float" office:value="-112" table:formula="of:=[.F293]-[.H293]" table:style-name="ce15">
            <text:p>-112</text:p>
          </table:table-cell>
          <table:table-cell office:value-type="percentage" office:value="-6.6956521739130428E-2" table:formula="of:=([.I294]-[.I293])/[.I293]" table:style-name="ce16">
            <text:p>-7%</text:p>
          </table:table-cell>
          <table:table-cell office:value-type="string" office:string-value="Valid" table:formula="of:=IF([.F293]&lt;=[.E293]; &quot;Valid&quot;; &quot;Invalid&quot;)" table:style-name="ce17">
            <text:p>Valid</text:p>
          </table:table-cell>
          <table:table-cell office:value-type="string" office:string-value="Valid" table:formula="of:=IF([.H293]&lt;=[.G293]; &quot;Valid&quot;; &quot;Invalid&quot;)" table:style-name="ce17">
            <text:p>Valid</text:p>
          </table:table-cell>
          <table:table-cell office:value-type="string" office:string-value="Stable/Reducing" table:formula="of:=IF([.J293]&gt;0; &quot;Increasing Pressure&quot;; &quot;Stable/Reducing&quot;)" table:style-name="ce18">
            <text:p>Stable/Reducing</text:p>
          </table:table-cell>
          <table:table-cell office:value-type="float" office:value="1.4516129032258065" table:formula="of:=IFERROR([.H293]/[.F293]; 0)" table:style-name="ce17">
            <text:p>1.451612903</text:p>
          </table:table-cell>
          <table:table-cell office:value-type="float" office:value="7568.1428571428569" table:formula="of:=AVERAGE([.I293:.I299])" table:style-name="ce15">
            <text:p>7568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3-31T00:00:00" table:style-name="ce14">
            <text:p>31-03-2024</text:p>
          </table:table-cell>
          <table:table-cell office:value-type="string" office:string-value="March" table:formula="of:=TEXT([.A294]; &quot;mmmm&quot;)" table:style-name="ce14">
            <text:p>March</text:p>
          </table:table-cell>
          <table:table-cell office:value-type="string" office:string-value="2024-03" table:formula="of:=TEXT([.A294]; &quot;yyyy-mm&quot;)" table:style-name="ce14">
            <text:p>2024-03</text:p>
          </table:table-cell>
          <table:table-cell office:value-type="float" office:value="105" table:style-name="ce9">
            <text:p>105</text:p>
          </table:table-cell>
          <table:table-cell office:value-type="float" office:value="254" table:style-name="ce9">
            <text:p>254</text:p>
          </table:table-cell>
          <table:table-cell office:value-type="float" office:value="151" table:style-name="ce9">
            <text:p>151</text:p>
          </table:table-cell>
          <table:table-cell office:value-type="float" office:value="7257" table:style-name="ce9">
            <text:p>7257</text:p>
          </table:table-cell>
          <table:table-cell office:value-type="float" office:value="287" table:style-name="ce9">
            <text:p>287</text:p>
          </table:table-cell>
          <table:table-cell office:value-type="float" office:value="7511" table:formula="of:=SUM([.G294]+[.E294])" table:style-name="ce15">
            <text:p>7511</text:p>
          </table:table-cell>
          <table:table-cell office:value-type="float" office:value="-136" table:formula="of:=[.F294]-[.H294]" table:style-name="ce15">
            <text:p>-136</text:p>
          </table:table-cell>
          <table:table-cell office:value-type="percentage" office:value="-6.6569032086273463E-4" table:formula="of:=([.I295]-[.I294])/[.I294]" table:style-name="ce16">
            <text:p>0%</text:p>
          </table:table-cell>
          <table:table-cell office:value-type="string" office:string-value="Valid" table:formula="of:=IF([.F294]&lt;=[.E294]; &quot;Valid&quot;; &quot;Invalid&quot;)" table:style-name="ce17">
            <text:p>Valid</text:p>
          </table:table-cell>
          <table:table-cell office:value-type="string" office:string-value="Valid" table:formula="of:=IF([.H294]&lt;=[.G294]; &quot;Valid&quot;; &quot;Invalid&quot;)" table:style-name="ce17">
            <text:p>Valid</text:p>
          </table:table-cell>
          <table:table-cell office:value-type="string" office:string-value="Stable/Reducing" table:formula="of:=IF([.J294]&gt;0; &quot;Increasing Pressure&quot;; &quot;Stable/Reducing&quot;)" table:style-name="ce18">
            <text:p>Stable/Reducing</text:p>
          </table:table-cell>
          <table:table-cell office:value-type="float" office:value="1.9006622516556291" table:formula="of:=IFERROR([.H294]/[.F294]; 0)" table:style-name="ce17">
            <text:p>1.900662252</text:p>
          </table:table-cell>
          <table:table-cell office:value-type="float" office:value="7449.2857142857147" table:formula="of:=AVERAGE([.I294:.I300])" table:style-name="ce15">
            <text:p>7449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4-01T00:00:00" table:style-name="ce14">
            <text:p>01-04-2024</text:p>
          </table:table-cell>
          <table:table-cell office:value-type="string" office:string-value="April" table:formula="of:=TEXT([.A295]; &quot;mmmm&quot;)" table:style-name="ce14">
            <text:p>April</text:p>
          </table:table-cell>
          <table:table-cell office:value-type="string" office:string-value="2024-04" table:formula="of:=TEXT([.A295]; &quot;yyyy-mm&quot;)" table:style-name="ce14">
            <text:p>2024-04</text:p>
          </table:table-cell>
          <table:table-cell office:value-type="float" office:value="109" table:style-name="ce9">
            <text:p>109</text:p>
          </table:table-cell>
          <table:table-cell office:value-type="float" office:value="235" table:style-name="ce9">
            <text:p>235</text:p>
          </table:table-cell>
          <table:table-cell office:value-type="float" office:value="171" table:style-name="ce9">
            <text:p>171</text:p>
          </table:table-cell>
          <table:table-cell office:value-type="float" office:value="7271" table:style-name="ce9">
            <text:p>7271</text:p>
          </table:table-cell>
          <table:table-cell office:value-type="float" office:value="172" table:style-name="ce9">
            <text:p>172</text:p>
          </table:table-cell>
          <table:table-cell office:value-type="float" office:value="7506" table:formula="of:=SUM([.G295]+[.E295])" table:style-name="ce15">
            <text:p>7506</text:p>
          </table:table-cell>
          <table:table-cell office:value-type="float" office:value="-1" table:formula="of:=[.F295]-[.H295]" table:style-name="ce15">
            <text:p>-1</text:p>
          </table:table-cell>
          <table:table-cell office:value-type="percentage" office:value="8.5265121236344256E-3" table:formula="of:=([.I296]-[.I295])/[.I295]" table:style-name="ce16">
            <text:p>1%</text:p>
          </table:table-cell>
          <table:table-cell office:value-type="string" office:string-value="Valid" table:formula="of:=IF([.F295]&lt;=[.E295]; &quot;Valid&quot;; &quot;Invalid&quot;)" table:style-name="ce17">
            <text:p>Valid</text:p>
          </table:table-cell>
          <table:table-cell office:value-type="string" office:string-value="Valid" table:formula="of:=IF([.H295]&lt;=[.G295]; &quot;Valid&quot;; &quot;Invalid&quot;)" table:style-name="ce17">
            <text:p>Valid</text:p>
          </table:table-cell>
          <table:table-cell office:value-type="string" office:string-value="Stable/Reducing" table:formula="of:=IF([.J295]&gt;0; &quot;Increasing Pressure&quot;; &quot;Stable/Reducing&quot;)" table:style-name="ce18">
            <text:p>Stable/Reducing</text:p>
          </table:table-cell>
          <table:table-cell office:value-type="float" office:value="1.0058479532163742" table:formula="of:=IFERROR([.H295]/[.F295]; 0)" table:style-name="ce17">
            <text:p>1.005847953</text:p>
          </table:table-cell>
          <table:table-cell office:value-type="float" office:value="7415.4285714285716" table:formula="of:=AVERAGE([.I295:.I301])" table:style-name="ce15">
            <text:p>7415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4-02T00:00:00" table:style-name="ce14">
            <text:p>02-04-2024</text:p>
          </table:table-cell>
          <table:table-cell office:value-type="string" office:string-value="April" table:formula="of:=TEXT([.A296]; &quot;mmmm&quot;)" table:style-name="ce14">
            <text:p>April</text:p>
          </table:table-cell>
          <table:table-cell office:value-type="string" office:string-value="2024-04" table:formula="of:=TEXT([.A296]; &quot;yyyy-mm&quot;)" table:style-name="ce14">
            <text:p>2024-04</text:p>
          </table:table-cell>
          <table:table-cell office:value-type="float" office:value="101" table:style-name="ce9">
            <text:p>101</text:p>
          </table:table-cell>
          <table:table-cell office:value-type="float" office:value="230" table:style-name="ce9">
            <text:p>230</text:p>
          </table:table-cell>
          <table:table-cell office:value-type="float" office:value="175" table:style-name="ce9">
            <text:p>175</text:p>
          </table:table-cell>
          <table:table-cell office:value-type="float" office:value="7340" table:style-name="ce9">
            <text:p>7340</text:p>
          </table:table-cell>
          <table:table-cell office:value-type="float" office:value="132" table:style-name="ce9">
            <text:p>132</text:p>
          </table:table-cell>
          <table:table-cell office:value-type="float" office:value="7570" table:formula="of:=SUM([.G296]+[.E296])" table:style-name="ce15">
            <text:p>7570</text:p>
          </table:table-cell>
          <table:table-cell office:value-type="float" office:value="43" table:formula="of:=[.F296]-[.H296]" table:style-name="ce15">
            <text:p>43</text:p>
          </table:table-cell>
          <table:table-cell office:value-type="percentage" office:value="7.9260237780713345E-4" table:formula="of:=([.I297]-[.I296])/[.I296]" table:style-name="ce16">
            <text:p>0%</text:p>
          </table:table-cell>
          <table:table-cell office:value-type="string" office:string-value="Valid" table:formula="of:=IF([.F296]&lt;=[.E296]; &quot;Valid&quot;; &quot;Invalid&quot;)" table:style-name="ce17">
            <text:p>Valid</text:p>
          </table:table-cell>
          <table:table-cell office:value-type="string" office:string-value="Valid" table:formula="of:=IF([.H296]&lt;=[.G296]; &quot;Valid&quot;; &quot;Invalid&quot;)" table:style-name="ce17">
            <text:p>Valid</text:p>
          </table:table-cell>
          <table:table-cell office:value-type="string" office:string-value="Increasing Pressure" table:formula="of:=IF([.J296]&gt;0; &quot;Increasing Pressure&quot;; &quot;Stable/Reducing&quot;)" table:style-name="ce18">
            <text:p>Increasing Pressure</text:p>
          </table:table-cell>
          <table:table-cell office:value-type="float" office:value="0.75428571428571434" table:formula="of:=IFERROR([.H296]/[.F296]; 0)" table:style-name="ce17">
            <text:p>0.754285714</text:p>
          </table:table-cell>
          <table:table-cell office:value-type="float" office:value="7377.8571428571431" table:formula="of:=AVERAGE([.I296:.I302])" table:style-name="ce15">
            <text:p>7378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4-03T00:00:00" table:style-name="ce14">
            <text:p>03-04-2024</text:p>
          </table:table-cell>
          <table:table-cell office:value-type="string" office:string-value="April" table:formula="of:=TEXT([.A297]; &quot;mmmm&quot;)" table:style-name="ce14">
            <text:p>April</text:p>
          </table:table-cell>
          <table:table-cell office:value-type="string" office:string-value="2024-04" table:formula="of:=TEXT([.A297]; &quot;yyyy-mm&quot;)" table:style-name="ce14">
            <text:p>2024-04</text:p>
          </table:table-cell>
          <table:table-cell office:value-type="float" office:value="124" table:style-name="ce9">
            <text:p>124</text:p>
          </table:table-cell>
          <table:table-cell office:value-type="float" office:value="230" table:style-name="ce9">
            <text:p>230</text:p>
          </table:table-cell>
          <table:table-cell office:value-type="float" office:value="190" table:style-name="ce9">
            <text:p>190</text:p>
          </table:table-cell>
          <table:table-cell office:value-type="float" office:value="7346" table:style-name="ce9">
            <text:p>7346</text:p>
          </table:table-cell>
          <table:table-cell office:value-type="float" office:value="163" table:style-name="ce9">
            <text:p>163</text:p>
          </table:table-cell>
          <table:table-cell office:value-type="float" office:value="7576" table:formula="of:=SUM([.G297]+[.E297])" table:style-name="ce15">
            <text:p>7576</text:p>
          </table:table-cell>
          <table:table-cell office:value-type="float" office:value="27" table:formula="of:=[.F297]-[.H297]" table:style-name="ce15">
            <text:p>27</text:p>
          </table:table-cell>
          <table:table-cell office:value-type="percentage" office:value="-4.3558606124604014E-3" table:formula="of:=([.I298]-[.I297])/[.I297]" table:style-name="ce16">
            <text:p>0%</text:p>
          </table:table-cell>
          <table:table-cell office:value-type="string" office:string-value="Valid" table:formula="of:=IF([.F297]&lt;=[.E297]; &quot;Valid&quot;; &quot;Invalid&quot;)" table:style-name="ce17">
            <text:p>Valid</text:p>
          </table:table-cell>
          <table:table-cell office:value-type="string" office:string-value="Valid" table:formula="of:=IF([.H297]&lt;=[.G297]; &quot;Valid&quot;; &quot;Invalid&quot;)" table:style-name="ce17">
            <text:p>Valid</text:p>
          </table:table-cell>
          <table:table-cell office:value-type="string" office:string-value="Increasing Pressure" table:formula="of:=IF([.J297]&gt;0; &quot;Increasing Pressure&quot;; &quot;Stable/Reducing&quot;)" table:style-name="ce18">
            <text:p>Increasing Pressure</text:p>
          </table:table-cell>
          <table:table-cell office:value-type="float" office:value="0.85789473684210527" table:formula="of:=IFERROR([.H297]/[.F297]; 0)" table:style-name="ce17">
            <text:p>0.857894737</text:p>
          </table:table-cell>
          <table:table-cell office:value-type="float" office:value="7315.4285714285716" table:formula="of:=AVERAGE([.I297:.I303])" table:style-name="ce15">
            <text:p>7315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4-04T00:00:00" table:style-name="ce14">
            <text:p>04-04-2024</text:p>
          </table:table-cell>
          <table:table-cell office:value-type="string" office:string-value="April" table:formula="of:=TEXT([.A298]; &quot;mmmm&quot;)" table:style-name="ce14">
            <text:p>April</text:p>
          </table:table-cell>
          <table:table-cell office:value-type="string" office:string-value="2024-04" table:formula="of:=TEXT([.A298]; &quot;yyyy-mm&quot;)" table:style-name="ce14">
            <text:p>2024-04</text:p>
          </table:table-cell>
          <table:table-cell office:value-type="float" office:value="95" table:style-name="ce9">
            <text:p>95</text:p>
          </table:table-cell>
          <table:table-cell office:value-type="float" office:value="226" table:style-name="ce9">
            <text:p>226</text:p>
          </table:table-cell>
          <table:table-cell office:value-type="float" office:value="152" table:style-name="ce9">
            <text:p>152</text:p>
          </table:table-cell>
          <table:table-cell office:value-type="float" office:value="7317" table:style-name="ce9">
            <text:p>7317</text:p>
          </table:table-cell>
          <table:table-cell office:value-type="float" office:value="225" table:style-name="ce9">
            <text:p>225</text:p>
          </table:table-cell>
          <table:table-cell office:value-type="float" office:value="7543" table:formula="of:=SUM([.G298]+[.E298])" table:style-name="ce15">
            <text:p>7543</text:p>
          </table:table-cell>
          <table:table-cell office:value-type="float" office:value="-73" table:formula="of:=[.F298]-[.H298]" table:style-name="ce15">
            <text:p>-73</text:p>
          </table:table-cell>
          <table:table-cell office:value-type="percentage" office:value="-4.2688585443457508E-2" table:formula="of:=([.I299]-[.I298])/[.I298]" table:style-name="ce16">
            <text:p>-4%</text:p>
          </table:table-cell>
          <table:table-cell office:value-type="string" office:string-value="Valid" table:formula="of:=IF([.F298]&lt;=[.E298]; &quot;Valid&quot;; &quot;Invalid&quot;)" table:style-name="ce17">
            <text:p>Valid</text:p>
          </table:table-cell>
          <table:table-cell office:value-type="string" office:string-value="Valid" table:formula="of:=IF([.H298]&lt;=[.G298]; &quot;Valid&quot;; &quot;Invalid&quot;)" table:style-name="ce17">
            <text:p>Valid</text:p>
          </table:table-cell>
          <table:table-cell office:value-type="string" office:string-value="Stable/Reducing" table:formula="of:=IF([.J298]&gt;0; &quot;Increasing Pressure&quot;; &quot;Stable/Reducing&quot;)" table:style-name="ce18">
            <text:p>Stable/Reducing</text:p>
          </table:table-cell>
          <table:table-cell office:value-type="float" office:value="1.4802631578947369" table:formula="of:=IFERROR([.H298]/[.F298]; 0)" table:style-name="ce17">
            <text:p>1.480263158</text:p>
          </table:table-cell>
          <table:table-cell office:value-type="float" office:value="7215.2857142857147" table:formula="of:=AVERAGE([.I298:.I304])" table:style-name="ce15">
            <text:p>7215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4-07T00:00:00" table:style-name="ce14">
            <text:p>07-04-2024</text:p>
          </table:table-cell>
          <table:table-cell office:value-type="string" office:string-value="April" table:formula="of:=TEXT([.A299]; &quot;mmmm&quot;)" table:style-name="ce14">
            <text:p>April</text:p>
          </table:table-cell>
          <table:table-cell office:value-type="string" office:string-value="2024-04" table:formula="of:=TEXT([.A299]; &quot;yyyy-mm&quot;)" table:style-name="ce14">
            <text:p>2024-04</text:p>
          </table:table-cell>
          <table:table-cell office:value-type="float" office:value="106" table:style-name="ce9">
            <text:p>106</text:p>
          </table:table-cell>
          <table:table-cell office:value-type="float" office:value="239" table:style-name="ce9">
            <text:p>239</text:p>
          </table:table-cell>
          <table:table-cell office:value-type="float" office:value="233" table:style-name="ce9">
            <text:p>233</text:p>
          </table:table-cell>
          <table:table-cell office:value-type="float" office:value="6982" table:style-name="ce9">
            <text:p>6982</text:p>
          </table:table-cell>
          <table:table-cell office:value-type="float" office:value="279" table:style-name="ce9">
            <text:p>279</text:p>
          </table:table-cell>
          <table:table-cell office:value-type="float" office:value="7221" table:formula="of:=SUM([.G299]+[.E299])" table:style-name="ce15">
            <text:p>7221</text:p>
          </table:table-cell>
          <table:table-cell office:value-type="float" office:value="-46" table:formula="of:=[.F299]-[.H299]" table:style-name="ce15">
            <text:p>-46</text:p>
          </table:table-cell>
          <table:table-cell office:value-type="percentage" office:value="-4.1545492314083921E-4" table:formula="of:=([.I300]-[.I299])/[.I299]" table:style-name="ce16">
            <text:p>0%</text:p>
          </table:table-cell>
          <table:table-cell office:value-type="string" office:string-value="Valid" table:formula="of:=IF([.F299]&lt;=[.E299]; &quot;Valid&quot;; &quot;Invalid&quot;)" table:style-name="ce17">
            <text:p>Valid</text:p>
          </table:table-cell>
          <table:table-cell office:value-type="string" office:string-value="Valid" table:formula="of:=IF([.H299]&lt;=[.G299]; &quot;Valid&quot;; &quot;Invalid&quot;)" table:style-name="ce17">
            <text:p>Valid</text:p>
          </table:table-cell>
          <table:table-cell office:value-type="string" office:string-value="Stable/Reducing" table:formula="of:=IF([.J299]&gt;0; &quot;Increasing Pressure&quot;; &quot;Stable/Reducing&quot;)" table:style-name="ce18">
            <text:p>Stable/Reducing</text:p>
          </table:table-cell>
          <table:table-cell office:value-type="float" office:value="1.1974248927038627" table:formula="of:=IFERROR([.H299]/[.F299]; 0)" table:style-name="ce17">
            <text:p>1.197424893</text:p>
          </table:table-cell>
          <table:table-cell office:value-type="float" office:value="7135.4285714285716" table:formula="of:=AVERAGE([.I299:.I305])" table:style-name="ce15">
            <text:p>7135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4-08T00:00:00" table:style-name="ce14">
            <text:p>08-04-2024</text:p>
          </table:table-cell>
          <table:table-cell office:value-type="string" office:string-value="April" table:formula="of:=TEXT([.A300]; &quot;mmmm&quot;)" table:style-name="ce14">
            <text:p>April</text:p>
          </table:table-cell>
          <table:table-cell office:value-type="string" office:string-value="2024-04" table:formula="of:=TEXT([.A300]; &quot;yyyy-mm&quot;)" table:style-name="ce14">
            <text:p>2024-04</text:p>
          </table:table-cell>
          <table:table-cell office:value-type="float" office:value="102" table:style-name="ce9">
            <text:p>102</text:p>
          </table:table-cell>
          <table:table-cell office:value-type="float" office:value="230" table:style-name="ce9">
            <text:p>230</text:p>
          </table:table-cell>
          <table:table-cell office:value-type="float" office:value="167" table:style-name="ce9">
            <text:p>167</text:p>
          </table:table-cell>
          <table:table-cell office:value-type="float" office:value="6988" table:style-name="ce9">
            <text:p>6988</text:p>
          </table:table-cell>
          <table:table-cell office:value-type="float" office:value="199" table:style-name="ce9">
            <text:p>199</text:p>
          </table:table-cell>
          <table:table-cell office:value-type="float" office:value="7218" table:formula="of:=SUM([.G300]+[.E300])" table:style-name="ce15">
            <text:p>7218</text:p>
          </table:table-cell>
          <table:table-cell office:value-type="float" office:value="-32" table:formula="of:=[.F300]-[.H300]" table:style-name="ce15">
            <text:p>-32</text:p>
          </table:table-cell>
          <table:table-cell office:value-type="percentage" office:value="7.7583818232197285E-3" table:formula="of:=([.I301]-[.I300])/[.I300]" table:style-name="ce16">
            <text:p>1%</text:p>
          </table:table-cell>
          <table:table-cell office:value-type="string" office:string-value="Valid" table:formula="of:=IF([.F300]&lt;=[.E300]; &quot;Valid&quot;; &quot;Invalid&quot;)" table:style-name="ce17">
            <text:p>Valid</text:p>
          </table:table-cell>
          <table:table-cell office:value-type="string" office:string-value="Valid" table:formula="of:=IF([.H300]&lt;=[.G300]; &quot;Valid&quot;; &quot;Invalid&quot;)" table:style-name="ce17">
            <text:p>Valid</text:p>
          </table:table-cell>
          <table:table-cell office:value-type="string" office:string-value="Stable/Reducing" table:formula="of:=IF([.J300]&gt;0; &quot;Increasing Pressure&quot;; &quot;Stable/Reducing&quot;)" table:style-name="ce18">
            <text:p>Stable/Reducing</text:p>
          </table:table-cell>
          <table:table-cell office:value-type="float" office:value="1.1916167664670658" table:formula="of:=IFERROR([.H300]/[.F300]; 0)" table:style-name="ce17">
            <text:p>1.191616766</text:p>
          </table:table-cell>
          <table:table-cell office:value-type="float" office:value="7114.8571428571431" table:formula="of:=AVERAGE([.I300:.I306])" table:style-name="ce15">
            <text:p>7115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4-09T00:00:00" table:style-name="ce14">
            <text:p>09-04-2024</text:p>
          </table:table-cell>
          <table:table-cell office:value-type="string" office:string-value="April" table:formula="of:=TEXT([.A301]; &quot;mmmm&quot;)" table:style-name="ce14">
            <text:p>April</text:p>
          </table:table-cell>
          <table:table-cell office:value-type="string" office:string-value="2024-04" table:formula="of:=TEXT([.A301]; &quot;yyyy-mm&quot;)" table:style-name="ce14">
            <text:p>2024-04</text:p>
          </table:table-cell>
          <table:table-cell office:value-type="float" office:value="118" table:style-name="ce9">
            <text:p>118</text:p>
          </table:table-cell>
          <table:table-cell office:value-type="float" office:value="231" table:style-name="ce9">
            <text:p>231</text:p>
          </table:table-cell>
          <table:table-cell office:value-type="float" office:value="217" table:style-name="ce9">
            <text:p>217</text:p>
          </table:table-cell>
          <table:table-cell office:value-type="float" office:value="7043" table:style-name="ce9">
            <text:p>7043</text:p>
          </table:table-cell>
          <table:table-cell office:value-type="float" office:value="130" table:style-name="ce9">
            <text:p>130</text:p>
          </table:table-cell>
          <table:table-cell office:value-type="float" office:value="7274" table:formula="of:=SUM([.G301]+[.E301])" table:style-name="ce15">
            <text:p>7274</text:p>
          </table:table-cell>
          <table:table-cell office:value-type="float" office:value="87" table:formula="of:=[.F301]-[.H301]" table:style-name="ce15">
            <text:p>87</text:p>
          </table:table-cell>
          <table:table-cell office:value-type="percentage" office:value="-4.2617541930162223E-3" table:formula="of:=([.I302]-[.I301])/[.I301]" table:style-name="ce16">
            <text:p>0%</text:p>
          </table:table-cell>
          <table:table-cell office:value-type="string" office:string-value="Valid" table:formula="of:=IF([.F301]&lt;=[.E301]; &quot;Valid&quot;; &quot;Invalid&quot;)" table:style-name="ce17">
            <text:p>Valid</text:p>
          </table:table-cell>
          <table:table-cell office:value-type="string" office:string-value="Valid" table:formula="of:=IF([.H301]&lt;=[.G301]; &quot;Valid&quot;; &quot;Invalid&quot;)" table:style-name="ce17">
            <text:p>Valid</text:p>
          </table:table-cell>
          <table:table-cell office:value-type="string" office:string-value="Increasing Pressure" table:formula="of:=IF([.J301]&gt;0; &quot;Increasing Pressure&quot;; &quot;Stable/Reducing&quot;)" table:style-name="ce18">
            <text:p>Increasing Pressure</text:p>
          </table:table-cell>
          <table:table-cell office:value-type="float" office:value="0.59907834101382484" table:formula="of:=IFERROR([.H301]/[.F301]; 0)" table:style-name="ce17">
            <text:p>0.599078341</text:p>
          </table:table-cell>
          <table:table-cell office:value-type="float" office:value="7097.4285714285716" table:formula="of:=AVERAGE([.I301:.I307])" table:style-name="ce15">
            <text:p>7097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4-10T00:00:00" table:style-name="ce14">
            <text:p>10-04-2024</text:p>
          </table:table-cell>
          <table:table-cell office:value-type="string" office:string-value="April" table:formula="of:=TEXT([.A302]; &quot;mmmm&quot;)" table:style-name="ce14">
            <text:p>April</text:p>
          </table:table-cell>
          <table:table-cell office:value-type="string" office:string-value="2024-04" table:formula="of:=TEXT([.A302]; &quot;yyyy-mm&quot;)" table:style-name="ce14">
            <text:p>2024-04</text:p>
          </table:table-cell>
          <table:table-cell office:value-type="float" office:value="117" table:style-name="ce9">
            <text:p>117</text:p>
          </table:table-cell>
          <table:table-cell office:value-type="float" office:value="244" table:style-name="ce9">
            <text:p>244</text:p>
          </table:table-cell>
          <table:table-cell office:value-type="float" office:value="142" table:style-name="ce9">
            <text:p>142</text:p>
          </table:table-cell>
          <table:table-cell office:value-type="float" office:value="6999" table:style-name="ce9">
            <text:p>6999</text:p>
          </table:table-cell>
          <table:table-cell office:value-type="float" office:value="227" table:style-name="ce9">
            <text:p>227</text:p>
          </table:table-cell>
          <table:table-cell office:value-type="float" office:value="7243" table:formula="of:=SUM([.G302]+[.E302])" table:style-name="ce15">
            <text:p>7243</text:p>
          </table:table-cell>
          <table:table-cell office:value-type="float" office:value="-85" table:formula="of:=[.F302]-[.H302]" table:style-name="ce15">
            <text:p>-85</text:p>
          </table:table-cell>
          <table:table-cell office:value-type="percentage" office:value="-1.5187077177964931E-2" table:formula="of:=([.I303]-[.I302])/[.I302]" table:style-name="ce16">
            <text:p>-2%</text:p>
          </table:table-cell>
          <table:table-cell office:value-type="string" office:string-value="Valid" table:formula="of:=IF([.F302]&lt;=[.E302]; &quot;Valid&quot;; &quot;Invalid&quot;)" table:style-name="ce17">
            <text:p>Valid</text:p>
          </table:table-cell>
          <table:table-cell office:value-type="string" office:string-value="Valid" table:formula="of:=IF([.H302]&lt;=[.G302]; &quot;Valid&quot;; &quot;Invalid&quot;)" table:style-name="ce17">
            <text:p>Valid</text:p>
          </table:table-cell>
          <table:table-cell office:value-type="string" office:string-value="Stable/Reducing" table:formula="of:=IF([.J302]&gt;0; &quot;Increasing Pressure&quot;; &quot;Stable/Reducing&quot;)" table:style-name="ce18">
            <text:p>Stable/Reducing</text:p>
          </table:table-cell>
          <table:table-cell office:value-type="float" office:value="1.5985915492957747" table:formula="of:=IFERROR([.H302]/[.F302]; 0)" table:style-name="ce17">
            <text:p>1.598591549</text:p>
          </table:table-cell>
          <table:table-cell office:value-type="float" office:value="7065.4285714285716" table:formula="of:=AVERAGE([.I302:.I308])" table:style-name="ce15">
            <text:p>7065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4-11T00:00:00" table:style-name="ce14">
            <text:p>11-04-2024</text:p>
          </table:table-cell>
          <table:table-cell office:value-type="string" office:string-value="April" table:formula="of:=TEXT([.A303]; &quot;mmmm&quot;)" table:style-name="ce14">
            <text:p>April</text:p>
          </table:table-cell>
          <table:table-cell office:value-type="string" office:string-value="2024-04" table:formula="of:=TEXT([.A303]; &quot;yyyy-mm&quot;)" table:style-name="ce14">
            <text:p>2024-04</text:p>
          </table:table-cell>
          <table:table-cell office:value-type="float" office:value="183" table:style-name="ce9">
            <text:p>183</text:p>
          </table:table-cell>
          <table:table-cell office:value-type="float" office:value="221" table:style-name="ce9">
            <text:p>221</text:p>
          </table:table-cell>
          <table:table-cell office:value-type="float" office:value="220" table:style-name="ce9">
            <text:p>220</text:p>
          </table:table-cell>
          <table:table-cell office:value-type="float" office:value="6912" table:style-name="ce9">
            <text:p>6912</text:p>
          </table:table-cell>
          <table:table-cell office:value-type="float" office:value="285" table:style-name="ce9">
            <text:p>285</text:p>
          </table:table-cell>
          <table:table-cell office:value-type="float" office:value="7133" table:formula="of:=SUM([.G303]+[.E303])" table:style-name="ce15">
            <text:p>7133</text:p>
          </table:table-cell>
          <table:table-cell office:value-type="float" office:value="-65" table:formula="of:=[.F303]-[.H303]" table:style-name="ce15">
            <text:p>-65</text:p>
          </table:table-cell>
          <table:table-cell office:value-type="percentage" office:value="-3.6169914481985137E-2" table:formula="of:=([.I304]-[.I303])/[.I303]" table:style-name="ce16">
            <text:p>-4%</text:p>
          </table:table-cell>
          <table:table-cell office:value-type="string" office:string-value="Valid" table:formula="of:=IF([.F303]&lt;=[.E303]; &quot;Valid&quot;; &quot;Invalid&quot;)" table:style-name="ce17">
            <text:p>Valid</text:p>
          </table:table-cell>
          <table:table-cell office:value-type="string" office:string-value="Valid" table:formula="of:=IF([.H303]&lt;=[.G303]; &quot;Valid&quot;; &quot;Invalid&quot;)" table:style-name="ce17">
            <text:p>Valid</text:p>
          </table:table-cell>
          <table:table-cell office:value-type="string" office:string-value="Stable/Reducing" table:formula="of:=IF([.J303]&gt;0; &quot;Increasing Pressure&quot;; &quot;Stable/Reducing&quot;)" table:style-name="ce18">
            <text:p>Stable/Reducing</text:p>
          </table:table-cell>
          <table:table-cell office:value-type="float" office:value="1.2954545454545454" table:formula="of:=IFERROR([.H303]/[.F303]; 0)" table:style-name="ce17">
            <text:p>1.295454545</text:p>
          </table:table-cell>
          <table:table-cell office:value-type="float" office:value="7048.5714285714284" table:formula="of:=AVERAGE([.I303:.I309])" table:style-name="ce15">
            <text:p>7049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4-14T00:00:00" table:style-name="ce14">
            <text:p>14-04-2024</text:p>
          </table:table-cell>
          <table:table-cell office:value-type="string" office:string-value="April" table:formula="of:=TEXT([.A304]; &quot;mmmm&quot;)" table:style-name="ce14">
            <text:p>April</text:p>
          </table:table-cell>
          <table:table-cell office:value-type="string" office:string-value="2024-04" table:formula="of:=TEXT([.A304]; &quot;yyyy-mm&quot;)" table:style-name="ce14">
            <text:p>2024-04</text:p>
          </table:table-cell>
          <table:table-cell office:value-type="float" office:value="128" table:style-name="ce9">
            <text:p>128</text:p>
          </table:table-cell>
          <table:table-cell office:value-type="float" office:value="245" table:style-name="ce9">
            <text:p>245</text:p>
          </table:table-cell>
          <table:table-cell office:value-type="float" office:value="243" table:style-name="ce9">
            <text:p>243</text:p>
          </table:table-cell>
          <table:table-cell office:value-type="float" office:value="6630" table:style-name="ce9">
            <text:p>6630</text:p>
          </table:table-cell>
          <table:table-cell office:value-type="float" office:value="290" table:style-name="ce9">
            <text:p>290</text:p>
          </table:table-cell>
          <table:table-cell office:value-type="float" office:value="6875" table:formula="of:=SUM([.G304]+[.E304])" table:style-name="ce15">
            <text:p>6875</text:p>
          </table:table-cell>
          <table:table-cell office:value-type="float" office:value="-47" table:formula="of:=[.F304]-[.H304]" table:style-name="ce15">
            <text:p>-47</text:p>
          </table:table-cell>
          <table:table-cell office:value-type="percentage" office:value="1.5854545454545454E-2" table:formula="of:=([.I305]-[.I304])/[.I304]" table:style-name="ce16">
            <text:p>2%</text:p>
          </table:table-cell>
          <table:table-cell office:value-type="string" office:string-value="Valid" table:formula="of:=IF([.F304]&lt;=[.E304]; &quot;Valid&quot;; &quot;Invalid&quot;)" table:style-name="ce17">
            <text:p>Valid</text:p>
          </table:table-cell>
          <table:table-cell office:value-type="string" office:string-value="Valid" table:formula="of:=IF([.H304]&lt;=[.G304]; &quot;Valid&quot;; &quot;Invalid&quot;)" table:style-name="ce17">
            <text:p>Valid</text:p>
          </table:table-cell>
          <table:table-cell office:value-type="string" office:string-value="Stable/Reducing" table:formula="of:=IF([.J304]&gt;0; &quot;Increasing Pressure&quot;; &quot;Stable/Reducing&quot;)" table:style-name="ce18">
            <text:p>Stable/Reducing</text:p>
          </table:table-cell>
          <table:table-cell office:value-type="float" office:value="1.1934156378600822" table:formula="of:=IFERROR([.H304]/[.F304]; 0)" table:style-name="ce17">
            <text:p>1.193415638</text:p>
          </table:table-cell>
          <table:table-cell office:value-type="float" office:value="7061.4285714285716" table:formula="of:=AVERAGE([.I304:.I310])" table:style-name="ce15">
            <text:p>7061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4-15T00:00:00" table:style-name="ce14">
            <text:p>15-04-2024</text:p>
          </table:table-cell>
          <table:table-cell office:value-type="string" office:string-value="April" table:formula="of:=TEXT([.A305]; &quot;mmmm&quot;)" table:style-name="ce14">
            <text:p>April</text:p>
          </table:table-cell>
          <table:table-cell office:value-type="string" office:string-value="2024-04" table:formula="of:=TEXT([.A305]; &quot;yyyy-mm&quot;)" table:style-name="ce14">
            <text:p>2024-04</text:p>
          </table:table-cell>
          <table:table-cell office:value-type="float" office:value="144" table:style-name="ce9">
            <text:p>144</text:p>
          </table:table-cell>
          <table:table-cell office:value-type="float" office:value="303" table:style-name="ce9">
            <text:p>303</text:p>
          </table:table-cell>
          <table:table-cell office:value-type="float" office:value="176" table:style-name="ce9">
            <text:p>176</text:p>
          </table:table-cell>
          <table:table-cell office:value-type="float" office:value="6681" table:style-name="ce9">
            <text:p>6681</text:p>
          </table:table-cell>
          <table:table-cell office:value-type="float" office:value="191" table:style-name="ce9">
            <text:p>191</text:p>
          </table:table-cell>
          <table:table-cell office:value-type="float" office:value="6984" table:formula="of:=SUM([.G305]+[.E305])" table:style-name="ce15">
            <text:p>6984</text:p>
          </table:table-cell>
          <table:table-cell office:value-type="float" office:value="-15" table:formula="of:=[.F305]-[.H305]" table:style-name="ce15">
            <text:p>-15</text:p>
          </table:table-cell>
          <table:table-cell office:value-type="percentage" office:value="1.331615120274914E-2" table:formula="of:=([.I306]-[.I305])/[.I305]" table:style-name="ce16">
            <text:p>1%</text:p>
          </table:table-cell>
          <table:table-cell office:value-type="string" office:string-value="Valid" table:formula="of:=IF([.F305]&lt;=[.E305]; &quot;Valid&quot;; &quot;Invalid&quot;)" table:style-name="ce17">
            <text:p>Valid</text:p>
          </table:table-cell>
          <table:table-cell office:value-type="string" office:string-value="Valid" table:formula="of:=IF([.H305]&lt;=[.G305]; &quot;Valid&quot;; &quot;Invalid&quot;)" table:style-name="ce17">
            <text:p>Valid</text:p>
          </table:table-cell>
          <table:table-cell office:value-type="string" office:string-value="Stable/Reducing" table:formula="of:=IF([.J305]&gt;0; &quot;Increasing Pressure&quot;; &quot;Stable/Reducing&quot;)" table:style-name="ce18">
            <text:p>Stable/Reducing</text:p>
          </table:table-cell>
          <table:table-cell office:value-type="float" office:value="1.0852272727272727" table:formula="of:=IFERROR([.H305]/[.F305]; 0)" table:style-name="ce17">
            <text:p>1.085227273</text:p>
          </table:table-cell>
          <table:table-cell office:value-type="float" office:value="7135.5714285714284" table:formula="of:=AVERAGE([.I305:.I311])" table:style-name="ce15">
            <text:p>7136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4-16T00:00:00" table:style-name="ce14">
            <text:p>16-04-2024</text:p>
          </table:table-cell>
          <table:table-cell office:value-type="string" office:string-value="April" table:formula="of:=TEXT([.A306]; &quot;mmmm&quot;)" table:style-name="ce14">
            <text:p>April</text:p>
          </table:table-cell>
          <table:table-cell office:value-type="string" office:string-value="2024-04" table:formula="of:=TEXT([.A306]; &quot;yyyy-mm&quot;)" table:style-name="ce14">
            <text:p>2024-04</text:p>
          </table:table-cell>
          <table:table-cell office:value-type="float" office:value="219" table:style-name="ce9">
            <text:p>219</text:p>
          </table:table-cell>
          <table:table-cell office:value-type="float" office:value="392" table:style-name="ce9">
            <text:p>392</text:p>
          </table:table-cell>
          <table:table-cell office:value-type="float" office:value="205" table:style-name="ce9">
            <text:p>205</text:p>
          </table:table-cell>
          <table:table-cell office:value-type="float" office:value="6685" table:style-name="ce9">
            <text:p>6685</text:p>
          </table:table-cell>
          <table:table-cell office:value-type="float" office:value="163" table:style-name="ce9">
            <text:p>163</text:p>
          </table:table-cell>
          <table:table-cell office:value-type="float" office:value="7077" table:formula="of:=SUM([.G306]+[.E306])" table:style-name="ce15">
            <text:p>7077</text:p>
          </table:table-cell>
          <table:table-cell office:value-type="float" office:value="42" table:formula="of:=[.F306]-[.H306]" table:style-name="ce15">
            <text:p>42</text:p>
          </table:table-cell>
          <table:table-cell office:value-type="percentage" office:value="2.6847534265931894E-3" table:formula="of:=([.I307]-[.I306])/[.I306]" table:style-name="ce16">
            <text:p>0%</text:p>
          </table:table-cell>
          <table:table-cell office:value-type="string" office:string-value="Valid" table:formula="of:=IF([.F306]&lt;=[.E306]; &quot;Valid&quot;; &quot;Invalid&quot;)" table:style-name="ce17">
            <text:p>Valid</text:p>
          </table:table-cell>
          <table:table-cell office:value-type="string" office:string-value="Valid" table:formula="of:=IF([.H306]&lt;=[.G306]; &quot;Valid&quot;; &quot;Invalid&quot;)" table:style-name="ce17">
            <text:p>Valid</text:p>
          </table:table-cell>
          <table:table-cell office:value-type="string" office:string-value="Increasing Pressure" table:formula="of:=IF([.J306]&gt;0; &quot;Increasing Pressure&quot;; &quot;Stable/Reducing&quot;)" table:style-name="ce18">
            <text:p>Increasing Pressure</text:p>
          </table:table-cell>
          <table:table-cell office:value-type="float" office:value="0.79512195121951224" table:formula="of:=IFERROR([.H306]/[.F306]; 0)" table:style-name="ce17">
            <text:p>0.795121951</text:p>
          </table:table-cell>
          <table:table-cell office:value-type="float" office:value="7214.8571428571431" table:formula="of:=AVERAGE([.I306:.I312])" table:style-name="ce15">
            <text:p>7215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4-17T00:00:00" table:style-name="ce14">
            <text:p>17-04-2024</text:p>
          </table:table-cell>
          <table:table-cell office:value-type="string" office:string-value="April" table:formula="of:=TEXT([.A307]; &quot;mmmm&quot;)" table:style-name="ce14">
            <text:p>April</text:p>
          </table:table-cell>
          <table:table-cell office:value-type="string" office:string-value="2024-04" table:formula="of:=TEXT([.A307]; &quot;yyyy-mm&quot;)" table:style-name="ce14">
            <text:p>2024-04</text:p>
          </table:table-cell>
          <table:table-cell office:value-type="float" office:value="182" table:style-name="ce9">
            <text:p>182</text:p>
          </table:table-cell>
          <table:table-cell office:value-type="float" office:value="371" table:style-name="ce9">
            <text:p>371</text:p>
          </table:table-cell>
          <table:table-cell office:value-type="float" office:value="274" table:style-name="ce9">
            <text:p>274</text:p>
          </table:table-cell>
          <table:table-cell office:value-type="float" office:value="6725" table:style-name="ce9">
            <text:p>6725</text:p>
          </table:table-cell>
          <table:table-cell office:value-type="float" office:value="227" table:style-name="ce9">
            <text:p>227</text:p>
          </table:table-cell>
          <table:table-cell office:value-type="float" office:value="7096" table:formula="of:=SUM([.G307]+[.E307])" table:style-name="ce15">
            <text:p>7096</text:p>
          </table:table-cell>
          <table:table-cell office:value-type="float" office:value="47" table:formula="of:=[.F307]-[.H307]" table:style-name="ce15">
            <text:p>47</text:p>
          </table:table-cell>
          <table:table-cell office:value-type="percentage" office:value="-6.4825253664036074E-3" table:formula="of:=([.I308]-[.I307])/[.I307]" table:style-name="ce16">
            <text:p>-1%</text:p>
          </table:table-cell>
          <table:table-cell office:value-type="string" office:string-value="Valid" table:formula="of:=IF([.F307]&lt;=[.E307]; &quot;Valid&quot;; &quot;Invalid&quot;)" table:style-name="ce17">
            <text:p>Valid</text:p>
          </table:table-cell>
          <table:table-cell office:value-type="string" office:string-value="Valid" table:formula="of:=IF([.H307]&lt;=[.G307]; &quot;Valid&quot;; &quot;Invalid&quot;)" table:style-name="ce17">
            <text:p>Valid</text:p>
          </table:table-cell>
          <table:table-cell office:value-type="string" office:string-value="Increasing Pressure" table:formula="of:=IF([.J307]&gt;0; &quot;Increasing Pressure&quot;; &quot;Stable/Reducing&quot;)" table:style-name="ce18">
            <text:p>Increasing Pressure</text:p>
          </table:table-cell>
          <table:table-cell office:value-type="float" office:value="0.82846715328467158" table:formula="of:=IFERROR([.H307]/[.F307]; 0)" table:style-name="ce17">
            <text:p>0.828467153</text:p>
          </table:table-cell>
          <table:table-cell office:value-type="float" office:value="7284.7142857142853" table:formula="of:=AVERAGE([.I307:.I313])" table:style-name="ce15">
            <text:p>7285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4-18T00:00:00" table:style-name="ce14">
            <text:p>18-04-2024</text:p>
          </table:table-cell>
          <table:table-cell office:value-type="string" office:string-value="April" table:formula="of:=TEXT([.A308]; &quot;mmmm&quot;)" table:style-name="ce14">
            <text:p>April</text:p>
          </table:table-cell>
          <table:table-cell office:value-type="string" office:string-value="2024-04" table:formula="of:=TEXT([.A308]; &quot;yyyy-mm&quot;)" table:style-name="ce14">
            <text:p>2024-04</text:p>
          </table:table-cell>
          <table:table-cell office:value-type="float" office:value="144" table:style-name="ce9">
            <text:p>144</text:p>
          </table:table-cell>
          <table:table-cell office:value-type="float" office:value="322" table:style-name="ce9">
            <text:p>322</text:p>
          </table:table-cell>
          <table:table-cell office:value-type="float" office:value="258" table:style-name="ce9">
            <text:p>258</text:p>
          </table:table-cell>
          <table:table-cell office:value-type="float" office:value="6728" table:style-name="ce9">
            <text:p>6728</text:p>
          </table:table-cell>
          <table:table-cell office:value-type="float" office:value="260" table:style-name="ce9">
            <text:p>260</text:p>
          </table:table-cell>
          <table:table-cell office:value-type="float" office:value="7050" table:formula="of:=SUM([.G308]+[.E308])" table:style-name="ce15">
            <text:p>7050</text:p>
          </table:table-cell>
          <table:table-cell office:value-type="float" office:value="-2" table:formula="of:=[.F308]-[.H308]" table:style-name="ce15">
            <text:p>-2</text:p>
          </table:table-cell>
          <table:table-cell office:value-type="percentage" office:value="1.0638297872340425E-2" table:formula="of:=([.I309]-[.I308])/[.I308]" table:style-name="ce16">
            <text:p>1%</text:p>
          </table:table-cell>
          <table:table-cell office:value-type="string" office:string-value="Valid" table:formula="of:=IF([.F308]&lt;=[.E308]; &quot;Valid&quot;; &quot;Invalid&quot;)" table:style-name="ce17">
            <text:p>Valid</text:p>
          </table:table-cell>
          <table:table-cell office:value-type="string" office:string-value="Valid" table:formula="of:=IF([.H308]&lt;=[.G308]; &quot;Valid&quot;; &quot;Invalid&quot;)" table:style-name="ce17">
            <text:p>Valid</text:p>
          </table:table-cell>
          <table:table-cell office:value-type="string" office:string-value="Stable/Reducing" table:formula="of:=IF([.J308]&gt;0; &quot;Increasing Pressure&quot;; &quot;Stable/Reducing&quot;)" table:style-name="ce18">
            <text:p>Stable/Reducing</text:p>
          </table:table-cell>
          <table:table-cell office:value-type="float" office:value="1.0077519379844961" table:formula="of:=IFERROR([.H308]/[.F308]; 0)" table:style-name="ce17">
            <text:p>1.007751938</text:p>
          </table:table-cell>
          <table:table-cell office:value-type="float" office:value="7363.4285714285716" table:formula="of:=AVERAGE([.I308:.I314])" table:style-name="ce15">
            <text:p>7363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4-21T00:00:00" table:style-name="ce14">
            <text:p>21-04-2024</text:p>
          </table:table-cell>
          <table:table-cell office:value-type="string" office:string-value="April" table:formula="of:=TEXT([.A309]; &quot;mmmm&quot;)" table:style-name="ce14">
            <text:p>April</text:p>
          </table:table-cell>
          <table:table-cell office:value-type="string" office:string-value="2024-04" table:formula="of:=TEXT([.A309]; &quot;yyyy-mm&quot;)" table:style-name="ce14">
            <text:p>2024-04</text:p>
          </table:table-cell>
          <table:table-cell office:value-type="float" office:value="208" table:style-name="ce9">
            <text:p>208</text:p>
          </table:table-cell>
          <table:table-cell office:value-type="float" office:value="380" table:style-name="ce9">
            <text:p>380</text:p>
          </table:table-cell>
          <table:table-cell office:value-type="float" office:value="343" table:style-name="ce9">
            <text:p>343</text:p>
          </table:table-cell>
          <table:table-cell office:value-type="float" office:value="6745" table:style-name="ce9">
            <text:p>6745</text:p>
          </table:table-cell>
          <table:table-cell office:value-type="float" office:value="240" table:style-name="ce9">
            <text:p>240</text:p>
          </table:table-cell>
          <table:table-cell office:value-type="float" office:value="7125" table:formula="of:=SUM([.G309]+[.E309])" table:style-name="ce15">
            <text:p>7125</text:p>
          </table:table-cell>
          <table:table-cell office:value-type="float" office:value="103" table:formula="of:=[.F309]-[.H309]" table:style-name="ce15">
            <text:p>103</text:p>
          </table:table-cell>
          <table:table-cell office:value-type="percentage" office:value="1.3754385964912281E-2" table:formula="of:=([.I310]-[.I309])/[.I309]" table:style-name="ce16">
            <text:p>1%</text:p>
          </table:table-cell>
          <table:table-cell office:value-type="string" office:string-value="Valid" table:formula="of:=IF([.F309]&lt;=[.E309]; &quot;Valid&quot;; &quot;Invalid&quot;)" table:style-name="ce17">
            <text:p>Valid</text:p>
          </table:table-cell>
          <table:table-cell office:value-type="string" office:string-value="Valid" table:formula="of:=IF([.H309]&lt;=[.G309]; &quot;Valid&quot;; &quot;Invalid&quot;)" table:style-name="ce17">
            <text:p>Valid</text:p>
          </table:table-cell>
          <table:table-cell office:value-type="string" office:string-value="Increasing Pressure" table:formula="of:=IF([.J309]&gt;0; &quot;Increasing Pressure&quot;; &quot;Stable/Reducing&quot;)" table:style-name="ce18">
            <text:p>Increasing Pressure</text:p>
          </table:table-cell>
          <table:table-cell office:value-type="float" office:value="0.69970845481049559" table:formula="of:=IFERROR([.H309]/[.F309]; 0)" table:style-name="ce17">
            <text:p>0.699708455</text:p>
          </table:table-cell>
          <table:table-cell office:value-type="float" office:value="7451.2857142857147" table:formula="of:=AVERAGE([.I309:.I315])" table:style-name="ce15">
            <text:p>7451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4-22T00:00:00" table:style-name="ce14">
            <text:p>22-04-2024</text:p>
          </table:table-cell>
          <table:table-cell office:value-type="string" office:string-value="April" table:formula="of:=TEXT([.A310]; &quot;mmmm&quot;)" table:style-name="ce14">
            <text:p>April</text:p>
          </table:table-cell>
          <table:table-cell office:value-type="string" office:string-value="2024-04" table:formula="of:=TEXT([.A310]; &quot;yyyy-mm&quot;)" table:style-name="ce14">
            <text:p>2024-04</text:p>
          </table:table-cell>
          <table:table-cell office:value-type="float" office:value="176" table:style-name="ce9">
            <text:p>176</text:p>
          </table:table-cell>
          <table:table-cell office:value-type="float" office:value="424" table:style-name="ce9">
            <text:p>424</text:p>
          </table:table-cell>
          <table:table-cell office:value-type="float" office:value="251" table:style-name="ce9">
            <text:p>251</text:p>
          </table:table-cell>
          <table:table-cell office:value-type="float" office:value="6799" table:style-name="ce9">
            <text:p>6799</text:p>
          </table:table-cell>
          <table:table-cell office:value-type="float" office:value="214" table:style-name="ce9">
            <text:p>214</text:p>
          </table:table-cell>
          <table:table-cell office:value-type="float" office:value="7223" table:formula="of:=SUM([.G310]+[.E310])" table:style-name="ce15">
            <text:p>7223</text:p>
          </table:table-cell>
          <table:table-cell office:value-type="float" office:value="37" table:formula="of:=[.F310]-[.H310]" table:style-name="ce15">
            <text:p>37</text:p>
          </table:table-cell>
          <table:table-cell office:value-type="percentage" office:value="2.3674373529004568E-2" table:formula="of:=([.I311]-[.I310])/[.I310]" table:style-name="ce16">
            <text:p>2%</text:p>
          </table:table-cell>
          <table:table-cell office:value-type="string" office:string-value="Valid" table:formula="of:=IF([.F310]&lt;=[.E310]; &quot;Valid&quot;; &quot;Invalid&quot;)" table:style-name="ce17">
            <text:p>Valid</text:p>
          </table:table-cell>
          <table:table-cell office:value-type="string" office:string-value="Valid" table:formula="of:=IF([.H310]&lt;=[.G310]; &quot;Valid&quot;; &quot;Invalid&quot;)" table:style-name="ce17">
            <text:p>Valid</text:p>
          </table:table-cell>
          <table:table-cell office:value-type="string" office:string-value="Increasing Pressure" table:formula="of:=IF([.J310]&gt;0; &quot;Increasing Pressure&quot;; &quot;Stable/Reducing&quot;)" table:style-name="ce18">
            <text:p>Increasing Pressure</text:p>
          </table:table-cell>
          <table:table-cell office:value-type="float" office:value="0.85258964143426297" table:formula="of:=IFERROR([.H310]/[.F310]; 0)" table:style-name="ce17">
            <text:p>0.852589641</text:p>
          </table:table-cell>
          <table:table-cell office:value-type="float" office:value="7558.2857142857147" table:formula="of:=AVERAGE([.I310:.I316])" table:style-name="ce15">
            <text:p>7558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4-23T00:00:00" table:style-name="ce14">
            <text:p>23-04-2024</text:p>
          </table:table-cell>
          <table:table-cell office:value-type="string" office:string-value="April" table:formula="of:=TEXT([.A311]; &quot;mmmm&quot;)" table:style-name="ce14">
            <text:p>April</text:p>
          </table:table-cell>
          <table:table-cell office:value-type="string" office:string-value="2024-04" table:formula="of:=TEXT([.A311]; &quot;yyyy-mm&quot;)" table:style-name="ce14">
            <text:p>2024-04</text:p>
          </table:table-cell>
          <table:table-cell office:value-type="float" office:value="252" table:style-name="ce9">
            <text:p>252</text:p>
          </table:table-cell>
          <table:table-cell office:value-type="float" office:value="427" table:style-name="ce9">
            <text:p>427</text:p>
          </table:table-cell>
          <table:table-cell office:value-type="float" office:value="307" table:style-name="ce9">
            <text:p>307</text:p>
          </table:table-cell>
          <table:table-cell office:value-type="float" office:value="6967" table:style-name="ce9">
            <text:p>6967</text:p>
          </table:table-cell>
          <table:table-cell office:value-type="float" office:value="134" table:style-name="ce9">
            <text:p>134</text:p>
          </table:table-cell>
          <table:table-cell office:value-type="float" office:value="7394" table:formula="of:=SUM([.G311]+[.E311])" table:style-name="ce15">
            <text:p>7394</text:p>
          </table:table-cell>
          <table:table-cell office:value-type="float" office:value="173" table:formula="of:=[.F311]-[.H311]" table:style-name="ce15">
            <text:p>173</text:p>
          </table:table-cell>
          <table:table-cell office:value-type="percentage" office:value="1.9610494995942657E-2" table:formula="of:=([.I312]-[.I311])/[.I311]" table:style-name="ce16">
            <text:p>2%</text:p>
          </table:table-cell>
          <table:table-cell office:value-type="string" office:string-value="Valid" table:formula="of:=IF([.F311]&lt;=[.E311]; &quot;Valid&quot;; &quot;Invalid&quot;)" table:style-name="ce17">
            <text:p>Valid</text:p>
          </table:table-cell>
          <table:table-cell office:value-type="string" office:string-value="Valid" table:formula="of:=IF([.H311]&lt;=[.G311]; &quot;Valid&quot;; &quot;Invalid&quot;)" table:style-name="ce17">
            <text:p>Valid</text:p>
          </table:table-cell>
          <table:table-cell office:value-type="string" office:string-value="Increasing Pressure" table:formula="of:=IF([.J311]&gt;0; &quot;Increasing Pressure&quot;; &quot;Stable/Reducing&quot;)" table:style-name="ce18">
            <text:p>Increasing Pressure</text:p>
          </table:table-cell>
          <table:table-cell office:value-type="float" office:value="0.43648208469055377" table:formula="of:=IFERROR([.H311]/[.F311]; 0)" table:style-name="ce17">
            <text:p>0.436482085</text:p>
          </table:table-cell>
          <table:table-cell office:value-type="float" office:value="7661.4285714285716" table:formula="of:=AVERAGE([.I311:.I317])" table:style-name="ce15">
            <text:p>7661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4-24T00:00:00" table:style-name="ce14">
            <text:p>24-04-2024</text:p>
          </table:table-cell>
          <table:table-cell office:value-type="string" office:string-value="April" table:formula="of:=TEXT([.A312]; &quot;mmmm&quot;)" table:style-name="ce14">
            <text:p>April</text:p>
          </table:table-cell>
          <table:table-cell office:value-type="string" office:string-value="2024-04" table:formula="of:=TEXT([.A312]; &quot;yyyy-mm&quot;)" table:style-name="ce14">
            <text:p>2024-04</text:p>
          </table:table-cell>
          <table:table-cell office:value-type="float" office:value="253" table:style-name="ce9">
            <text:p>253</text:p>
          </table:table-cell>
          <table:table-cell office:value-type="float" office:value="411" table:style-name="ce9">
            <text:p>411</text:p>
          </table:table-cell>
          <table:table-cell office:value-type="float" office:value="307" table:style-name="ce9">
            <text:p>307</text:p>
          </table:table-cell>
          <table:table-cell office:value-type="float" office:value="7128" table:style-name="ce9">
            <text:p>7128</text:p>
          </table:table-cell>
          <table:table-cell office:value-type="float" office:value="154" table:style-name="ce9">
            <text:p>154</text:p>
          </table:table-cell>
          <table:table-cell office:value-type="float" office:value="7539" table:formula="of:=SUM([.G312]+[.E312])" table:style-name="ce15">
            <text:p>7539</text:p>
          </table:table-cell>
          <table:table-cell office:value-type="float" office:value="153" table:formula="of:=[.F312]-[.H312]" table:style-name="ce15">
            <text:p>153</text:p>
          </table:table-cell>
          <table:table-cell office:value-type="percentage" office:value="3.5813768404297651E-3" table:formula="of:=([.I313]-[.I312])/[.I312]" table:style-name="ce16">
            <text:p>0%</text:p>
          </table:table-cell>
          <table:table-cell office:value-type="string" office:string-value="Valid" table:formula="of:=IF([.F312]&lt;=[.E312]; &quot;Valid&quot;; &quot;Invalid&quot;)" table:style-name="ce17">
            <text:p>Valid</text:p>
          </table:table-cell>
          <table:table-cell office:value-type="string" office:string-value="Valid" table:formula="of:=IF([.H312]&lt;=[.G312]; &quot;Valid&quot;; &quot;Invalid&quot;)" table:style-name="ce17">
            <text:p>Valid</text:p>
          </table:table-cell>
          <table:table-cell office:value-type="string" office:string-value="Increasing Pressure" table:formula="of:=IF([.J312]&gt;0; &quot;Increasing Pressure&quot;; &quot;Stable/Reducing&quot;)" table:style-name="ce18">
            <text:p>Increasing Pressure</text:p>
          </table:table-cell>
          <table:table-cell office:value-type="float" office:value="0.50162866449511401" table:formula="of:=IFERROR([.H312]/[.F312]; 0)" table:style-name="ce17">
            <text:p>0.501628664</text:p>
          </table:table-cell>
          <table:table-cell office:value-type="float" office:value="7746.2857142857147" table:formula="of:=AVERAGE([.I312:.I318])" table:style-name="ce15">
            <text:p>7746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4-25T00:00:00" table:style-name="ce14">
            <text:p>25-04-2024</text:p>
          </table:table-cell>
          <table:table-cell office:value-type="string" office:string-value="April" table:formula="of:=TEXT([.A313]; &quot;mmmm&quot;)" table:style-name="ce14">
            <text:p>April</text:p>
          </table:table-cell>
          <table:table-cell office:value-type="string" office:string-value="2024-04" table:formula="of:=TEXT([.A313]; &quot;yyyy-mm&quot;)" table:style-name="ce14">
            <text:p>2024-04</text:p>
          </table:table-cell>
          <table:table-cell office:value-type="float" office:value="145" table:style-name="ce9">
            <text:p>145</text:p>
          </table:table-cell>
          <table:table-cell office:value-type="float" office:value="357" table:style-name="ce9">
            <text:p>357</text:p>
          </table:table-cell>
          <table:table-cell office:value-type="float" office:value="333" table:style-name="ce9">
            <text:p>333</text:p>
          </table:table-cell>
          <table:table-cell office:value-type="float" office:value="7209" table:style-name="ce9">
            <text:p>7209</text:p>
          </table:table-cell>
          <table:table-cell office:value-type="float" office:value="217" table:style-name="ce9">
            <text:p>217</text:p>
          </table:table-cell>
          <table:table-cell office:value-type="float" office:value="7566" table:formula="of:=SUM([.G313]+[.E313])" table:style-name="ce15">
            <text:p>7566</text:p>
          </table:table-cell>
          <table:table-cell office:value-type="float" office:value="116" table:formula="of:=[.F313]-[.H313]" table:style-name="ce15">
            <text:p>116</text:p>
          </table:table-cell>
          <table:table-cell office:value-type="percentage" office:value="1.070578905630452E-2" table:formula="of:=([.I314]-[.I313])/[.I313]" table:style-name="ce16">
            <text:p>1%</text:p>
          </table:table-cell>
          <table:table-cell office:value-type="string" office:string-value="Valid" table:formula="of:=IF([.F313]&lt;=[.E313]; &quot;Valid&quot;; &quot;Invalid&quot;)" table:style-name="ce17">
            <text:p>Valid</text:p>
          </table:table-cell>
          <table:table-cell office:value-type="string" office:string-value="Valid" table:formula="of:=IF([.H313]&lt;=[.G313]; &quot;Valid&quot;; &quot;Invalid&quot;)" table:style-name="ce17">
            <text:p>Valid</text:p>
          </table:table-cell>
          <table:table-cell office:value-type="string" office:string-value="Increasing Pressure" table:formula="of:=IF([.J313]&gt;0; &quot;Increasing Pressure&quot;; &quot;Stable/Reducing&quot;)" table:style-name="ce18">
            <text:p>Increasing Pressure</text:p>
          </table:table-cell>
          <table:table-cell office:value-type="float" office:value="0.65165165165165162" table:formula="of:=IFERROR([.H313]/[.F313]; 0)" table:style-name="ce17">
            <text:p>0.651651652</text:p>
          </table:table-cell>
          <table:table-cell office:value-type="float" office:value="7778.1428571428569" table:formula="of:=AVERAGE([.I313:.I319])" table:style-name="ce15">
            <text:p>7778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4-28T00:00:00" table:style-name="ce14">
            <text:p>28-04-2024</text:p>
          </table:table-cell>
          <table:table-cell office:value-type="string" office:string-value="April" table:formula="of:=TEXT([.A314]; &quot;mmmm&quot;)" table:style-name="ce14">
            <text:p>April</text:p>
          </table:table-cell>
          <table:table-cell office:value-type="string" office:string-value="2024-04" table:formula="of:=TEXT([.A314]; &quot;yyyy-mm&quot;)" table:style-name="ce14">
            <text:p>2024-04</text:p>
          </table:table-cell>
          <table:table-cell office:value-type="float" office:value="158" table:style-name="ce9">
            <text:p>158</text:p>
          </table:table-cell>
          <table:table-cell office:value-type="float" office:value="349" table:style-name="ce9">
            <text:p>349</text:p>
          </table:table-cell>
          <table:table-cell office:value-type="float" office:value="365" table:style-name="ce9">
            <text:p>365</text:p>
          </table:table-cell>
          <table:table-cell office:value-type="float" office:value="7298" table:style-name="ce9">
            <text:p>7298</text:p>
          </table:table-cell>
          <table:table-cell office:value-type="float" office:value="250" table:style-name="ce9">
            <text:p>250</text:p>
          </table:table-cell>
          <table:table-cell office:value-type="float" office:value="7647" table:formula="of:=SUM([.G314]+[.E314])" table:style-name="ce15">
            <text:p>7647</text:p>
          </table:table-cell>
          <table:table-cell office:value-type="float" office:value="115" table:formula="of:=[.F314]-[.H314]" table:style-name="ce15">
            <text:p>115</text:p>
          </table:table-cell>
          <table:table-cell office:value-type="percentage" office:value="2.3538642604943117E-3" table:formula="of:=([.I315]-[.I314])/[.I314]" table:style-name="ce16">
            <text:p>0%</text:p>
          </table:table-cell>
          <table:table-cell office:value-type="string" office:string-value="Invalid" table:formula="of:=IF([.F314]&lt;=[.E314]; &quot;Valid&quot;; &quot;Invalid&quot;)" table:style-name="ce17">
            <text:p>Invalid</text:p>
          </table:table-cell>
          <table:table-cell office:value-type="string" office:string-value="Valid" table:formula="of:=IF([.H314]&lt;=[.G314]; &quot;Valid&quot;; &quot;Invalid&quot;)" table:style-name="ce17">
            <text:p>Valid</text:p>
          </table:table-cell>
          <table:table-cell office:value-type="string" office:string-value="Increasing Pressure" table:formula="of:=IF([.J314]&gt;0; &quot;Increasing Pressure&quot;; &quot;Stable/Reducing&quot;)" table:style-name="ce18">
            <text:p>Increasing Pressure</text:p>
          </table:table-cell>
          <table:table-cell office:value-type="float" office:value="0.68493150684931503" table:formula="of:=IFERROR([.H314]/[.F314]; 0)" table:style-name="ce17">
            <text:p>0.684931507</text:p>
          </table:table-cell>
          <table:table-cell office:value-type="float" office:value="7809.5714285714284" table:formula="of:=AVERAGE([.I314:.I320])" table:style-name="ce15">
            <text:p>7810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4-29T00:00:00" table:style-name="ce14">
            <text:p>29-04-2024</text:p>
          </table:table-cell>
          <table:table-cell office:value-type="string" office:string-value="April" table:formula="of:=TEXT([.A315]; &quot;mmmm&quot;)" table:style-name="ce14">
            <text:p>April</text:p>
          </table:table-cell>
          <table:table-cell office:value-type="string" office:string-value="2024-04" table:formula="of:=TEXT([.A315]; &quot;yyyy-mm&quot;)" table:style-name="ce14">
            <text:p>2024-04</text:p>
          </table:table-cell>
          <table:table-cell office:value-type="float" office:value="140" table:style-name="ce9">
            <text:p>140</text:p>
          </table:table-cell>
          <table:table-cell office:value-type="float" office:value="292" table:style-name="ce9">
            <text:p>292</text:p>
          </table:table-cell>
          <table:table-cell office:value-type="float" office:value="255" table:style-name="ce9">
            <text:p>255</text:p>
          </table:table-cell>
          <table:table-cell office:value-type="float" office:value="7373" table:style-name="ce9">
            <text:p>7373</text:p>
          </table:table-cell>
          <table:table-cell office:value-type="float" office:value="187" table:style-name="ce9">
            <text:p>187</text:p>
          </table:table-cell>
          <table:table-cell office:value-type="float" office:value="7665" table:formula="of:=SUM([.G315]+[.E315])" table:style-name="ce15">
            <text:p>7665</text:p>
          </table:table-cell>
          <table:table-cell office:value-type="float" office:value="68" table:formula="of:=[.F315]-[.H315]" table:style-name="ce15">
            <text:p>68</text:p>
          </table:table-cell>
          <table:table-cell office:value-type="percentage" office:value="2.7266797129810828E-2" table:formula="of:=([.I316]-[.I315])/[.I315]" table:style-name="ce16">
            <text:p>3%</text:p>
          </table:table-cell>
          <table:table-cell office:value-type="string" office:string-value="Valid" table:formula="of:=IF([.F315]&lt;=[.E315]; &quot;Valid&quot;; &quot;Invalid&quot;)" table:style-name="ce17">
            <text:p>Valid</text:p>
          </table:table-cell>
          <table:table-cell office:value-type="string" office:string-value="Valid" table:formula="of:=IF([.H315]&lt;=[.G315]; &quot;Valid&quot;; &quot;Invalid&quot;)" table:style-name="ce17">
            <text:p>Valid</text:p>
          </table:table-cell>
          <table:table-cell office:value-type="string" office:string-value="Increasing Pressure" table:formula="of:=IF([.J315]&gt;0; &quot;Increasing Pressure&quot;; &quot;Stable/Reducing&quot;)" table:style-name="ce18">
            <text:p>Increasing Pressure</text:p>
          </table:table-cell>
          <table:table-cell office:value-type="float" office:value="0.73333333333333328" table:formula="of:=IFERROR([.H315]/[.F315]; 0)" table:style-name="ce17">
            <text:p>0.733333333</text:p>
          </table:table-cell>
          <table:table-cell office:value-type="float" office:value="7845.7142857142853" table:formula="of:=AVERAGE([.I315:.I321])" table:style-name="ce15">
            <text:p>7846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4-30T00:00:00" table:style-name="ce14">
            <text:p>30-04-2024</text:p>
          </table:table-cell>
          <table:table-cell office:value-type="string" office:string-value="April" table:formula="of:=TEXT([.A316]; &quot;mmmm&quot;)" table:style-name="ce14">
            <text:p>April</text:p>
          </table:table-cell>
          <table:table-cell office:value-type="string" office:string-value="2024-04" table:formula="of:=TEXT([.A316]; &quot;yyyy-mm&quot;)" table:style-name="ce14">
            <text:p>2024-04</text:p>
          </table:table-cell>
          <table:table-cell office:value-type="float" office:value="220" table:style-name="ce9">
            <text:p>220</text:p>
          </table:table-cell>
          <table:table-cell office:value-type="float" office:value="443" table:style-name="ce9">
            <text:p>443</text:p>
          </table:table-cell>
          <table:table-cell office:value-type="float" office:value="194" table:style-name="ce9">
            <text:p>194</text:p>
          </table:table-cell>
          <table:table-cell office:value-type="float" office:value="7431" table:style-name="ce9">
            <text:p>7431</text:p>
          </table:table-cell>
          <table:table-cell office:value-type="float" office:value="135" table:style-name="ce9">
            <text:p>135</text:p>
          </table:table-cell>
          <table:table-cell office:value-type="float" office:value="7874" table:formula="of:=SUM([.G316]+[.E316])" table:style-name="ce15">
            <text:p>7874</text:p>
          </table:table-cell>
          <table:table-cell office:value-type="float" office:value="59" table:formula="of:=[.F316]-[.H316]" table:style-name="ce15">
            <text:p>59</text:p>
          </table:table-cell>
          <table:table-cell office:value-type="percentage" office:value="9.0170180340360673E-3" table:formula="of:=([.I317]-[.I316])/[.I316]" table:style-name="ce16">
            <text:p>1%</text:p>
          </table:table-cell>
          <table:table-cell office:value-type="string" office:string-value="Valid" table:formula="of:=IF([.F316]&lt;=[.E316]; &quot;Valid&quot;; &quot;Invalid&quot;)" table:style-name="ce17">
            <text:p>Valid</text:p>
          </table:table-cell>
          <table:table-cell office:value-type="string" office:string-value="Valid" table:formula="of:=IF([.H316]&lt;=[.G316]; &quot;Valid&quot;; &quot;Invalid&quot;)" table:style-name="ce17">
            <text:p>Valid</text:p>
          </table:table-cell>
          <table:table-cell office:value-type="string" office:string-value="Increasing Pressure" table:formula="of:=IF([.J316]&gt;0; &quot;Increasing Pressure&quot;; &quot;Stable/Reducing&quot;)" table:style-name="ce18">
            <text:p>Increasing Pressure</text:p>
          </table:table-cell>
          <table:table-cell office:value-type="float" office:value="0.69587628865979378" table:formula="of:=IFERROR([.H316]/[.F316]; 0)" table:style-name="ce17">
            <text:p>0.695876289</text:p>
          </table:table-cell>
          <table:table-cell office:value-type="float" office:value="7887.4285714285716" table:formula="of:=AVERAGE([.I316:.I322])" table:style-name="ce15">
            <text:p>7887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5-01T00:00:00" table:style-name="ce14">
            <text:p>01-05-2024</text:p>
          </table:table-cell>
          <table:table-cell office:value-type="string" office:string-value="May" table:formula="of:=TEXT([.A317]; &quot;mmmm&quot;)" table:style-name="ce14">
            <text:p>May</text:p>
          </table:table-cell>
          <table:table-cell office:value-type="string" office:string-value="2024-05" table:formula="of:=TEXT([.A317]; &quot;yyyy-mm&quot;)" table:style-name="ce14">
            <text:p>2024-05</text:p>
          </table:table-cell>
          <table:table-cell office:value-type="float" office:value="197" table:style-name="ce9">
            <text:p>197</text:p>
          </table:table-cell>
          <table:table-cell office:value-type="float" office:value="437" table:style-name="ce9">
            <text:p>437</text:p>
          </table:table-cell>
          <table:table-cell office:value-type="float" office:value="295" table:style-name="ce9">
            <text:p>295</text:p>
          </table:table-cell>
          <table:table-cell office:value-type="float" office:value="7508" table:style-name="ce9">
            <text:p>7508</text:p>
          </table:table-cell>
          <table:table-cell office:value-type="float" office:value="190" table:style-name="ce9">
            <text:p>190</text:p>
          </table:table-cell>
          <table:table-cell office:value-type="float" office:value="7945" table:formula="of:=SUM([.G317]+[.E317])" table:style-name="ce15">
            <text:p>7945</text:p>
          </table:table-cell>
          <table:table-cell office:value-type="float" office:value="105" table:formula="of:=[.F317]-[.H317]" table:style-name="ce15">
            <text:p>105</text:p>
          </table:table-cell>
          <table:table-cell office:value-type="percentage" office:value="5.4122089364380113E-3" table:formula="of:=([.I318]-[.I317])/[.I317]" table:style-name="ce16">
            <text:p>1%</text:p>
          </table:table-cell>
          <table:table-cell office:value-type="string" office:string-value="Valid" table:formula="of:=IF([.F317]&lt;=[.E317]; &quot;Valid&quot;; &quot;Invalid&quot;)" table:style-name="ce17">
            <text:p>Valid</text:p>
          </table:table-cell>
          <table:table-cell office:value-type="string" office:string-value="Valid" table:formula="of:=IF([.H317]&lt;=[.G317]; &quot;Valid&quot;; &quot;Invalid&quot;)" table:style-name="ce17">
            <text:p>Valid</text:p>
          </table:table-cell>
          <table:table-cell office:value-type="string" office:string-value="Increasing Pressure" table:formula="of:=IF([.J317]&gt;0; &quot;Increasing Pressure&quot;; &quot;Stable/Reducing&quot;)" table:style-name="ce18">
            <text:p>Increasing Pressure</text:p>
          </table:table-cell>
          <table:table-cell office:value-type="float" office:value="0.64406779661016944" table:formula="of:=IFERROR([.H317]/[.F317]; 0)" table:style-name="ce17">
            <text:p>0.644067797</text:p>
          </table:table-cell>
          <table:table-cell office:value-type="float" office:value="7884.7142857142853" table:formula="of:=AVERAGE([.I317:.I323])" table:style-name="ce15">
            <text:p>7885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5-02T00:00:00" table:style-name="ce14">
            <text:p>02-05-2024</text:p>
          </table:table-cell>
          <table:table-cell office:value-type="string" office:string-value="May" table:formula="of:=TEXT([.A318]; &quot;mmmm&quot;)" table:style-name="ce14">
            <text:p>May</text:p>
          </table:table-cell>
          <table:table-cell office:value-type="string" office:string-value="2024-05" table:formula="of:=TEXT([.A318]; &quot;yyyy-mm&quot;)" table:style-name="ce14">
            <text:p>2024-05</text:p>
          </table:table-cell>
          <table:table-cell office:value-type="float" office:value="206" table:style-name="ce9">
            <text:p>206</text:p>
          </table:table-cell>
          <table:table-cell office:value-type="float" office:value="411" table:style-name="ce9">
            <text:p>411</text:p>
          </table:table-cell>
          <table:table-cell office:value-type="float" office:value="293" table:style-name="ce9">
            <text:p>293</text:p>
          </table:table-cell>
          <table:table-cell office:value-type="float" office:value="7577" table:style-name="ce9">
            <text:p>7577</text:p>
          </table:table-cell>
          <table:table-cell office:value-type="float" office:value="194" table:style-name="ce9">
            <text:p>194</text:p>
          </table:table-cell>
          <table:table-cell office:value-type="float" office:value="7988" table:formula="of:=SUM([.G318]+[.E318])" table:style-name="ce15">
            <text:p>7988</text:p>
          </table:table-cell>
          <table:table-cell office:value-type="float" office:value="99" table:formula="of:=[.F318]-[.H318]" table:style-name="ce15">
            <text:p>99</text:p>
          </table:table-cell>
          <table:table-cell office:value-type="percentage" office:value="-2.829243865798698E-2" table:formula="of:=([.I319]-[.I318])/[.I318]" table:style-name="ce16">
            <text:p>-3%</text:p>
          </table:table-cell>
          <table:table-cell office:value-type="string" office:string-value="Valid" table:formula="of:=IF([.F318]&lt;=[.E318]; &quot;Valid&quot;; &quot;Invalid&quot;)" table:style-name="ce17">
            <text:p>Valid</text:p>
          </table:table-cell>
          <table:table-cell office:value-type="string" office:string-value="Valid" table:formula="of:=IF([.H318]&lt;=[.G318]; &quot;Valid&quot;; &quot;Invalid&quot;)" table:style-name="ce17">
            <text:p>Valid</text:p>
          </table:table-cell>
          <table:table-cell office:value-type="string" office:string-value="Increasing Pressure" table:formula="of:=IF([.J318]&gt;0; &quot;Increasing Pressure&quot;; &quot;Stable/Reducing&quot;)" table:style-name="ce18">
            <text:p>Increasing Pressure</text:p>
          </table:table-cell>
          <table:table-cell office:value-type="float" office:value="0.66211604095563137" table:formula="of:=IFERROR([.H318]/[.F318]; 0)" table:style-name="ce17">
            <text:p>0.662116041</text:p>
          </table:table-cell>
          <table:table-cell office:value-type="float" office:value="7859" table:formula="of:=AVERAGE([.I318:.I324])" table:style-name="ce15">
            <text:p>7859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5-05T00:00:00" table:style-name="ce14">
            <text:p>05-05-2024</text:p>
          </table:table-cell>
          <table:table-cell office:value-type="string" office:string-value="May" table:formula="of:=TEXT([.A319]; &quot;mmmm&quot;)" table:style-name="ce14">
            <text:p>May</text:p>
          </table:table-cell>
          <table:table-cell office:value-type="string" office:string-value="2024-05" table:formula="of:=TEXT([.A319]; &quot;yyyy-mm&quot;)" table:style-name="ce14">
            <text:p>2024-05</text:p>
          </table:table-cell>
          <table:table-cell office:value-type="float" office:value="150" table:style-name="ce9">
            <text:p>150</text:p>
          </table:table-cell>
          <table:table-cell office:value-type="float" office:value="315" table:style-name="ce9">
            <text:p>315</text:p>
          </table:table-cell>
          <table:table-cell office:value-type="float" office:value="228" table:style-name="ce9">
            <text:p>228</text:p>
          </table:table-cell>
          <table:table-cell office:value-type="float" office:value="7447" table:style-name="ce9">
            <text:p>7447</text:p>
          </table:table-cell>
          <table:table-cell office:value-type="float" office:value="332" table:style-name="ce9">
            <text:p>332</text:p>
          </table:table-cell>
          <table:table-cell office:value-type="float" office:value="7762" table:formula="of:=SUM([.G319]+[.E319])" table:style-name="ce15">
            <text:p>7762</text:p>
          </table:table-cell>
          <table:table-cell office:value-type="float" office:value="-104" table:formula="of:=[.F319]-[.H319]" table:style-name="ce15">
            <text:p>-104</text:p>
          </table:table-cell>
          <table:table-cell office:value-type="percentage" office:value="3.0919866013913938E-3" table:formula="of:=([.I320]-[.I319])/[.I319]" table:style-name="ce16">
            <text:p>0%</text:p>
          </table:table-cell>
          <table:table-cell office:value-type="string" office:string-value="Valid" table:formula="of:=IF([.F319]&lt;=[.E319]; &quot;Valid&quot;; &quot;Invalid&quot;)" table:style-name="ce17">
            <text:p>Valid</text:p>
          </table:table-cell>
          <table:table-cell office:value-type="string" office:string-value="Valid" table:formula="of:=IF([.H319]&lt;=[.G319]; &quot;Valid&quot;; &quot;Invalid&quot;)" table:style-name="ce17">
            <text:p>Valid</text:p>
          </table:table-cell>
          <table:table-cell office:value-type="string" office:string-value="Stable/Reducing" table:formula="of:=IF([.J319]&gt;0; &quot;Increasing Pressure&quot;; &quot;Stable/Reducing&quot;)" table:style-name="ce18">
            <text:p>Stable/Reducing</text:p>
          </table:table-cell>
          <table:table-cell office:value-type="float" office:value="1.4561403508771931" table:formula="of:=IFERROR([.H319]/[.F319]; 0)" table:style-name="ce17">
            <text:p>1.456140351</text:p>
          </table:table-cell>
          <table:table-cell office:value-type="float" office:value="7836.4285714285716" table:formula="of:=AVERAGE([.I319:.I325])" table:style-name="ce15">
            <text:p>7836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5-06T00:00:00" table:style-name="ce14">
            <text:p>06-05-2024</text:p>
          </table:table-cell>
          <table:table-cell office:value-type="string" office:string-value="May" table:formula="of:=TEXT([.A320]; &quot;mmmm&quot;)" table:style-name="ce14">
            <text:p>May</text:p>
          </table:table-cell>
          <table:table-cell office:value-type="string" office:string-value="2024-05" table:formula="of:=TEXT([.A320]; &quot;yyyy-mm&quot;)" table:style-name="ce14">
            <text:p>2024-05</text:p>
          </table:table-cell>
          <table:table-cell office:value-type="float" office:value="173" table:style-name="ce9">
            <text:p>173</text:p>
          </table:table-cell>
          <table:table-cell office:value-type="float" office:value="337" table:style-name="ce9">
            <text:p>337</text:p>
          </table:table-cell>
          <table:table-cell office:value-type="float" office:value="211" table:style-name="ce9">
            <text:p>211</text:p>
          </table:table-cell>
          <table:table-cell office:value-type="float" office:value="7449" table:style-name="ce9">
            <text:p>7449</text:p>
          </table:table-cell>
          <table:table-cell office:value-type="float" office:value="205" table:style-name="ce9">
            <text:p>205</text:p>
          </table:table-cell>
          <table:table-cell office:value-type="float" office:value="7786" table:formula="of:=SUM([.G320]+[.E320])" table:style-name="ce15">
            <text:p>7786</text:p>
          </table:table-cell>
          <table:table-cell office:value-type="float" office:value="6" table:formula="of:=[.F320]-[.H320]" table:style-name="ce15">
            <text:p>6</text:p>
          </table:table-cell>
          <table:table-cell office:value-type="percentage" office:value="1.4641664526072438E-2" table:formula="of:=([.I321]-[.I320])/[.I320]" table:style-name="ce16">
            <text:p>1%</text:p>
          </table:table-cell>
          <table:table-cell office:value-type="string" office:string-value="Valid" table:formula="of:=IF([.F320]&lt;=[.E320]; &quot;Valid&quot;; &quot;Invalid&quot;)" table:style-name="ce17">
            <text:p>Valid</text:p>
          </table:table-cell>
          <table:table-cell office:value-type="string" office:string-value="Valid" table:formula="of:=IF([.H320]&lt;=[.G320]; &quot;Valid&quot;; &quot;Invalid&quot;)" table:style-name="ce17">
            <text:p>Valid</text:p>
          </table:table-cell>
          <table:table-cell office:value-type="string" office:string-value="Increasing Pressure" table:formula="of:=IF([.J320]&gt;0; &quot;Increasing Pressure&quot;; &quot;Stable/Reducing&quot;)" table:style-name="ce18">
            <text:p>Increasing Pressure</text:p>
          </table:table-cell>
          <table:table-cell office:value-type="float" office:value="0.97156398104265407" table:formula="of:=IFERROR([.H320]/[.F320]; 0)" table:style-name="ce17">
            <text:p>0.971563981</text:p>
          </table:table-cell>
          <table:table-cell office:value-type="float" office:value="7865.4285714285716" table:formula="of:=AVERAGE([.I320:.I326])" table:style-name="ce15">
            <text:p>7865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5-07T00:00:00" table:style-name="ce14">
            <text:p>07-05-2024</text:p>
          </table:table-cell>
          <table:table-cell office:value-type="string" office:string-value="May" table:formula="of:=TEXT([.A321]; &quot;mmmm&quot;)" table:style-name="ce14">
            <text:p>May</text:p>
          </table:table-cell>
          <table:table-cell office:value-type="string" office:string-value="2024-05" table:formula="of:=TEXT([.A321]; &quot;yyyy-mm&quot;)" table:style-name="ce14">
            <text:p>2024-05</text:p>
          </table:table-cell>
          <table:table-cell office:value-type="float" office:value="176" table:style-name="ce9">
            <text:p>176</text:p>
          </table:table-cell>
          <table:table-cell office:value-type="float" office:value="334" table:style-name="ce9">
            <text:p>334</text:p>
          </table:table-cell>
          <table:table-cell office:value-type="float" office:value="246" table:style-name="ce9">
            <text:p>246</text:p>
          </table:table-cell>
          <table:table-cell office:value-type="float" office:value="7566" table:style-name="ce9">
            <text:p>7566</text:p>
          </table:table-cell>
          <table:table-cell office:value-type="float" office:value="163" table:style-name="ce9">
            <text:p>163</text:p>
          </table:table-cell>
          <table:table-cell office:value-type="float" office:value="7900" table:formula="of:=SUM([.G321]+[.E321])" table:style-name="ce15">
            <text:p>7900</text:p>
          </table:table-cell>
          <table:table-cell office:value-type="float" office:value="83" table:formula="of:=[.F321]-[.H321]" table:style-name="ce15">
            <text:p>83</text:p>
          </table:table-cell>
          <table:table-cell office:value-type="percentage" office:value="7.2151898734177213E-3" table:formula="of:=([.I322]-[.I321])/[.I321]" table:style-name="ce16">
            <text:p>1%</text:p>
          </table:table-cell>
          <table:table-cell office:value-type="string" office:string-value="Valid" table:formula="of:=IF([.F321]&lt;=[.E321]; &quot;Valid&quot;; &quot;Invalid&quot;)" table:style-name="ce17">
            <text:p>Valid</text:p>
          </table:table-cell>
          <table:table-cell office:value-type="string" office:string-value="Valid" table:formula="of:=IF([.H321]&lt;=[.G321]; &quot;Valid&quot;; &quot;Invalid&quot;)" table:style-name="ce17">
            <text:p>Valid</text:p>
          </table:table-cell>
          <table:table-cell office:value-type="string" office:string-value="Increasing Pressure" table:formula="of:=IF([.J321]&gt;0; &quot;Increasing Pressure&quot;; &quot;Stable/Reducing&quot;)" table:style-name="ce18">
            <text:p>Increasing Pressure</text:p>
          </table:table-cell>
          <table:table-cell office:value-type="float" office:value="0.66260162601626016" table:formula="of:=IFERROR([.H321]/[.F321]; 0)" table:style-name="ce17">
            <text:p>0.662601626</text:p>
          </table:table-cell>
          <table:table-cell office:value-type="float" office:value="7878" table:formula="of:=AVERAGE([.I321:.I327])" table:style-name="ce15">
            <text:p>7878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5-08T00:00:00" table:style-name="ce14">
            <text:p>08-05-2024</text:p>
          </table:table-cell>
          <table:table-cell office:value-type="string" office:string-value="May" table:formula="of:=TEXT([.A322]; &quot;mmmm&quot;)" table:style-name="ce14">
            <text:p>May</text:p>
          </table:table-cell>
          <table:table-cell office:value-type="string" office:string-value="2024-05" table:formula="of:=TEXT([.A322]; &quot;yyyy-mm&quot;)" table:style-name="ce14">
            <text:p>2024-05</text:p>
          </table:table-cell>
          <table:table-cell office:value-type="float" office:value="167" table:style-name="ce9">
            <text:p>167</text:p>
          </table:table-cell>
          <table:table-cell office:value-type="float" office:value="374" table:style-name="ce9">
            <text:p>374</text:p>
          </table:table-cell>
          <table:table-cell office:value-type="float" office:value="205" table:style-name="ce9">
            <text:p>205</text:p>
          </table:table-cell>
          <table:table-cell office:value-type="float" office:value="7583" table:style-name="ce9">
            <text:p>7583</text:p>
          </table:table-cell>
          <table:table-cell office:value-type="float" office:value="202" table:style-name="ce9">
            <text:p>202</text:p>
          </table:table-cell>
          <table:table-cell office:value-type="float" office:value="7957" table:formula="of:=SUM([.G322]+[.E322])" table:style-name="ce15">
            <text:p>7957</text:p>
          </table:table-cell>
          <table:table-cell office:value-type="float" office:value="3" table:formula="of:=[.F322]-[.H322]" table:style-name="ce15">
            <text:p>3</text:p>
          </table:table-cell>
          <table:table-cell office:value-type="percentage" office:value="-1.2818901596078925E-2" table:formula="of:=([.I323]-[.I322])/[.I322]" table:style-name="ce16">
            <text:p>-1%</text:p>
          </table:table-cell>
          <table:table-cell office:value-type="string" office:string-value="Valid" table:formula="of:=IF([.F322]&lt;=[.E322]; &quot;Valid&quot;; &quot;Invalid&quot;)" table:style-name="ce17">
            <text:p>Valid</text:p>
          </table:table-cell>
          <table:table-cell office:value-type="string" office:string-value="Valid" table:formula="of:=IF([.H322]&lt;=[.G322]; &quot;Valid&quot;; &quot;Invalid&quot;)" table:style-name="ce17">
            <text:p>Valid</text:p>
          </table:table-cell>
          <table:table-cell office:value-type="string" office:string-value="Increasing Pressure" table:formula="of:=IF([.J322]&gt;0; &quot;Increasing Pressure&quot;; &quot;Stable/Reducing&quot;)" table:style-name="ce18">
            <text:p>Increasing Pressure</text:p>
          </table:table-cell>
          <table:table-cell office:value-type="float" office:value="0.98536585365853657" table:formula="of:=IFERROR([.H322]/[.F322]; 0)" table:style-name="ce17">
            <text:p>0.985365854</text:p>
          </table:table-cell>
          <table:table-cell office:value-type="float" office:value="7878.7142857142853" table:formula="of:=AVERAGE([.I322:.I328])" table:style-name="ce15">
            <text:p>7879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5-09T00:00:00" table:style-name="ce14">
            <text:p>09-05-2024</text:p>
          </table:table-cell>
          <table:table-cell office:value-type="string" office:string-value="May" table:formula="of:=TEXT([.A323]; &quot;mmmm&quot;)" table:style-name="ce14">
            <text:p>May</text:p>
          </table:table-cell>
          <table:table-cell office:value-type="string" office:string-value="2024-05" table:formula="of:=TEXT([.A323]; &quot;yyyy-mm&quot;)" table:style-name="ce14">
            <text:p>2024-05</text:p>
          </table:table-cell>
          <table:table-cell office:value-type="float" office:value="138" table:style-name="ce9">
            <text:p>138</text:p>
          </table:table-cell>
          <table:table-cell office:value-type="float" office:value="285" table:style-name="ce9">
            <text:p>285</text:p>
          </table:table-cell>
          <table:table-cell office:value-type="float" office:value="268" table:style-name="ce9">
            <text:p>268</text:p>
          </table:table-cell>
          <table:table-cell office:value-type="float" office:value="7570" table:style-name="ce9">
            <text:p>7570</text:p>
          </table:table-cell>
          <table:table-cell office:value-type="float" office:value="244" table:style-name="ce9">
            <text:p>244</text:p>
          </table:table-cell>
          <table:table-cell office:value-type="float" office:value="7855" table:formula="of:=SUM([.G323]+[.E323])" table:style-name="ce15">
            <text:p>7855</text:p>
          </table:table-cell>
          <table:table-cell office:value-type="float" office:value="24" table:formula="of:=[.F323]-[.H323]" table:style-name="ce15">
            <text:p>24</text:p>
          </table:table-cell>
          <table:table-cell office:value-type="percentage" office:value="-1.1457670273711012E-2" table:formula="of:=([.I324]-[.I323])/[.I323]" table:style-name="ce16">
            <text:p>-1%</text:p>
          </table:table-cell>
          <table:table-cell office:value-type="string" office:string-value="Valid" table:formula="of:=IF([.F323]&lt;=[.E323]; &quot;Valid&quot;; &quot;Invalid&quot;)" table:style-name="ce17">
            <text:p>Valid</text:p>
          </table:table-cell>
          <table:table-cell office:value-type="string" office:string-value="Valid" table:formula="of:=IF([.H323]&lt;=[.G323]; &quot;Valid&quot;; &quot;Invalid&quot;)" table:style-name="ce17">
            <text:p>Valid</text:p>
          </table:table-cell>
          <table:table-cell office:value-type="string" office:string-value="Increasing Pressure" table:formula="of:=IF([.J323]&gt;0; &quot;Increasing Pressure&quot;; &quot;Stable/Reducing&quot;)" table:style-name="ce18">
            <text:p>Increasing Pressure</text:p>
          </table:table-cell>
          <table:table-cell office:value-type="float" office:value="0.91044776119402981" table:formula="of:=IFERROR([.H323]/[.F323]; 0)" table:style-name="ce17">
            <text:p>0.910447761</text:p>
          </table:table-cell>
          <table:table-cell office:value-type="float" office:value="7835" table:formula="of:=AVERAGE([.I323:.I329])" table:style-name="ce15">
            <text:p>7835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5-12T00:00:00" table:style-name="ce14">
            <text:p>12-05-2024</text:p>
          </table:table-cell>
          <table:table-cell office:value-type="string" office:string-value="May" table:formula="of:=TEXT([.A324]; &quot;mmmm&quot;)" table:style-name="ce14">
            <text:p>May</text:p>
          </table:table-cell>
          <table:table-cell office:value-type="string" office:string-value="2024-05" table:formula="of:=TEXT([.A324]; &quot;yyyy-mm&quot;)" table:style-name="ce14">
            <text:p>2024-05</text:p>
          </table:table-cell>
          <table:table-cell office:value-type="float" office:value="138" table:style-name="ce9">
            <text:p>138</text:p>
          </table:table-cell>
          <table:table-cell office:value-type="float" office:value="301" table:style-name="ce9">
            <text:p>301</text:p>
          </table:table-cell>
          <table:table-cell office:value-type="float" office:value="263" table:style-name="ce9">
            <text:p>263</text:p>
          </table:table-cell>
          <table:table-cell office:value-type="float" office:value="7464" table:style-name="ce9">
            <text:p>7464</text:p>
          </table:table-cell>
          <table:table-cell office:value-type="float" office:value="245" table:style-name="ce9">
            <text:p>245</text:p>
          </table:table-cell>
          <table:table-cell office:value-type="float" office:value="7765" table:formula="of:=SUM([.G324]+[.E324])" table:style-name="ce15">
            <text:p>7765</text:p>
          </table:table-cell>
          <table:table-cell office:value-type="float" office:value="18" table:formula="of:=[.F324]-[.H324]" table:style-name="ce15">
            <text:p>18</text:p>
          </table:table-cell>
          <table:table-cell office:value-type="percentage" office:value="8.3708950418544745E-3" table:formula="of:=([.I325]-[.I324])/[.I324]" table:style-name="ce16">
            <text:p>1%</text:p>
          </table:table-cell>
          <table:table-cell office:value-type="string" office:string-value="Valid" table:formula="of:=IF([.F324]&lt;=[.E324]; &quot;Valid&quot;; &quot;Invalid&quot;)" table:style-name="ce17">
            <text:p>Valid</text:p>
          </table:table-cell>
          <table:table-cell office:value-type="string" office:string-value="Valid" table:formula="of:=IF([.H324]&lt;=[.G324]; &quot;Valid&quot;; &quot;Invalid&quot;)" table:style-name="ce17">
            <text:p>Valid</text:p>
          </table:table-cell>
          <table:table-cell office:value-type="string" office:string-value="Increasing Pressure" table:formula="of:=IF([.J324]&gt;0; &quot;Increasing Pressure&quot;; &quot;Stable/Reducing&quot;)" table:style-name="ce18">
            <text:p>Increasing Pressure</text:p>
          </table:table-cell>
          <table:table-cell office:value-type="float" office:value="0.9315589353612167" table:formula="of:=IFERROR([.H324]/[.F324]; 0)" table:style-name="ce17">
            <text:p>0.931558935</text:p>
          </table:table-cell>
          <table:table-cell office:value-type="float" office:value="7803.7142857142853" table:formula="of:=AVERAGE([.I324:.I330])" table:style-name="ce15">
            <text:p>7804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5-13T00:00:00" table:style-name="ce14">
            <text:p>13-05-2024</text:p>
          </table:table-cell>
          <table:table-cell office:value-type="string" office:string-value="May" table:formula="of:=TEXT([.A325]; &quot;mmmm&quot;)" table:style-name="ce14">
            <text:p>May</text:p>
          </table:table-cell>
          <table:table-cell office:value-type="string" office:string-value="2024-05" table:formula="of:=TEXT([.A325]; &quot;yyyy-mm&quot;)" table:style-name="ce14">
            <text:p>2024-05</text:p>
          </table:table-cell>
          <table:table-cell office:value-type="float" office:value="112" table:style-name="ce9">
            <text:p>112</text:p>
          </table:table-cell>
          <table:table-cell office:value-type="float" office:value="331" table:style-name="ce9">
            <text:p>331</text:p>
          </table:table-cell>
          <table:table-cell office:value-type="float" office:value="167" table:style-name="ce9">
            <text:p>167</text:p>
          </table:table-cell>
          <table:table-cell office:value-type="float" office:value="7499" table:style-name="ce9">
            <text:p>7499</text:p>
          </table:table-cell>
          <table:table-cell office:value-type="float" office:value="157" table:style-name="ce9">
            <text:p>157</text:p>
          </table:table-cell>
          <table:table-cell office:value-type="float" office:value="7830" table:formula="of:=SUM([.G325]+[.E325])" table:style-name="ce15">
            <text:p>7830</text:p>
          </table:table-cell>
          <table:table-cell office:value-type="float" office:value="10" table:formula="of:=[.F325]-[.H325]" table:style-name="ce15">
            <text:p>10</text:p>
          </table:table-cell>
          <table:table-cell office:value-type="percentage" office:value="1.7241379310344827E-2" table:formula="of:=([.I326]-[.I325])/[.I325]" table:style-name="ce16">
            <text:p>2%</text:p>
          </table:table-cell>
          <table:table-cell office:value-type="string" office:string-value="Valid" table:formula="of:=IF([.F325]&lt;=[.E325]; &quot;Valid&quot;; &quot;Invalid&quot;)" table:style-name="ce17">
            <text:p>Valid</text:p>
          </table:table-cell>
          <table:table-cell office:value-type="string" office:string-value="Valid" table:formula="of:=IF([.H325]&lt;=[.G325]; &quot;Valid&quot;; &quot;Invalid&quot;)" table:style-name="ce17">
            <text:p>Valid</text:p>
          </table:table-cell>
          <table:table-cell office:value-type="string" office:string-value="Increasing Pressure" table:formula="of:=IF([.J325]&gt;0; &quot;Increasing Pressure&quot;; &quot;Stable/Reducing&quot;)" table:style-name="ce18">
            <text:p>Increasing Pressure</text:p>
          </table:table-cell>
          <table:table-cell office:value-type="float" office:value="0.94011976047904189" table:formula="of:=IFERROR([.H325]/[.F325]; 0)" table:style-name="ce17">
            <text:p>0.94011976</text:p>
          </table:table-cell>
          <table:table-cell office:value-type="float" office:value="7801.8571428571431" table:formula="of:=AVERAGE([.I325:.I331])" table:style-name="ce15">
            <text:p>7802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5-14T00:00:00" table:style-name="ce14">
            <text:p>14-05-2024</text:p>
          </table:table-cell>
          <table:table-cell office:value-type="string" office:string-value="May" table:formula="of:=TEXT([.A326]; &quot;mmmm&quot;)" table:style-name="ce14">
            <text:p>May</text:p>
          </table:table-cell>
          <table:table-cell office:value-type="string" office:string-value="2024-05" table:formula="of:=TEXT([.A326]; &quot;yyyy-mm&quot;)" table:style-name="ce14">
            <text:p>2024-05</text:p>
          </table:table-cell>
          <table:table-cell office:value-type="float" office:value="246" table:style-name="ce9">
            <text:p>246</text:p>
          </table:table-cell>
          <table:table-cell office:value-type="float" office:value="419" table:style-name="ce9">
            <text:p>419</text:p>
          </table:table-cell>
          <table:table-cell office:value-type="float" office:value="218" table:style-name="ce9">
            <text:p>218</text:p>
          </table:table-cell>
          <table:table-cell office:value-type="float" office:value="7546" table:style-name="ce9">
            <text:p>7546</text:p>
          </table:table-cell>
          <table:table-cell office:value-type="float" office:value="186" table:style-name="ce9">
            <text:p>186</text:p>
          </table:table-cell>
          <table:table-cell office:value-type="float" office:value="7965" table:formula="of:=SUM([.G326]+[.E326])" table:style-name="ce15">
            <text:p>7965</text:p>
          </table:table-cell>
          <table:table-cell office:value-type="float" office:value="32" table:formula="of:=[.F326]-[.H326]" table:style-name="ce15">
            <text:p>32</text:p>
          </table:table-cell>
          <table:table-cell office:value-type="percentage" office:value="-1.1424984306340239E-2" table:formula="of:=([.I327]-[.I326])/[.I326]" table:style-name="ce16">
            <text:p>-1%</text:p>
          </table:table-cell>
          <table:table-cell office:value-type="string" office:string-value="Valid" table:formula="of:=IF([.F326]&lt;=[.E326]; &quot;Valid&quot;; &quot;Invalid&quot;)" table:style-name="ce17">
            <text:p>Valid</text:p>
          </table:table-cell>
          <table:table-cell office:value-type="string" office:string-value="Valid" table:formula="of:=IF([.H326]&lt;=[.G326]; &quot;Valid&quot;; &quot;Invalid&quot;)" table:style-name="ce17">
            <text:p>Valid</text:p>
          </table:table-cell>
          <table:table-cell office:value-type="string" office:string-value="Increasing Pressure" table:formula="of:=IF([.J326]&gt;0; &quot;Increasing Pressure&quot;; &quot;Stable/Reducing&quot;)" table:style-name="ce18">
            <text:p>Increasing Pressure</text:p>
          </table:table-cell>
          <table:table-cell office:value-type="float" office:value="0.85321100917431192" table:formula="of:=IFERROR([.H326]/[.F326]; 0)" table:style-name="ce17">
            <text:p>0.853211009</text:p>
          </table:table-cell>
          <table:table-cell office:value-type="float" office:value="7800.8571428571431" table:formula="of:=AVERAGE([.I326:.I332])" table:style-name="ce15">
            <text:p>7801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5-15T00:00:00" table:style-name="ce14">
            <text:p>15-05-2024</text:p>
          </table:table-cell>
          <table:table-cell office:value-type="string" office:string-value="May" table:formula="of:=TEXT([.A327]; &quot;mmmm&quot;)" table:style-name="ce14">
            <text:p>May</text:p>
          </table:table-cell>
          <table:table-cell office:value-type="string" office:string-value="2024-05" table:formula="of:=TEXT([.A327]; &quot;yyyy-mm&quot;)" table:style-name="ce14">
            <text:p>2024-05</text:p>
          </table:table-cell>
          <table:table-cell office:value-type="float" office:value="115" table:style-name="ce9">
            <text:p>115</text:p>
          </table:table-cell>
          <table:table-cell office:value-type="float" office:value="285" table:style-name="ce9">
            <text:p>285</text:p>
          </table:table-cell>
          <table:table-cell office:value-type="float" office:value="341" table:style-name="ce9">
            <text:p>341</text:p>
          </table:table-cell>
          <table:table-cell office:value-type="float" office:value="7589" table:style-name="ce9">
            <text:p>7589</text:p>
          </table:table-cell>
          <table:table-cell office:value-type="float" office:value="265" table:style-name="ce9">
            <text:p>265</text:p>
          </table:table-cell>
          <table:table-cell office:value-type="float" office:value="7874" table:formula="of:=SUM([.G327]+[.E327])" table:style-name="ce15">
            <text:p>7874</text:p>
          </table:table-cell>
          <table:table-cell office:value-type="float" office:value="76" table:formula="of:=[.F327]-[.H327]" table:style-name="ce15">
            <text:p>76</text:p>
          </table:table-cell>
          <table:table-cell office:value-type="percentage" office:value="3.937007874015748E-3" table:formula="of:=([.I328]-[.I327])/[.I327]" table:style-name="ce16">
            <text:p>0%</text:p>
          </table:table-cell>
          <table:table-cell office:value-type="string" office:string-value="Invalid" table:formula="of:=IF([.F327]&lt;=[.E327]; &quot;Valid&quot;; &quot;Invalid&quot;)" table:style-name="ce17">
            <text:p>Invalid</text:p>
          </table:table-cell>
          <table:table-cell office:value-type="string" office:string-value="Valid" table:formula="of:=IF([.H327]&lt;=[.G327]; &quot;Valid&quot;; &quot;Invalid&quot;)" table:style-name="ce17">
            <text:p>Valid</text:p>
          </table:table-cell>
          <table:table-cell office:value-type="string" office:string-value="Increasing Pressure" table:formula="of:=IF([.J327]&gt;0; &quot;Increasing Pressure&quot;; &quot;Stable/Reducing&quot;)" table:style-name="ce18">
            <text:p>Increasing Pressure</text:p>
          </table:table-cell>
          <table:table-cell office:value-type="float" office:value="0.77712609970674484" table:formula="of:=IFERROR([.H327]/[.F327]; 0)" table:style-name="ce17">
            <text:p>0.7771261</text:p>
          </table:table-cell>
          <table:table-cell office:value-type="float" office:value="7772.4285714285716" table:formula="of:=AVERAGE([.I327:.I333])" table:style-name="ce15">
            <text:p>7772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5-16T00:00:00" table:style-name="ce14">
            <text:p>16-05-2024</text:p>
          </table:table-cell>
          <table:table-cell office:value-type="string" office:string-value="May" table:formula="of:=TEXT([.A328]; &quot;mmmm&quot;)" table:style-name="ce14">
            <text:p>May</text:p>
          </table:table-cell>
          <table:table-cell office:value-type="string" office:string-value="2024-05" table:formula="of:=TEXT([.A328]; &quot;yyyy-mm&quot;)" table:style-name="ce14">
            <text:p>2024-05</text:p>
          </table:table-cell>
          <table:table-cell office:value-type="float" office:value="206" table:style-name="ce9">
            <text:p>206</text:p>
          </table:table-cell>
          <table:table-cell office:value-type="float" office:value="340" table:style-name="ce9">
            <text:p>340</text:p>
          </table:table-cell>
          <table:table-cell office:value-type="float" office:value="214" table:style-name="ce9">
            <text:p>214</text:p>
          </table:table-cell>
          <table:table-cell office:value-type="float" office:value="7565" table:style-name="ce9">
            <text:p>7565</text:p>
          </table:table-cell>
          <table:table-cell office:value-type="float" office:value="234" table:style-name="ce9">
            <text:p>234</text:p>
          </table:table-cell>
          <table:table-cell office:value-type="float" office:value="7905" table:formula="of:=SUM([.G328]+[.E328])" table:style-name="ce15">
            <text:p>7905</text:p>
          </table:table-cell>
          <table:table-cell office:value-type="float" office:value="-20" table:formula="of:=[.F328]-[.H328]" table:style-name="ce15">
            <text:p>-20</text:p>
          </table:table-cell>
          <table:table-cell office:value-type="percentage" office:value="-3.2131562302340294E-2" table:formula="of:=([.I329]-[.I328])/[.I328]" table:style-name="ce16">
            <text:p>-3%</text:p>
          </table:table-cell>
          <table:table-cell office:value-type="string" office:string-value="Valid" table:formula="of:=IF([.F328]&lt;=[.E328]; &quot;Valid&quot;; &quot;Invalid&quot;)" table:style-name="ce17">
            <text:p>Valid</text:p>
          </table:table-cell>
          <table:table-cell office:value-type="string" office:string-value="Valid" table:formula="of:=IF([.H328]&lt;=[.G328]; &quot;Valid&quot;; &quot;Invalid&quot;)" table:style-name="ce17">
            <text:p>Valid</text:p>
          </table:table-cell>
          <table:table-cell office:value-type="string" office:string-value="Stable/Reducing" table:formula="of:=IF([.J328]&gt;0; &quot;Increasing Pressure&quot;; &quot;Stable/Reducing&quot;)" table:style-name="ce18">
            <text:p>Stable/Reducing</text:p>
          </table:table-cell>
          <table:table-cell office:value-type="float" office:value="1.0934579439252337" table:formula="of:=IFERROR([.H328]/[.F328]; 0)" table:style-name="ce17">
            <text:p>1.093457944</text:p>
          </table:table-cell>
          <table:table-cell office:value-type="float" office:value="7748.8571428571431" table:formula="of:=AVERAGE([.I328:.I334])" table:style-name="ce15">
            <text:p>7749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5-19T00:00:00" table:style-name="ce14">
            <text:p>19-05-2024</text:p>
          </table:table-cell>
          <table:table-cell office:value-type="string" office:string-value="May" table:formula="of:=TEXT([.A329]; &quot;mmmm&quot;)" table:style-name="ce14">
            <text:p>May</text:p>
          </table:table-cell>
          <table:table-cell office:value-type="string" office:string-value="2024-05" table:formula="of:=TEXT([.A329]; &quot;yyyy-mm&quot;)" table:style-name="ce14">
            <text:p>2024-05</text:p>
          </table:table-cell>
          <table:table-cell office:value-type="float" office:value="143" table:style-name="ce9">
            <text:p>143</text:p>
          </table:table-cell>
          <table:table-cell office:value-type="float" office:value="295" table:style-name="ce9">
            <text:p>295</text:p>
          </table:table-cell>
          <table:table-cell office:value-type="float" office:value="278" table:style-name="ce9">
            <text:p>278</text:p>
          </table:table-cell>
          <table:table-cell office:value-type="float" office:value="7356" table:style-name="ce9">
            <text:p>7356</text:p>
          </table:table-cell>
          <table:table-cell office:value-type="float" office:value="298" table:style-name="ce9">
            <text:p>298</text:p>
          </table:table-cell>
          <table:table-cell office:value-type="float" office:value="7651" table:formula="of:=SUM([.G329]+[.E329])" table:style-name="ce15">
            <text:p>7651</text:p>
          </table:table-cell>
          <table:table-cell office:value-type="float" office:value="-20" table:formula="of:=[.F329]-[.H329]" table:style-name="ce15">
            <text:p>-20</text:p>
          </table:table-cell>
          <table:table-cell office:value-type="percentage" office:value="-1.9605280355509086E-3" table:formula="of:=([.I330]-[.I329])/[.I329]" table:style-name="ce16">
            <text:p>0%</text:p>
          </table:table-cell>
          <table:table-cell office:value-type="string" office:string-value="Valid" table:formula="of:=IF([.F329]&lt;=[.E329]; &quot;Valid&quot;; &quot;Invalid&quot;)" table:style-name="ce17">
            <text:p>Valid</text:p>
          </table:table-cell>
          <table:table-cell office:value-type="string" office:string-value="Valid" table:formula="of:=IF([.H329]&lt;=[.G329]; &quot;Valid&quot;; &quot;Invalid&quot;)" table:style-name="ce17">
            <text:p>Valid</text:p>
          </table:table-cell>
          <table:table-cell office:value-type="string" office:string-value="Stable/Reducing" table:formula="of:=IF([.J329]&gt;0; &quot;Increasing Pressure&quot;; &quot;Stable/Reducing&quot;)" table:style-name="ce18">
            <text:p>Stable/Reducing</text:p>
          </table:table-cell>
          <table:table-cell office:value-type="float" office:value="1.0719424460431655" table:formula="of:=IFERROR([.H329]/[.F329]; 0)" table:style-name="ce17">
            <text:p>1.071942446</text:p>
          </table:table-cell>
          <table:table-cell office:value-type="float" office:value="7729" table:formula="of:=AVERAGE([.I329:.I335])" table:style-name="ce15">
            <text:p>7729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5-20T00:00:00" table:style-name="ce14">
            <text:p>20-05-2024</text:p>
          </table:table-cell>
          <table:table-cell office:value-type="string" office:string-value="May" table:formula="of:=TEXT([.A330]; &quot;mmmm&quot;)" table:style-name="ce14">
            <text:p>May</text:p>
          </table:table-cell>
          <table:table-cell office:value-type="string" office:string-value="2024-05" table:formula="of:=TEXT([.A330]; &quot;yyyy-mm&quot;)" table:style-name="ce14">
            <text:p>2024-05</text:p>
          </table:table-cell>
          <table:table-cell office:value-type="float" office:value="111" table:style-name="ce9">
            <text:p>111</text:p>
          </table:table-cell>
          <table:table-cell office:value-type="float" office:value="268" table:style-name="ce9">
            <text:p>268</text:p>
          </table:table-cell>
          <table:table-cell office:value-type="float" office:value="217" table:style-name="ce9">
            <text:p>217</text:p>
          </table:table-cell>
          <table:table-cell office:value-type="float" office:value="7368" table:style-name="ce9">
            <text:p>7368</text:p>
          </table:table-cell>
          <table:table-cell office:value-type="float" office:value="192" table:style-name="ce9">
            <text:p>192</text:p>
          </table:table-cell>
          <table:table-cell office:value-type="float" office:value="7636" table:formula="of:=SUM([.G330]+[.E330])" table:style-name="ce15">
            <text:p>7636</text:p>
          </table:table-cell>
          <table:table-cell office:value-type="float" office:value="25" table:formula="of:=[.F330]-[.H330]" table:style-name="ce15">
            <text:p>25</text:p>
          </table:table-cell>
          <table:table-cell office:value-type="percentage" office:value="1.5191199580932426E-2" table:formula="of:=([.I331]-[.I330])/[.I330]" table:style-name="ce16">
            <text:p>2%</text:p>
          </table:table-cell>
          <table:table-cell office:value-type="string" office:string-value="Valid" table:formula="of:=IF([.F330]&lt;=[.E330]; &quot;Valid&quot;; &quot;Invalid&quot;)" table:style-name="ce17">
            <text:p>Valid</text:p>
          </table:table-cell>
          <table:table-cell office:value-type="string" office:string-value="Valid" table:formula="of:=IF([.H330]&lt;=[.G330]; &quot;Valid&quot;; &quot;Invalid&quot;)" table:style-name="ce17">
            <text:p>Valid</text:p>
          </table:table-cell>
          <table:table-cell office:value-type="string" office:string-value="Increasing Pressure" table:formula="of:=IF([.J330]&gt;0; &quot;Increasing Pressure&quot;; &quot;Stable/Reducing&quot;)" table:style-name="ce18">
            <text:p>Increasing Pressure</text:p>
          </table:table-cell>
          <table:table-cell office:value-type="float" office:value="0.88479262672811065" table:formula="of:=IFERROR([.H330]/[.F330]; 0)" table:style-name="ce17">
            <text:p>0.884792627</text:p>
          </table:table-cell>
          <table:table-cell office:value-type="float" office:value="7772.1428571428569" table:formula="of:=AVERAGE([.I330:.I336])" table:style-name="ce15">
            <text:p>7772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5-21T00:00:00" table:style-name="ce14">
            <text:p>21-05-2024</text:p>
          </table:table-cell>
          <table:table-cell office:value-type="string" office:string-value="May" table:formula="of:=TEXT([.A331]; &quot;mmmm&quot;)" table:style-name="ce14">
            <text:p>May</text:p>
          </table:table-cell>
          <table:table-cell office:value-type="string" office:string-value="2024-05" table:formula="of:=TEXT([.A331]; &quot;yyyy-mm&quot;)" table:style-name="ce14">
            <text:p>2024-05</text:p>
          </table:table-cell>
          <table:table-cell office:value-type="float" office:value="196" table:style-name="ce9">
            <text:p>196</text:p>
          </table:table-cell>
          <table:table-cell office:value-type="float" office:value="348" table:style-name="ce9">
            <text:p>348</text:p>
          </table:table-cell>
          <table:table-cell office:value-type="float" office:value="176" table:style-name="ce9">
            <text:p>176</text:p>
          </table:table-cell>
          <table:table-cell office:value-type="float" office:value="7404" table:style-name="ce9">
            <text:p>7404</text:p>
          </table:table-cell>
          <table:table-cell office:value-type="float" office:value="145" table:style-name="ce9">
            <text:p>145</text:p>
          </table:table-cell>
          <table:table-cell office:value-type="float" office:value="7752" table:formula="of:=SUM([.G331]+[.E331])" table:style-name="ce15">
            <text:p>7752</text:p>
          </table:table-cell>
          <table:table-cell office:value-type="float" office:value="31" table:formula="of:=[.F331]-[.H331]" table:style-name="ce15">
            <text:p>31</text:p>
          </table:table-cell>
          <table:table-cell office:value-type="percentage" office:value="9.1589267285861718E-3" table:formula="of:=([.I332]-[.I331])/[.I331]" table:style-name="ce16">
            <text:p>1%</text:p>
          </table:table-cell>
          <table:table-cell office:value-type="string" office:string-value="Valid" table:formula="of:=IF([.F331]&lt;=[.E331]; &quot;Valid&quot;; &quot;Invalid&quot;)" table:style-name="ce17">
            <text:p>Valid</text:p>
          </table:table-cell>
          <table:table-cell office:value-type="string" office:string-value="Valid" table:formula="of:=IF([.H331]&lt;=[.G331]; &quot;Valid&quot;; &quot;Invalid&quot;)" table:style-name="ce17">
            <text:p>Valid</text:p>
          </table:table-cell>
          <table:table-cell office:value-type="string" office:string-value="Increasing Pressure" table:formula="of:=IF([.J331]&gt;0; &quot;Increasing Pressure&quot;; &quot;Stable/Reducing&quot;)" table:style-name="ce18">
            <text:p>Increasing Pressure</text:p>
          </table:table-cell>
          <table:table-cell office:value-type="float" office:value="0.82386363636363635" table:formula="of:=IFERROR([.H331]/[.F331]; 0)" table:style-name="ce17">
            <text:p>0.823863636</text:p>
          </table:table-cell>
          <table:table-cell office:value-type="float" office:value="7819.7142857142853" table:formula="of:=AVERAGE([.I331:.I337])" table:style-name="ce15">
            <text:p>7820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5-22T00:00:00" table:style-name="ce14">
            <text:p>22-05-2024</text:p>
          </table:table-cell>
          <table:table-cell office:value-type="string" office:string-value="May" table:formula="of:=TEXT([.A332]; &quot;mmmm&quot;)" table:style-name="ce14">
            <text:p>May</text:p>
          </table:table-cell>
          <table:table-cell office:value-type="string" office:string-value="2024-05" table:formula="of:=TEXT([.A332]; &quot;yyyy-mm&quot;)" table:style-name="ce14">
            <text:p>2024-05</text:p>
          </table:table-cell>
          <table:table-cell office:value-type="float" office:value="168" table:style-name="ce9">
            <text:p>168</text:p>
          </table:table-cell>
          <table:table-cell office:value-type="float" office:value="349" table:style-name="ce9">
            <text:p>349</text:p>
          </table:table-cell>
          <table:table-cell office:value-type="float" office:value="272" table:style-name="ce9">
            <text:p>272</text:p>
          </table:table-cell>
          <table:table-cell office:value-type="float" office:value="7474" table:style-name="ce9">
            <text:p>7474</text:p>
          </table:table-cell>
          <table:table-cell office:value-type="float" office:value="208" table:style-name="ce9">
            <text:p>208</text:p>
          </table:table-cell>
          <table:table-cell office:value-type="float" office:value="7823" table:formula="of:=SUM([.G332]+[.E332])" table:style-name="ce15">
            <text:p>7823</text:p>
          </table:table-cell>
          <table:table-cell office:value-type="float" office:value="64" table:formula="of:=[.F332]-[.H332]" table:style-name="ce15">
            <text:p>64</text:p>
          </table:table-cell>
          <table:table-cell office:value-type="percentage" office:value="-7.2862073373386165E-3" table:formula="of:=([.I333]-[.I332])/[.I332]" table:style-name="ce16">
            <text:p>-1%</text:p>
          </table:table-cell>
          <table:table-cell office:value-type="string" office:string-value="Valid" table:formula="of:=IF([.F332]&lt;=[.E332]; &quot;Valid&quot;; &quot;Invalid&quot;)" table:style-name="ce17">
            <text:p>Valid</text:p>
          </table:table-cell>
          <table:table-cell office:value-type="string" office:string-value="Valid" table:formula="of:=IF([.H332]&lt;=[.G332]; &quot;Valid&quot;; &quot;Invalid&quot;)" table:style-name="ce17">
            <text:p>Valid</text:p>
          </table:table-cell>
          <table:table-cell office:value-type="string" office:string-value="Increasing Pressure" table:formula="of:=IF([.J332]&gt;0; &quot;Increasing Pressure&quot;; &quot;Stable/Reducing&quot;)" table:style-name="ce18">
            <text:p>Increasing Pressure</text:p>
          </table:table-cell>
          <table:table-cell office:value-type="float" office:value="0.76470588235294112" table:formula="of:=IFERROR([.H332]/[.F332]; 0)" table:style-name="ce17">
            <text:p>0.764705882</text:p>
          </table:table-cell>
          <table:table-cell office:value-type="float" office:value="7837.4285714285716" table:formula="of:=AVERAGE([.I332:.I338])" table:style-name="ce15">
            <text:p>7837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5-23T00:00:00" table:style-name="ce14">
            <text:p>23-05-2024</text:p>
          </table:table-cell>
          <table:table-cell office:value-type="string" office:string-value="May" table:formula="of:=TEXT([.A333]; &quot;mmmm&quot;)" table:style-name="ce14">
            <text:p>May</text:p>
          </table:table-cell>
          <table:table-cell office:value-type="string" office:string-value="2024-05" table:formula="of:=TEXT([.A333]; &quot;yyyy-mm&quot;)" table:style-name="ce14">
            <text:p>2024-05</text:p>
          </table:table-cell>
          <table:table-cell office:value-type="float" office:value="193" table:style-name="ce9">
            <text:p>193</text:p>
          </table:table-cell>
          <table:table-cell office:value-type="float" office:value="272" table:style-name="ce9">
            <text:p>272</text:p>
          </table:table-cell>
          <table:table-cell office:value-type="float" office:value="314" table:style-name="ce9">
            <text:p>314</text:p>
          </table:table-cell>
          <table:table-cell office:value-type="float" office:value="7494" table:style-name="ce9">
            <text:p>7494</text:p>
          </table:table-cell>
          <table:table-cell office:value-type="float" office:value="227" table:style-name="ce9">
            <text:p>227</text:p>
          </table:table-cell>
          <table:table-cell office:value-type="float" office:value="7766" table:formula="of:=SUM([.G333]+[.E333])" table:style-name="ce15">
            <text:p>7766</text:p>
          </table:table-cell>
          <table:table-cell office:value-type="float" office:value="87" table:formula="of:=[.F333]-[.H333]" table:style-name="ce15">
            <text:p>87</text:p>
          </table:table-cell>
          <table:table-cell office:value-type="percentage" office:value="-7.3396858099407675E-3" table:formula="of:=([.I334]-[.I333])/[.I333]" table:style-name="ce16">
            <text:p>-1%</text:p>
          </table:table-cell>
          <table:table-cell office:value-type="string" office:string-value="Invalid" table:formula="of:=IF([.F333]&lt;=[.E333]; &quot;Valid&quot;; &quot;Invalid&quot;)" table:style-name="ce17">
            <text:p>Invalid</text:p>
          </table:table-cell>
          <table:table-cell office:value-type="string" office:string-value="Valid" table:formula="of:=IF([.H333]&lt;=[.G333]; &quot;Valid&quot;; &quot;Invalid&quot;)" table:style-name="ce17">
            <text:p>Valid</text:p>
          </table:table-cell>
          <table:table-cell office:value-type="string" office:string-value="Increasing Pressure" table:formula="of:=IF([.J333]&gt;0; &quot;Increasing Pressure&quot;; &quot;Stable/Reducing&quot;)" table:style-name="ce18">
            <text:p>Increasing Pressure</text:p>
          </table:table-cell>
          <table:table-cell office:value-type="float" office:value="0.72292993630573243" table:formula="of:=IFERROR([.H333]/[.F333]; 0)" table:style-name="ce17">
            <text:p>0.722929936</text:p>
          </table:table-cell>
          <table:table-cell office:value-type="float" office:value="7839.8571428571431" table:formula="of:=AVERAGE([.I333:.I339])" table:style-name="ce15">
            <text:p>7840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5-27T00:00:00" table:style-name="ce14">
            <text:p>27-05-2024</text:p>
          </table:table-cell>
          <table:table-cell office:value-type="string" office:string-value="May" table:formula="of:=TEXT([.A334]; &quot;mmmm&quot;)" table:style-name="ce14">
            <text:p>May</text:p>
          </table:table-cell>
          <table:table-cell office:value-type="string" office:string-value="2024-05" table:formula="of:=TEXT([.A334]; &quot;yyyy-mm&quot;)" table:style-name="ce14">
            <text:p>2024-05</text:p>
          </table:table-cell>
          <table:table-cell office:value-type="float" office:value="156" table:style-name="ce9">
            <text:p>156</text:p>
          </table:table-cell>
          <table:table-cell office:value-type="float" office:value="344" table:style-name="ce9">
            <text:p>344</text:p>
          </table:table-cell>
          <table:table-cell office:value-type="float" office:value="252" table:style-name="ce9">
            <text:p>252</text:p>
          </table:table-cell>
          <table:table-cell office:value-type="float" office:value="7365" table:style-name="ce9">
            <text:p>7365</text:p>
          </table:table-cell>
          <table:table-cell office:value-type="float" office:value="167" table:style-name="ce9">
            <text:p>167</text:p>
          </table:table-cell>
          <table:table-cell office:value-type="float" office:value="7709" table:formula="of:=SUM([.G334]+[.E334])" table:style-name="ce15">
            <text:p>7709</text:p>
          </table:table-cell>
          <table:table-cell office:value-type="float" office:value="85" table:formula="of:=[.F334]-[.H334]" table:style-name="ce15">
            <text:p>85</text:p>
          </table:table-cell>
          <table:table-cell office:value-type="percentage" office:value="7.3939551173952522E-3" table:formula="of:=([.I335]-[.I334])/[.I334]" table:style-name="ce16">
            <text:p>1%</text:p>
          </table:table-cell>
          <table:table-cell office:value-type="string" office:string-value="Valid" table:formula="of:=IF([.F334]&lt;=[.E334]; &quot;Valid&quot;; &quot;Invalid&quot;)" table:style-name="ce17">
            <text:p>Valid</text:p>
          </table:table-cell>
          <table:table-cell office:value-type="string" office:string-value="Valid" table:formula="of:=IF([.H334]&lt;=[.G334]; &quot;Valid&quot;; &quot;Invalid&quot;)" table:style-name="ce17">
            <text:p>Valid</text:p>
          </table:table-cell>
          <table:table-cell office:value-type="string" office:string-value="Increasing Pressure" table:formula="of:=IF([.J334]&gt;0; &quot;Increasing Pressure&quot;; &quot;Stable/Reducing&quot;)" table:style-name="ce18">
            <text:p>Increasing Pressure</text:p>
          </table:table-cell>
          <table:table-cell office:value-type="float" office:value="0.66269841269841268" table:formula="of:=IFERROR([.H334]/[.F334]; 0)" table:style-name="ce17">
            <text:p>0.662698413</text:p>
          </table:table-cell>
          <table:table-cell office:value-type="float" office:value="7862" table:formula="of:=AVERAGE([.I334:.I340])" table:style-name="ce15">
            <text:p>7862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5-28T00:00:00" table:style-name="ce14">
            <text:p>28-05-2024</text:p>
          </table:table-cell>
          <table:table-cell office:value-type="string" office:string-value="May" table:formula="of:=TEXT([.A335]; &quot;mmmm&quot;)" table:style-name="ce14">
            <text:p>May</text:p>
          </table:table-cell>
          <table:table-cell office:value-type="string" office:string-value="2024-05" table:formula="of:=TEXT([.A335]; &quot;yyyy-mm&quot;)" table:style-name="ce14">
            <text:p>2024-05</text:p>
          </table:table-cell>
          <table:table-cell office:value-type="float" office:value="153" table:style-name="ce9">
            <text:p>153</text:p>
          </table:table-cell>
          <table:table-cell office:value-type="float" office:value="348" table:style-name="ce9">
            <text:p>348</text:p>
          </table:table-cell>
          <table:table-cell office:value-type="float" office:value="239" table:style-name="ce9">
            <text:p>239</text:p>
          </table:table-cell>
          <table:table-cell office:value-type="float" office:value="7418" table:style-name="ce9">
            <text:p>7418</text:p>
          </table:table-cell>
          <table:table-cell office:value-type="float" office:value="151" table:style-name="ce9">
            <text:p>151</text:p>
          </table:table-cell>
          <table:table-cell office:value-type="float" office:value="7766" table:formula="of:=SUM([.G335]+[.E335])" table:style-name="ce15">
            <text:p>7766</text:p>
          </table:table-cell>
          <table:table-cell office:value-type="float" office:value="88" table:formula="of:=[.F335]-[.H335]" table:style-name="ce15">
            <text:p>88</text:p>
          </table:table-cell>
          <table:table-cell office:value-type="percentage" office:value="2.4079320113314446E-2" table:formula="of:=([.I336]-[.I335])/[.I335]" table:style-name="ce16">
            <text:p>2%</text:p>
          </table:table-cell>
          <table:table-cell office:value-type="string" office:string-value="Valid" table:formula="of:=IF([.F335]&lt;=[.E335]; &quot;Valid&quot;; &quot;Invalid&quot;)" table:style-name="ce17">
            <text:p>Valid</text:p>
          </table:table-cell>
          <table:table-cell office:value-type="string" office:string-value="Valid" table:formula="of:=IF([.H335]&lt;=[.G335]; &quot;Valid&quot;; &quot;Invalid&quot;)" table:style-name="ce17">
            <text:p>Valid</text:p>
          </table:table-cell>
          <table:table-cell office:value-type="string" office:string-value="Increasing Pressure" table:formula="of:=IF([.J335]&gt;0; &quot;Increasing Pressure&quot;; &quot;Stable/Reducing&quot;)" table:style-name="ce18">
            <text:p>Increasing Pressure</text:p>
          </table:table-cell>
          <table:table-cell office:value-type="float" office:value="0.63179916317991636" table:formula="of:=IFERROR([.H335]/[.F335]; 0)" table:style-name="ce17">
            <text:p>0.631799163</text:p>
          </table:table-cell>
          <table:table-cell office:value-type="float" office:value="7908.7142857142853" table:formula="of:=AVERAGE([.I335:.I341])" table:style-name="ce15">
            <text:p>7909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5-29T00:00:00" table:style-name="ce14">
            <text:p>29-05-2024</text:p>
          </table:table-cell>
          <table:table-cell office:value-type="string" office:string-value="May" table:formula="of:=TEXT([.A336]; &quot;mmmm&quot;)" table:style-name="ce14">
            <text:p>May</text:p>
          </table:table-cell>
          <table:table-cell office:value-type="string" office:string-value="2024-05" table:formula="of:=TEXT([.A336]; &quot;yyyy-mm&quot;)" table:style-name="ce14">
            <text:p>2024-05</text:p>
          </table:table-cell>
          <table:table-cell office:value-type="float" office:value="182" table:style-name="ce9">
            <text:p>182</text:p>
          </table:table-cell>
          <table:table-cell office:value-type="float" office:value="462" table:style-name="ce9">
            <text:p>462</text:p>
          </table:table-cell>
          <table:table-cell office:value-type="float" office:value="158" table:style-name="ce9">
            <text:p>158</text:p>
          </table:table-cell>
          <table:table-cell office:value-type="float" office:value="7491" table:style-name="ce9">
            <text:p>7491</text:p>
          </table:table-cell>
          <table:table-cell office:value-type="float" office:value="141" table:style-name="ce9">
            <text:p>141</text:p>
          </table:table-cell>
          <table:table-cell office:value-type="float" office:value="7953" table:formula="of:=SUM([.G336]+[.E336])" table:style-name="ce15">
            <text:p>7953</text:p>
          </table:table-cell>
          <table:table-cell office:value-type="float" office:value="17" table:formula="of:=[.F336]-[.H336]" table:style-name="ce15">
            <text:p>17</text:p>
          </table:table-cell>
          <table:table-cell office:value-type="percentage" office:value="2.0118194392053312E-3" table:formula="of:=([.I337]-[.I336])/[.I336]" table:style-name="ce16">
            <text:p>0%</text:p>
          </table:table-cell>
          <table:table-cell office:value-type="string" office:string-value="Valid" table:formula="of:=IF([.F336]&lt;=[.E336]; &quot;Valid&quot;; &quot;Invalid&quot;)" table:style-name="ce17">
            <text:p>Valid</text:p>
          </table:table-cell>
          <table:table-cell office:value-type="string" office:string-value="Valid" table:formula="of:=IF([.H336]&lt;=[.G336]; &quot;Valid&quot;; &quot;Invalid&quot;)" table:style-name="ce17">
            <text:p>Valid</text:p>
          </table:table-cell>
          <table:table-cell office:value-type="string" office:string-value="Increasing Pressure" table:formula="of:=IF([.J336]&gt;0; &quot;Increasing Pressure&quot;; &quot;Stable/Reducing&quot;)" table:style-name="ce18">
            <text:p>Increasing Pressure</text:p>
          </table:table-cell>
          <table:table-cell office:value-type="float" office:value="0.89240506329113922" table:formula="of:=IFERROR([.H336]/[.F336]; 0)" table:style-name="ce17">
            <text:p>0.892405063</text:p>
          </table:table-cell>
          <table:table-cell office:value-type="float" office:value="7951.7142857142853" table:formula="of:=AVERAGE([.I336:.I342])" table:style-name="ce15">
            <text:p>7952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5-30T00:00:00" table:style-name="ce14">
            <text:p>30-05-2024</text:p>
          </table:table-cell>
          <table:table-cell office:value-type="string" office:string-value="May" table:formula="of:=TEXT([.A337]; &quot;mmmm&quot;)" table:style-name="ce14">
            <text:p>May</text:p>
          </table:table-cell>
          <table:table-cell office:value-type="string" office:string-value="2024-05" table:formula="of:=TEXT([.A337]; &quot;yyyy-mm&quot;)" table:style-name="ce14">
            <text:p>2024-05</text:p>
          </table:table-cell>
          <table:table-cell office:value-type="float" office:value="167" table:style-name="ce9">
            <text:p>167</text:p>
          </table:table-cell>
          <table:table-cell office:value-type="float" office:value="406" table:style-name="ce9">
            <text:p>406</text:p>
          </table:table-cell>
          <table:table-cell office:value-type="float" office:value="339" table:style-name="ce9">
            <text:p>339</text:p>
          </table:table-cell>
          <table:table-cell office:value-type="float" office:value="7563" table:style-name="ce9">
            <text:p>7563</text:p>
          </table:table-cell>
          <table:table-cell office:value-type="float" office:value="190" table:style-name="ce9">
            <text:p>190</text:p>
          </table:table-cell>
          <table:table-cell office:value-type="float" office:value="7969" table:formula="of:=SUM([.G337]+[.E337])" table:style-name="ce15">
            <text:p>7969</text:p>
          </table:table-cell>
          <table:table-cell office:value-type="float" office:value="149" table:formula="of:=[.F337]-[.H337]" table:style-name="ce15">
            <text:p>149</text:p>
          </table:table-cell>
          <table:table-cell office:value-type="percentage" office:value="-1.167022211067888E-2" table:formula="of:=([.I338]-[.I337])/[.I337]" table:style-name="ce16">
            <text:p>-1%</text:p>
          </table:table-cell>
          <table:table-cell office:value-type="string" office:string-value="Valid" table:formula="of:=IF([.F337]&lt;=[.E337]; &quot;Valid&quot;; &quot;Invalid&quot;)" table:style-name="ce17">
            <text:p>Valid</text:p>
          </table:table-cell>
          <table:table-cell office:value-type="string" office:string-value="Valid" table:formula="of:=IF([.H337]&lt;=[.G337]; &quot;Valid&quot;; &quot;Invalid&quot;)" table:style-name="ce17">
            <text:p>Valid</text:p>
          </table:table-cell>
          <table:table-cell office:value-type="string" office:string-value="Increasing Pressure" table:formula="of:=IF([.J337]&gt;0; &quot;Increasing Pressure&quot;; &quot;Stable/Reducing&quot;)" table:style-name="ce18">
            <text:p>Increasing Pressure</text:p>
          </table:table-cell>
          <table:table-cell office:value-type="float" office:value="0.56047197640117996" table:formula="of:=IFERROR([.H337]/[.F337]; 0)" table:style-name="ce17">
            <text:p>0.560471976</text:p>
          </table:table-cell>
          <table:table-cell office:value-type="float" office:value="7921.2857142857147" table:formula="of:=AVERAGE([.I337:.I343])" table:style-name="ce15">
            <text:p>7921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6-02T00:00:00" table:style-name="ce14">
            <text:p>02-06-2024</text:p>
          </table:table-cell>
          <table:table-cell office:value-type="string" office:string-value="June" table:formula="of:=TEXT([.A338]; &quot;mmmm&quot;)" table:style-name="ce14">
            <text:p>June</text:p>
          </table:table-cell>
          <table:table-cell office:value-type="string" office:string-value="2024-06" table:formula="of:=TEXT([.A338]; &quot;yyyy-mm&quot;)" table:style-name="ce14">
            <text:p>2024-06</text:p>
          </table:table-cell>
          <table:table-cell office:value-type="float" office:value="159" table:style-name="ce9">
            <text:p>159</text:p>
          </table:table-cell>
          <table:table-cell office:value-type="float" office:value="330" table:style-name="ce9">
            <text:p>330</text:p>
          </table:table-cell>
          <table:table-cell office:value-type="float" office:value="322" table:style-name="ce9">
            <text:p>322</text:p>
          </table:table-cell>
          <table:table-cell office:value-type="float" office:value="7546" table:style-name="ce9">
            <text:p>7546</text:p>
          </table:table-cell>
          <table:table-cell office:value-type="float" office:value="306" table:style-name="ce9">
            <text:p>306</text:p>
          </table:table-cell>
          <table:table-cell office:value-type="float" office:value="7876" table:formula="of:=SUM([.G338]+[.E338])" table:style-name="ce15">
            <text:p>7876</text:p>
          </table:table-cell>
          <table:table-cell office:value-type="float" office:value="16" table:formula="of:=[.F338]-[.H338]" table:style-name="ce15">
            <text:p>16</text:p>
          </table:table-cell>
          <table:table-cell office:value-type="percentage" office:value="-4.5708481462671405E-3" table:formula="of:=([.I339]-[.I338])/[.I338]" table:style-name="ce16">
            <text:p>0%</text:p>
          </table:table-cell>
          <table:table-cell office:value-type="string" office:string-value="Valid" table:formula="of:=IF([.F338]&lt;=[.E338]; &quot;Valid&quot;; &quot;Invalid&quot;)" table:style-name="ce17">
            <text:p>Valid</text:p>
          </table:table-cell>
          <table:table-cell office:value-type="string" office:string-value="Valid" table:formula="of:=IF([.H338]&lt;=[.G338]; &quot;Valid&quot;; &quot;Invalid&quot;)" table:style-name="ce17">
            <text:p>Valid</text:p>
          </table:table-cell>
          <table:table-cell office:value-type="string" office:string-value="Increasing Pressure" table:formula="of:=IF([.J338]&gt;0; &quot;Increasing Pressure&quot;; &quot;Stable/Reducing&quot;)" table:style-name="ce18">
            <text:p>Increasing Pressure</text:p>
          </table:table-cell>
          <table:table-cell office:value-type="float" office:value="0.9503105590062112" table:formula="of:=IFERROR([.H338]/[.F338]; 0)" table:style-name="ce17">
            <text:p>0.950310559</text:p>
          </table:table-cell>
          <table:table-cell office:value-type="float" office:value="7893.2857142857147" table:formula="of:=AVERAGE([.I338:.I344])" table:style-name="ce15">
            <text:p>7893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6-03T00:00:00" table:style-name="ce14">
            <text:p>03-06-2024</text:p>
          </table:table-cell>
          <table:table-cell office:value-type="string" office:string-value="June" table:formula="of:=TEXT([.A339]; &quot;mmmm&quot;)" table:style-name="ce14">
            <text:p>June</text:p>
          </table:table-cell>
          <table:table-cell office:value-type="string" office:string-value="2024-06" table:formula="of:=TEXT([.A339]; &quot;yyyy-mm&quot;)" table:style-name="ce14">
            <text:p>2024-06</text:p>
          </table:table-cell>
          <table:table-cell office:value-type="float" office:value="109" table:style-name="ce9">
            <text:p>109</text:p>
          </table:table-cell>
          <table:table-cell office:value-type="float" office:value="244" table:style-name="ce9">
            <text:p>244</text:p>
          </table:table-cell>
          <table:table-cell office:value-type="float" office:value="257" table:style-name="ce9">
            <text:p>257</text:p>
          </table:table-cell>
          <table:table-cell office:value-type="float" office:value="7596" table:style-name="ce9">
            <text:p>7596</text:p>
          </table:table-cell>
          <table:table-cell office:value-type="float" office:value="224" table:style-name="ce9">
            <text:p>224</text:p>
          </table:table-cell>
          <table:table-cell office:value-type="float" office:value="7840" table:formula="of:=SUM([.G339]+[.E339])" table:style-name="ce15">
            <text:p>7840</text:p>
          </table:table-cell>
          <table:table-cell office:value-type="float" office:value="33" table:formula="of:=[.F339]-[.H339]" table:style-name="ce15">
            <text:p>33</text:p>
          </table:table-cell>
          <table:table-cell office:value-type="percentage" office:value="1.0331632653061225E-2" table:formula="of:=([.I340]-[.I339])/[.I339]" table:style-name="ce16">
            <text:p>1%</text:p>
          </table:table-cell>
          <table:table-cell office:value-type="string" office:string-value="Invalid" table:formula="of:=IF([.F339]&lt;=[.E339]; &quot;Valid&quot;; &quot;Invalid&quot;)" table:style-name="ce17">
            <text:p>Invalid</text:p>
          </table:table-cell>
          <table:table-cell office:value-type="string" office:string-value="Valid" table:formula="of:=IF([.H339]&lt;=[.G339]; &quot;Valid&quot;; &quot;Invalid&quot;)" table:style-name="ce17">
            <text:p>Valid</text:p>
          </table:table-cell>
          <table:table-cell office:value-type="string" office:string-value="Increasing Pressure" table:formula="of:=IF([.J339]&gt;0; &quot;Increasing Pressure&quot;; &quot;Stable/Reducing&quot;)" table:style-name="ce18">
            <text:p>Increasing Pressure</text:p>
          </table:table-cell>
          <table:table-cell office:value-type="float" office:value="0.87159533073929962" table:formula="of:=IFERROR([.H339]/[.F339]; 0)" table:style-name="ce17">
            <text:p>0.871595331</text:p>
          </table:table-cell>
          <table:table-cell office:value-type="float" office:value="7888.8571428571431" table:formula="of:=AVERAGE([.I339:.I345])" table:style-name="ce15">
            <text:p>7889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6-04T00:00:00" table:style-name="ce14">
            <text:p>04-06-2024</text:p>
          </table:table-cell>
          <table:table-cell office:value-type="string" office:string-value="June" table:formula="of:=TEXT([.A340]; &quot;mmmm&quot;)" table:style-name="ce14">
            <text:p>June</text:p>
          </table:table-cell>
          <table:table-cell office:value-type="string" office:string-value="2024-06" table:formula="of:=TEXT([.A340]; &quot;yyyy-mm&quot;)" table:style-name="ce14">
            <text:p>2024-06</text:p>
          </table:table-cell>
          <table:table-cell office:value-type="float" office:value="260" table:style-name="ce9">
            <text:p>260</text:p>
          </table:table-cell>
          <table:table-cell office:value-type="float" office:value="356" table:style-name="ce9">
            <text:p>356</text:p>
          </table:table-cell>
          <table:table-cell office:value-type="float" office:value="176" table:style-name="ce9">
            <text:p>176</text:p>
          </table:table-cell>
          <table:table-cell office:value-type="float" office:value="7565" table:style-name="ce9">
            <text:p>7565</text:p>
          </table:table-cell>
          <table:table-cell office:value-type="float" office:value="203" table:style-name="ce9">
            <text:p>203</text:p>
          </table:table-cell>
          <table:table-cell office:value-type="float" office:value="7921" table:formula="of:=SUM([.G340]+[.E340])" table:style-name="ce15">
            <text:p>7921</text:p>
          </table:table-cell>
          <table:table-cell office:value-type="float" office:value="-27" table:formula="of:=[.F340]-[.H340]" table:style-name="ce15">
            <text:p>-27</text:p>
          </table:table-cell>
          <table:table-cell office:value-type="percentage" office:value="1.4518368892816564E-2" table:formula="of:=([.I341]-[.I340])/[.I340]" table:style-name="ce16">
            <text:p>1%</text:p>
          </table:table-cell>
          <table:table-cell office:value-type="string" office:string-value="Valid" table:formula="of:=IF([.F340]&lt;=[.E340]; &quot;Valid&quot;; &quot;Invalid&quot;)" table:style-name="ce17">
            <text:p>Valid</text:p>
          </table:table-cell>
          <table:table-cell office:value-type="string" office:string-value="Valid" table:formula="of:=IF([.H340]&lt;=[.G340]; &quot;Valid&quot;; &quot;Invalid&quot;)" table:style-name="ce17">
            <text:p>Valid</text:p>
          </table:table-cell>
          <table:table-cell office:value-type="string" office:string-value="Stable/Reducing" table:formula="of:=IF([.J340]&gt;0; &quot;Increasing Pressure&quot;; &quot;Stable/Reducing&quot;)" table:style-name="ce18">
            <text:p>Stable/Reducing</text:p>
          </table:table-cell>
          <table:table-cell office:value-type="float" office:value="1.1534090909090908" table:formula="of:=IFERROR([.H340]/[.F340]; 0)" table:style-name="ce17">
            <text:p>1.153409091</text:p>
          </table:table-cell>
          <table:table-cell office:value-type="float" office:value="7885.1428571428569" table:formula="of:=AVERAGE([.I340:.I346])" table:style-name="ce15">
            <text:p>7885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6-05T00:00:00" table:style-name="ce14">
            <text:p>05-06-2024</text:p>
          </table:table-cell>
          <table:table-cell office:value-type="string" office:string-value="June" table:formula="of:=TEXT([.A341]; &quot;mmmm&quot;)" table:style-name="ce14">
            <text:p>June</text:p>
          </table:table-cell>
          <table:table-cell office:value-type="string" office:string-value="2024-06" table:formula="of:=TEXT([.A341]; &quot;yyyy-mm&quot;)" table:style-name="ce14">
            <text:p>2024-06</text:p>
          </table:table-cell>
          <table:table-cell office:value-type="float" office:value="173" table:style-name="ce9">
            <text:p>173</text:p>
          </table:table-cell>
          <table:table-cell office:value-type="float" office:value="345" table:style-name="ce9">
            <text:p>345</text:p>
          </table:table-cell>
          <table:table-cell office:value-type="float" office:value="291" table:style-name="ce9">
            <text:p>291</text:p>
          </table:table-cell>
          <table:table-cell office:value-type="float" office:value="7691" table:style-name="ce9">
            <text:p>7691</text:p>
          </table:table-cell>
          <table:table-cell office:value-type="float" office:value="198" table:style-name="ce9">
            <text:p>198</text:p>
          </table:table-cell>
          <table:table-cell office:value-type="float" office:value="8036" table:formula="of:=SUM([.G341]+[.E341])" table:style-name="ce15">
            <text:p>8036</text:p>
          </table:table-cell>
          <table:table-cell office:value-type="float" office:value="93" table:formula="of:=[.F341]-[.H341]" table:style-name="ce15">
            <text:p>93</text:p>
          </table:table-cell>
          <table:table-cell office:value-type="percentage" office:value="3.8576406172224987E-3" table:formula="of:=([.I342]-[.I341])/[.I341]" table:style-name="ce16">
            <text:p>0%</text:p>
          </table:table-cell>
          <table:table-cell office:value-type="string" office:string-value="Valid" table:formula="of:=IF([.F341]&lt;=[.E341]; &quot;Valid&quot;; &quot;Invalid&quot;)" table:style-name="ce17">
            <text:p>Valid</text:p>
          </table:table-cell>
          <table:table-cell office:value-type="string" office:string-value="Valid" table:formula="of:=IF([.H341]&lt;=[.G341]; &quot;Valid&quot;; &quot;Invalid&quot;)" table:style-name="ce17">
            <text:p>Valid</text:p>
          </table:table-cell>
          <table:table-cell office:value-type="string" office:string-value="Increasing Pressure" table:formula="of:=IF([.J341]&gt;0; &quot;Increasing Pressure&quot;; &quot;Stable/Reducing&quot;)" table:style-name="ce18">
            <text:p>Increasing Pressure</text:p>
          </table:table-cell>
          <table:table-cell office:value-type="float" office:value="0.68041237113402064" table:formula="of:=IFERROR([.H341]/[.F341]; 0)" table:style-name="ce17">
            <text:p>0.680412371</text:p>
          </table:table-cell>
          <table:table-cell office:value-type="float" office:value="7873.1428571428569" table:formula="of:=AVERAGE([.I341:.I347])" table:style-name="ce15">
            <text:p>7873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6-06T00:00:00" table:style-name="ce14">
            <text:p>06-06-2024</text:p>
          </table:table-cell>
          <table:table-cell office:value-type="string" office:string-value="June" table:formula="of:=TEXT([.A342]; &quot;mmmm&quot;)" table:style-name="ce14">
            <text:p>June</text:p>
          </table:table-cell>
          <table:table-cell office:value-type="string" office:string-value="2024-06" table:formula="of:=TEXT([.A342]; &quot;yyyy-mm&quot;)" table:style-name="ce14">
            <text:p>2024-06</text:p>
          </table:table-cell>
          <table:table-cell office:value-type="float" office:value="179" table:style-name="ce9">
            <text:p>179</text:p>
          </table:table-cell>
          <table:table-cell office:value-type="float" office:value="326" table:style-name="ce9">
            <text:p>326</text:p>
          </table:table-cell>
          <table:table-cell office:value-type="float" office:value="282" table:style-name="ce9">
            <text:p>282</text:p>
          </table:table-cell>
          <table:table-cell office:value-type="float" office:value="7741" table:style-name="ce9">
            <text:p>7741</text:p>
          </table:table-cell>
          <table:table-cell office:value-type="float" office:value="238" table:style-name="ce9">
            <text:p>238</text:p>
          </table:table-cell>
          <table:table-cell office:value-type="float" office:value="8067" table:formula="of:=SUM([.G342]+[.E342])" table:style-name="ce15">
            <text:p>8067</text:p>
          </table:table-cell>
          <table:table-cell office:value-type="float" office:value="44" table:formula="of:=[.F342]-[.H342]" table:style-name="ce15">
            <text:p>44</text:p>
          </table:table-cell>
          <table:table-cell office:value-type="percentage" office:value="-4.0535515061361098E-2" table:formula="of:=([.I343]-[.I342])/[.I342]" table:style-name="ce16">
            <text:p>-4%</text:p>
          </table:table-cell>
          <table:table-cell office:value-type="string" office:string-value="Valid" table:formula="of:=IF([.F342]&lt;=[.E342]; &quot;Valid&quot;; &quot;Invalid&quot;)" table:style-name="ce17">
            <text:p>Valid</text:p>
          </table:table-cell>
          <table:table-cell office:value-type="string" office:string-value="Valid" table:formula="of:=IF([.H342]&lt;=[.G342]; &quot;Valid&quot;; &quot;Invalid&quot;)" table:style-name="ce17">
            <text:p>Valid</text:p>
          </table:table-cell>
          <table:table-cell office:value-type="string" office:string-value="Increasing Pressure" table:formula="of:=IF([.J342]&gt;0; &quot;Increasing Pressure&quot;; &quot;Stable/Reducing&quot;)" table:style-name="ce18">
            <text:p>Increasing Pressure</text:p>
          </table:table-cell>
          <table:table-cell office:value-type="float" office:value="0.84397163120567376" table:formula="of:=IFERROR([.H342]/[.F342]; 0)" table:style-name="ce17">
            <text:p>0.843971631</text:p>
          </table:table-cell>
          <table:table-cell office:value-type="float" office:value="7814" table:formula="of:=AVERAGE([.I342:.I348])" table:style-name="ce15">
            <text:p>7814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6-09T00:00:00" table:style-name="ce14">
            <text:p>09-06-2024</text:p>
          </table:table-cell>
          <table:table-cell office:value-type="string" office:string-value="June" table:formula="of:=TEXT([.A343]; &quot;mmmm&quot;)" table:style-name="ce14">
            <text:p>June</text:p>
          </table:table-cell>
          <table:table-cell office:value-type="string" office:string-value="2024-06" table:formula="of:=TEXT([.A343]; &quot;yyyy-mm&quot;)" table:style-name="ce14">
            <text:p>2024-06</text:p>
          </table:table-cell>
          <table:table-cell office:value-type="float" office:value="116" table:style-name="ce9">
            <text:p>116</text:p>
          </table:table-cell>
          <table:table-cell office:value-type="float" office:value="289" table:style-name="ce9">
            <text:p>289</text:p>
          </table:table-cell>
          <table:table-cell office:value-type="float" office:value="166" table:style-name="ce9">
            <text:p>166</text:p>
          </table:table-cell>
          <table:table-cell office:value-type="float" office:value="7451" table:style-name="ce9">
            <text:p>7451</text:p>
          </table:table-cell>
          <table:table-cell office:value-type="float" office:value="312" table:style-name="ce9">
            <text:p>312</text:p>
          </table:table-cell>
          <table:table-cell office:value-type="float" office:value="7740" table:formula="of:=SUM([.G343]+[.E343])" table:style-name="ce15">
            <text:p>7740</text:p>
          </table:table-cell>
          <table:table-cell office:value-type="float" office:value="-146" table:formula="of:=[.F343]-[.H343]" table:style-name="ce15">
            <text:p>-146</text:p>
          </table:table-cell>
          <table:table-cell office:value-type="percentage" office:value="4.2635658914728682E-3" table:formula="of:=([.I344]-[.I343])/[.I343]" table:style-name="ce16">
            <text:p>0%</text:p>
          </table:table-cell>
          <table:table-cell office:value-type="string" office:string-value="Valid" table:formula="of:=IF([.F343]&lt;=[.E343]; &quot;Valid&quot;; &quot;Invalid&quot;)" table:style-name="ce17">
            <text:p>Valid</text:p>
          </table:table-cell>
          <table:table-cell office:value-type="string" office:string-value="Valid" table:formula="of:=IF([.H343]&lt;=[.G343]; &quot;Valid&quot;; &quot;Invalid&quot;)" table:style-name="ce17">
            <text:p>Valid</text:p>
          </table:table-cell>
          <table:table-cell office:value-type="string" office:string-value="Stable/Reducing" table:formula="of:=IF([.J343]&gt;0; &quot;Increasing Pressure&quot;; &quot;Stable/Reducing&quot;)" table:style-name="ce18">
            <text:p>Stable/Reducing</text:p>
          </table:table-cell>
          <table:table-cell office:value-type="float" office:value="1.8795180722891567" table:formula="of:=IFERROR([.H343]/[.F343]; 0)" table:style-name="ce17">
            <text:p>1.879518072</text:p>
          </table:table-cell>
          <table:table-cell office:value-type="float" office:value="7751.2857142857147" table:formula="of:=AVERAGE([.I343:.I349])" table:style-name="ce15">
            <text:p>7751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6-10T00:00:00" table:style-name="ce14">
            <text:p>10-06-2024</text:p>
          </table:table-cell>
          <table:table-cell office:value-type="string" office:string-value="June" table:formula="of:=TEXT([.A344]; &quot;mmmm&quot;)" table:style-name="ce14">
            <text:p>June</text:p>
          </table:table-cell>
          <table:table-cell office:value-type="string" office:string-value="2024-06" table:formula="of:=TEXT([.A344]; &quot;yyyy-mm&quot;)" table:style-name="ce14">
            <text:p>2024-06</text:p>
          </table:table-cell>
          <table:table-cell office:value-type="float" office:value="184" table:style-name="ce9">
            <text:p>184</text:p>
          </table:table-cell>
          <table:table-cell office:value-type="float" office:value="334" table:style-name="ce9">
            <text:p>334</text:p>
          </table:table-cell>
          <table:table-cell office:value-type="float" office:value="229" table:style-name="ce9">
            <text:p>229</text:p>
          </table:table-cell>
          <table:table-cell office:value-type="float" office:value="7439" table:style-name="ce9">
            <text:p>7439</text:p>
          </table:table-cell>
          <table:table-cell office:value-type="float" office:value="212" table:style-name="ce9">
            <text:p>212</text:p>
          </table:table-cell>
          <table:table-cell office:value-type="float" office:value="7773" table:formula="of:=SUM([.G344]+[.E344])" table:style-name="ce15">
            <text:p>7773</text:p>
          </table:table-cell>
          <table:table-cell office:value-type="float" office:value="17" table:formula="of:=[.F344]-[.H344]" table:style-name="ce15">
            <text:p>17</text:p>
          </table:table-cell>
          <table:table-cell office:value-type="percentage" office:value="9.262832883056734E-3" table:formula="of:=([.I345]-[.I344])/[.I344]" table:style-name="ce16">
            <text:p>1%</text:p>
          </table:table-cell>
          <table:table-cell office:value-type="string" office:string-value="Valid" table:formula="of:=IF([.F344]&lt;=[.E344]; &quot;Valid&quot;; &quot;Invalid&quot;)" table:style-name="ce17">
            <text:p>Valid</text:p>
          </table:table-cell>
          <table:table-cell office:value-type="string" office:string-value="Valid" table:formula="of:=IF([.H344]&lt;=[.G344]; &quot;Valid&quot;; &quot;Invalid&quot;)" table:style-name="ce17">
            <text:p>Valid</text:p>
          </table:table-cell>
          <table:table-cell office:value-type="string" office:string-value="Increasing Pressure" table:formula="of:=IF([.J344]&gt;0; &quot;Increasing Pressure&quot;; &quot;Stable/Reducing&quot;)" table:style-name="ce18">
            <text:p>Increasing Pressure</text:p>
          </table:table-cell>
          <table:table-cell office:value-type="float" office:value="0.92576419213973804" table:formula="of:=IFERROR([.H344]/[.F344]; 0)" table:style-name="ce17">
            <text:p>0.925764192</text:p>
          </table:table-cell>
          <table:table-cell office:value-type="float" office:value="7736.5714285714284" table:formula="of:=AVERAGE([.I344:.I350])" table:style-name="ce15">
            <text:p>7737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6-11T00:00:00" table:style-name="ce14">
            <text:p>11-06-2024</text:p>
          </table:table-cell>
          <table:table-cell office:value-type="string" office:string-value="June" table:formula="of:=TEXT([.A345]; &quot;mmmm&quot;)" table:style-name="ce14">
            <text:p>June</text:p>
          </table:table-cell>
          <table:table-cell office:value-type="string" office:string-value="2024-06" table:formula="of:=TEXT([.A345]; &quot;yyyy-mm&quot;)" table:style-name="ce14">
            <text:p>2024-06</text:p>
          </table:table-cell>
          <table:table-cell office:value-type="float" office:value="186" table:style-name="ce9">
            <text:p>186</text:p>
          </table:table-cell>
          <table:table-cell office:value-type="float" office:value="352" table:style-name="ce9">
            <text:p>352</text:p>
          </table:table-cell>
          <table:table-cell office:value-type="float" office:value="224" table:style-name="ce9">
            <text:p>224</text:p>
          </table:table-cell>
          <table:table-cell office:value-type="float" office:value="7493" table:style-name="ce9">
            <text:p>7493</text:p>
          </table:table-cell>
          <table:table-cell office:value-type="float" office:value="156" table:style-name="ce9">
            <text:p>156</text:p>
          </table:table-cell>
          <table:table-cell office:value-type="float" office:value="7845" table:formula="of:=SUM([.G345]+[.E345])" table:style-name="ce15">
            <text:p>7845</text:p>
          </table:table-cell>
          <table:table-cell office:value-type="float" office:value="68" table:formula="of:=[.F345]-[.H345]" table:style-name="ce15">
            <text:p>68</text:p>
          </table:table-cell>
          <table:table-cell office:value-type="percentage" office:value="-3.9515615041427659E-3" table:formula="of:=([.I346]-[.I345])/[.I345]" table:style-name="ce16">
            <text:p>0%</text:p>
          </table:table-cell>
          <table:table-cell office:value-type="string" office:string-value="Valid" table:formula="of:=IF([.F345]&lt;=[.E345]; &quot;Valid&quot;; &quot;Invalid&quot;)" table:style-name="ce17">
            <text:p>Valid</text:p>
          </table:table-cell>
          <table:table-cell office:value-type="string" office:string-value="Valid" table:formula="of:=IF([.H345]&lt;=[.G345]; &quot;Valid&quot;; &quot;Invalid&quot;)" table:style-name="ce17">
            <text:p>Valid</text:p>
          </table:table-cell>
          <table:table-cell office:value-type="string" office:string-value="Increasing Pressure" table:formula="of:=IF([.J345]&gt;0; &quot;Increasing Pressure&quot;; &quot;Stable/Reducing&quot;)" table:style-name="ce18">
            <text:p>Increasing Pressure</text:p>
          </table:table-cell>
          <table:table-cell office:value-type="float" office:value="0.6964285714285714" table:formula="of:=IFERROR([.H345]/[.F345]; 0)" table:style-name="ce17">
            <text:p>0.696428571</text:p>
          </table:table-cell>
          <table:table-cell office:value-type="float" office:value="7733.8571428571431" table:formula="of:=AVERAGE([.I345:.I351])" table:style-name="ce15">
            <text:p>7734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6-12T00:00:00" table:style-name="ce14">
            <text:p>12-06-2024</text:p>
          </table:table-cell>
          <table:table-cell office:value-type="string" office:string-value="June" table:formula="of:=TEXT([.A346]; &quot;mmmm&quot;)" table:style-name="ce14">
            <text:p>June</text:p>
          </table:table-cell>
          <table:table-cell office:value-type="string" office:string-value="2024-06" table:formula="of:=TEXT([.A346]; &quot;yyyy-mm&quot;)" table:style-name="ce14">
            <text:p>2024-06</text:p>
          </table:table-cell>
          <table:table-cell office:value-type="float" office:value="152" table:style-name="ce9">
            <text:p>152</text:p>
          </table:table-cell>
          <table:table-cell office:value-type="float" office:value="266" table:style-name="ce9">
            <text:p>266</text:p>
          </table:table-cell>
          <table:table-cell office:value-type="float" office:value="274" table:style-name="ce9">
            <text:p>274</text:p>
          </table:table-cell>
          <table:table-cell office:value-type="float" office:value="7548" table:style-name="ce9">
            <text:p>7548</text:p>
          </table:table-cell>
          <table:table-cell office:value-type="float" office:value="212" table:style-name="ce9">
            <text:p>212</text:p>
          </table:table-cell>
          <table:table-cell office:value-type="float" office:value="7814" table:formula="of:=SUM([.G346]+[.E346])" table:style-name="ce15">
            <text:p>7814</text:p>
          </table:table-cell>
          <table:table-cell office:value-type="float" office:value="62" table:formula="of:=[.F346]-[.H346]" table:style-name="ce15">
            <text:p>62</text:p>
          </table:table-cell>
          <table:table-cell office:value-type="percentage" office:value="2.9434348605067826E-3" table:formula="of:=([.I347]-[.I346])/[.I346]" table:style-name="ce16">
            <text:p>0%</text:p>
          </table:table-cell>
          <table:table-cell office:value-type="string" office:string-value="Invalid" table:formula="of:=IF([.F346]&lt;=[.E346]; &quot;Valid&quot;; &quot;Invalid&quot;)" table:style-name="ce17">
            <text:p>Invalid</text:p>
          </table:table-cell>
          <table:table-cell office:value-type="string" office:string-value="Valid" table:formula="of:=IF([.H346]&lt;=[.G346]; &quot;Valid&quot;; &quot;Invalid&quot;)" table:style-name="ce17">
            <text:p>Valid</text:p>
          </table:table-cell>
          <table:table-cell office:value-type="string" office:string-value="Increasing Pressure" table:formula="of:=IF([.J346]&gt;0; &quot;Increasing Pressure&quot;; &quot;Stable/Reducing&quot;)" table:style-name="ce18">
            <text:p>Increasing Pressure</text:p>
          </table:table-cell>
          <table:table-cell office:value-type="float" office:value="0.77372262773722633" table:formula="of:=IFERROR([.H346]/[.F346]; 0)" table:style-name="ce17">
            <text:p>0.773722628</text:p>
          </table:table-cell>
          <table:table-cell office:value-type="float" office:value="7710" table:formula="of:=AVERAGE([.I346:.I352])" table:style-name="ce15">
            <text:p>7710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6-13T00:00:00" table:style-name="ce14">
            <text:p>13-06-2024</text:p>
          </table:table-cell>
          <table:table-cell office:value-type="string" office:string-value="June" table:formula="of:=TEXT([.A347]; &quot;mmmm&quot;)" table:style-name="ce14">
            <text:p>June</text:p>
          </table:table-cell>
          <table:table-cell office:value-type="string" office:string-value="2024-06" table:formula="of:=TEXT([.A347]; &quot;yyyy-mm&quot;)" table:style-name="ce14">
            <text:p>2024-06</text:p>
          </table:table-cell>
          <table:table-cell office:value-type="float" office:value="167" table:style-name="ce9">
            <text:p>167</text:p>
          </table:table-cell>
          <table:table-cell office:value-type="float" office:value="293" table:style-name="ce9">
            <text:p>293</text:p>
          </table:table-cell>
          <table:table-cell office:value-type="float" office:value="230" table:style-name="ce9">
            <text:p>230</text:p>
          </table:table-cell>
          <table:table-cell office:value-type="float" office:value="7544" table:style-name="ce9">
            <text:p>7544</text:p>
          </table:table-cell>
          <table:table-cell office:value-type="float" office:value="259" table:style-name="ce9">
            <text:p>259</text:p>
          </table:table-cell>
          <table:table-cell office:value-type="float" office:value="7837" table:formula="of:=SUM([.G347]+[.E347])" table:style-name="ce15">
            <text:p>7837</text:p>
          </table:table-cell>
          <table:table-cell office:value-type="float" office:value="-29" table:formula="of:=[.F347]-[.H347]" table:style-name="ce15">
            <text:p>-29</text:p>
          </table:table-cell>
          <table:table-cell office:value-type="percentage" office:value="-2.7433967079239504E-2" table:formula="of:=([.I348]-[.I347])/[.I347]" table:style-name="ce16">
            <text:p>-3%</text:p>
          </table:table-cell>
          <table:table-cell office:value-type="string" office:string-value="Valid" table:formula="of:=IF([.F347]&lt;=[.E347]; &quot;Valid&quot;; &quot;Invalid&quot;)" table:style-name="ce17">
            <text:p>Valid</text:p>
          </table:table-cell>
          <table:table-cell office:value-type="string" office:string-value="Valid" table:formula="of:=IF([.H347]&lt;=[.G347]; &quot;Valid&quot;; &quot;Invalid&quot;)" table:style-name="ce17">
            <text:p>Valid</text:p>
          </table:table-cell>
          <table:table-cell office:value-type="string" office:string-value="Stable/Reducing" table:formula="of:=IF([.J347]&gt;0; &quot;Increasing Pressure&quot;; &quot;Stable/Reducing&quot;)" table:style-name="ce18">
            <text:p>Stable/Reducing</text:p>
          </table:table-cell>
          <table:table-cell office:value-type="float" office:value="1.1260869565217391" table:formula="of:=IFERROR([.H347]/[.F347]; 0)" table:style-name="ce17">
            <text:p>1.126086957</text:p>
          </table:table-cell>
          <table:table-cell office:value-type="float" office:value="7661.4285714285716" table:formula="of:=AVERAGE([.I347:.I353])" table:style-name="ce15">
            <text:p>7661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6-16T00:00:00" table:style-name="ce14">
            <text:p>16-06-2024</text:p>
          </table:table-cell>
          <table:table-cell office:value-type="string" office:string-value="June" table:formula="of:=TEXT([.A348]; &quot;mmmm&quot;)" table:style-name="ce14">
            <text:p>June</text:p>
          </table:table-cell>
          <table:table-cell office:value-type="string" office:string-value="2024-06" table:formula="of:=TEXT([.A348]; &quot;yyyy-mm&quot;)" table:style-name="ce14">
            <text:p>2024-06</text:p>
          </table:table-cell>
          <table:table-cell office:value-type="float" office:value="204" table:style-name="ce9">
            <text:p>204</text:p>
          </table:table-cell>
          <table:table-cell office:value-type="float" office:value="315" table:style-name="ce9">
            <text:p>315</text:p>
          </table:table-cell>
          <table:table-cell office:value-type="float" office:value="233" table:style-name="ce9">
            <text:p>233</text:p>
          </table:table-cell>
          <table:table-cell office:value-type="float" office:value="7307" table:style-name="ce9">
            <text:p>7307</text:p>
          </table:table-cell>
          <table:table-cell office:value-type="float" office:value="294" table:style-name="ce9">
            <text:p>294</text:p>
          </table:table-cell>
          <table:table-cell office:value-type="float" office:value="7622" table:formula="of:=SUM([.G348]+[.E348])" table:style-name="ce15">
            <text:p>7622</text:p>
          </table:table-cell>
          <table:table-cell office:value-type="float" office:value="-61" table:formula="of:=[.F348]-[.H348]" table:style-name="ce15">
            <text:p>-61</text:p>
          </table:table-cell>
          <table:table-cell office:value-type="percentage" office:value="7.8719496195224351E-4" table:formula="of:=([.I349]-[.I348])/[.I348]" table:style-name="ce16">
            <text:p>0%</text:p>
          </table:table-cell>
          <table:table-cell office:value-type="string" office:string-value="Valid" table:formula="of:=IF([.F348]&lt;=[.E348]; &quot;Valid&quot;; &quot;Invalid&quot;)" table:style-name="ce17">
            <text:p>Valid</text:p>
          </table:table-cell>
          <table:table-cell office:value-type="string" office:string-value="Valid" table:formula="of:=IF([.H348]&lt;=[.G348]; &quot;Valid&quot;; &quot;Invalid&quot;)" table:style-name="ce17">
            <text:p>Valid</text:p>
          </table:table-cell>
          <table:table-cell office:value-type="string" office:string-value="Stable/Reducing" table:formula="of:=IF([.J348]&gt;0; &quot;Increasing Pressure&quot;; &quot;Stable/Reducing&quot;)" table:style-name="ce18">
            <text:p>Stable/Reducing</text:p>
          </table:table-cell>
          <table:table-cell office:value-type="float" office:value="1.2618025751072961" table:formula="of:=IFERROR([.H348]/[.F348]; 0)" table:style-name="ce17">
            <text:p>1.261802575</text:p>
          </table:table-cell>
          <table:table-cell office:value-type="float" office:value="7601" table:formula="of:=AVERAGE([.I348:.I354])" table:style-name="ce15">
            <text:p>7601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6-17T00:00:00" table:style-name="ce14">
            <text:p>17-06-2024</text:p>
          </table:table-cell>
          <table:table-cell office:value-type="string" office:string-value="June" table:formula="of:=TEXT([.A349]; &quot;mmmm&quot;)" table:style-name="ce14">
            <text:p>June</text:p>
          </table:table-cell>
          <table:table-cell office:value-type="string" office:string-value="2024-06" table:formula="of:=TEXT([.A349]; &quot;yyyy-mm&quot;)" table:style-name="ce14">
            <text:p>2024-06</text:p>
          </table:table-cell>
          <table:table-cell office:value-type="float" office:value="159" table:style-name="ce9">
            <text:p>159</text:p>
          </table:table-cell>
          <table:table-cell office:value-type="float" office:value="310" table:style-name="ce9">
            <text:p>310</text:p>
          </table:table-cell>
          <table:table-cell office:value-type="float" office:value="272" table:style-name="ce9">
            <text:p>272</text:p>
          </table:table-cell>
          <table:table-cell office:value-type="float" office:value="7318" table:style-name="ce9">
            <text:p>7318</text:p>
          </table:table-cell>
          <table:table-cell office:value-type="float" office:value="224" table:style-name="ce9">
            <text:p>224</text:p>
          </table:table-cell>
          <table:table-cell office:value-type="float" office:value="7628" table:formula="of:=SUM([.G349]+[.E349])" table:style-name="ce15">
            <text:p>7628</text:p>
          </table:table-cell>
          <table:table-cell office:value-type="float" office:value="48" table:formula="of:=[.F349]-[.H349]" table:style-name="ce15">
            <text:p>48</text:p>
          </table:table-cell>
          <table:table-cell office:value-type="percentage" office:value="1.1798636601992659E-3" table:formula="of:=([.I350]-[.I349])/[.I349]" table:style-name="ce16">
            <text:p>0%</text:p>
          </table:table-cell>
          <table:table-cell office:value-type="string" office:string-value="Valid" table:formula="of:=IF([.F349]&lt;=[.E349]; &quot;Valid&quot;; &quot;Invalid&quot;)" table:style-name="ce17">
            <text:p>Valid</text:p>
          </table:table-cell>
          <table:table-cell office:value-type="string" office:string-value="Valid" table:formula="of:=IF([.H349]&lt;=[.G349]; &quot;Valid&quot;; &quot;Invalid&quot;)" table:style-name="ce17">
            <text:p>Valid</text:p>
          </table:table-cell>
          <table:table-cell office:value-type="string" office:string-value="Increasing Pressure" table:formula="of:=IF([.J349]&gt;0; &quot;Increasing Pressure&quot;; &quot;Stable/Reducing&quot;)" table:style-name="ce18">
            <text:p>Increasing Pressure</text:p>
          </table:table-cell>
          <table:table-cell office:value-type="float" office:value="0.82352941176470584" table:formula="of:=IFERROR([.H349]/[.F349]; 0)" table:style-name="ce17">
            <text:p>0.823529412</text:p>
          </table:table-cell>
          <table:table-cell office:value-type="float" office:value="7583.8571428571431" table:formula="of:=AVERAGE([.I349:.I355])" table:style-name="ce15">
            <text:p>7584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6-18T00:00:00" table:style-name="ce14">
            <text:p>18-06-2024</text:p>
          </table:table-cell>
          <table:table-cell office:value-type="string" office:string-value="June" table:formula="of:=TEXT([.A350]; &quot;mmmm&quot;)" table:style-name="ce14">
            <text:p>June</text:p>
          </table:table-cell>
          <table:table-cell office:value-type="string" office:string-value="2024-06" table:formula="of:=TEXT([.A350]; &quot;yyyy-mm&quot;)" table:style-name="ce14">
            <text:p>2024-06</text:p>
          </table:table-cell>
          <table:table-cell office:value-type="float" office:value="160" table:style-name="ce9">
            <text:p>160</text:p>
          </table:table-cell>
          <table:table-cell office:value-type="float" office:value="297" table:style-name="ce9">
            <text:p>297</text:p>
          </table:table-cell>
          <table:table-cell office:value-type="float" office:value="253" table:style-name="ce9">
            <text:p>253</text:p>
          </table:table-cell>
          <table:table-cell office:value-type="float" office:value="7340" table:style-name="ce9">
            <text:p>7340</text:p>
          </table:table-cell>
          <table:table-cell office:value-type="float" office:value="214" table:style-name="ce9">
            <text:p>214</text:p>
          </table:table-cell>
          <table:table-cell office:value-type="float" office:value="7637" table:formula="of:=SUM([.G350]+[.E350])" table:style-name="ce15">
            <text:p>7637</text:p>
          </table:table-cell>
          <table:table-cell office:value-type="float" office:value="39" table:formula="of:=[.F350]-[.H350]" table:style-name="ce15">
            <text:p>39</text:p>
          </table:table-cell>
          <table:table-cell office:value-type="percentage" office:value="1.532015189210423E-2" table:formula="of:=([.I351]-[.I350])/[.I350]" table:style-name="ce16">
            <text:p>2%</text:p>
          </table:table-cell>
          <table:table-cell office:value-type="string" office:string-value="Valid" table:formula="of:=IF([.F350]&lt;=[.E350]; &quot;Valid&quot;; &quot;Invalid&quot;)" table:style-name="ce17">
            <text:p>Valid</text:p>
          </table:table-cell>
          <table:table-cell office:value-type="string" office:string-value="Valid" table:formula="of:=IF([.H350]&lt;=[.G350]; &quot;Valid&quot;; &quot;Invalid&quot;)" table:style-name="ce17">
            <text:p>Valid</text:p>
          </table:table-cell>
          <table:table-cell office:value-type="string" office:string-value="Increasing Pressure" table:formula="of:=IF([.J350]&gt;0; &quot;Increasing Pressure&quot;; &quot;Stable/Reducing&quot;)" table:style-name="ce18">
            <text:p>Increasing Pressure</text:p>
          </table:table-cell>
          <table:table-cell office:value-type="float" office:value="0.8458498023715415" table:formula="of:=IFERROR([.H350]/[.F350]; 0)" table:style-name="ce17">
            <text:p>0.845849802</text:p>
          </table:table-cell>
          <table:table-cell office:value-type="float" office:value="7566" table:formula="of:=AVERAGE([.I350:.I356])" table:style-name="ce15">
            <text:p>7566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6-19T00:00:00" table:style-name="ce14">
            <text:p>19-06-2024</text:p>
          </table:table-cell>
          <table:table-cell office:value-type="string" office:string-value="June" table:formula="of:=TEXT([.A351]; &quot;mmmm&quot;)" table:style-name="ce14">
            <text:p>June</text:p>
          </table:table-cell>
          <table:table-cell office:value-type="string" office:string-value="2024-06" table:formula="of:=TEXT([.A351]; &quot;yyyy-mm&quot;)" table:style-name="ce14">
            <text:p>2024-06</text:p>
          </table:table-cell>
          <table:table-cell office:value-type="float" office:value="204" table:style-name="ce9">
            <text:p>204</text:p>
          </table:table-cell>
          <table:table-cell office:value-type="float" office:value="321" table:style-name="ce9">
            <text:p>321</text:p>
          </table:table-cell>
          <table:table-cell office:value-type="float" office:value="246" table:style-name="ce9">
            <text:p>246</text:p>
          </table:table-cell>
          <table:table-cell office:value-type="float" office:value="7433" table:style-name="ce9">
            <text:p>7433</text:p>
          </table:table-cell>
          <table:table-cell office:value-type="float" office:value="198" table:style-name="ce9">
            <text:p>198</text:p>
          </table:table-cell>
          <table:table-cell office:value-type="float" office:value="7754" table:formula="of:=SUM([.G351]+[.E351])" table:style-name="ce15">
            <text:p>7754</text:p>
          </table:table-cell>
          <table:table-cell office:value-type="float" office:value="48" table:formula="of:=[.F351]-[.H351]" table:style-name="ce15">
            <text:p>48</text:p>
          </table:table-cell>
          <table:table-cell office:value-type="percentage" office:value="-9.8013928295073507E-3" table:formula="of:=([.I352]-[.I351])/[.I351]" table:style-name="ce16">
            <text:p>-1%</text:p>
          </table:table-cell>
          <table:table-cell office:value-type="string" office:string-value="Valid" table:formula="of:=IF([.F351]&lt;=[.E351]; &quot;Valid&quot;; &quot;Invalid&quot;)" table:style-name="ce17">
            <text:p>Valid</text:p>
          </table:table-cell>
          <table:table-cell office:value-type="string" office:string-value="Valid" table:formula="of:=IF([.H351]&lt;=[.G351]; &quot;Valid&quot;; &quot;Invalid&quot;)" table:style-name="ce17">
            <text:p>Valid</text:p>
          </table:table-cell>
          <table:table-cell office:value-type="string" office:string-value="Increasing Pressure" table:formula="of:=IF([.J351]&gt;0; &quot;Increasing Pressure&quot;; &quot;Stable/Reducing&quot;)" table:style-name="ce18">
            <text:p>Increasing Pressure</text:p>
          </table:table-cell>
          <table:table-cell office:value-type="float" office:value="0.80487804878048785" table:formula="of:=IFERROR([.H351]/[.F351]; 0)" table:style-name="ce17">
            <text:p>0.804878049</text:p>
          </table:table-cell>
          <table:table-cell office:value-type="float" office:value="7540.1428571428569" table:formula="of:=AVERAGE([.I351:.I357])" table:style-name="ce15">
            <text:p>7540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6-20T00:00:00" table:style-name="ce14">
            <text:p>20-06-2024</text:p>
          </table:table-cell>
          <table:table-cell office:value-type="string" office:string-value="June" table:formula="of:=TEXT([.A352]; &quot;mmmm&quot;)" table:style-name="ce14">
            <text:p>June</text:p>
          </table:table-cell>
          <table:table-cell office:value-type="string" office:string-value="2024-06" table:formula="of:=TEXT([.A352]; &quot;yyyy-mm&quot;)" table:style-name="ce14">
            <text:p>2024-06</text:p>
          </table:table-cell>
          <table:table-cell office:value-type="float" office:value="145" table:style-name="ce9">
            <text:p>145</text:p>
          </table:table-cell>
          <table:table-cell office:value-type="float" office:value="247" table:style-name="ce9">
            <text:p>247</text:p>
          </table:table-cell>
          <table:table-cell office:value-type="float" office:value="243" table:style-name="ce9">
            <text:p>243</text:p>
          </table:table-cell>
          <table:table-cell office:value-type="float" office:value="7431" table:style-name="ce9">
            <text:p>7431</text:p>
          </table:table-cell>
          <table:table-cell office:value-type="float" office:value="235" table:style-name="ce9">
            <text:p>235</text:p>
          </table:table-cell>
          <table:table-cell office:value-type="float" office:value="7678" table:formula="of:=SUM([.G352]+[.E352])" table:style-name="ce15">
            <text:p>7678</text:p>
          </table:table-cell>
          <table:table-cell office:value-type="float" office:value="8" table:formula="of:=[.F352]-[.H352]" table:style-name="ce15">
            <text:p>8</text:p>
          </table:table-cell>
          <table:table-cell office:value-type="percentage" office:value="-2.6569419119562385E-2" table:formula="of:=([.I353]-[.I352])/[.I352]" table:style-name="ce16">
            <text:p>-3%</text:p>
          </table:table-cell>
          <table:table-cell office:value-type="string" office:string-value="Valid" table:formula="of:=IF([.F352]&lt;=[.E352]; &quot;Valid&quot;; &quot;Invalid&quot;)" table:style-name="ce17">
            <text:p>Valid</text:p>
          </table:table-cell>
          <table:table-cell office:value-type="string" office:string-value="Valid" table:formula="of:=IF([.H352]&lt;=[.G352]; &quot;Valid&quot;; &quot;Invalid&quot;)" table:style-name="ce17">
            <text:p>Valid</text:p>
          </table:table-cell>
          <table:table-cell office:value-type="string" office:string-value="Increasing Pressure" table:formula="of:=IF([.J352]&gt;0; &quot;Increasing Pressure&quot;; &quot;Stable/Reducing&quot;)" table:style-name="ce18">
            <text:p>Increasing Pressure</text:p>
          </table:table-cell>
          <table:table-cell office:value-type="float" office:value="0.96707818930041156" table:formula="of:=IFERROR([.H352]/[.F352]; 0)" table:style-name="ce17">
            <text:p>0.967078189</text:p>
          </table:table-cell>
          <table:table-cell office:value-type="float" office:value="7447.2857142857147" table:formula="of:=AVERAGE([.I352:.I358])" table:style-name="ce15">
            <text:p>7447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6-23T00:00:00" table:style-name="ce14">
            <text:p>23-06-2024</text:p>
          </table:table-cell>
          <table:table-cell office:value-type="string" office:string-value="June" table:formula="of:=TEXT([.A353]; &quot;mmmm&quot;)" table:style-name="ce14">
            <text:p>June</text:p>
          </table:table-cell>
          <table:table-cell office:value-type="string" office:string-value="2024-06" table:formula="of:=TEXT([.A353]; &quot;yyyy-mm&quot;)" table:style-name="ce14">
            <text:p>2024-06</text:p>
          </table:table-cell>
          <table:table-cell office:value-type="float" office:value="102" table:style-name="ce9">
            <text:p>102</text:p>
          </table:table-cell>
          <table:table-cell office:value-type="float" office:value="227" table:style-name="ce9">
            <text:p>227</text:p>
          </table:table-cell>
          <table:table-cell office:value-type="float" office:value="201" table:style-name="ce9">
            <text:p>201</text:p>
          </table:table-cell>
          <table:table-cell office:value-type="float" office:value="7247" table:style-name="ce9">
            <text:p>7247</text:p>
          </table:table-cell>
          <table:table-cell office:value-type="float" office:value="294" table:style-name="ce9">
            <text:p>294</text:p>
          </table:table-cell>
          <table:table-cell office:value-type="float" office:value="7474" table:formula="of:=SUM([.G353]+[.E353])" table:style-name="ce15">
            <text:p>7474</text:p>
          </table:table-cell>
          <table:table-cell office:value-type="float" office:value="-93" table:formula="of:=[.F353]-[.H353]" table:style-name="ce15">
            <text:p>-93</text:p>
          </table:table-cell>
          <table:table-cell office:value-type="percentage" office:value="-8.0278298100080279E-3" table:formula="of:=([.I354]-[.I353])/[.I353]" table:style-name="ce16">
            <text:p>-1%</text:p>
          </table:table-cell>
          <table:table-cell office:value-type="string" office:string-value="Valid" table:formula="of:=IF([.F353]&lt;=[.E353]; &quot;Valid&quot;; &quot;Invalid&quot;)" table:style-name="ce17">
            <text:p>Valid</text:p>
          </table:table-cell>
          <table:table-cell office:value-type="string" office:string-value="Valid" table:formula="of:=IF([.H353]&lt;=[.G353]; &quot;Valid&quot;; &quot;Invalid&quot;)" table:style-name="ce17">
            <text:p>Valid</text:p>
          </table:table-cell>
          <table:table-cell office:value-type="string" office:string-value="Stable/Reducing" table:formula="of:=IF([.J353]&gt;0; &quot;Increasing Pressure&quot;; &quot;Stable/Reducing&quot;)" table:style-name="ce18">
            <text:p>Stable/Reducing</text:p>
          </table:table-cell>
          <table:table-cell office:value-type="float" office:value="1.4626865671641791" table:formula="of:=IFERROR([.H353]/[.F353]; 0)" table:style-name="ce17">
            <text:p>1.462686567</text:p>
          </table:table-cell>
          <table:table-cell office:value-type="float" office:value="7358.7142857142853" table:formula="of:=AVERAGE([.I353:.I359])" table:style-name="ce15">
            <text:p>7359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6-24T00:00:00" table:style-name="ce14">
            <text:p>24-06-2024</text:p>
          </table:table-cell>
          <table:table-cell office:value-type="string" office:string-value="June" table:formula="of:=TEXT([.A354]; &quot;mmmm&quot;)" table:style-name="ce14">
            <text:p>June</text:p>
          </table:table-cell>
          <table:table-cell office:value-type="string" office:string-value="2024-06" table:formula="of:=TEXT([.A354]; &quot;yyyy-mm&quot;)" table:style-name="ce14">
            <text:p>2024-06</text:p>
          </table:table-cell>
          <table:table-cell office:value-type="float" office:value="116" table:style-name="ce9">
            <text:p>116</text:p>
          </table:table-cell>
          <table:table-cell office:value-type="float" office:value="175" table:style-name="ce9">
            <text:p>175</text:p>
          </table:table-cell>
          <table:table-cell office:value-type="float" office:value="172" table:style-name="ce9">
            <text:p>172</text:p>
          </table:table-cell>
          <table:table-cell office:value-type="float" office:value="7239" table:style-name="ce9">
            <text:p>7239</text:p>
          </table:table-cell>
          <table:table-cell office:value-type="float" office:value="202" table:style-name="ce9">
            <text:p>202</text:p>
          </table:table-cell>
          <table:table-cell office:value-type="float" office:value="7414" table:formula="of:=SUM([.G354]+[.E354])" table:style-name="ce15">
            <text:p>7414</text:p>
          </table:table-cell>
          <table:table-cell office:value-type="float" office:value="-30" table:formula="of:=[.F354]-[.H354]" table:style-name="ce15">
            <text:p>-30</text:p>
          </table:table-cell>
          <table:table-cell office:value-type="percentage" office:value="1.1869436201780416E-2" table:formula="of:=([.I355]-[.I354])/[.I354]" table:style-name="ce16">
            <text:p>1%</text:p>
          </table:table-cell>
          <table:table-cell office:value-type="string" office:string-value="Valid" table:formula="of:=IF([.F354]&lt;=[.E354]; &quot;Valid&quot;; &quot;Invalid&quot;)" table:style-name="ce17">
            <text:p>Valid</text:p>
          </table:table-cell>
          <table:table-cell office:value-type="string" office:string-value="Valid" table:formula="of:=IF([.H354]&lt;=[.G354]; &quot;Valid&quot;; &quot;Invalid&quot;)" table:style-name="ce17">
            <text:p>Valid</text:p>
          </table:table-cell>
          <table:table-cell office:value-type="string" office:string-value="Stable/Reducing" table:formula="of:=IF([.J354]&gt;0; &quot;Increasing Pressure&quot;; &quot;Stable/Reducing&quot;)" table:style-name="ce18">
            <text:p>Stable/Reducing</text:p>
          </table:table-cell>
          <table:table-cell office:value-type="float" office:value="1.1744186046511629" table:formula="of:=IFERROR([.H354]/[.F354]; 0)" table:style-name="ce17">
            <text:p>1.174418605</text:p>
          </table:table-cell>
          <table:table-cell office:value-type="float" office:value="7298.8571428571431" table:formula="of:=AVERAGE([.I354:.I360])" table:style-name="ce15">
            <text:p>7299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6-25T00:00:00" table:style-name="ce14">
            <text:p>25-06-2024</text:p>
          </table:table-cell>
          <table:table-cell office:value-type="string" office:string-value="June" table:formula="of:=TEXT([.A355]; &quot;mmmm&quot;)" table:style-name="ce14">
            <text:p>June</text:p>
          </table:table-cell>
          <table:table-cell office:value-type="string" office:string-value="2024-06" table:formula="of:=TEXT([.A355]; &quot;yyyy-mm&quot;)" table:style-name="ce14">
            <text:p>2024-06</text:p>
          </table:table-cell>
          <table:table-cell office:value-type="float" office:value="172" table:style-name="ce9">
            <text:p>172</text:p>
          </table:table-cell>
          <table:table-cell office:value-type="float" office:value="263" table:style-name="ce9">
            <text:p>263</text:p>
          </table:table-cell>
          <table:table-cell office:value-type="float" office:value="191" table:style-name="ce9">
            <text:p>191</text:p>
          </table:table-cell>
          <table:table-cell office:value-type="float" office:value="7239" table:style-name="ce9">
            <text:p>7239</text:p>
          </table:table-cell>
          <table:table-cell office:value-type="float" office:value="202" table:style-name="ce9">
            <text:p>202</text:p>
          </table:table-cell>
          <table:table-cell office:value-type="float" office:value="7502" table:formula="of:=SUM([.G355]+[.E355])" table:style-name="ce15">
            <text:p>7502</text:p>
          </table:table-cell>
          <table:table-cell office:value-type="float" office:value="-11" table:formula="of:=[.F355]-[.H355]" table:style-name="ce15">
            <text:p>-11</text:p>
          </table:table-cell>
          <table:table-cell office:value-type="percentage" office:value="1.3329778725673153E-4" table:formula="of:=([.I356]-[.I355])/[.I355]" table:style-name="ce16">
            <text:p>0%</text:p>
          </table:table-cell>
          <table:table-cell office:value-type="string" office:string-value="Valid" table:formula="of:=IF([.F355]&lt;=[.E355]; &quot;Valid&quot;; &quot;Invalid&quot;)" table:style-name="ce17">
            <text:p>Valid</text:p>
          </table:table-cell>
          <table:table-cell office:value-type="string" office:string-value="Valid" table:formula="of:=IF([.H355]&lt;=[.G355]; &quot;Valid&quot;; &quot;Invalid&quot;)" table:style-name="ce17">
            <text:p>Valid</text:p>
          </table:table-cell>
          <table:table-cell office:value-type="string" office:string-value="Stable/Reducing" table:formula="of:=IF([.J355]&gt;0; &quot;Increasing Pressure&quot;; &quot;Stable/Reducing&quot;)" table:style-name="ce18">
            <text:p>Stable/Reducing</text:p>
          </table:table-cell>
          <table:table-cell office:value-type="float" office:value="1.0575916230366491" table:formula="of:=IFERROR([.H355]/[.F355]; 0)" table:style-name="ce17">
            <text:p>1.057591623</text:p>
          </table:table-cell>
          <table:table-cell office:value-type="float" office:value="7242" table:formula="of:=AVERAGE([.I355:.I361])" table:style-name="ce15">
            <text:p>7242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6-26T00:00:00" table:style-name="ce14">
            <text:p>26-06-2024</text:p>
          </table:table-cell>
          <table:table-cell office:value-type="string" office:string-value="June" table:formula="of:=TEXT([.A356]; &quot;mmmm&quot;)" table:style-name="ce14">
            <text:p>June</text:p>
          </table:table-cell>
          <table:table-cell office:value-type="string" office:string-value="2024-06" table:formula="of:=TEXT([.A356]; &quot;yyyy-mm&quot;)" table:style-name="ce14">
            <text:p>2024-06</text:p>
          </table:table-cell>
          <table:table-cell office:value-type="float" office:value="132" table:style-name="ce9">
            <text:p>132</text:p>
          </table:table-cell>
          <table:table-cell office:value-type="float" office:value="235" table:style-name="ce9">
            <text:p>235</text:p>
          </table:table-cell>
          <table:table-cell office:value-type="float" office:value="197" table:style-name="ce9">
            <text:p>197</text:p>
          </table:table-cell>
          <table:table-cell office:value-type="float" office:value="7268" table:style-name="ce9">
            <text:p>7268</text:p>
          </table:table-cell>
          <table:table-cell office:value-type="float" office:value="187" table:style-name="ce9">
            <text:p>187</text:p>
          </table:table-cell>
          <table:table-cell office:value-type="float" office:value="7503" table:formula="of:=SUM([.G356]+[.E356])" table:style-name="ce15">
            <text:p>7503</text:p>
          </table:table-cell>
          <table:table-cell office:value-type="float" office:value="10" table:formula="of:=[.F356]-[.H356]" table:style-name="ce15">
            <text:p>10</text:p>
          </table:table-cell>
          <table:table-cell office:value-type="percentage" office:value="-6.2641610022657604E-3" table:formula="of:=([.I357]-[.I356])/[.I356]" table:style-name="ce16">
            <text:p>-1%</text:p>
          </table:table-cell>
          <table:table-cell office:value-type="string" office:string-value="Valid" table:formula="of:=IF([.F356]&lt;=[.E356]; &quot;Valid&quot;; &quot;Invalid&quot;)" table:style-name="ce17">
            <text:p>Valid</text:p>
          </table:table-cell>
          <table:table-cell office:value-type="string" office:string-value="Valid" table:formula="of:=IF([.H356]&lt;=[.G356]; &quot;Valid&quot;; &quot;Invalid&quot;)" table:style-name="ce17">
            <text:p>Valid</text:p>
          </table:table-cell>
          <table:table-cell office:value-type="string" office:string-value="Increasing Pressure" table:formula="of:=IF([.J356]&gt;0; &quot;Increasing Pressure&quot;; &quot;Stable/Reducing&quot;)" table:style-name="ce18">
            <text:p>Increasing Pressure</text:p>
          </table:table-cell>
          <table:table-cell office:value-type="float" office:value="0.949238578680203" table:formula="of:=IFERROR([.H356]/[.F356]; 0)" table:style-name="ce17">
            <text:p>0.949238579</text:p>
          </table:table-cell>
          <table:table-cell office:value-type="float" office:value="7135.8571428571431" table:formula="of:=AVERAGE([.I356:.I362])" table:style-name="ce15">
            <text:p>7136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6-27T00:00:00" table:style-name="ce14">
            <text:p>27-06-2024</text:p>
          </table:table-cell>
          <table:table-cell office:value-type="string" office:string-value="June" table:formula="of:=TEXT([.A357]; &quot;mmmm&quot;)" table:style-name="ce14">
            <text:p>June</text:p>
          </table:table-cell>
          <table:table-cell office:value-type="string" office:string-value="2024-06" table:formula="of:=TEXT([.A357]; &quot;yyyy-mm&quot;)" table:style-name="ce14">
            <text:p>2024-06</text:p>
          </table:table-cell>
          <table:table-cell office:value-type="float" office:value="174" table:style-name="ce9">
            <text:p>174</text:p>
          </table:table-cell>
          <table:table-cell office:value-type="float" office:value="208" table:style-name="ce9">
            <text:p>208</text:p>
          </table:table-cell>
          <table:table-cell office:value-type="float" office:value="256" table:style-name="ce9">
            <text:p>256</text:p>
          </table:table-cell>
          <table:table-cell office:value-type="float" office:value="7248" table:style-name="ce9">
            <text:p>7248</text:p>
          </table:table-cell>
          <table:table-cell office:value-type="float" office:value="268" table:style-name="ce9">
            <text:p>268</text:p>
          </table:table-cell>
          <table:table-cell office:value-type="float" office:value="7456" table:formula="of:=SUM([.G357]+[.E357])" table:style-name="ce15">
            <text:p>7456</text:p>
          </table:table-cell>
          <table:table-cell office:value-type="float" office:value="-12" table:formula="of:=[.F357]-[.H357]" table:style-name="ce15">
            <text:p>-12</text:p>
          </table:table-cell>
          <table:table-cell office:value-type="percentage" office:value="-4.7210300429184553E-2" table:formula="of:=([.I358]-[.I357])/[.I357]" table:style-name="ce16">
            <text:p>-5%</text:p>
          </table:table-cell>
          <table:table-cell office:value-type="string" office:string-value="Invalid" table:formula="of:=IF([.F357]&lt;=[.E357]; &quot;Valid&quot;; &quot;Invalid&quot;)" table:style-name="ce17">
            <text:p>Invalid</text:p>
          </table:table-cell>
          <table:table-cell office:value-type="string" office:string-value="Valid" table:formula="of:=IF([.H357]&lt;=[.G357]; &quot;Valid&quot;; &quot;Invalid&quot;)" table:style-name="ce17">
            <text:p>Valid</text:p>
          </table:table-cell>
          <table:table-cell office:value-type="string" office:string-value="Stable/Reducing" table:formula="of:=IF([.J357]&gt;0; &quot;Increasing Pressure&quot;; &quot;Stable/Reducing&quot;)" table:style-name="ce18">
            <text:p>Stable/Reducing</text:p>
          </table:table-cell>
          <table:table-cell office:value-type="float" office:value="1.046875" table:formula="of:=IFERROR([.H357]/[.F357]; 0)" table:style-name="ce17">
            <text:p>1.046875</text:p>
          </table:table-cell>
          <table:table-cell office:value-type="float" office:value="7034" table:formula="of:=AVERAGE([.I357:.I363])" table:style-name="ce15">
            <text:p>7034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6-30T00:00:00" table:style-name="ce14">
            <text:p>30-06-2024</text:p>
          </table:table-cell>
          <table:table-cell office:value-type="string" office:string-value="June" table:formula="of:=TEXT([.A358]; &quot;mmmm&quot;)" table:style-name="ce14">
            <text:p>June</text:p>
          </table:table-cell>
          <table:table-cell office:value-type="string" office:string-value="2024-06" table:formula="of:=TEXT([.A358]; &quot;yyyy-mm&quot;)" table:style-name="ce14">
            <text:p>2024-06</text:p>
          </table:table-cell>
          <table:table-cell office:value-type="float" office:value="123" table:style-name="ce9">
            <text:p>123</text:p>
          </table:table-cell>
          <table:table-cell office:value-type="float" office:value="230" table:style-name="ce9">
            <text:p>230</text:p>
          </table:table-cell>
          <table:table-cell office:value-type="float" office:value="167" table:style-name="ce9">
            <text:p>167</text:p>
          </table:table-cell>
          <table:table-cell office:value-type="float" office:value="6874" table:style-name="ce9">
            <text:p>6874</text:p>
          </table:table-cell>
          <table:table-cell office:value-type="float" office:value="273" table:style-name="ce9">
            <text:p>273</text:p>
          </table:table-cell>
          <table:table-cell office:value-type="float" office:value="7104" table:formula="of:=SUM([.G358]+[.E358])" table:style-name="ce15">
            <text:p>7104</text:p>
          </table:table-cell>
          <table:table-cell office:value-type="float" office:value="-106" table:formula="of:=[.F358]-[.H358]" table:style-name="ce15">
            <text:p>-106</text:p>
          </table:table-cell>
          <table:table-cell office:value-type="percentage" office:value="-6.475225225225225E-3" table:formula="of:=([.I359]-[.I358])/[.I358]" table:style-name="ce16">
            <text:p>-1%</text:p>
          </table:table-cell>
          <table:table-cell office:value-type="string" office:string-value="Valid" table:formula="of:=IF([.F358]&lt;=[.E358]; &quot;Valid&quot;; &quot;Invalid&quot;)" table:style-name="ce17">
            <text:p>Valid</text:p>
          </table:table-cell>
          <table:table-cell office:value-type="string" office:string-value="Valid" table:formula="of:=IF([.H358]&lt;=[.G358]; &quot;Valid&quot;; &quot;Invalid&quot;)" table:style-name="ce17">
            <text:p>Valid</text:p>
          </table:table-cell>
          <table:table-cell office:value-type="string" office:string-value="Stable/Reducing" table:formula="of:=IF([.J358]&gt;0; &quot;Increasing Pressure&quot;; &quot;Stable/Reducing&quot;)" table:style-name="ce18">
            <text:p>Stable/Reducing</text:p>
          </table:table-cell>
          <table:table-cell office:value-type="float" office:value="1.6347305389221556" table:formula="of:=IFERROR([.H358]/[.F358]; 0)" table:style-name="ce17">
            <text:p>1.634730539</text:p>
          </table:table-cell>
          <table:table-cell office:value-type="float" office:value="6944.8571428571431" table:formula="of:=AVERAGE([.I358:.I364])" table:style-name="ce15">
            <text:p>6945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7-01T00:00:00" table:style-name="ce14">
            <text:p>01-07-2024</text:p>
          </table:table-cell>
          <table:table-cell office:value-type="string" office:string-value="July" table:formula="of:=TEXT([.A359]; &quot;mmmm&quot;)" table:style-name="ce14">
            <text:p>July</text:p>
          </table:table-cell>
          <table:table-cell office:value-type="string" office:string-value="2024-07" table:formula="of:=TEXT([.A359]; &quot;yyyy-mm&quot;)" table:style-name="ce14">
            <text:p>2024-07</text:p>
          </table:table-cell>
          <table:table-cell office:value-type="float" office:value="123" table:style-name="ce9">
            <text:p>123</text:p>
          </table:table-cell>
          <table:table-cell office:value-type="float" office:value="233" table:style-name="ce9">
            <text:p>233</text:p>
          </table:table-cell>
          <table:table-cell office:value-type="float" office:value="159" table:style-name="ce9">
            <text:p>159</text:p>
          </table:table-cell>
          <table:table-cell office:value-type="float" office:value="6825" table:style-name="ce9">
            <text:p>6825</text:p>
          </table:table-cell>
          <table:table-cell office:value-type="float" office:value="229" table:style-name="ce9">
            <text:p>229</text:p>
          </table:table-cell>
          <table:table-cell office:value-type="float" office:value="7058" table:formula="of:=SUM([.G359]+[.E359])" table:style-name="ce15">
            <text:p>7058</text:p>
          </table:table-cell>
          <table:table-cell office:value-type="float" office:value="-70" table:formula="of:=[.F359]-[.H359]" table:style-name="ce15">
            <text:p>-70</text:p>
          </table:table-cell>
          <table:table-cell office:value-type="percentage" office:value="-4.2504958911873051E-4" table:formula="of:=([.I360]-[.I359])/[.I359]" table:style-name="ce16">
            <text:p>0%</text:p>
          </table:table-cell>
          <table:table-cell office:value-type="string" office:string-value="Valid" table:formula="of:=IF([.F359]&lt;=[.E359]; &quot;Valid&quot;; &quot;Invalid&quot;)" table:style-name="ce17">
            <text:p>Valid</text:p>
          </table:table-cell>
          <table:table-cell office:value-type="string" office:string-value="Valid" table:formula="of:=IF([.H359]&lt;=[.G359]; &quot;Valid&quot;; &quot;Invalid&quot;)" table:style-name="ce17">
            <text:p>Valid</text:p>
          </table:table-cell>
          <table:table-cell office:value-type="string" office:string-value="Stable/Reducing" table:formula="of:=IF([.J359]&gt;0; &quot;Increasing Pressure&quot;; &quot;Stable/Reducing&quot;)" table:style-name="ce18">
            <text:p>Stable/Reducing</text:p>
          </table:table-cell>
          <table:table-cell office:value-type="float" office:value="1.4402515723270439" table:formula="of:=IFERROR([.H359]/[.F359]; 0)" table:style-name="ce17">
            <text:p>1.440251572</text:p>
          </table:table-cell>
          <table:table-cell office:value-type="float" office:value="6902.2857142857147" table:formula="of:=AVERAGE([.I359:.I365])" table:style-name="ce15">
            <text:p>6902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7-02T00:00:00" table:style-name="ce14">
            <text:p>02-07-2024</text:p>
          </table:table-cell>
          <table:table-cell office:value-type="string" office:string-value="July" table:formula="of:=TEXT([.A360]; &quot;mmmm&quot;)" table:style-name="ce14">
            <text:p>July</text:p>
          </table:table-cell>
          <table:table-cell office:value-type="string" office:string-value="2024-07" table:formula="of:=TEXT([.A360]; &quot;yyyy-mm&quot;)" table:style-name="ce14">
            <text:p>2024-07</text:p>
          </table:table-cell>
          <table:table-cell office:value-type="float" office:value="141" table:style-name="ce9">
            <text:p>141</text:p>
          </table:table-cell>
          <table:table-cell office:value-type="float" office:value="232" table:style-name="ce9">
            <text:p>232</text:p>
          </table:table-cell>
          <table:table-cell office:value-type="float" office:value="188" table:style-name="ce9">
            <text:p>188</text:p>
          </table:table-cell>
          <table:table-cell office:value-type="float" office:value="6823" table:style-name="ce9">
            <text:p>6823</text:p>
          </table:table-cell>
          <table:table-cell office:value-type="float" office:value="184" table:style-name="ce9">
            <text:p>184</text:p>
          </table:table-cell>
          <table:table-cell office:value-type="float" office:value="7055" table:formula="of:=SUM([.G360]+[.E360])" table:style-name="ce15">
            <text:p>7055</text:p>
          </table:table-cell>
          <table:table-cell office:value-type="float" office:value="4" table:formula="of:=[.F360]-[.H360]" table:style-name="ce15">
            <text:p>4</text:p>
          </table:table-cell>
          <table:table-cell office:value-type="percentage" office:value="-5.5279943302622252E-3" table:formula="of:=([.I361]-[.I360])/[.I360]" table:style-name="ce16">
            <text:p>-1%</text:p>
          </table:table-cell>
          <table:table-cell office:value-type="string" office:string-value="Valid" table:formula="of:=IF([.F360]&lt;=[.E360]; &quot;Valid&quot;; &quot;Invalid&quot;)" table:style-name="ce17">
            <text:p>Valid</text:p>
          </table:table-cell>
          <table:table-cell office:value-type="string" office:string-value="Valid" table:formula="of:=IF([.H360]&lt;=[.G360]; &quot;Valid&quot;; &quot;Invalid&quot;)" table:style-name="ce17">
            <text:p>Valid</text:p>
          </table:table-cell>
          <table:table-cell office:value-type="string" office:string-value="Increasing Pressure" table:formula="of:=IF([.J360]&gt;0; &quot;Increasing Pressure&quot;; &quot;Stable/Reducing&quot;)" table:style-name="ce18">
            <text:p>Increasing Pressure</text:p>
          </table:table-cell>
          <table:table-cell office:value-type="float" office:value="0.97872340425531912" table:formula="of:=IFERROR([.H360]/[.F360]; 0)" table:style-name="ce17">
            <text:p>0.978723404</text:p>
          </table:table-cell>
          <table:table-cell office:value-type="float" office:value="6867.7142857142853" table:formula="of:=AVERAGE([.I360:.I366])" table:style-name="ce15">
            <text:p>6868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7-04T00:00:00" table:style-name="ce14">
            <text:p>04-07-2024</text:p>
          </table:table-cell>
          <table:table-cell office:value-type="string" office:string-value="July" table:formula="of:=TEXT([.A361]; &quot;mmmm&quot;)" table:style-name="ce14">
            <text:p>July</text:p>
          </table:table-cell>
          <table:table-cell office:value-type="string" office:string-value="2024-07" table:formula="of:=TEXT([.A361]; &quot;yyyy-mm&quot;)" table:style-name="ce14">
            <text:p>2024-07</text:p>
          </table:table-cell>
          <table:table-cell office:value-type="float" office:value="158" table:style-name="ce9">
            <text:p>158</text:p>
          </table:table-cell>
          <table:table-cell office:value-type="float" office:value="226" table:style-name="ce9">
            <text:p>226</text:p>
          </table:table-cell>
          <table:table-cell office:value-type="float" office:value="191" table:style-name="ce9">
            <text:p>191</text:p>
          </table:table-cell>
          <table:table-cell office:value-type="float" office:value="6790" table:style-name="ce9">
            <text:p>6790</text:p>
          </table:table-cell>
          <table:table-cell office:value-type="float" office:value="225" table:style-name="ce9">
            <text:p>225</text:p>
          </table:table-cell>
          <table:table-cell office:value-type="float" office:value="7016" table:formula="of:=SUM([.G361]+[.E361])" table:style-name="ce15">
            <text:p>7016</text:p>
          </table:table-cell>
          <table:table-cell office:value-type="float" office:value="-34" table:formula="of:=[.F361]-[.H361]" table:style-name="ce15">
            <text:p>-34</text:p>
          </table:table-cell>
          <table:table-cell office:value-type="percentage" office:value="-3.6630558722919045E-2" table:formula="of:=([.I362]-[.I361])/[.I361]" table:style-name="ce16">
            <text:p>-4%</text:p>
          </table:table-cell>
          <table:table-cell office:value-type="string" office:string-value="Valid" table:formula="of:=IF([.F361]&lt;=[.E361]; &quot;Valid&quot;; &quot;Invalid&quot;)" table:style-name="ce17">
            <text:p>Valid</text:p>
          </table:table-cell>
          <table:table-cell office:value-type="string" office:string-value="Valid" table:formula="of:=IF([.H361]&lt;=[.G361]; &quot;Valid&quot;; &quot;Invalid&quot;)" table:style-name="ce17">
            <text:p>Valid</text:p>
          </table:table-cell>
          <table:table-cell office:value-type="string" office:string-value="Stable/Reducing" table:formula="of:=IF([.J361]&gt;0; &quot;Increasing Pressure&quot;; &quot;Stable/Reducing&quot;)" table:style-name="ce18">
            <text:p>Stable/Reducing</text:p>
          </table:table-cell>
          <table:table-cell office:value-type="float" office:value="1.1780104712041886" table:formula="of:=IFERROR([.H361]/[.F361]; 0)" table:style-name="ce17">
            <text:p>1.178010471</text:p>
          </table:table-cell>
          <table:table-cell office:value-type="float" office:value="6787.8571428571431" table:formula="of:=AVERAGE([.I361:.I367])" table:style-name="ce15">
            <text:p>6788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7-07T00:00:00" table:style-name="ce14">
            <text:p>07-07-2024</text:p>
          </table:table-cell>
          <table:table-cell office:value-type="string" office:string-value="July" table:formula="of:=TEXT([.A362]; &quot;mmmm&quot;)" table:style-name="ce14">
            <text:p>July</text:p>
          </table:table-cell>
          <table:table-cell office:value-type="string" office:string-value="2024-07" table:formula="of:=TEXT([.A362]; &quot;yyyy-mm&quot;)" table:style-name="ce14">
            <text:p>2024-07</text:p>
          </table:table-cell>
          <table:table-cell office:value-type="float" office:value="96" table:style-name="ce9">
            <text:p>96</text:p>
          </table:table-cell>
          <table:table-cell office:value-type="float" office:value="160" table:style-name="ce9">
            <text:p>160</text:p>
          </table:table-cell>
          <table:table-cell office:value-type="float" office:value="233" table:style-name="ce9">
            <text:p>233</text:p>
          </table:table-cell>
          <table:table-cell office:value-type="float" office:value="6599" table:style-name="ce9">
            <text:p>6599</text:p>
          </table:table-cell>
          <table:table-cell office:value-type="float" office:value="213" table:style-name="ce9">
            <text:p>213</text:p>
          </table:table-cell>
          <table:table-cell office:value-type="float" office:value="6759" table:formula="of:=SUM([.G362]+[.E362])" table:style-name="ce15">
            <text:p>6759</text:p>
          </table:table-cell>
          <table:table-cell office:value-type="float" office:value="20" table:formula="of:=[.F362]-[.H362]" table:style-name="ce15">
            <text:p>20</text:p>
          </table:table-cell>
          <table:table-cell office:value-type="percentage" office:value="4.5864772895398724E-3" table:formula="of:=([.I363]-[.I362])/[.I362]" table:style-name="ce16">
            <text:p>0%</text:p>
          </table:table-cell>
          <table:table-cell office:value-type="string" office:string-value="Invalid" table:formula="of:=IF([.F362]&lt;=[.E362]; &quot;Valid&quot;; &quot;Invalid&quot;)" table:style-name="ce17">
            <text:p>Invalid</text:p>
          </table:table-cell>
          <table:table-cell office:value-type="string" office:string-value="Valid" table:formula="of:=IF([.H362]&lt;=[.G362]; &quot;Valid&quot;; &quot;Invalid&quot;)" table:style-name="ce17">
            <text:p>Valid</text:p>
          </table:table-cell>
          <table:table-cell office:value-type="string" office:string-value="Increasing Pressure" table:formula="of:=IF([.J362]&gt;0; &quot;Increasing Pressure&quot;; &quot;Stable/Reducing&quot;)" table:style-name="ce18">
            <text:p>Increasing Pressure</text:p>
          </table:table-cell>
          <table:table-cell office:value-type="float" office:value="0.91416309012875541" table:formula="of:=IFERROR([.H362]/[.F362]; 0)" table:style-name="ce17">
            <text:p>0.91416309</text:p>
          </table:table-cell>
          <table:table-cell office:value-type="float" office:value="6709.5714285714284" table:formula="of:=AVERAGE([.I362:.I368])" table:style-name="ce15">
            <text:p>6710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7-08T00:00:00" table:style-name="ce14">
            <text:p>08-07-2024</text:p>
          </table:table-cell>
          <table:table-cell office:value-type="string" office:string-value="July" table:formula="of:=TEXT([.A363]; &quot;mmmm&quot;)" table:style-name="ce14">
            <text:p>July</text:p>
          </table:table-cell>
          <table:table-cell office:value-type="string" office:string-value="2024-07" table:formula="of:=TEXT([.A363]; &quot;yyyy-mm&quot;)" table:style-name="ce14">
            <text:p>2024-07</text:p>
          </table:table-cell>
          <table:table-cell office:value-type="float" office:value="141" table:style-name="ce9">
            <text:p>141</text:p>
          </table:table-cell>
          <table:table-cell office:value-type="float" office:value="173" table:style-name="ce9">
            <text:p>173</text:p>
          </table:table-cell>
          <table:table-cell office:value-type="float" office:value="129" table:style-name="ce9">
            <text:p>129</text:p>
          </table:table-cell>
          <table:table-cell office:value-type="float" office:value="6617" table:style-name="ce9">
            <text:p>6617</text:p>
          </table:table-cell>
          <table:table-cell office:value-type="float" office:value="123" table:style-name="ce9">
            <text:p>123</text:p>
          </table:table-cell>
          <table:table-cell office:value-type="float" office:value="6790" table:formula="of:=SUM([.G363]+[.E363])" table:style-name="ce15">
            <text:p>6790</text:p>
          </table:table-cell>
          <table:table-cell office:value-type="float" office:value="6" table:formula="of:=[.F363]-[.H363]" table:style-name="ce15">
            <text:p>6</text:p>
          </table:table-cell>
          <table:table-cell office:value-type="percentage" office:value="6.1855670103092781E-3" table:formula="of:=([.I364]-[.I363])/[.I363]" table:style-name="ce16">
            <text:p>1%</text:p>
          </table:table-cell>
          <table:table-cell office:value-type="string" office:string-value="Valid" table:formula="of:=IF([.F363]&lt;=[.E363]; &quot;Valid&quot;; &quot;Invalid&quot;)" table:style-name="ce17">
            <text:p>Valid</text:p>
          </table:table-cell>
          <table:table-cell office:value-type="string" office:string-value="Valid" table:formula="of:=IF([.H363]&lt;=[.G363]; &quot;Valid&quot;; &quot;Invalid&quot;)" table:style-name="ce17">
            <text:p>Valid</text:p>
          </table:table-cell>
          <table:table-cell office:value-type="string" office:string-value="Increasing Pressure" table:formula="of:=IF([.J363]&gt;0; &quot;Increasing Pressure&quot;; &quot;Stable/Reducing&quot;)" table:style-name="ce18">
            <text:p>Increasing Pressure</text:p>
          </table:table-cell>
          <table:table-cell office:value-type="float" office:value="0.95348837209302328" table:formula="of:=IFERROR([.H363]/[.F363]; 0)" table:style-name="ce17">
            <text:p>0.953488372</text:p>
          </table:table-cell>
          <table:table-cell office:value-type="float" office:value="6670.4285714285716" table:formula="of:=AVERAGE([.I363:.I369])" table:style-name="ce15">
            <text:p>6670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7-09T00:00:00" table:style-name="ce14">
            <text:p>09-07-2024</text:p>
          </table:table-cell>
          <table:table-cell office:value-type="string" office:string-value="July" table:formula="of:=TEXT([.A364]; &quot;mmmm&quot;)" table:style-name="ce14">
            <text:p>July</text:p>
          </table:table-cell>
          <table:table-cell office:value-type="string" office:string-value="2024-07" table:formula="of:=TEXT([.A364]; &quot;yyyy-mm&quot;)" table:style-name="ce14">
            <text:p>2024-07</text:p>
          </table:table-cell>
          <table:table-cell office:value-type="float" office:value="116" table:style-name="ce9">
            <text:p>116</text:p>
          </table:table-cell>
          <table:table-cell office:value-type="float" office:value="181" table:style-name="ce9">
            <text:p>181</text:p>
          </table:table-cell>
          <table:table-cell office:value-type="float" office:value="182" table:style-name="ce9">
            <text:p>182</text:p>
          </table:table-cell>
          <table:table-cell office:value-type="float" office:value="6651" table:style-name="ce9">
            <text:p>6651</text:p>
          </table:table-cell>
          <table:table-cell office:value-type="float" office:value="130" table:style-name="ce9">
            <text:p>130</text:p>
          </table:table-cell>
          <table:table-cell office:value-type="float" office:value="6832" table:formula="of:=SUM([.G364]+[.E364])" table:style-name="ce15">
            <text:p>6832</text:p>
          </table:table-cell>
          <table:table-cell office:value-type="float" office:value="52" table:formula="of:=[.F364]-[.H364]" table:style-name="ce15">
            <text:p>52</text:p>
          </table:table-cell>
          <table:table-cell office:value-type="percentage" office:value="-3.8056206088992973E-3" table:formula="of:=([.I365]-[.I364])/[.I364]" table:style-name="ce16">
            <text:p>0%</text:p>
          </table:table-cell>
          <table:table-cell office:value-type="string" office:string-value="Invalid" table:formula="of:=IF([.F364]&lt;=[.E364]; &quot;Valid&quot;; &quot;Invalid&quot;)" table:style-name="ce17">
            <text:p>Invalid</text:p>
          </table:table-cell>
          <table:table-cell office:value-type="string" office:string-value="Valid" table:formula="of:=IF([.H364]&lt;=[.G364]; &quot;Valid&quot;; &quot;Invalid&quot;)" table:style-name="ce17">
            <text:p>Valid</text:p>
          </table:table-cell>
          <table:table-cell office:value-type="string" office:string-value="Increasing Pressure" table:formula="of:=IF([.J364]&gt;0; &quot;Increasing Pressure&quot;; &quot;Stable/Reducing&quot;)" table:style-name="ce18">
            <text:p>Increasing Pressure</text:p>
          </table:table-cell>
          <table:table-cell office:value-type="float" office:value="0.7142857142857143" table:formula="of:=IFERROR([.H364]/[.F364]; 0)" table:style-name="ce17">
            <text:p>0.714285714</text:p>
          </table:table-cell>
          <table:table-cell office:value-type="float" office:value="6622.7142857142853" table:formula="of:=AVERAGE([.I364:.I370])" table:style-name="ce15">
            <text:p>6623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7-10T00:00:00" table:style-name="ce14">
            <text:p>10-07-2024</text:p>
          </table:table-cell>
          <table:table-cell office:value-type="string" office:string-value="July" table:formula="of:=TEXT([.A365]; &quot;mmmm&quot;)" table:style-name="ce14">
            <text:p>July</text:p>
          </table:table-cell>
          <table:table-cell office:value-type="string" office:string-value="2024-07" table:formula="of:=TEXT([.A365]; &quot;yyyy-mm&quot;)" table:style-name="ce14">
            <text:p>2024-07</text:p>
          </table:table-cell>
          <table:table-cell office:value-type="float" office:value="150" table:style-name="ce9">
            <text:p>150</text:p>
          </table:table-cell>
          <table:table-cell office:value-type="float" office:value="157" table:style-name="ce9">
            <text:p>157</text:p>
          </table:table-cell>
          <table:table-cell office:value-type="float" office:value="201" table:style-name="ce9">
            <text:p>201</text:p>
          </table:table-cell>
          <table:table-cell office:value-type="float" office:value="6649" table:style-name="ce9">
            <text:p>6649</text:p>
          </table:table-cell>
          <table:table-cell office:value-type="float" office:value="177" table:style-name="ce9">
            <text:p>177</text:p>
          </table:table-cell>
          <table:table-cell office:value-type="float" office:value="6806" table:formula="of:=SUM([.G365]+[.E365])" table:style-name="ce15">
            <text:p>6806</text:p>
          </table:table-cell>
          <table:table-cell office:value-type="float" office:value="24" table:formula="of:=[.F365]-[.H365]" table:style-name="ce15">
            <text:p>24</text:p>
          </table:table-cell>
          <table:table-cell office:value-type="percentage" office:value="1.4692918013517484E-3" table:formula="of:=([.I366]-[.I365])/[.I365]" table:style-name="ce16">
            <text:p>0%</text:p>
          </table:table-cell>
          <table:table-cell office:value-type="string" office:string-value="Invalid" table:formula="of:=IF([.F365]&lt;=[.E365]; &quot;Valid&quot;; &quot;Invalid&quot;)" table:style-name="ce17">
            <text:p>Invalid</text:p>
          </table:table-cell>
          <table:table-cell office:value-type="string" office:string-value="Valid" table:formula="of:=IF([.H365]&lt;=[.G365]; &quot;Valid&quot;; &quot;Invalid&quot;)" table:style-name="ce17">
            <text:p>Valid</text:p>
          </table:table-cell>
          <table:table-cell office:value-type="string" office:string-value="Increasing Pressure" table:formula="of:=IF([.J365]&gt;0; &quot;Increasing Pressure&quot;; &quot;Stable/Reducing&quot;)" table:style-name="ce18">
            <text:p>Increasing Pressure</text:p>
          </table:table-cell>
          <table:table-cell office:value-type="float" office:value="0.88059701492537312" table:formula="of:=IFERROR([.H365]/[.F365]; 0)" table:style-name="ce17">
            <text:p>0.880597015</text:p>
          </table:table-cell>
          <table:table-cell office:value-type="float" office:value="6540.1428571428569" table:formula="of:=AVERAGE([.I365:.I371])" table:style-name="ce15">
            <text:p>6540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7-11T00:00:00" table:style-name="ce14">
            <text:p>11-07-2024</text:p>
          </table:table-cell>
          <table:table-cell office:value-type="string" office:string-value="July" table:formula="of:=TEXT([.A366]; &quot;mmmm&quot;)" table:style-name="ce14">
            <text:p>July</text:p>
          </table:table-cell>
          <table:table-cell office:value-type="string" office:string-value="2024-07" table:formula="of:=TEXT([.A366]; &quot;yyyy-mm&quot;)" table:style-name="ce14">
            <text:p>2024-07</text:p>
          </table:table-cell>
          <table:table-cell office:value-type="float" office:value="80" table:style-name="ce9">
            <text:p>80</text:p>
          </table:table-cell>
          <table:table-cell office:value-type="float" office:value="176" table:style-name="ce9">
            <text:p>176</text:p>
          </table:table-cell>
          <table:table-cell office:value-type="float" office:value="125" table:style-name="ce9">
            <text:p>125</text:p>
          </table:table-cell>
          <table:table-cell office:value-type="float" office:value="6640" table:style-name="ce9">
            <text:p>6640</text:p>
          </table:table-cell>
          <table:table-cell office:value-type="float" office:value="197" table:style-name="ce9">
            <text:p>197</text:p>
          </table:table-cell>
          <table:table-cell office:value-type="float" office:value="6816" table:formula="of:=SUM([.G366]+[.E366])" table:style-name="ce15">
            <text:p>6816</text:p>
          </table:table-cell>
          <table:table-cell office:value-type="float" office:value="-72" table:formula="of:=[.F366]-[.H366]" table:style-name="ce15">
            <text:p>-72</text:p>
          </table:table-cell>
          <table:table-cell office:value-type="percentage" office:value="-4.6948356807511735E-2" table:formula="of:=([.I367]-[.I366])/[.I366]" table:style-name="ce16">
            <text:p>-5%</text:p>
          </table:table-cell>
          <table:table-cell office:value-type="string" office:string-value="Valid" table:formula="of:=IF([.F366]&lt;=[.E366]; &quot;Valid&quot;; &quot;Invalid&quot;)" table:style-name="ce17">
            <text:p>Valid</text:p>
          </table:table-cell>
          <table:table-cell office:value-type="string" office:string-value="Valid" table:formula="of:=IF([.H366]&lt;=[.G366]; &quot;Valid&quot;; &quot;Invalid&quot;)" table:style-name="ce17">
            <text:p>Valid</text:p>
          </table:table-cell>
          <table:table-cell office:value-type="string" office:string-value="Stable/Reducing" table:formula="of:=IF([.J366]&gt;0; &quot;Increasing Pressure&quot;; &quot;Stable/Reducing&quot;)" table:style-name="ce18">
            <text:p>Stable/Reducing</text:p>
          </table:table-cell>
          <table:table-cell office:value-type="float" office:value="1.5760000000000001" table:formula="of:=IFERROR([.H366]/[.F366]; 0)" table:style-name="ce17">
            <text:p>1.576</text:p>
          </table:table-cell>
          <table:table-cell office:value-type="float" office:value="6452.2857142857147" table:formula="of:=AVERAGE([.I366:.I372])" table:style-name="ce15">
            <text:p>6452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7-14T00:00:00" table:style-name="ce14">
            <text:p>14-07-2024</text:p>
          </table:table-cell>
          <table:table-cell office:value-type="string" office:string-value="July" table:formula="of:=TEXT([.A367]; &quot;mmmm&quot;)" table:style-name="ce14">
            <text:p>July</text:p>
          </table:table-cell>
          <table:table-cell office:value-type="string" office:string-value="2024-07" table:formula="of:=TEXT([.A367]; &quot;yyyy-mm&quot;)" table:style-name="ce14">
            <text:p>2024-07</text:p>
          </table:table-cell>
          <table:table-cell office:value-type="float" office:value="116" table:style-name="ce9">
            <text:p>116</text:p>
          </table:table-cell>
          <table:table-cell office:value-type="float" office:value="188" table:style-name="ce9">
            <text:p>188</text:p>
          </table:table-cell>
          <table:table-cell office:value-type="float" office:value="164" table:style-name="ce9">
            <text:p>164</text:p>
          </table:table-cell>
          <table:table-cell office:value-type="float" office:value="6308" table:style-name="ce9">
            <text:p>6308</text:p>
          </table:table-cell>
          <table:table-cell office:value-type="float" office:value="237" table:style-name="ce9">
            <text:p>237</text:p>
          </table:table-cell>
          <table:table-cell office:value-type="float" office:value="6496" table:formula="of:=SUM([.G367]+[.E367])" table:style-name="ce15">
            <text:p>6496</text:p>
          </table:table-cell>
          <table:table-cell office:value-type="float" office:value="-73" table:formula="of:=[.F367]-[.H367]" table:style-name="ce15">
            <text:p>-73</text:p>
          </table:table-cell>
          <table:table-cell office:value-type="percentage" office:value="-4.3103448275862068E-3" table:formula="of:=([.I368]-[.I367])/[.I367]" table:style-name="ce16">
            <text:p>0%</text:p>
          </table:table-cell>
          <table:table-cell office:value-type="string" office:string-value="Valid" table:formula="of:=IF([.F367]&lt;=[.E367]; &quot;Valid&quot;; &quot;Invalid&quot;)" table:style-name="ce17">
            <text:p>Valid</text:p>
          </table:table-cell>
          <table:table-cell office:value-type="string" office:string-value="Valid" table:formula="of:=IF([.H367]&lt;=[.G367]; &quot;Valid&quot;; &quot;Invalid&quot;)" table:style-name="ce17">
            <text:p>Valid</text:p>
          </table:table-cell>
          <table:table-cell office:value-type="string" office:string-value="Stable/Reducing" table:formula="of:=IF([.J367]&gt;0; &quot;Increasing Pressure&quot;; &quot;Stable/Reducing&quot;)" table:style-name="ce18">
            <text:p>Stable/Reducing</text:p>
          </table:table-cell>
          <table:table-cell office:value-type="float" office:value="1.4451219512195121" table:formula="of:=IFERROR([.H367]/[.F367]; 0)" table:style-name="ce17">
            <text:p>1.445121951</text:p>
          </table:table-cell>
          <table:table-cell office:value-type="float" office:value="6367.4285714285716" table:formula="of:=AVERAGE([.I367:.I373])" table:style-name="ce15">
            <text:p>6367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7-15T00:00:00" table:style-name="ce14">
            <text:p>15-07-2024</text:p>
          </table:table-cell>
          <table:table-cell office:value-type="string" office:string-value="July" table:formula="of:=TEXT([.A368]; &quot;mmmm&quot;)" table:style-name="ce14">
            <text:p>July</text:p>
          </table:table-cell>
          <table:table-cell office:value-type="string" office:string-value="2024-07" table:formula="of:=TEXT([.A368]; &quot;yyyy-mm&quot;)" table:style-name="ce14">
            <text:p>2024-07</text:p>
          </table:table-cell>
          <table:table-cell office:value-type="float" office:value="105" table:style-name="ce9">
            <text:p>105</text:p>
          </table:table-cell>
          <table:table-cell office:value-type="float" office:value="185" table:style-name="ce9">
            <text:p>185</text:p>
          </table:table-cell>
          <table:table-cell office:value-type="float" office:value="158" table:style-name="ce9">
            <text:p>158</text:p>
          </table:table-cell>
          <table:table-cell office:value-type="float" office:value="6283" table:style-name="ce9">
            <text:p>6283</text:p>
          </table:table-cell>
          <table:table-cell office:value-type="float" office:value="171" table:style-name="ce9">
            <text:p>171</text:p>
          </table:table-cell>
          <table:table-cell office:value-type="float" office:value="6468" table:formula="of:=SUM([.G368]+[.E368])" table:style-name="ce15">
            <text:p>6468</text:p>
          </table:table-cell>
          <table:table-cell office:value-type="float" office:value="-13" table:formula="of:=[.F368]-[.H368]" table:style-name="ce15">
            <text:p>-13</text:p>
          </table:table-cell>
          <table:table-cell office:value-type="percentage" office:value="2.6283240568954853E-3" table:formula="of:=([.I369]-[.I368])/[.I368]" table:style-name="ce16">
            <text:p>0%</text:p>
          </table:table-cell>
          <table:table-cell office:value-type="string" office:string-value="Valid" table:formula="of:=IF([.F368]&lt;=[.E368]; &quot;Valid&quot;; &quot;Invalid&quot;)" table:style-name="ce17">
            <text:p>Valid</text:p>
          </table:table-cell>
          <table:table-cell office:value-type="string" office:string-value="Valid" table:formula="of:=IF([.H368]&lt;=[.G368]; &quot;Valid&quot;; &quot;Invalid&quot;)" table:style-name="ce17">
            <text:p>Valid</text:p>
          </table:table-cell>
          <table:table-cell office:value-type="string" office:string-value="Stable/Reducing" table:formula="of:=IF([.J368]&gt;0; &quot;Increasing Pressure&quot;; &quot;Stable/Reducing&quot;)" table:style-name="ce18">
            <text:p>Stable/Reducing</text:p>
          </table:table-cell>
          <table:table-cell office:value-type="float" office:value="1.0822784810126582" table:formula="of:=IFERROR([.H368]/[.F368]; 0)" table:style-name="ce17">
            <text:p>1.082278481</text:p>
          </table:table-cell>
          <table:table-cell office:value-type="float" office:value="6325" table:formula="of:=AVERAGE([.I368:.I374])" table:style-name="ce15">
            <text:p>6325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7-16T00:00:00" table:style-name="ce14">
            <text:p>16-07-2024</text:p>
          </table:table-cell>
          <table:table-cell office:value-type="string" office:string-value="July" table:formula="of:=TEXT([.A369]; &quot;mmmm&quot;)" table:style-name="ce14">
            <text:p>July</text:p>
          </table:table-cell>
          <table:table-cell office:value-type="string" office:string-value="2024-07" table:formula="of:=TEXT([.A369]; &quot;yyyy-mm&quot;)" table:style-name="ce14">
            <text:p>2024-07</text:p>
          </table:table-cell>
          <table:table-cell office:value-type="float" office:value="136" table:style-name="ce9">
            <text:p>136</text:p>
          </table:table-cell>
          <table:table-cell office:value-type="float" office:value="246" table:style-name="ce9">
            <text:p>246</text:p>
          </table:table-cell>
          <table:table-cell office:value-type="float" office:value="123" table:style-name="ce9">
            <text:p>123</text:p>
          </table:table-cell>
          <table:table-cell office:value-type="float" office:value="6239" table:style-name="ce9">
            <text:p>6239</text:p>
          </table:table-cell>
          <table:table-cell office:value-type="float" office:value="173" table:style-name="ce9">
            <text:p>173</text:p>
          </table:table-cell>
          <table:table-cell office:value-type="float" office:value="6485" table:formula="of:=SUM([.G369]+[.E369])" table:style-name="ce15">
            <text:p>6485</text:p>
          </table:table-cell>
          <table:table-cell office:value-type="float" office:value="-50" table:formula="of:=[.F369]-[.H369]" table:style-name="ce15">
            <text:p>-50</text:p>
          </table:table-cell>
          <table:table-cell office:value-type="percentage" office:value="-4.4718581341557442E-3" table:formula="of:=([.I370]-[.I369])/[.I369]" table:style-name="ce16">
            <text:p>0%</text:p>
          </table:table-cell>
          <table:table-cell office:value-type="string" office:string-value="Valid" table:formula="of:=IF([.F369]&lt;=[.E369]; &quot;Valid&quot;; &quot;Invalid&quot;)" table:style-name="ce17">
            <text:p>Valid</text:p>
          </table:table-cell>
          <table:table-cell office:value-type="string" office:string-value="Valid" table:formula="of:=IF([.H369]&lt;=[.G369]; &quot;Valid&quot;; &quot;Invalid&quot;)" table:style-name="ce17">
            <text:p>Valid</text:p>
          </table:table-cell>
          <table:table-cell office:value-type="string" office:string-value="Stable/Reducing" table:formula="of:=IF([.J369]&gt;0; &quot;Increasing Pressure&quot;; &quot;Stable/Reducing&quot;)" table:style-name="ce18">
            <text:p>Stable/Reducing</text:p>
          </table:table-cell>
          <table:table-cell office:value-type="float" office:value="1.4065040650406504" table:formula="of:=IFERROR([.H369]/[.F369]; 0)" table:style-name="ce17">
            <text:p>1.406504065</text:p>
          </table:table-cell>
          <table:table-cell office:value-type="float" office:value="6279.8571428571431" table:formula="of:=AVERAGE([.I369:.I375])" table:style-name="ce15">
            <text:p>6280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7-17T00:00:00" table:style-name="ce14">
            <text:p>17-07-2024</text:p>
          </table:table-cell>
          <table:table-cell office:value-type="string" office:string-value="July" table:formula="of:=TEXT([.A370]; &quot;mmmm&quot;)" table:style-name="ce14">
            <text:p>July</text:p>
          </table:table-cell>
          <table:table-cell office:value-type="string" office:string-value="2024-07" table:formula="of:=TEXT([.A370]; &quot;yyyy-mm&quot;)" table:style-name="ce14">
            <text:p>2024-07</text:p>
          </table:table-cell>
          <table:table-cell office:value-type="float" office:value="128" table:style-name="ce9">
            <text:p>128</text:p>
          </table:table-cell>
          <table:table-cell office:value-type="float" office:value="228" table:style-name="ce9">
            <text:p>228</text:p>
          </table:table-cell>
          <table:table-cell office:value-type="float" office:value="177" table:style-name="ce9">
            <text:p>177</text:p>
          </table:table-cell>
          <table:table-cell office:value-type="float" office:value="6228" table:style-name="ce9">
            <text:p>6228</text:p>
          </table:table-cell>
          <table:table-cell office:value-type="float" office:value="187" table:style-name="ce9">
            <text:p>187</text:p>
          </table:table-cell>
          <table:table-cell office:value-type="float" office:value="6456" table:formula="of:=SUM([.G370]+[.E370])" table:style-name="ce15">
            <text:p>6456</text:p>
          </table:table-cell>
          <table:table-cell office:value-type="float" office:value="-10" table:formula="of:=[.F370]-[.H370]" table:style-name="ce15">
            <text:p>-10</text:p>
          </table:table-cell>
          <table:table-cell office:value-type="percentage" office:value="-3.1288723667905825E-2" table:formula="of:=([.I371]-[.I370])/[.I370]" table:style-name="ce16">
            <text:p>-3%</text:p>
          </table:table-cell>
          <table:table-cell office:value-type="string" office:string-value="Valid" table:formula="of:=IF([.F370]&lt;=[.E370]; &quot;Valid&quot;; &quot;Invalid&quot;)" table:style-name="ce17">
            <text:p>Valid</text:p>
          </table:table-cell>
          <table:table-cell office:value-type="string" office:string-value="Valid" table:formula="of:=IF([.H370]&lt;=[.G370]; &quot;Valid&quot;; &quot;Invalid&quot;)" table:style-name="ce17">
            <text:p>Valid</text:p>
          </table:table-cell>
          <table:table-cell office:value-type="string" office:string-value="Stable/Reducing" table:formula="of:=IF([.J370]&gt;0; &quot;Increasing Pressure&quot;; &quot;Stable/Reducing&quot;)" table:style-name="ce18">
            <text:p>Stable/Reducing</text:p>
          </table:table-cell>
          <table:table-cell office:value-type="float" office:value="1.0564971751412429" table:formula="of:=IFERROR([.H370]/[.F370]; 0)" table:style-name="ce17">
            <text:p>1.056497175</text:p>
          </table:table-cell>
          <table:table-cell office:value-type="float" office:value="6215.2857142857147" table:formula="of:=AVERAGE([.I370:.I376])" table:style-name="ce15">
            <text:p>6215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7-21T00:00:00" table:style-name="ce14">
            <text:p>21-07-2024</text:p>
          </table:table-cell>
          <table:table-cell office:value-type="string" office:string-value="July" table:formula="of:=TEXT([.A371]; &quot;mmmm&quot;)" table:style-name="ce14">
            <text:p>July</text:p>
          </table:table-cell>
          <table:table-cell office:value-type="string" office:string-value="2024-07" table:formula="of:=TEXT([.A371]; &quot;yyyy-mm&quot;)" table:style-name="ce14">
            <text:p>2024-07</text:p>
          </table:table-cell>
          <table:table-cell office:value-type="float" office:value="90" table:style-name="ce9">
            <text:p>90</text:p>
          </table:table-cell>
          <table:table-cell office:value-type="float" office:value="196" table:style-name="ce9">
            <text:p>196</text:p>
          </table:table-cell>
          <table:table-cell office:value-type="float" office:value="205" table:style-name="ce9">
            <text:p>205</text:p>
          </table:table-cell>
          <table:table-cell office:value-type="float" office:value="6058" table:style-name="ce9">
            <text:p>6058</text:p>
          </table:table-cell>
          <table:table-cell office:value-type="float" office:value="262" table:style-name="ce9">
            <text:p>262</text:p>
          </table:table-cell>
          <table:table-cell office:value-type="float" office:value="6254" table:formula="of:=SUM([.G371]+[.E371])" table:style-name="ce15">
            <text:p>6254</text:p>
          </table:table-cell>
          <table:table-cell office:value-type="float" office:value="-57" table:formula="of:=[.F371]-[.H371]" table:style-name="ce15">
            <text:p>-57</text:p>
          </table:table-cell>
          <table:table-cell office:value-type="percentage" office:value="-1.0073552926127279E-2" table:formula="of:=([.I372]-[.I371])/[.I371]" table:style-name="ce16">
            <text:p>-1%</text:p>
          </table:table-cell>
          <table:table-cell office:value-type="string" office:string-value="Invalid" table:formula="of:=IF([.F371]&lt;=[.E371]; &quot;Valid&quot;; &quot;Invalid&quot;)" table:style-name="ce17">
            <text:p>Invalid</text:p>
          </table:table-cell>
          <table:table-cell office:value-type="string" office:string-value="Valid" table:formula="of:=IF([.H371]&lt;=[.G371]; &quot;Valid&quot;; &quot;Invalid&quot;)" table:style-name="ce17">
            <text:p>Valid</text:p>
          </table:table-cell>
          <table:table-cell office:value-type="string" office:string-value="Stable/Reducing" table:formula="of:=IF([.J371]&gt;0; &quot;Increasing Pressure&quot;; &quot;Stable/Reducing&quot;)" table:style-name="ce18">
            <text:p>Stable/Reducing</text:p>
          </table:table-cell>
          <table:table-cell office:value-type="float" office:value="1.2780487804878049" table:formula="of:=IFERROR([.H371]/[.F371]; 0)" table:style-name="ce17">
            <text:p>1.27804878</text:p>
          </table:table-cell>
          <table:table-cell office:value-type="float" office:value="6154.2857142857147" table:formula="of:=AVERAGE([.I371:.I377])" table:style-name="ce15">
            <text:p>6154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7-22T00:00:00" table:style-name="ce14">
            <text:p>22-07-2024</text:p>
          </table:table-cell>
          <table:table-cell office:value-type="string" office:string-value="July" table:formula="of:=TEXT([.A372]; &quot;mmmm&quot;)" table:style-name="ce14">
            <text:p>July</text:p>
          </table:table-cell>
          <table:table-cell office:value-type="string" office:string-value="2024-07" table:formula="of:=TEXT([.A372]; &quot;yyyy-mm&quot;)" table:style-name="ce14">
            <text:p>2024-07</text:p>
          </table:table-cell>
          <table:table-cell office:value-type="float" office:value="102" table:style-name="ce9">
            <text:p>102</text:p>
          </table:table-cell>
          <table:table-cell office:value-type="float" office:value="189" table:style-name="ce9">
            <text:p>189</text:p>
          </table:table-cell>
          <table:table-cell office:value-type="float" office:value="155" table:style-name="ce9">
            <text:p>155</text:p>
          </table:table-cell>
          <table:table-cell office:value-type="float" office:value="6002" table:style-name="ce9">
            <text:p>6002</text:p>
          </table:table-cell>
          <table:table-cell office:value-type="float" office:value="234" table:style-name="ce9">
            <text:p>234</text:p>
          </table:table-cell>
          <table:table-cell office:value-type="float" office:value="6191" table:formula="of:=SUM([.G372]+[.E372])" table:style-name="ce15">
            <text:p>6191</text:p>
          </table:table-cell>
          <table:table-cell office:value-type="float" office:value="-79" table:formula="of:=[.F372]-[.H372]" table:style-name="ce15">
            <text:p>-79</text:p>
          </table:table-cell>
          <table:table-cell office:value-type="percentage" office:value="5.0072686157325149E-3" table:formula="of:=([.I373]-[.I372])/[.I372]" table:style-name="ce16">
            <text:p>1%</text:p>
          </table:table-cell>
          <table:table-cell office:value-type="string" office:string-value="Valid" table:formula="of:=IF([.F372]&lt;=[.E372]; &quot;Valid&quot;; &quot;Invalid&quot;)" table:style-name="ce17">
            <text:p>Valid</text:p>
          </table:table-cell>
          <table:table-cell office:value-type="string" office:string-value="Valid" table:formula="of:=IF([.H372]&lt;=[.G372]; &quot;Valid&quot;; &quot;Invalid&quot;)" table:style-name="ce17">
            <text:p>Valid</text:p>
          </table:table-cell>
          <table:table-cell office:value-type="string" office:string-value="Stable/Reducing" table:formula="of:=IF([.J372]&gt;0; &quot;Increasing Pressure&quot;; &quot;Stable/Reducing&quot;)" table:style-name="ce18">
            <text:p>Stable/Reducing</text:p>
          </table:table-cell>
          <table:table-cell office:value-type="float" office:value="1.5096774193548388" table:formula="of:=IFERROR([.H372]/[.F372]; 0)" table:style-name="ce17">
            <text:p>1.509677419</text:p>
          </table:table-cell>
          <table:table-cell office:value-type="float" office:value="6137" table:formula="of:=AVERAGE([.I372:.I378])" table:style-name="ce15">
            <text:p>6137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7-23T00:00:00" table:style-name="ce14">
            <text:p>23-07-2024</text:p>
          </table:table-cell>
          <table:table-cell office:value-type="string" office:string-value="July" table:formula="of:=TEXT([.A373]; &quot;mmmm&quot;)" table:style-name="ce14">
            <text:p>July</text:p>
          </table:table-cell>
          <table:table-cell office:value-type="string" office:string-value="2024-07" table:formula="of:=TEXT([.A373]; &quot;yyyy-mm&quot;)" table:style-name="ce14">
            <text:p>2024-07</text:p>
          </table:table-cell>
          <table:table-cell office:value-type="float" office:value="120" table:style-name="ce9">
            <text:p>120</text:p>
          </table:table-cell>
          <table:table-cell office:value-type="float" office:value="257" table:style-name="ce9">
            <text:p>257</text:p>
          </table:table-cell>
          <table:table-cell office:value-type="float" office:value="126" table:style-name="ce9">
            <text:p>126</text:p>
          </table:table-cell>
          <table:table-cell office:value-type="float" office:value="5965" table:style-name="ce9">
            <text:p>5965</text:p>
          </table:table-cell>
          <table:table-cell office:value-type="float" office:value="170" table:style-name="ce9">
            <text:p>170</text:p>
          </table:table-cell>
          <table:table-cell office:value-type="float" office:value="6222" table:formula="of:=SUM([.G373]+[.E373])" table:style-name="ce15">
            <text:p>6222</text:p>
          </table:table-cell>
          <table:table-cell office:value-type="float" office:value="-44" table:formula="of:=[.F373]-[.H373]" table:style-name="ce15">
            <text:p>-44</text:p>
          </table:table-cell>
          <table:table-cell office:value-type="percentage" office:value="-3.6965605914496946E-3" table:formula="of:=([.I374]-[.I373])/[.I373]" table:style-name="ce16">
            <text:p>0%</text:p>
          </table:table-cell>
          <table:table-cell office:value-type="string" office:string-value="Valid" table:formula="of:=IF([.F373]&lt;=[.E373]; &quot;Valid&quot;; &quot;Invalid&quot;)" table:style-name="ce17">
            <text:p>Valid</text:p>
          </table:table-cell>
          <table:table-cell office:value-type="string" office:string-value="Valid" table:formula="of:=IF([.H373]&lt;=[.G373]; &quot;Valid&quot;; &quot;Invalid&quot;)" table:style-name="ce17">
            <text:p>Valid</text:p>
          </table:table-cell>
          <table:table-cell office:value-type="string" office:string-value="Stable/Reducing" table:formula="of:=IF([.J373]&gt;0; &quot;Increasing Pressure&quot;; &quot;Stable/Reducing&quot;)" table:style-name="ce18">
            <text:p>Stable/Reducing</text:p>
          </table:table-cell>
          <table:table-cell office:value-type="float" office:value="1.3492063492063493" table:formula="of:=IFERROR([.H373]/[.F373]; 0)" table:style-name="ce17">
            <text:p>1.349206349</text:p>
          </table:table-cell>
          <table:table-cell office:value-type="float" office:value="6141.7142857142853" table:formula="of:=AVERAGE([.I373:.I379])" table:style-name="ce15">
            <text:p>6142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7-24T00:00:00" table:style-name="ce14">
            <text:p>24-07-2024</text:p>
          </table:table-cell>
          <table:table-cell office:value-type="string" office:string-value="July" table:formula="of:=TEXT([.A374]; &quot;mmmm&quot;)" table:style-name="ce14">
            <text:p>July</text:p>
          </table:table-cell>
          <table:table-cell office:value-type="string" office:string-value="2024-07" table:formula="of:=TEXT([.A374]; &quot;yyyy-mm&quot;)" table:style-name="ce14">
            <text:p>2024-07</text:p>
          </table:table-cell>
          <table:table-cell office:value-type="float" office:value="137" table:style-name="ce9">
            <text:p>137</text:p>
          </table:table-cell>
          <table:table-cell office:value-type="float" office:value="272" table:style-name="ce9">
            <text:p>272</text:p>
          </table:table-cell>
          <table:table-cell office:value-type="float" office:value="166" table:style-name="ce9">
            <text:p>166</text:p>
          </table:table-cell>
          <table:table-cell office:value-type="float" office:value="5927" table:style-name="ce9">
            <text:p>5927</text:p>
          </table:table-cell>
          <table:table-cell office:value-type="float" office:value="177" table:style-name="ce9">
            <text:p>177</text:p>
          </table:table-cell>
          <table:table-cell office:value-type="float" office:value="6199" table:formula="of:=SUM([.G374]+[.E374])" table:style-name="ce15">
            <text:p>6199</text:p>
          </table:table-cell>
          <table:table-cell office:value-type="float" office:value="-11" table:formula="of:=[.F374]-[.H374]" table:style-name="ce15">
            <text:p>-11</text:p>
          </table:table-cell>
          <table:table-cell office:value-type="percentage" office:value="-7.5818680432327796E-3" table:formula="of:=([.I375]-[.I374])/[.I374]" table:style-name="ce16">
            <text:p>-1%</text:p>
          </table:table-cell>
          <table:table-cell office:value-type="string" office:string-value="Valid" table:formula="of:=IF([.F374]&lt;=[.E374]; &quot;Valid&quot;; &quot;Invalid&quot;)" table:style-name="ce17">
            <text:p>Valid</text:p>
          </table:table-cell>
          <table:table-cell office:value-type="string" office:string-value="Valid" table:formula="of:=IF([.H374]&lt;=[.G374]; &quot;Valid&quot;; &quot;Invalid&quot;)" table:style-name="ce17">
            <text:p>Valid</text:p>
          </table:table-cell>
          <table:table-cell office:value-type="string" office:string-value="Stable/Reducing" table:formula="of:=IF([.J374]&gt;0; &quot;Increasing Pressure&quot;; &quot;Stable/Reducing&quot;)" table:style-name="ce18">
            <text:p>Stable/Reducing</text:p>
          </table:table-cell>
          <table:table-cell office:value-type="float" office:value="1.0662650602409638" table:formula="of:=IFERROR([.H374]/[.F374]; 0)" table:style-name="ce17">
            <text:p>1.06626506</text:p>
          </table:table-cell>
          <table:table-cell office:value-type="float" office:value="6154.8571428571431" table:formula="of:=AVERAGE([.I374:.I380])" table:style-name="ce15">
            <text:p>6155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7-25T00:00:00" table:style-name="ce14">
            <text:p>25-07-2024</text:p>
          </table:table-cell>
          <table:table-cell office:value-type="string" office:string-value="July" table:formula="of:=TEXT([.A375]; &quot;mmmm&quot;)" table:style-name="ce14">
            <text:p>July</text:p>
          </table:table-cell>
          <table:table-cell office:value-type="string" office:string-value="2024-07" table:formula="of:=TEXT([.A375]; &quot;yyyy-mm&quot;)" table:style-name="ce14">
            <text:p>2024-07</text:p>
          </table:table-cell>
          <table:table-cell office:value-type="float" office:value="93" table:style-name="ce9">
            <text:p>93</text:p>
          </table:table-cell>
          <table:table-cell office:value-type="float" office:value="198" table:style-name="ce9">
            <text:p>198</text:p>
          </table:table-cell>
          <table:table-cell office:value-type="float" office:value="208" table:style-name="ce9">
            <text:p>208</text:p>
          </table:table-cell>
          <table:table-cell office:value-type="float" office:value="5954" table:style-name="ce9">
            <text:p>5954</text:p>
          </table:table-cell>
          <table:table-cell office:value-type="float" office:value="194" table:style-name="ce9">
            <text:p>194</text:p>
          </table:table-cell>
          <table:table-cell office:value-type="float" office:value="6152" table:formula="of:=SUM([.G375]+[.E375])" table:style-name="ce15">
            <text:p>6152</text:p>
          </table:table-cell>
          <table:table-cell office:value-type="float" office:value="14" table:formula="of:=[.F375]-[.H375]" table:style-name="ce15">
            <text:p>14</text:p>
          </table:table-cell>
          <table:table-cell office:value-type="percentage" office:value="-1.934330299089727E-2" table:formula="of:=([.I376]-[.I375])/[.I375]" table:style-name="ce16">
            <text:p>-2%</text:p>
          </table:table-cell>
          <table:table-cell office:value-type="string" office:string-value="Invalid" table:formula="of:=IF([.F375]&lt;=[.E375]; &quot;Valid&quot;; &quot;Invalid&quot;)" table:style-name="ce17">
            <text:p>Invalid</text:p>
          </table:table-cell>
          <table:table-cell office:value-type="string" office:string-value="Valid" table:formula="of:=IF([.H375]&lt;=[.G375]; &quot;Valid&quot;; &quot;Invalid&quot;)" table:style-name="ce17">
            <text:p>Valid</text:p>
          </table:table-cell>
          <table:table-cell office:value-type="string" office:string-value="Increasing Pressure" table:formula="of:=IF([.J375]&gt;0; &quot;Increasing Pressure&quot;; &quot;Stable/Reducing&quot;)" table:style-name="ce18">
            <text:p>Increasing Pressure</text:p>
          </table:table-cell>
          <table:table-cell office:value-type="float" office:value="0.93269230769230771" table:formula="of:=IFERROR([.H375]/[.F375]; 0)" table:style-name="ce17">
            <text:p>0.932692308</text:p>
          </table:table-cell>
          <table:table-cell office:value-type="float" office:value="6142.1428571428569" table:formula="of:=AVERAGE([.I375:.I381])" table:style-name="ce15">
            <text:p>6142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7-28T00:00:00" table:style-name="ce14">
            <text:p>28-07-2024</text:p>
          </table:table-cell>
          <table:table-cell office:value-type="string" office:string-value="July" table:formula="of:=TEXT([.A376]; &quot;mmmm&quot;)" table:style-name="ce14">
            <text:p>July</text:p>
          </table:table-cell>
          <table:table-cell office:value-type="string" office:string-value="2024-07" table:formula="of:=TEXT([.A376]; &quot;yyyy-mm&quot;)" table:style-name="ce14">
            <text:p>2024-07</text:p>
          </table:table-cell>
          <table:table-cell office:value-type="float" office:value="152" table:style-name="ce9">
            <text:p>152</text:p>
          </table:table-cell>
          <table:table-cell office:value-type="float" office:value="290" table:style-name="ce9">
            <text:p>290</text:p>
          </table:table-cell>
          <table:table-cell office:value-type="float" office:value="199" table:style-name="ce9">
            <text:p>199</text:p>
          </table:table-cell>
          <table:table-cell office:value-type="float" office:value="5743" table:style-name="ce9">
            <text:p>5743</text:p>
          </table:table-cell>
          <table:table-cell office:value-type="float" office:value="207" table:style-name="ce9">
            <text:p>207</text:p>
          </table:table-cell>
          <table:table-cell office:value-type="float" office:value="6033" table:formula="of:=SUM([.G376]+[.E376])" table:style-name="ce15">
            <text:p>6033</text:p>
          </table:table-cell>
          <table:table-cell office:value-type="float" office:value="-8" table:formula="of:=[.F376]-[.H376]" table:style-name="ce15">
            <text:p>-8</text:p>
          </table:table-cell>
          <table:table-cell office:value-type="percentage" office:value="-6.6302005635670484E-4" table:formula="of:=([.I377]-[.I376])/[.I376]" table:style-name="ce16">
            <text:p>0%</text:p>
          </table:table-cell>
          <table:table-cell office:value-type="string" office:string-value="Valid" table:formula="of:=IF([.F376]&lt;=[.E376]; &quot;Valid&quot;; &quot;Invalid&quot;)" table:style-name="ce17">
            <text:p>Valid</text:p>
          </table:table-cell>
          <table:table-cell office:value-type="string" office:string-value="Valid" table:formula="of:=IF([.H376]&lt;=[.G376]; &quot;Valid&quot;; &quot;Invalid&quot;)" table:style-name="ce17">
            <text:p>Valid</text:p>
          </table:table-cell>
          <table:table-cell office:value-type="string" office:string-value="Stable/Reducing" table:formula="of:=IF([.J376]&gt;0; &quot;Increasing Pressure&quot;; &quot;Stable/Reducing&quot;)" table:style-name="ce18">
            <text:p>Stable/Reducing</text:p>
          </table:table-cell>
          <table:table-cell office:value-type="float" office:value="1.0402010050251256" table:formula="of:=IFERROR([.H376]/[.F376]; 0)" table:style-name="ce17">
            <text:p>1.040201005</text:p>
          </table:table-cell>
          <table:table-cell office:value-type="float" office:value="6150.2857142857147" table:formula="of:=AVERAGE([.I376:.I382])" table:style-name="ce15">
            <text:p>6150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7-29T00:00:00" table:style-name="ce14">
            <text:p>29-07-2024</text:p>
          </table:table-cell>
          <table:table-cell office:value-type="string" office:string-value="July" table:formula="of:=TEXT([.A377]; &quot;mmmm&quot;)" table:style-name="ce14">
            <text:p>July</text:p>
          </table:table-cell>
          <table:table-cell office:value-type="string" office:string-value="2024-07" table:formula="of:=TEXT([.A377]; &quot;yyyy-mm&quot;)" table:style-name="ce14">
            <text:p>2024-07</text:p>
          </table:table-cell>
          <table:table-cell office:value-type="float" office:value="114" table:style-name="ce9">
            <text:p>114</text:p>
          </table:table-cell>
          <table:table-cell office:value-type="float" office:value="210" table:style-name="ce9">
            <text:p>210</text:p>
          </table:table-cell>
          <table:table-cell office:value-type="float" office:value="219" table:style-name="ce9">
            <text:p>219</text:p>
          </table:table-cell>
          <table:table-cell office:value-type="float" office:value="5819" table:style-name="ce9">
            <text:p>5819</text:p>
          </table:table-cell>
          <table:table-cell office:value-type="float" office:value="163" table:style-name="ce9">
            <text:p>163</text:p>
          </table:table-cell>
          <table:table-cell office:value-type="float" office:value="6029" table:formula="of:=SUM([.G377]+[.E377])" table:style-name="ce15">
            <text:p>6029</text:p>
          </table:table-cell>
          <table:table-cell office:value-type="float" office:value="56" table:formula="of:=[.F377]-[.H377]" table:style-name="ce15">
            <text:p>56</text:p>
          </table:table-cell>
          <table:table-cell office:value-type="percentage" office:value="1.7249958533753523E-2" table:formula="of:=([.I378]-[.I377])/[.I377]" table:style-name="ce16">
            <text:p>2%</text:p>
          </table:table-cell>
          <table:table-cell office:value-type="string" office:string-value="Invalid" table:formula="of:=IF([.F377]&lt;=[.E377]; &quot;Valid&quot;; &quot;Invalid&quot;)" table:style-name="ce17">
            <text:p>Invalid</text:p>
          </table:table-cell>
          <table:table-cell office:value-type="string" office:string-value="Valid" table:formula="of:=IF([.H377]&lt;=[.G377]; &quot;Valid&quot;; &quot;Invalid&quot;)" table:style-name="ce17">
            <text:p>Valid</text:p>
          </table:table-cell>
          <table:table-cell office:value-type="string" office:string-value="Increasing Pressure" table:formula="of:=IF([.J377]&gt;0; &quot;Increasing Pressure&quot;; &quot;Stable/Reducing&quot;)" table:style-name="ce18">
            <text:p>Increasing Pressure</text:p>
          </table:table-cell>
          <table:table-cell office:value-type="float" office:value="0.74429223744292239" table:formula="of:=IFERROR([.H377]/[.F377]; 0)" table:style-name="ce17">
            <text:p>0.744292237</text:p>
          </table:table-cell>
          <table:table-cell office:value-type="float" office:value="6185.7142857142853" table:formula="of:=AVERAGE([.I377:.I383])" table:style-name="ce15">
            <text:p>6186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7-30T00:00:00" table:style-name="ce14">
            <text:p>30-07-2024</text:p>
          </table:table-cell>
          <table:table-cell office:value-type="string" office:string-value="July" table:formula="of:=TEXT([.A378]; &quot;mmmm&quot;)" table:style-name="ce14">
            <text:p>July</text:p>
          </table:table-cell>
          <table:table-cell office:value-type="string" office:string-value="2024-07" table:formula="of:=TEXT([.A378]; &quot;yyyy-mm&quot;)" table:style-name="ce14">
            <text:p>2024-07</text:p>
          </table:table-cell>
          <table:table-cell office:value-type="float" office:value="125" table:style-name="ce9">
            <text:p>125</text:p>
          </table:table-cell>
          <table:table-cell office:value-type="float" office:value="203" table:style-name="ce9">
            <text:p>203</text:p>
          </table:table-cell>
          <table:table-cell office:value-type="float" office:value="208" table:style-name="ce9">
            <text:p>208</text:p>
          </table:table-cell>
          <table:table-cell office:value-type="float" office:value="5930" table:style-name="ce9">
            <text:p>5930</text:p>
          </table:table-cell>
          <table:table-cell office:value-type="float" office:value="92" table:style-name="ce9">
            <text:p>92</text:p>
          </table:table-cell>
          <table:table-cell office:value-type="float" office:value="6133" table:formula="of:=SUM([.G378]+[.E378])" table:style-name="ce15">
            <text:p>6133</text:p>
          </table:table-cell>
          <table:table-cell office:value-type="float" office:value="116" table:formula="of:=[.F378]-[.H378]" table:style-name="ce15">
            <text:p>116</text:p>
          </table:table-cell>
          <table:table-cell office:value-type="percentage" office:value="1.4837762921897929E-2" table:formula="of:=([.I379]-[.I378])/[.I378]" table:style-name="ce16">
            <text:p>1%</text:p>
          </table:table-cell>
          <table:table-cell office:value-type="string" office:string-value="Invalid" table:formula="of:=IF([.F378]&lt;=[.E378]; &quot;Valid&quot;; &quot;Invalid&quot;)" table:style-name="ce17">
            <text:p>Invalid</text:p>
          </table:table-cell>
          <table:table-cell office:value-type="string" office:string-value="Valid" table:formula="of:=IF([.H378]&lt;=[.G378]; &quot;Valid&quot;; &quot;Invalid&quot;)" table:style-name="ce17">
            <text:p>Valid</text:p>
          </table:table-cell>
          <table:table-cell office:value-type="string" office:string-value="Increasing Pressure" table:formula="of:=IF([.J378]&gt;0; &quot;Increasing Pressure&quot;; &quot;Stable/Reducing&quot;)" table:style-name="ce18">
            <text:p>Increasing Pressure</text:p>
          </table:table-cell>
          <table:table-cell office:value-type="float" office:value="0.44230769230769229" table:formula="of:=IFERROR([.H378]/[.F378]; 0)" table:style-name="ce17">
            <text:p>0.442307692</text:p>
          </table:table-cell>
          <table:table-cell office:value-type="float" office:value="6226" table:formula="of:=AVERAGE([.I378:.I384])" table:style-name="ce15">
            <text:p>6226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7-31T00:00:00" table:style-name="ce14">
            <text:p>31-07-2024</text:p>
          </table:table-cell>
          <table:table-cell office:value-type="string" office:string-value="July" table:formula="of:=TEXT([.A379]; &quot;mmmm&quot;)" table:style-name="ce14">
            <text:p>July</text:p>
          </table:table-cell>
          <table:table-cell office:value-type="string" office:string-value="2024-07" table:formula="of:=TEXT([.A379]; &quot;yyyy-mm&quot;)" table:style-name="ce14">
            <text:p>2024-07</text:p>
          </table:table-cell>
          <table:table-cell office:value-type="float" office:value="140" table:style-name="ce9">
            <text:p>140</text:p>
          </table:table-cell>
          <table:table-cell office:value-type="float" office:value="261" table:style-name="ce9">
            <text:p>261</text:p>
          </table:table-cell>
          <table:table-cell office:value-type="float" office:value="163" table:style-name="ce9">
            <text:p>163</text:p>
          </table:table-cell>
          <table:table-cell office:value-type="float" office:value="5963" table:style-name="ce9">
            <text:p>5963</text:p>
          </table:table-cell>
          <table:table-cell office:value-type="float" office:value="154" table:style-name="ce9">
            <text:p>154</text:p>
          </table:table-cell>
          <table:table-cell office:value-type="float" office:value="6224" table:formula="of:=SUM([.G379]+[.E379])" table:style-name="ce15">
            <text:p>6224</text:p>
          </table:table-cell>
          <table:table-cell office:value-type="float" office:value="9" table:formula="of:=[.F379]-[.H379]" table:style-name="ce15">
            <text:p>9</text:p>
          </table:table-cell>
          <table:table-cell office:value-type="percentage" office:value="1.4460154241645245E-2" table:formula="of:=([.I380]-[.I379])/[.I379]" table:style-name="ce16">
            <text:p>1%</text:p>
          </table:table-cell>
          <table:table-cell office:value-type="string" office:string-value="Valid" table:formula="of:=IF([.F379]&lt;=[.E379]; &quot;Valid&quot;; &quot;Invalid&quot;)" table:style-name="ce17">
            <text:p>Valid</text:p>
          </table:table-cell>
          <table:table-cell office:value-type="string" office:string-value="Valid" table:formula="of:=IF([.H379]&lt;=[.G379]; &quot;Valid&quot;; &quot;Invalid&quot;)" table:style-name="ce17">
            <text:p>Valid</text:p>
          </table:table-cell>
          <table:table-cell office:value-type="string" office:string-value="Increasing Pressure" table:formula="of:=IF([.J379]&gt;0; &quot;Increasing Pressure&quot;; &quot;Stable/Reducing&quot;)" table:style-name="ce18">
            <text:p>Increasing Pressure</text:p>
          </table:table-cell>
          <table:table-cell office:value-type="float" office:value="0.94478527607361962" table:formula="of:=IFERROR([.H379]/[.F379]; 0)" table:style-name="ce17">
            <text:p>0.944785276</text:p>
          </table:table-cell>
          <table:table-cell office:value-type="float" office:value="6251.8571428571431" table:formula="of:=AVERAGE([.I379:.I385])" table:style-name="ce15">
            <text:p>6252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8-01T00:00:00" table:style-name="ce14">
            <text:p>01-08-2024</text:p>
          </table:table-cell>
          <table:table-cell office:value-type="string" office:string-value="August" table:formula="of:=TEXT([.A380]; &quot;mmmm&quot;)" table:style-name="ce14">
            <text:p>August</text:p>
          </table:table-cell>
          <table:table-cell office:value-type="string" office:string-value="2024-08" table:formula="of:=TEXT([.A380]; &quot;yyyy-mm&quot;)" table:style-name="ce14">
            <text:p>2024-08</text:p>
          </table:table-cell>
          <table:table-cell office:value-type="float" office:value="227" table:style-name="ce9">
            <text:p>227</text:p>
          </table:table-cell>
          <table:table-cell office:value-type="float" office:value="298" table:style-name="ce9">
            <text:p>298</text:p>
          </table:table-cell>
          <table:table-cell office:value-type="float" office:value="212" table:style-name="ce9">
            <text:p>212</text:p>
          </table:table-cell>
          <table:table-cell office:value-type="float" office:value="6016" table:style-name="ce9">
            <text:p>6016</text:p>
          </table:table-cell>
          <table:table-cell office:value-type="float" office:value="169" table:style-name="ce9">
            <text:p>169</text:p>
          </table:table-cell>
          <table:table-cell office:value-type="float" office:value="6314" table:formula="of:=SUM([.G380]+[.E380])" table:style-name="ce15">
            <text:p>6314</text:p>
          </table:table-cell>
          <table:table-cell office:value-type="float" office:value="43" table:formula="of:=[.F380]-[.H380]" table:style-name="ce15">
            <text:p>43</text:p>
          </table:table-cell>
          <table:table-cell office:value-type="percentage" office:value="-3.2309154260373771E-2" table:formula="of:=([.I381]-[.I380])/[.I380]" table:style-name="ce16">
            <text:p>-3%</text:p>
          </table:table-cell>
          <table:table-cell office:value-type="string" office:string-value="Valid" table:formula="of:=IF([.F380]&lt;=[.E380]; &quot;Valid&quot;; &quot;Invalid&quot;)" table:style-name="ce17">
            <text:p>Valid</text:p>
          </table:table-cell>
          <table:table-cell office:value-type="string" office:string-value="Valid" table:formula="of:=IF([.H380]&lt;=[.G380]; &quot;Valid&quot;; &quot;Invalid&quot;)" table:style-name="ce17">
            <text:p>Valid</text:p>
          </table:table-cell>
          <table:table-cell office:value-type="string" office:string-value="Increasing Pressure" table:formula="of:=IF([.J380]&gt;0; &quot;Increasing Pressure&quot;; &quot;Stable/Reducing&quot;)" table:style-name="ce18">
            <text:p>Increasing Pressure</text:p>
          </table:table-cell>
          <table:table-cell office:value-type="float" office:value="0.79716981132075471" table:formula="of:=IFERROR([.H380]/[.F380]; 0)" table:style-name="ce17">
            <text:p>0.797169811</text:p>
          </table:table-cell>
          <table:table-cell office:value-type="float" office:value="6234.8571428571431" table:formula="of:=AVERAGE([.I380:.I386])" table:style-name="ce15">
            <text:p>6235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8-04T00:00:00" table:style-name="ce14">
            <text:p>04-08-2024</text:p>
          </table:table-cell>
          <table:table-cell office:value-type="string" office:string-value="August" table:formula="of:=TEXT([.A381]; &quot;mmmm&quot;)" table:style-name="ce14">
            <text:p>August</text:p>
          </table:table-cell>
          <table:table-cell office:value-type="string" office:string-value="2024-08" table:formula="of:=TEXT([.A381]; &quot;yyyy-mm&quot;)" table:style-name="ce14">
            <text:p>2024-08</text:p>
          </table:table-cell>
          <table:table-cell office:value-type="float" office:value="63" table:style-name="ce9">
            <text:p>63</text:p>
          </table:table-cell>
          <table:table-cell office:value-type="float" office:value="167" table:style-name="ce9">
            <text:p>167</text:p>
          </table:table-cell>
          <table:table-cell office:value-type="float" office:value="143" table:style-name="ce9">
            <text:p>143</text:p>
          </table:table-cell>
          <table:table-cell office:value-type="float" office:value="5943" table:style-name="ce9">
            <text:p>5943</text:p>
          </table:table-cell>
          <table:table-cell office:value-type="float" office:value="170" table:style-name="ce9">
            <text:p>170</text:p>
          </table:table-cell>
          <table:table-cell office:value-type="float" office:value="6110" table:formula="of:=SUM([.G381]+[.E381])" table:style-name="ce15">
            <text:p>6110</text:p>
          </table:table-cell>
          <table:table-cell office:value-type="float" office:value="-27" table:formula="of:=[.F381]-[.H381]" table:style-name="ce15">
            <text:p>-27</text:p>
          </table:table-cell>
          <table:table-cell office:value-type="percentage" office:value="1.6202945990180032E-2" table:formula="of:=([.I382]-[.I381])/[.I381]" table:style-name="ce16">
            <text:p>2%</text:p>
          </table:table-cell>
          <table:table-cell office:value-type="string" office:string-value="Valid" table:formula="of:=IF([.F381]&lt;=[.E381]; &quot;Valid&quot;; &quot;Invalid&quot;)" table:style-name="ce17">
            <text:p>Valid</text:p>
          </table:table-cell>
          <table:table-cell office:value-type="string" office:string-value="Valid" table:formula="of:=IF([.H381]&lt;=[.G381]; &quot;Valid&quot;; &quot;Invalid&quot;)" table:style-name="ce17">
            <text:p>Valid</text:p>
          </table:table-cell>
          <table:table-cell office:value-type="string" office:string-value="Stable/Reducing" table:formula="of:=IF([.J381]&gt;0; &quot;Increasing Pressure&quot;; &quot;Stable/Reducing&quot;)" table:style-name="ce18">
            <text:p>Stable/Reducing</text:p>
          </table:table-cell>
          <table:table-cell office:value-type="float" office:value="1.1888111888111887" table:formula="of:=IFERROR([.H381]/[.F381]; 0)" table:style-name="ce17">
            <text:p>1.188811189</text:p>
          </table:table-cell>
          <table:table-cell office:value-type="float" office:value="6207.4285714285716" table:formula="of:=AVERAGE([.I381:.I387])" table:style-name="ce15">
            <text:p>6207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8-05T00:00:00" table:style-name="ce14">
            <text:p>05-08-2024</text:p>
          </table:table-cell>
          <table:table-cell office:value-type="string" office:string-value="August" table:formula="of:=TEXT([.A382]; &quot;mmmm&quot;)" table:style-name="ce14">
            <text:p>August</text:p>
          </table:table-cell>
          <table:table-cell office:value-type="string" office:string-value="2024-08" table:formula="of:=TEXT([.A382]; &quot;yyyy-mm&quot;)" table:style-name="ce14">
            <text:p>2024-08</text:p>
          </table:table-cell>
          <table:table-cell office:value-type="float" office:value="172" table:style-name="ce9">
            <text:p>172</text:p>
          </table:table-cell>
          <table:table-cell office:value-type="float" office:value="259" table:style-name="ce9">
            <text:p>259</text:p>
          </table:table-cell>
          <table:table-cell office:value-type="float" office:value="138" table:style-name="ce9">
            <text:p>138</text:p>
          </table:table-cell>
          <table:table-cell office:value-type="float" office:value="5950" table:style-name="ce9">
            <text:p>5950</text:p>
          </table:table-cell>
          <table:table-cell office:value-type="float" office:value="150" table:style-name="ce9">
            <text:p>150</text:p>
          </table:table-cell>
          <table:table-cell office:value-type="float" office:value="6209" table:formula="of:=SUM([.G382]+[.E382])" table:style-name="ce15">
            <text:p>6209</text:p>
          </table:table-cell>
          <table:table-cell office:value-type="float" office:value="-12" table:formula="of:=[.F382]-[.H382]" table:style-name="ce15">
            <text:p>-12</text:p>
          </table:table-cell>
          <table:table-cell office:value-type="percentage" office:value="1.1596070220647446E-2" table:formula="of:=([.I383]-[.I382])/[.I382]" table:style-name="ce16">
            <text:p>1%</text:p>
          </table:table-cell>
          <table:table-cell office:value-type="string" office:string-value="Valid" table:formula="of:=IF([.F382]&lt;=[.E382]; &quot;Valid&quot;; &quot;Invalid&quot;)" table:style-name="ce17">
            <text:p>Valid</text:p>
          </table:table-cell>
          <table:table-cell office:value-type="string" office:string-value="Valid" table:formula="of:=IF([.H382]&lt;=[.G382]; &quot;Valid&quot;; &quot;Invalid&quot;)" table:style-name="ce17">
            <text:p>Valid</text:p>
          </table:table-cell>
          <table:table-cell office:value-type="string" office:string-value="Stable/Reducing" table:formula="of:=IF([.J382]&gt;0; &quot;Increasing Pressure&quot;; &quot;Stable/Reducing&quot;)" table:style-name="ce18">
            <text:p>Stable/Reducing</text:p>
          </table:table-cell>
          <table:table-cell office:value-type="float" office:value="1.0869565217391304" table:formula="of:=IFERROR([.H382]/[.F382]; 0)" table:style-name="ce17">
            <text:p>1.086956522</text:p>
          </table:table-cell>
          <table:table-cell office:value-type="float" office:value="6223.1428571428569" table:formula="of:=AVERAGE([.I382:.I388])" table:style-name="ce15">
            <text:p>6223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8-06T00:00:00" table:style-name="ce14">
            <text:p>06-08-2024</text:p>
          </table:table-cell>
          <table:table-cell office:value-type="string" office:string-value="August" table:formula="of:=TEXT([.A383]; &quot;mmmm&quot;)" table:style-name="ce14">
            <text:p>August</text:p>
          </table:table-cell>
          <table:table-cell office:value-type="string" office:string-value="2024-08" table:formula="of:=TEXT([.A383]; &quot;yyyy-mm&quot;)" table:style-name="ce14">
            <text:p>2024-08</text:p>
          </table:table-cell>
          <table:table-cell office:value-type="float" office:value="163" table:style-name="ce9">
            <text:p>163</text:p>
          </table:table-cell>
          <table:table-cell office:value-type="float" office:value="283" table:style-name="ce9">
            <text:p>283</text:p>
          </table:table-cell>
          <table:table-cell office:value-type="float" office:value="200" table:style-name="ce9">
            <text:p>200</text:p>
          </table:table-cell>
          <table:table-cell office:value-type="float" office:value="5998" table:style-name="ce9">
            <text:p>5998</text:p>
          </table:table-cell>
          <table:table-cell office:value-type="float" office:value="143" table:style-name="ce9">
            <text:p>143</text:p>
          </table:table-cell>
          <table:table-cell office:value-type="float" office:value="6281" table:formula="of:=SUM([.G383]+[.E383])" table:style-name="ce15">
            <text:p>6281</text:p>
          </table:table-cell>
          <table:table-cell office:value-type="float" office:value="57" table:formula="of:=[.F383]-[.H383]" table:style-name="ce15">
            <text:p>57</text:p>
          </table:table-cell>
          <table:table-cell office:value-type="percentage" office:value="4.7763095048559143E-3" table:formula="of:=([.I384]-[.I383])/[.I383]" table:style-name="ce16">
            <text:p>0%</text:p>
          </table:table-cell>
          <table:table-cell office:value-type="string" office:string-value="Valid" table:formula="of:=IF([.F383]&lt;=[.E383]; &quot;Valid&quot;; &quot;Invalid&quot;)" table:style-name="ce17">
            <text:p>Valid</text:p>
          </table:table-cell>
          <table:table-cell office:value-type="string" office:string-value="Valid" table:formula="of:=IF([.H383]&lt;=[.G383]; &quot;Valid&quot;; &quot;Invalid&quot;)" table:style-name="ce17">
            <text:p>Valid</text:p>
          </table:table-cell>
          <table:table-cell office:value-type="string" office:string-value="Increasing Pressure" table:formula="of:=IF([.J383]&gt;0; &quot;Increasing Pressure&quot;; &quot;Stable/Reducing&quot;)" table:style-name="ce18">
            <text:p>Increasing Pressure</text:p>
          </table:table-cell>
          <table:table-cell office:value-type="float" office:value="0.71499999999999997" table:formula="of:=IFERROR([.H383]/[.F383]; 0)" table:style-name="ce17">
            <text:p>0.715</text:p>
          </table:table-cell>
          <table:table-cell office:value-type="float" office:value="6223.7142857142853" table:formula="of:=AVERAGE([.I383:.I389])" table:style-name="ce15">
            <text:p>6224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8-07T00:00:00" table:style-name="ce14">
            <text:p>07-08-2024</text:p>
          </table:table-cell>
          <table:table-cell office:value-type="string" office:string-value="August" table:formula="of:=TEXT([.A384]; &quot;mmmm&quot;)" table:style-name="ce14">
            <text:p>August</text:p>
          </table:table-cell>
          <table:table-cell office:value-type="string" office:string-value="2024-08" table:formula="of:=TEXT([.A384]; &quot;yyyy-mm&quot;)" table:style-name="ce14">
            <text:p>2024-08</text:p>
          </table:table-cell>
          <table:table-cell office:value-type="float" office:value="135" table:style-name="ce9">
            <text:p>135</text:p>
          </table:table-cell>
          <table:table-cell office:value-type="float" office:value="273" table:style-name="ce9">
            <text:p>273</text:p>
          </table:table-cell>
          <table:table-cell office:value-type="float" office:value="207" table:style-name="ce9">
            <text:p>207</text:p>
          </table:table-cell>
          <table:table-cell office:value-type="float" office:value="6038" table:style-name="ce9">
            <text:p>6038</text:p>
          </table:table-cell>
          <table:table-cell office:value-type="float" office:value="174" table:style-name="ce9">
            <text:p>174</text:p>
          </table:table-cell>
          <table:table-cell office:value-type="float" office:value="6311" table:formula="of:=SUM([.G384]+[.E384])" table:style-name="ce15">
            <text:p>6311</text:p>
          </table:table-cell>
          <table:table-cell office:value-type="float" office:value="33" table:formula="of:=[.F384]-[.H384]" table:style-name="ce15">
            <text:p>33</text:p>
          </table:table-cell>
          <table:table-cell office:value-type="percentage" office:value="4.7536048169862145E-4" table:formula="of:=([.I385]-[.I384])/[.I384]" table:style-name="ce16">
            <text:p>0%</text:p>
          </table:table-cell>
          <table:table-cell office:value-type="string" office:string-value="Valid" table:formula="of:=IF([.F384]&lt;=[.E384]; &quot;Valid&quot;; &quot;Invalid&quot;)" table:style-name="ce17">
            <text:p>Valid</text:p>
          </table:table-cell>
          <table:table-cell office:value-type="string" office:string-value="Valid" table:formula="of:=IF([.H384]&lt;=[.G384]; &quot;Valid&quot;; &quot;Invalid&quot;)" table:style-name="ce17">
            <text:p>Valid</text:p>
          </table:table-cell>
          <table:table-cell office:value-type="string" office:string-value="Increasing Pressure" table:formula="of:=IF([.J384]&gt;0; &quot;Increasing Pressure&quot;; &quot;Stable/Reducing&quot;)" table:style-name="ce18">
            <text:p>Increasing Pressure</text:p>
          </table:table-cell>
          <table:table-cell office:value-type="float" office:value="0.84057971014492749" table:formula="of:=IFERROR([.H384]/[.F384]; 0)" table:style-name="ce17">
            <text:p>0.84057971</text:p>
          </table:table-cell>
          <table:table-cell office:value-type="float" office:value="6203" table:formula="of:=AVERAGE([.I384:.I390])" table:style-name="ce15">
            <text:p>6203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8-08T00:00:00" table:style-name="ce14">
            <text:p>08-08-2024</text:p>
          </table:table-cell>
          <table:table-cell office:value-type="string" office:string-value="August" table:formula="of:=TEXT([.A385]; &quot;mmmm&quot;)" table:style-name="ce14">
            <text:p>August</text:p>
          </table:table-cell>
          <table:table-cell office:value-type="string" office:string-value="2024-08" table:formula="of:=TEXT([.A385]; &quot;yyyy-mm&quot;)" table:style-name="ce14">
            <text:p>2024-08</text:p>
          </table:table-cell>
          <table:table-cell office:value-type="float" office:value="119" table:style-name="ce9">
            <text:p>119</text:p>
          </table:table-cell>
          <table:table-cell office:value-type="float" office:value="230" table:style-name="ce9">
            <text:p>230</text:p>
          </table:table-cell>
          <table:table-cell office:value-type="float" office:value="213" table:style-name="ce9">
            <text:p>213</text:p>
          </table:table-cell>
          <table:table-cell office:value-type="float" office:value="6084" table:style-name="ce9">
            <text:p>6084</text:p>
          </table:table-cell>
          <table:table-cell office:value-type="float" office:value="174" table:style-name="ce9">
            <text:p>174</text:p>
          </table:table-cell>
          <table:table-cell office:value-type="float" office:value="6314" table:formula="of:=SUM([.G385]+[.E385])" table:style-name="ce15">
            <text:p>6314</text:p>
          </table:table-cell>
          <table:table-cell office:value-type="float" office:value="39" table:formula="of:=[.F385]-[.H385]" table:style-name="ce15">
            <text:p>39</text:p>
          </table:table-cell>
          <table:table-cell office:value-type="percentage" office:value="-3.3101045296167246E-2" table:formula="of:=([.I386]-[.I385])/[.I385]" table:style-name="ce16">
            <text:p>-3%</text:p>
          </table:table-cell>
          <table:table-cell office:value-type="string" office:string-value="Valid" table:formula="of:=IF([.F385]&lt;=[.E385]; &quot;Valid&quot;; &quot;Invalid&quot;)" table:style-name="ce17">
            <text:p>Valid</text:p>
          </table:table-cell>
          <table:table-cell office:value-type="string" office:string-value="Valid" table:formula="of:=IF([.H385]&lt;=[.G385]; &quot;Valid&quot;; &quot;Invalid&quot;)" table:style-name="ce17">
            <text:p>Valid</text:p>
          </table:table-cell>
          <table:table-cell office:value-type="string" office:string-value="Increasing Pressure" table:formula="of:=IF([.J385]&gt;0; &quot;Increasing Pressure&quot;; &quot;Stable/Reducing&quot;)" table:style-name="ce18">
            <text:p>Increasing Pressure</text:p>
          </table:table-cell>
          <table:table-cell office:value-type="float" office:value="0.81690140845070425" table:formula="of:=IFERROR([.H385]/[.F385]; 0)" table:style-name="ce17">
            <text:p>0.816901408</text:p>
          </table:table-cell>
          <table:table-cell office:value-type="float" office:value="6167.8571428571431" table:formula="of:=AVERAGE([.I385:.I391])" table:style-name="ce15">
            <text:p>6168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8-11T00:00:00" table:style-name="ce14">
            <text:p>11-08-2024</text:p>
          </table:table-cell>
          <table:table-cell office:value-type="string" office:string-value="August" table:formula="of:=TEXT([.A386]; &quot;mmmm&quot;)" table:style-name="ce14">
            <text:p>August</text:p>
          </table:table-cell>
          <table:table-cell office:value-type="string" office:string-value="2024-08" table:formula="of:=TEXT([.A386]; &quot;yyyy-mm&quot;)" table:style-name="ce14">
            <text:p>2024-08</text:p>
          </table:table-cell>
          <table:table-cell office:value-type="float" office:value="95" table:style-name="ce9">
            <text:p>95</text:p>
          </table:table-cell>
          <table:table-cell office:value-type="float" office:value="211" table:style-name="ce9">
            <text:p>211</text:p>
          </table:table-cell>
          <table:table-cell office:value-type="float" office:value="140" table:style-name="ce9">
            <text:p>140</text:p>
          </table:table-cell>
          <table:table-cell office:value-type="float" office:value="5894" table:style-name="ce9">
            <text:p>5894</text:p>
          </table:table-cell>
          <table:table-cell office:value-type="float" office:value="249" table:style-name="ce9">
            <text:p>249</text:p>
          </table:table-cell>
          <table:table-cell office:value-type="float" office:value="6105" table:formula="of:=SUM([.G386]+[.E386])" table:style-name="ce15">
            <text:p>6105</text:p>
          </table:table-cell>
          <table:table-cell office:value-type="float" office:value="-109" table:formula="of:=[.F386]-[.H386]" table:style-name="ce15">
            <text:p>-109</text:p>
          </table:table-cell>
          <table:table-cell office:value-type="percentage" office:value="2.7846027846027844E-3" table:formula="of:=([.I387]-[.I386])/[.I386]" table:style-name="ce16">
            <text:p>0%</text:p>
          </table:table-cell>
          <table:table-cell office:value-type="string" office:string-value="Valid" table:formula="of:=IF([.F386]&lt;=[.E386]; &quot;Valid&quot;; &quot;Invalid&quot;)" table:style-name="ce17">
            <text:p>Valid</text:p>
          </table:table-cell>
          <table:table-cell office:value-type="string" office:string-value="Valid" table:formula="of:=IF([.H386]&lt;=[.G386]; &quot;Valid&quot;; &quot;Invalid&quot;)" table:style-name="ce17">
            <text:p>Valid</text:p>
          </table:table-cell>
          <table:table-cell office:value-type="string" office:string-value="Stable/Reducing" table:formula="of:=IF([.J386]&gt;0; &quot;Increasing Pressure&quot;; &quot;Stable/Reducing&quot;)" table:style-name="ce18">
            <text:p>Stable/Reducing</text:p>
          </table:table-cell>
          <table:table-cell office:value-type="float" office:value="1.7785714285714285" table:formula="of:=IFERROR([.H386]/[.F386]; 0)" table:style-name="ce17">
            <text:p>1.778571429</text:p>
          </table:table-cell>
          <table:table-cell office:value-type="float" office:value="6140" table:formula="of:=AVERAGE([.I386:.I392])" table:style-name="ce15">
            <text:p>6140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8-12T00:00:00" table:style-name="ce14">
            <text:p>12-08-2024</text:p>
          </table:table-cell>
          <table:table-cell office:value-type="string" office:string-value="August" table:formula="of:=TEXT([.A387]; &quot;mmmm&quot;)" table:style-name="ce14">
            <text:p>August</text:p>
          </table:table-cell>
          <table:table-cell office:value-type="string" office:string-value="2024-08" table:formula="of:=TEXT([.A387]; &quot;yyyy-mm&quot;)" table:style-name="ce14">
            <text:p>2024-08</text:p>
          </table:table-cell>
          <table:table-cell office:value-type="float" office:value="109" table:style-name="ce9">
            <text:p>109</text:p>
          </table:table-cell>
          <table:table-cell office:value-type="float" office:value="219" table:style-name="ce9">
            <text:p>219</text:p>
          </table:table-cell>
          <table:table-cell office:value-type="float" office:value="155" table:style-name="ce9">
            <text:p>155</text:p>
          </table:table-cell>
          <table:table-cell office:value-type="float" office:value="5903" table:style-name="ce9">
            <text:p>5903</text:p>
          </table:table-cell>
          <table:table-cell office:value-type="float" office:value="148" table:style-name="ce9">
            <text:p>148</text:p>
          </table:table-cell>
          <table:table-cell office:value-type="float" office:value="6122" table:formula="of:=SUM([.G387]+[.E387])" table:style-name="ce15">
            <text:p>6122</text:p>
          </table:table-cell>
          <table:table-cell office:value-type="float" office:value="7" table:formula="of:=[.F387]-[.H387]" table:style-name="ce15">
            <text:p>7</text:p>
          </table:table-cell>
          <table:table-cell office:value-type="percentage" office:value="1.6007840574975497E-2" table:formula="of:=([.I388]-[.I387])/[.I387]" table:style-name="ce16">
            <text:p>2%</text:p>
          </table:table-cell>
          <table:table-cell office:value-type="string" office:string-value="Valid" table:formula="of:=IF([.F387]&lt;=[.E387]; &quot;Valid&quot;; &quot;Invalid&quot;)" table:style-name="ce17">
            <text:p>Valid</text:p>
          </table:table-cell>
          <table:table-cell office:value-type="string" office:string-value="Valid" table:formula="of:=IF([.H387]&lt;=[.G387]; &quot;Valid&quot;; &quot;Invalid&quot;)" table:style-name="ce17">
            <text:p>Valid</text:p>
          </table:table-cell>
          <table:table-cell office:value-type="string" office:string-value="Increasing Pressure" table:formula="of:=IF([.J387]&gt;0; &quot;Increasing Pressure&quot;; &quot;Stable/Reducing&quot;)" table:style-name="ce18">
            <text:p>Increasing Pressure</text:p>
          </table:table-cell>
          <table:table-cell office:value-type="float" office:value="0.95483870967741935" table:formula="of:=IFERROR([.H387]/[.F387]; 0)" table:style-name="ce17">
            <text:p>0.95483871</text:p>
          </table:table-cell>
          <table:table-cell office:value-type="float" office:value="6163.4285714285716" table:formula="of:=AVERAGE([.I387:.I393])" table:style-name="ce15">
            <text:p>6163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8-13T00:00:00" table:style-name="ce14">
            <text:p>13-08-2024</text:p>
          </table:table-cell>
          <table:table-cell office:value-type="string" office:string-value="August" table:formula="of:=TEXT([.A388]; &quot;mmmm&quot;)" table:style-name="ce14">
            <text:p>August</text:p>
          </table:table-cell>
          <table:table-cell office:value-type="string" office:string-value="2024-08" table:formula="of:=TEXT([.A388]; &quot;yyyy-mm&quot;)" table:style-name="ce14">
            <text:p>2024-08</text:p>
          </table:table-cell>
          <table:table-cell office:value-type="float" office:value="162" table:style-name="ce9">
            <text:p>162</text:p>
          </table:table-cell>
          <table:table-cell office:value-type="float" office:value="239" table:style-name="ce9">
            <text:p>239</text:p>
          </table:table-cell>
          <table:table-cell office:value-type="float" office:value="189" table:style-name="ce9">
            <text:p>189</text:p>
          </table:table-cell>
          <table:table-cell office:value-type="float" office:value="5981" table:style-name="ce9">
            <text:p>5981</text:p>
          </table:table-cell>
          <table:table-cell office:value-type="float" office:value="123" table:style-name="ce9">
            <text:p>123</text:p>
          </table:table-cell>
          <table:table-cell office:value-type="float" office:value="6220" table:formula="of:=SUM([.G388]+[.E388])" table:style-name="ce15">
            <text:p>6220</text:p>
          </table:table-cell>
          <table:table-cell office:value-type="float" office:value="66" table:formula="of:=[.F388]-[.H388]" table:style-name="ce15">
            <text:p>66</text:p>
          </table:table-cell>
          <table:table-cell office:value-type="percentage" office:value="-1.1254019292604501E-3" table:formula="of:=([.I389]-[.I388])/[.I388]" table:style-name="ce16">
            <text:p>0%</text:p>
          </table:table-cell>
          <table:table-cell office:value-type="string" office:string-value="Valid" table:formula="of:=IF([.F388]&lt;=[.E388]; &quot;Valid&quot;; &quot;Invalid&quot;)" table:style-name="ce17">
            <text:p>Valid</text:p>
          </table:table-cell>
          <table:table-cell office:value-type="string" office:string-value="Valid" table:formula="of:=IF([.H388]&lt;=[.G388]; &quot;Valid&quot;; &quot;Invalid&quot;)" table:style-name="ce17">
            <text:p>Valid</text:p>
          </table:table-cell>
          <table:table-cell office:value-type="string" office:string-value="Increasing Pressure" table:formula="of:=IF([.J388]&gt;0; &quot;Increasing Pressure&quot;; &quot;Stable/Reducing&quot;)" table:style-name="ce18">
            <text:p>Increasing Pressure</text:p>
          </table:table-cell>
          <table:table-cell office:value-type="float" office:value="0.65079365079365081" table:formula="of:=IFERROR([.H388]/[.F388]; 0)" table:style-name="ce17">
            <text:p>0.650793651</text:p>
          </table:table-cell>
          <table:table-cell office:value-type="float" office:value="6185" table:formula="of:=AVERAGE([.I388:.I394])" table:style-name="ce15">
            <text:p>6185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8-14T00:00:00" table:style-name="ce14">
            <text:p>14-08-2024</text:p>
          </table:table-cell>
          <table:table-cell office:value-type="string" office:string-value="August" table:formula="of:=TEXT([.A389]; &quot;mmmm&quot;)" table:style-name="ce14">
            <text:p>August</text:p>
          </table:table-cell>
          <table:table-cell office:value-type="string" office:string-value="2024-08" table:formula="of:=TEXT([.A389]; &quot;yyyy-mm&quot;)" table:style-name="ce14">
            <text:p>2024-08</text:p>
          </table:table-cell>
          <table:table-cell office:value-type="float" office:value="109" table:style-name="ce9">
            <text:p>109</text:p>
          </table:table-cell>
          <table:table-cell office:value-type="float" office:value="226" table:style-name="ce9">
            <text:p>226</text:p>
          </table:table-cell>
          <table:table-cell office:value-type="float" office:value="191" table:style-name="ce9">
            <text:p>191</text:p>
          </table:table-cell>
          <table:table-cell office:value-type="float" office:value="5987" table:style-name="ce9">
            <text:p>5987</text:p>
          </table:table-cell>
          <table:table-cell office:value-type="float" office:value="178" table:style-name="ce9">
            <text:p>178</text:p>
          </table:table-cell>
          <table:table-cell office:value-type="float" office:value="6213" table:formula="of:=SUM([.G389]+[.E389])" table:style-name="ce15">
            <text:p>6213</text:p>
          </table:table-cell>
          <table:table-cell office:value-type="float" office:value="13" table:formula="of:=[.F389]-[.H389]" table:style-name="ce15">
            <text:p>13</text:p>
          </table:table-cell>
          <table:table-cell office:value-type="percentage" office:value="-1.2393368742958313E-2" table:formula="of:=([.I390]-[.I389])/[.I389]" table:style-name="ce16">
            <text:p>-1%</text:p>
          </table:table-cell>
          <table:table-cell office:value-type="string" office:string-value="Valid" table:formula="of:=IF([.F389]&lt;=[.E389]; &quot;Valid&quot;; &quot;Invalid&quot;)" table:style-name="ce17">
            <text:p>Valid</text:p>
          </table:table-cell>
          <table:table-cell office:value-type="string" office:string-value="Valid" table:formula="of:=IF([.H389]&lt;=[.G389]; &quot;Valid&quot;; &quot;Invalid&quot;)" table:style-name="ce17">
            <text:p>Valid</text:p>
          </table:table-cell>
          <table:table-cell office:value-type="string" office:string-value="Increasing Pressure" table:formula="of:=IF([.J389]&gt;0; &quot;Increasing Pressure&quot;; &quot;Stable/Reducing&quot;)" table:style-name="ce18">
            <text:p>Increasing Pressure</text:p>
          </table:table-cell>
          <table:table-cell office:value-type="float" office:value="0.93193717277486909" table:formula="of:=IFERROR([.H389]/[.F389]; 0)" table:style-name="ce17">
            <text:p>0.931937173</text:p>
          </table:table-cell>
          <table:table-cell office:value-type="float" office:value="6205.1428571428569" table:formula="of:=AVERAGE([.I389:.I395])" table:style-name="ce15">
            <text:p>6205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8-15T00:00:00" table:style-name="ce14">
            <text:p>15-08-2024</text:p>
          </table:table-cell>
          <table:table-cell office:value-type="string" office:string-value="August" table:formula="of:=TEXT([.A390]; &quot;mmmm&quot;)" table:style-name="ce14">
            <text:p>August</text:p>
          </table:table-cell>
          <table:table-cell office:value-type="string" office:string-value="2024-08" table:formula="of:=TEXT([.A390]; &quot;yyyy-mm&quot;)" table:style-name="ce14">
            <text:p>2024-08</text:p>
          </table:table-cell>
          <table:table-cell office:value-type="float" office:value="124" table:style-name="ce9">
            <text:p>124</text:p>
          </table:table-cell>
          <table:table-cell office:value-type="float" office:value="241" table:style-name="ce9">
            <text:p>241</text:p>
          </table:table-cell>
          <table:table-cell office:value-type="float" office:value="156" table:style-name="ce9">
            <text:p>156</text:p>
          </table:table-cell>
          <table:table-cell office:value-type="float" office:value="5895" table:style-name="ce9">
            <text:p>5895</text:p>
          </table:table-cell>
          <table:table-cell office:value-type="float" office:value="220" table:style-name="ce9">
            <text:p>220</text:p>
          </table:table-cell>
          <table:table-cell office:value-type="float" office:value="6136" table:formula="of:=SUM([.G390]+[.E390])" table:style-name="ce15">
            <text:p>6136</text:p>
          </table:table-cell>
          <table:table-cell office:value-type="float" office:value="-64" table:formula="of:=[.F390]-[.H390]" table:style-name="ce15">
            <text:p>-64</text:p>
          </table:table-cell>
          <table:table-cell office:value-type="percentage" office:value="-1.1571056062581487E-2" table:formula="of:=([.I391]-[.I390])/[.I390]" table:style-name="ce16">
            <text:p>-1%</text:p>
          </table:table-cell>
          <table:table-cell office:value-type="string" office:string-value="Valid" table:formula="of:=IF([.F390]&lt;=[.E390]; &quot;Valid&quot;; &quot;Invalid&quot;)" table:style-name="ce17">
            <text:p>Valid</text:p>
          </table:table-cell>
          <table:table-cell office:value-type="string" office:string-value="Valid" table:formula="of:=IF([.H390]&lt;=[.G390]; &quot;Valid&quot;; &quot;Invalid&quot;)" table:style-name="ce17">
            <text:p>Valid</text:p>
          </table:table-cell>
          <table:table-cell office:value-type="string" office:string-value="Stable/Reducing" table:formula="of:=IF([.J390]&gt;0; &quot;Increasing Pressure&quot;; &quot;Stable/Reducing&quot;)" table:style-name="ce18">
            <text:p>Stable/Reducing</text:p>
          </table:table-cell>
          <table:table-cell office:value-type="float" office:value="1.4102564102564104" table:formula="of:=IFERROR([.H390]/[.F390]; 0)" table:style-name="ce17">
            <text:p>1.41025641</text:p>
          </table:table-cell>
          <table:table-cell office:value-type="float" office:value="6237.1428571428569" table:formula="of:=AVERAGE([.I390:.I396])" table:style-name="ce15">
            <text:p>6237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8-18T00:00:00" table:style-name="ce14">
            <text:p>18-08-2024</text:p>
          </table:table-cell>
          <table:table-cell office:value-type="string" office:string-value="August" table:formula="of:=TEXT([.A391]; &quot;mmmm&quot;)" table:style-name="ce14">
            <text:p>August</text:p>
          </table:table-cell>
          <table:table-cell office:value-type="string" office:string-value="2024-08" table:formula="of:=TEXT([.A391]; &quot;yyyy-mm&quot;)" table:style-name="ce14">
            <text:p>2024-08</text:p>
          </table:table-cell>
          <table:table-cell office:value-type="float" office:value="86" table:style-name="ce9">
            <text:p>86</text:p>
          </table:table-cell>
          <table:table-cell office:value-type="float" office:value="244" table:style-name="ce9">
            <text:p>244</text:p>
          </table:table-cell>
          <table:table-cell office:value-type="float" office:value="235" table:style-name="ce9">
            <text:p>235</text:p>
          </table:table-cell>
          <table:table-cell office:value-type="float" office:value="5821" table:style-name="ce9">
            <text:p>5821</text:p>
          </table:table-cell>
          <table:table-cell office:value-type="float" office:value="178" table:style-name="ce9">
            <text:p>178</text:p>
          </table:table-cell>
          <table:table-cell office:value-type="float" office:value="6065" table:formula="of:=SUM([.G391]+[.E391])" table:style-name="ce15">
            <text:p>6065</text:p>
          </table:table-cell>
          <table:table-cell office:value-type="float" office:value="57" table:formula="of:=[.F391]-[.H391]" table:style-name="ce15">
            <text:p>57</text:p>
          </table:table-cell>
          <table:table-cell office:value-type="percentage" office:value="8.9035449299258041E-3" table:formula="of:=([.I392]-[.I391])/[.I391]" table:style-name="ce16">
            <text:p>1%</text:p>
          </table:table-cell>
          <table:table-cell office:value-type="string" office:string-value="Valid" table:formula="of:=IF([.F391]&lt;=[.E391]; &quot;Valid&quot;; &quot;Invalid&quot;)" table:style-name="ce17">
            <text:p>Valid</text:p>
          </table:table-cell>
          <table:table-cell office:value-type="string" office:string-value="Valid" table:formula="of:=IF([.H391]&lt;=[.G391]; &quot;Valid&quot;; &quot;Invalid&quot;)" table:style-name="ce17">
            <text:p>Valid</text:p>
          </table:table-cell>
          <table:table-cell office:value-type="string" office:string-value="Increasing Pressure" table:formula="of:=IF([.J391]&gt;0; &quot;Increasing Pressure&quot;; &quot;Stable/Reducing&quot;)" table:style-name="ce18">
            <text:p>Increasing Pressure</text:p>
          </table:table-cell>
          <table:table-cell office:value-type="float" office:value="0.75744680851063828" table:formula="of:=IFERROR([.H391]/[.F391]; 0)" table:style-name="ce17">
            <text:p>0.757446809</text:p>
          </table:table-cell>
          <table:table-cell office:value-type="float" office:value="6290.8571428571431" table:formula="of:=AVERAGE([.I391:.I397])" table:style-name="ce15">
            <text:p>6291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8-19T00:00:00" table:style-name="ce14">
            <text:p>19-08-2024</text:p>
          </table:table-cell>
          <table:table-cell office:value-type="string" office:string-value="August" table:formula="of:=TEXT([.A392]; &quot;mmmm&quot;)" table:style-name="ce14">
            <text:p>August</text:p>
          </table:table-cell>
          <table:table-cell office:value-type="string" office:string-value="2024-08" table:formula="of:=TEXT([.A392]; &quot;yyyy-mm&quot;)" table:style-name="ce14">
            <text:p>2024-08</text:p>
          </table:table-cell>
          <table:table-cell office:value-type="float" office:value="176" table:style-name="ce9">
            <text:p>176</text:p>
          </table:table-cell>
          <table:table-cell office:value-type="float" office:value="254" table:style-name="ce9">
            <text:p>254</text:p>
          </table:table-cell>
          <table:table-cell office:value-type="float" office:value="162" table:style-name="ce9">
            <text:p>162</text:p>
          </table:table-cell>
          <table:table-cell office:value-type="float" office:value="5865" table:style-name="ce9">
            <text:p>5865</text:p>
          </table:table-cell>
          <table:table-cell office:value-type="float" office:value="158" table:style-name="ce9">
            <text:p>158</text:p>
          </table:table-cell>
          <table:table-cell office:value-type="float" office:value="6119" table:formula="of:=SUM([.G392]+[.E392])" table:style-name="ce15">
            <text:p>6119</text:p>
          </table:table-cell>
          <table:table-cell office:value-type="float" office:value="4" table:formula="of:=[.F392]-[.H392]" table:style-name="ce15">
            <text:p>4</text:p>
          </table:table-cell>
          <table:table-cell office:value-type="percentage" office:value="2.4513809445987907E-2" table:formula="of:=([.I393]-[.I392])/[.I392]" table:style-name="ce16">
            <text:p>2%</text:p>
          </table:table-cell>
          <table:table-cell office:value-type="string" office:string-value="Valid" table:formula="of:=IF([.F392]&lt;=[.E392]; &quot;Valid&quot;; &quot;Invalid&quot;)" table:style-name="ce17">
            <text:p>Valid</text:p>
          </table:table-cell>
          <table:table-cell office:value-type="string" office:string-value="Valid" table:formula="of:=IF([.H392]&lt;=[.G392]; &quot;Valid&quot;; &quot;Invalid&quot;)" table:style-name="ce17">
            <text:p>Valid</text:p>
          </table:table-cell>
          <table:table-cell office:value-type="string" office:string-value="Increasing Pressure" table:formula="of:=IF([.J392]&gt;0; &quot;Increasing Pressure&quot;; &quot;Stable/Reducing&quot;)" table:style-name="ce18">
            <text:p>Increasing Pressure</text:p>
          </table:table-cell>
          <table:table-cell office:value-type="float" office:value="0.97530864197530864" table:formula="of:=IFERROR([.H392]/[.F392]; 0)" table:style-name="ce17">
            <text:p>0.975308642</text:p>
          </table:table-cell>
          <table:table-cell office:value-type="float" office:value="6359.4285714285716" table:formula="of:=AVERAGE([.I392:.I398])" table:style-name="ce15">
            <text:p>6359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8-20T00:00:00" table:style-name="ce14">
            <text:p>20-08-2024</text:p>
          </table:table-cell>
          <table:table-cell office:value-type="string" office:string-value="August" table:formula="of:=TEXT([.A393]; &quot;mmmm&quot;)" table:style-name="ce14">
            <text:p>August</text:p>
          </table:table-cell>
          <table:table-cell office:value-type="string" office:string-value="2024-08" table:formula="of:=TEXT([.A393]; &quot;yyyy-mm&quot;)" table:style-name="ce14">
            <text:p>2024-08</text:p>
          </table:table-cell>
          <table:table-cell office:value-type="float" office:value="136" table:style-name="ce9">
            <text:p>136</text:p>
          </table:table-cell>
          <table:table-cell office:value-type="float" office:value="274" table:style-name="ce9">
            <text:p>274</text:p>
          </table:table-cell>
          <table:table-cell office:value-type="float" office:value="245" table:style-name="ce9">
            <text:p>245</text:p>
          </table:table-cell>
          <table:table-cell office:value-type="float" office:value="5995" table:style-name="ce9">
            <text:p>5995</text:p>
          </table:table-cell>
          <table:table-cell office:value-type="float" office:value="112" table:style-name="ce9">
            <text:p>112</text:p>
          </table:table-cell>
          <table:table-cell office:value-type="float" office:value="6269" table:formula="of:=SUM([.G393]+[.E393])" table:style-name="ce15">
            <text:p>6269</text:p>
          </table:table-cell>
          <table:table-cell office:value-type="float" office:value="133" table:formula="of:=[.F393]-[.H393]" table:style-name="ce15">
            <text:p>133</text:p>
          </table:table-cell>
          <table:table-cell office:value-type="percentage" office:value="6.3806029669803796E-4" table:formula="of:=([.I394]-[.I393])/[.I393]" table:style-name="ce16">
            <text:p>0%</text:p>
          </table:table-cell>
          <table:table-cell office:value-type="string" office:string-value="Valid" table:formula="of:=IF([.F393]&lt;=[.E393]; &quot;Valid&quot;; &quot;Invalid&quot;)" table:style-name="ce17">
            <text:p>Valid</text:p>
          </table:table-cell>
          <table:table-cell office:value-type="string" office:string-value="Valid" table:formula="of:=IF([.H393]&lt;=[.G393]; &quot;Valid&quot;; &quot;Invalid&quot;)" table:style-name="ce17">
            <text:p>Valid</text:p>
          </table:table-cell>
          <table:table-cell office:value-type="string" office:string-value="Increasing Pressure" table:formula="of:=IF([.J393]&gt;0; &quot;Increasing Pressure&quot;; &quot;Stable/Reducing&quot;)" table:style-name="ce18">
            <text:p>Increasing Pressure</text:p>
          </table:table-cell>
          <table:table-cell office:value-type="float" office:value="0.45714285714285713" table:formula="of:=IFERROR([.H393]/[.F393]; 0)" table:style-name="ce17">
            <text:p>0.457142857</text:p>
          </table:table-cell>
          <table:table-cell office:value-type="float" office:value="6408.4285714285716" table:formula="of:=AVERAGE([.I393:.I399])" table:style-name="ce15">
            <text:p>6408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8-21T00:00:00" table:style-name="ce14">
            <text:p>21-08-2024</text:p>
          </table:table-cell>
          <table:table-cell office:value-type="string" office:string-value="August" table:formula="of:=TEXT([.A394]; &quot;mmmm&quot;)" table:style-name="ce14">
            <text:p>August</text:p>
          </table:table-cell>
          <table:table-cell office:value-type="string" office:string-value="2024-08" table:formula="of:=TEXT([.A394]; &quot;yyyy-mm&quot;)" table:style-name="ce14">
            <text:p>2024-08</text:p>
          </table:table-cell>
          <table:table-cell office:value-type="float" office:value="134" table:style-name="ce9">
            <text:p>134</text:p>
          </table:table-cell>
          <table:table-cell office:value-type="float" office:value="245" table:style-name="ce9">
            <text:p>245</text:p>
          </table:table-cell>
          <table:table-cell office:value-type="float" office:value="167" table:style-name="ce9">
            <text:p>167</text:p>
          </table:table-cell>
          <table:table-cell office:value-type="float" office:value="6028" table:style-name="ce9">
            <text:p>6028</text:p>
          </table:table-cell>
          <table:table-cell office:value-type="float" office:value="156" table:style-name="ce9">
            <text:p>156</text:p>
          </table:table-cell>
          <table:table-cell office:value-type="float" office:value="6273" table:formula="of:=SUM([.G394]+[.E394])" table:style-name="ce15">
            <text:p>6273</text:p>
          </table:table-cell>
          <table:table-cell office:value-type="float" office:value="11" table:formula="of:=[.F394]-[.H394]" table:style-name="ce15">
            <text:p>11</text:p>
          </table:table-cell>
          <table:table-cell office:value-type="percentage" office:value="1.4028375577873425E-2" table:formula="of:=([.I395]-[.I394])/[.I394]" table:style-name="ce16">
            <text:p>1%</text:p>
          </table:table-cell>
          <table:table-cell office:value-type="string" office:string-value="Valid" table:formula="of:=IF([.F394]&lt;=[.E394]; &quot;Valid&quot;; &quot;Invalid&quot;)" table:style-name="ce17">
            <text:p>Valid</text:p>
          </table:table-cell>
          <table:table-cell office:value-type="string" office:string-value="Valid" table:formula="of:=IF([.H394]&lt;=[.G394]; &quot;Valid&quot;; &quot;Invalid&quot;)" table:style-name="ce17">
            <text:p>Valid</text:p>
          </table:table-cell>
          <table:table-cell office:value-type="string" office:string-value="Increasing Pressure" table:formula="of:=IF([.J394]&gt;0; &quot;Increasing Pressure&quot;; &quot;Stable/Reducing&quot;)" table:style-name="ce18">
            <text:p>Increasing Pressure</text:p>
          </table:table-cell>
          <table:table-cell office:value-type="float" office:value="0.93413173652694614" table:formula="of:=IFERROR([.H394]/[.F394]; 0)" table:style-name="ce17">
            <text:p>0.934131737</text:p>
          </table:table-cell>
          <table:table-cell office:value-type="float" office:value="6446.4285714285716" table:formula="of:=AVERAGE([.I394:.I400])" table:style-name="ce15">
            <text:p>6446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8-22T00:00:00" table:style-name="ce14">
            <text:p>22-08-2024</text:p>
          </table:table-cell>
          <table:table-cell office:value-type="string" office:string-value="August" table:formula="of:=TEXT([.A395]; &quot;mmmm&quot;)" table:style-name="ce14">
            <text:p>August</text:p>
          </table:table-cell>
          <table:table-cell office:value-type="string" office:string-value="2024-08" table:formula="of:=TEXT([.A395]; &quot;yyyy-mm&quot;)" table:style-name="ce14">
            <text:p>2024-08</text:p>
          </table:table-cell>
          <table:table-cell office:value-type="float" office:value="182" table:style-name="ce9">
            <text:p>182</text:p>
          </table:table-cell>
          <table:table-cell office:value-type="float" office:value="307" table:style-name="ce9">
            <text:p>307</text:p>
          </table:table-cell>
          <table:table-cell office:value-type="float" office:value="205" table:style-name="ce9">
            <text:p>205</text:p>
          </table:table-cell>
          <table:table-cell office:value-type="float" office:value="6054" table:style-name="ce9">
            <text:p>6054</text:p>
          </table:table-cell>
          <table:table-cell office:value-type="float" office:value="171" table:style-name="ce9">
            <text:p>171</text:p>
          </table:table-cell>
          <table:table-cell office:value-type="float" office:value="6361" table:formula="of:=SUM([.G395]+[.E395])" table:style-name="ce15">
            <text:p>6361</text:p>
          </table:table-cell>
          <table:table-cell office:value-type="float" office:value="34" table:formula="of:=[.F395]-[.H395]" table:style-name="ce15">
            <text:p>34</text:p>
          </table:table-cell>
          <table:table-cell office:value-type="percentage" office:value="1.1947806948592989E-2" table:formula="of:=([.I396]-[.I395])/[.I395]" table:style-name="ce16">
            <text:p>1%</text:p>
          </table:table-cell>
          <table:table-cell office:value-type="string" office:string-value="Valid" table:formula="of:=IF([.F395]&lt;=[.E395]; &quot;Valid&quot;; &quot;Invalid&quot;)" table:style-name="ce17">
            <text:p>Valid</text:p>
          </table:table-cell>
          <table:table-cell office:value-type="string" office:string-value="Valid" table:formula="of:=IF([.H395]&lt;=[.G395]; &quot;Valid&quot;; &quot;Invalid&quot;)" table:style-name="ce17">
            <text:p>Valid</text:p>
          </table:table-cell>
          <table:table-cell office:value-type="string" office:string-value="Increasing Pressure" table:formula="of:=IF([.J395]&gt;0; &quot;Increasing Pressure&quot;; &quot;Stable/Reducing&quot;)" table:style-name="ce18">
            <text:p>Increasing Pressure</text:p>
          </table:table-cell>
          <table:table-cell office:value-type="float" office:value="0.8341463414634146" table:formula="of:=IFERROR([.H395]/[.F395]; 0)" table:style-name="ce17">
            <text:p>0.834146341</text:p>
          </table:table-cell>
          <table:table-cell office:value-type="float" office:value="6494" table:formula="of:=AVERAGE([.I395:.I401])" table:style-name="ce15">
            <text:p>6494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8-27T00:00:00" table:style-name="ce14">
            <text:p>27-08-2024</text:p>
          </table:table-cell>
          <table:table-cell office:value-type="string" office:string-value="August" table:formula="of:=TEXT([.A396]; &quot;mmmm&quot;)" table:style-name="ce14">
            <text:p>August</text:p>
          </table:table-cell>
          <table:table-cell office:value-type="string" office:string-value="2024-08" table:formula="of:=TEXT([.A396]; &quot;yyyy-mm&quot;)" table:style-name="ce14">
            <text:p>2024-08</text:p>
          </table:table-cell>
          <table:table-cell office:value-type="float" office:value="149" table:style-name="ce9">
            <text:p>149</text:p>
          </table:table-cell>
          <table:table-cell office:value-type="float" office:value="285" table:style-name="ce9">
            <text:p>285</text:p>
          </table:table-cell>
          <table:table-cell office:value-type="float" office:value="222" table:style-name="ce9">
            <text:p>222</text:p>
          </table:table-cell>
          <table:table-cell office:value-type="float" office:value="6152" table:style-name="ce9">
            <text:p>6152</text:p>
          </table:table-cell>
          <table:table-cell office:value-type="float" office:value="97" table:style-name="ce9">
            <text:p>97</text:p>
          </table:table-cell>
          <table:table-cell office:value-type="float" office:value="6437" table:formula="of:=SUM([.G396]+[.E396])" table:style-name="ce15">
            <text:p>6437</text:p>
          </table:table-cell>
          <table:table-cell office:value-type="float" office:value="125" table:formula="of:=[.F396]-[.H396]" table:style-name="ce15">
            <text:p>125</text:p>
          </table:table-cell>
          <table:table-cell office:value-type="percentage" office:value="1.1651390399254311E-2" table:formula="of:=([.I397]-[.I396])/[.I396]" table:style-name="ce16">
            <text:p>1%</text:p>
          </table:table-cell>
          <table:table-cell office:value-type="string" office:string-value="Valid" table:formula="of:=IF([.F396]&lt;=[.E396]; &quot;Valid&quot;; &quot;Invalid&quot;)" table:style-name="ce17">
            <text:p>Valid</text:p>
          </table:table-cell>
          <table:table-cell office:value-type="string" office:string-value="Valid" table:formula="of:=IF([.H396]&lt;=[.G396]; &quot;Valid&quot;; &quot;Invalid&quot;)" table:style-name="ce17">
            <text:p>Valid</text:p>
          </table:table-cell>
          <table:table-cell office:value-type="string" office:string-value="Increasing Pressure" table:formula="of:=IF([.J396]&gt;0; &quot;Increasing Pressure&quot;; &quot;Stable/Reducing&quot;)" table:style-name="ce18">
            <text:p>Increasing Pressure</text:p>
          </table:table-cell>
          <table:table-cell office:value-type="float" office:value="0.43693693693693691" table:formula="of:=IFERROR([.H396]/[.F396]; 0)" table:style-name="ce17">
            <text:p>0.436936937</text:p>
          </table:table-cell>
          <table:table-cell office:value-type="float" office:value="6539.2857142857147" table:formula="of:=AVERAGE([.I396:.I402])" table:style-name="ce15">
            <text:p>6539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8-28T00:00:00" table:style-name="ce14">
            <text:p>28-08-2024</text:p>
          </table:table-cell>
          <table:table-cell office:value-type="string" office:string-value="August" table:formula="of:=TEXT([.A397]; &quot;mmmm&quot;)" table:style-name="ce14">
            <text:p>August</text:p>
          </table:table-cell>
          <table:table-cell office:value-type="string" office:string-value="2024-08" table:formula="of:=TEXT([.A397]; &quot;yyyy-mm&quot;)" table:style-name="ce14">
            <text:p>2024-08</text:p>
          </table:table-cell>
          <table:table-cell office:value-type="float" office:value="170" table:style-name="ce9">
            <text:p>170</text:p>
          </table:table-cell>
          <table:table-cell office:value-type="float" office:value="285" table:style-name="ce9">
            <text:p>285</text:p>
          </table:table-cell>
          <table:table-cell office:value-type="float" office:value="178" table:style-name="ce9">
            <text:p>178</text:p>
          </table:table-cell>
          <table:table-cell office:value-type="float" office:value="6227" table:style-name="ce9">
            <text:p>6227</text:p>
          </table:table-cell>
          <table:table-cell office:value-type="float" office:value="134" table:style-name="ce9">
            <text:p>134</text:p>
          </table:table-cell>
          <table:table-cell office:value-type="float" office:value="6512" table:formula="of:=SUM([.G397]+[.E397])" table:style-name="ce15">
            <text:p>6512</text:p>
          </table:table-cell>
          <table:table-cell office:value-type="float" office:value="44" table:formula="of:=[.F397]-[.H397]" table:style-name="ce15">
            <text:p>44</text:p>
          </table:table-cell>
          <table:table-cell office:value-type="percentage" office:value="5.0675675675675678E-3" table:formula="of:=([.I398]-[.I397])/[.I397]" table:style-name="ce16">
            <text:p>1%</text:p>
          </table:table-cell>
          <table:table-cell office:value-type="string" office:string-value="Valid" table:formula="of:=IF([.F397]&lt;=[.E397]; &quot;Valid&quot;; &quot;Invalid&quot;)" table:style-name="ce17">
            <text:p>Valid</text:p>
          </table:table-cell>
          <table:table-cell office:value-type="string" office:string-value="Valid" table:formula="of:=IF([.H397]&lt;=[.G397]; &quot;Valid&quot;; &quot;Invalid&quot;)" table:style-name="ce17">
            <text:p>Valid</text:p>
          </table:table-cell>
          <table:table-cell office:value-type="string" office:string-value="Increasing Pressure" table:formula="of:=IF([.J397]&gt;0; &quot;Increasing Pressure&quot;; &quot;Stable/Reducing&quot;)" table:style-name="ce18">
            <text:p>Increasing Pressure</text:p>
          </table:table-cell>
          <table:table-cell office:value-type="float" office:value="0.7528089887640449" table:formula="of:=IFERROR([.H397]/[.F397]; 0)" table:style-name="ce17">
            <text:p>0.752808989</text:p>
          </table:table-cell>
          <table:table-cell office:value-type="float" office:value="6557.8571428571431" table:formula="of:=AVERAGE([.I397:.I403])" table:style-name="ce15">
            <text:p>6558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8-29T00:00:00" table:style-name="ce14">
            <text:p>29-08-2024</text:p>
          </table:table-cell>
          <table:table-cell office:value-type="string" office:string-value="August" table:formula="of:=TEXT([.A398]; &quot;mmmm&quot;)" table:style-name="ce14">
            <text:p>August</text:p>
          </table:table-cell>
          <table:table-cell office:value-type="string" office:string-value="2024-08" table:formula="of:=TEXT([.A398]; &quot;yyyy-mm&quot;)" table:style-name="ce14">
            <text:p>2024-08</text:p>
          </table:table-cell>
          <table:table-cell office:value-type="float" office:value="145" table:style-name="ce9">
            <text:p>145</text:p>
          </table:table-cell>
          <table:table-cell office:value-type="float" office:value="295" table:style-name="ce9">
            <text:p>295</text:p>
          </table:table-cell>
          <table:table-cell office:value-type="float" office:value="188" table:style-name="ce9">
            <text:p>188</text:p>
          </table:table-cell>
          <table:table-cell office:value-type="float" office:value="6250" table:style-name="ce9">
            <text:p>6250</text:p>
          </table:table-cell>
          <table:table-cell office:value-type="float" office:value="169" table:style-name="ce9">
            <text:p>169</text:p>
          </table:table-cell>
          <table:table-cell office:value-type="float" office:value="6545" table:formula="of:=SUM([.G398]+[.E398])" table:style-name="ce15">
            <text:p>6545</text:p>
          </table:table-cell>
          <table:table-cell office:value-type="float" office:value="19" table:formula="of:=[.F398]-[.H398]" table:style-name="ce15">
            <text:p>19</text:p>
          </table:table-cell>
          <table:table-cell office:value-type="percentage" office:value="-1.2681436210847975E-2" table:formula="of:=([.I399]-[.I398])/[.I398]" table:style-name="ce16">
            <text:p>-1%</text:p>
          </table:table-cell>
          <table:table-cell office:value-type="string" office:string-value="Valid" table:formula="of:=IF([.F398]&lt;=[.E398]; &quot;Valid&quot;; &quot;Invalid&quot;)" table:style-name="ce17">
            <text:p>Valid</text:p>
          </table:table-cell>
          <table:table-cell office:value-type="string" office:string-value="Valid" table:formula="of:=IF([.H398]&lt;=[.G398]; &quot;Valid&quot;; &quot;Invalid&quot;)" table:style-name="ce17">
            <text:p>Valid</text:p>
          </table:table-cell>
          <table:table-cell office:value-type="string" office:string-value="Increasing Pressure" table:formula="of:=IF([.J398]&gt;0; &quot;Increasing Pressure&quot;; &quot;Stable/Reducing&quot;)" table:style-name="ce18">
            <text:p>Increasing Pressure</text:p>
          </table:table-cell>
          <table:table-cell office:value-type="float" office:value="0.89893617021276595" table:formula="of:=IFERROR([.H398]/[.F398]; 0)" table:style-name="ce17">
            <text:p>0.89893617</text:p>
          </table:table-cell>
          <table:table-cell office:value-type="float" office:value="6574.4285714285716" table:formula="of:=AVERAGE([.I398:.I404])" table:style-name="ce15">
            <text:p>6574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9-02T00:00:00" table:style-name="ce14">
            <text:p>02-09-2024</text:p>
          </table:table-cell>
          <table:table-cell office:value-type="string" office:string-value="September" table:formula="of:=TEXT([.A399]; &quot;mmmm&quot;)" table:style-name="ce14">
            <text:p>September</text:p>
          </table:table-cell>
          <table:table-cell office:value-type="string" office:string-value="2024-09" table:formula="of:=TEXT([.A399]; &quot;yyyy-mm&quot;)" table:style-name="ce14">
            <text:p>2024-09</text:p>
          </table:table-cell>
          <table:table-cell office:value-type="float" office:value="133" table:style-name="ce9">
            <text:p>133</text:p>
          </table:table-cell>
          <table:table-cell office:value-type="float" office:value="270" table:style-name="ce9">
            <text:p>270</text:p>
          </table:table-cell>
          <table:table-cell office:value-type="float" office:value="198" table:style-name="ce9">
            <text:p>198</text:p>
          </table:table-cell>
          <table:table-cell office:value-type="float" office:value="6192" table:style-name="ce9">
            <text:p>6192</text:p>
          </table:table-cell>
          <table:table-cell office:value-type="float" office:value="129" table:style-name="ce9">
            <text:p>129</text:p>
          </table:table-cell>
          <table:table-cell office:value-type="float" office:value="6462" table:formula="of:=SUM([.G399]+[.E399])" table:style-name="ce15">
            <text:p>6462</text:p>
          </table:table-cell>
          <table:table-cell office:value-type="float" office:value="69" table:formula="of:=[.F399]-[.H399]" table:style-name="ce15">
            <text:p>69</text:p>
          </table:table-cell>
          <table:table-cell office:value-type="percentage" office:value="1.1296812132466728E-2" table:formula="of:=([.I400]-[.I399])/[.I399]" table:style-name="ce16">
            <text:p>1%</text:p>
          </table:table-cell>
          <table:table-cell office:value-type="string" office:string-value="Valid" table:formula="of:=IF([.F399]&lt;=[.E399]; &quot;Valid&quot;; &quot;Invalid&quot;)" table:style-name="ce17">
            <text:p>Valid</text:p>
          </table:table-cell>
          <table:table-cell office:value-type="string" office:string-value="Valid" table:formula="of:=IF([.H399]&lt;=[.G399]; &quot;Valid&quot;; &quot;Invalid&quot;)" table:style-name="ce17">
            <text:p>Valid</text:p>
          </table:table-cell>
          <table:table-cell office:value-type="string" office:string-value="Increasing Pressure" table:formula="of:=IF([.J399]&gt;0; &quot;Increasing Pressure&quot;; &quot;Stable/Reducing&quot;)" table:style-name="ce18">
            <text:p>Increasing Pressure</text:p>
          </table:table-cell>
          <table:table-cell office:value-type="float" office:value="0.65151515151515149" table:formula="of:=IFERROR([.H399]/[.F399]; 0)" table:style-name="ce17">
            <text:p>0.651515152</text:p>
          </table:table-cell>
          <table:table-cell office:value-type="float" office:value="6589" table:formula="of:=AVERAGE([.I399:.I405])" table:style-name="ce15">
            <text:p>6589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9-03T00:00:00" table:style-name="ce14">
            <text:p>03-09-2024</text:p>
          </table:table-cell>
          <table:table-cell office:value-type="string" office:string-value="September" table:formula="of:=TEXT([.A400]; &quot;mmmm&quot;)" table:style-name="ce14">
            <text:p>September</text:p>
          </table:table-cell>
          <table:table-cell office:value-type="string" office:string-value="2024-09" table:formula="of:=TEXT([.A400]; &quot;yyyy-mm&quot;)" table:style-name="ce14">
            <text:p>2024-09</text:p>
          </table:table-cell>
          <table:table-cell office:value-type="float" office:value="131" table:style-name="ce9">
            <text:p>131</text:p>
          </table:table-cell>
          <table:table-cell office:value-type="float" office:value="263" table:style-name="ce9">
            <text:p>263</text:p>
          </table:table-cell>
          <table:table-cell office:value-type="float" office:value="177" table:style-name="ce9">
            <text:p>177</text:p>
          </table:table-cell>
          <table:table-cell office:value-type="float" office:value="6272" table:style-name="ce9">
            <text:p>6272</text:p>
          </table:table-cell>
          <table:table-cell office:value-type="float" office:value="112" table:style-name="ce9">
            <text:p>112</text:p>
          </table:table-cell>
          <table:table-cell office:value-type="float" office:value="6535" table:formula="of:=SUM([.G400]+[.E400])" table:style-name="ce15">
            <text:p>6535</text:p>
          </table:table-cell>
          <table:table-cell office:value-type="float" office:value="65" table:formula="of:=[.F400]-[.H400]" table:style-name="ce15">
            <text:p>65</text:p>
          </table:table-cell>
          <table:table-cell office:value-type="percentage" office:value="1.0864575363427697E-2" table:formula="of:=([.I401]-[.I400])/[.I400]" table:style-name="ce16">
            <text:p>1%</text:p>
          </table:table-cell>
          <table:table-cell office:value-type="string" office:string-value="Valid" table:formula="of:=IF([.F400]&lt;=[.E400]; &quot;Valid&quot;; &quot;Invalid&quot;)" table:style-name="ce17">
            <text:p>Valid</text:p>
          </table:table-cell>
          <table:table-cell office:value-type="string" office:string-value="Valid" table:formula="of:=IF([.H400]&lt;=[.G400]; &quot;Valid&quot;; &quot;Invalid&quot;)" table:style-name="ce17">
            <text:p>Valid</text:p>
          </table:table-cell>
          <table:table-cell office:value-type="string" office:string-value="Increasing Pressure" table:formula="of:=IF([.J400]&gt;0; &quot;Increasing Pressure&quot;; &quot;Stable/Reducing&quot;)" table:style-name="ce18">
            <text:p>Increasing Pressure</text:p>
          </table:table-cell>
          <table:table-cell office:value-type="float" office:value="0.63276836158192096" table:formula="of:=IFERROR([.H400]/[.F400]; 0)" table:style-name="ce17">
            <text:p>0.632768362</text:p>
          </table:table-cell>
          <table:table-cell office:value-type="float" office:value="6617" table:formula="of:=AVERAGE([.I400:.I406])" table:style-name="ce15">
            <text:p>6617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9-04T00:00:00" table:style-name="ce14">
            <text:p>04-09-2024</text:p>
          </table:table-cell>
          <table:table-cell office:value-type="string" office:string-value="September" table:formula="of:=TEXT([.A401]; &quot;mmmm&quot;)" table:style-name="ce14">
            <text:p>September</text:p>
          </table:table-cell>
          <table:table-cell office:value-type="string" office:string-value="2024-09" table:formula="of:=TEXT([.A401]; &quot;yyyy-mm&quot;)" table:style-name="ce14">
            <text:p>2024-09</text:p>
          </table:table-cell>
          <table:table-cell office:value-type="float" office:value="121" table:style-name="ce9">
            <text:p>121</text:p>
          </table:table-cell>
          <table:table-cell office:value-type="float" office:value="231" table:style-name="ce9">
            <text:p>231</text:p>
          </table:table-cell>
          <table:table-cell office:value-type="float" office:value="219" table:style-name="ce9">
            <text:p>219</text:p>
          </table:table-cell>
          <table:table-cell office:value-type="float" office:value="6375" table:style-name="ce9">
            <text:p>6375</text:p>
          </table:table-cell>
          <table:table-cell office:value-type="float" office:value="114" table:style-name="ce9">
            <text:p>114</text:p>
          </table:table-cell>
          <table:table-cell office:value-type="float" office:value="6606" table:formula="of:=SUM([.G401]+[.E401])" table:style-name="ce15">
            <text:p>6606</text:p>
          </table:table-cell>
          <table:table-cell office:value-type="float" office:value="105" table:formula="of:=[.F401]-[.H401]" table:style-name="ce15">
            <text:p>105</text:p>
          </table:table-cell>
          <table:table-cell office:value-type="percentage" office:value="1.0899182561307902E-2" table:formula="of:=([.I402]-[.I401])/[.I401]" table:style-name="ce16">
            <text:p>1%</text:p>
          </table:table-cell>
          <table:table-cell office:value-type="string" office:string-value="Valid" table:formula="of:=IF([.F401]&lt;=[.E401]; &quot;Valid&quot;; &quot;Invalid&quot;)" table:style-name="ce17">
            <text:p>Valid</text:p>
          </table:table-cell>
          <table:table-cell office:value-type="string" office:string-value="Valid" table:formula="of:=IF([.H401]&lt;=[.G401]; &quot;Valid&quot;; &quot;Invalid&quot;)" table:style-name="ce17">
            <text:p>Valid</text:p>
          </table:table-cell>
          <table:table-cell office:value-type="string" office:string-value="Increasing Pressure" table:formula="of:=IF([.J401]&gt;0; &quot;Increasing Pressure&quot;; &quot;Stable/Reducing&quot;)" table:style-name="ce18">
            <text:p>Increasing Pressure</text:p>
          </table:table-cell>
          <table:table-cell office:value-type="float" office:value="0.52054794520547942" table:formula="of:=IFERROR([.H401]/[.F401]; 0)" table:style-name="ce17">
            <text:p>0.520547945</text:p>
          </table:table-cell>
          <table:table-cell office:value-type="float" office:value="6632" table:formula="of:=AVERAGE([.I401:.I407])" table:style-name="ce15">
            <text:p>6632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9-05T00:00:00" table:style-name="ce14">
            <text:p>05-09-2024</text:p>
          </table:table-cell>
          <table:table-cell office:value-type="string" office:string-value="September" table:formula="of:=TEXT([.A402]; &quot;mmmm&quot;)" table:style-name="ce14">
            <text:p>September</text:p>
          </table:table-cell>
          <table:table-cell office:value-type="string" office:string-value="2024-09" table:formula="of:=TEXT([.A402]; &quot;yyyy-mm&quot;)" table:style-name="ce14">
            <text:p>2024-09</text:p>
          </table:table-cell>
          <table:table-cell office:value-type="float" office:value="126" table:style-name="ce9">
            <text:p>126</text:p>
          </table:table-cell>
          <table:table-cell office:value-type="float" office:value="230" table:style-name="ce9">
            <text:p>230</text:p>
          </table:table-cell>
          <table:table-cell office:value-type="float" office:value="175" table:style-name="ce9">
            <text:p>175</text:p>
          </table:table-cell>
          <table:table-cell office:value-type="float" office:value="6448" table:style-name="ce9">
            <text:p>6448</text:p>
          </table:table-cell>
          <table:table-cell office:value-type="float" office:value="121" table:style-name="ce9">
            <text:p>121</text:p>
          </table:table-cell>
          <table:table-cell office:value-type="float" office:value="6678" table:formula="of:=SUM([.G402]+[.E402])" table:style-name="ce15">
            <text:p>6678</text:p>
          </table:table-cell>
          <table:table-cell office:value-type="float" office:value="54" table:formula="of:=[.F402]-[.H402]" table:style-name="ce15">
            <text:p>54</text:p>
          </table:table-cell>
          <table:table-cell office:value-type="percentage" office:value="-1.6621743036837375E-2" table:formula="of:=([.I403]-[.I402])/[.I402]" table:style-name="ce16">
            <text:p>-2%</text:p>
          </table:table-cell>
          <table:table-cell office:value-type="string" office:string-value="Valid" table:formula="of:=IF([.F402]&lt;=[.E402]; &quot;Valid&quot;; &quot;Invalid&quot;)" table:style-name="ce17">
            <text:p>Valid</text:p>
          </table:table-cell>
          <table:table-cell office:value-type="string" office:string-value="Valid" table:formula="of:=IF([.H402]&lt;=[.G402]; &quot;Valid&quot;; &quot;Invalid&quot;)" table:style-name="ce17">
            <text:p>Valid</text:p>
          </table:table-cell>
          <table:table-cell office:value-type="string" office:string-value="Increasing Pressure" table:formula="of:=IF([.J402]&gt;0; &quot;Increasing Pressure&quot;; &quot;Stable/Reducing&quot;)" table:style-name="ce18">
            <text:p>Increasing Pressure</text:p>
          </table:table-cell>
          <table:table-cell office:value-type="float" office:value="0.69142857142857139" table:formula="of:=IFERROR([.H402]/[.F402]; 0)" table:style-name="ce17">
            <text:p>0.691428571</text:p>
          </table:table-cell>
          <table:table-cell office:value-type="float" office:value="6620.5714285714284" table:formula="of:=AVERAGE([.I402:.I408])" table:style-name="ce15">
            <text:p>6621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9-08T00:00:00" table:style-name="ce14">
            <text:p>08-09-2024</text:p>
          </table:table-cell>
          <table:table-cell office:value-type="string" office:string-value="September" table:formula="of:=TEXT([.A403]; &quot;mmmm&quot;)" table:style-name="ce14">
            <text:p>September</text:p>
          </table:table-cell>
          <table:table-cell office:value-type="string" office:string-value="2024-09" table:formula="of:=TEXT([.A403]; &quot;yyyy-mm&quot;)" table:style-name="ce14">
            <text:p>2024-09</text:p>
          </table:table-cell>
          <table:table-cell office:value-type="float" office:value="123" table:style-name="ce9">
            <text:p>123</text:p>
          </table:table-cell>
          <table:table-cell office:value-type="float" office:value="255" table:style-name="ce9">
            <text:p>255</text:p>
          </table:table-cell>
          <table:table-cell office:value-type="float" office:value="164" table:style-name="ce9">
            <text:p>164</text:p>
          </table:table-cell>
          <table:table-cell office:value-type="float" office:value="6312" table:style-name="ce9">
            <text:p>6312</text:p>
          </table:table-cell>
          <table:table-cell office:value-type="float" office:value="221" table:style-name="ce9">
            <text:p>221</text:p>
          </table:table-cell>
          <table:table-cell office:value-type="float" office:value="6567" table:formula="of:=SUM([.G403]+[.E403])" table:style-name="ce15">
            <text:p>6567</text:p>
          </table:table-cell>
          <table:table-cell office:value-type="float" office:value="-57" table:formula="of:=[.F403]-[.H403]" table:style-name="ce15">
            <text:p>-57</text:p>
          </table:table-cell>
          <table:table-cell office:value-type="percentage" office:value="9.2888685853509973E-3" table:formula="of:=([.I404]-[.I403])/[.I403]" table:style-name="ce16">
            <text:p>1%</text:p>
          </table:table-cell>
          <table:table-cell office:value-type="string" office:string-value="Valid" table:formula="of:=IF([.F403]&lt;=[.E403]; &quot;Valid&quot;; &quot;Invalid&quot;)" table:style-name="ce17">
            <text:p>Valid</text:p>
          </table:table-cell>
          <table:table-cell office:value-type="string" office:string-value="Valid" table:formula="of:=IF([.H403]&lt;=[.G403]; &quot;Valid&quot;; &quot;Invalid&quot;)" table:style-name="ce17">
            <text:p>Valid</text:p>
          </table:table-cell>
          <table:table-cell office:value-type="string" office:string-value="Stable/Reducing" table:formula="of:=IF([.J403]&gt;0; &quot;Increasing Pressure&quot;; &quot;Stable/Reducing&quot;)" table:style-name="ce18">
            <text:p>Stable/Reducing</text:p>
          </table:table-cell>
          <table:table-cell office:value-type="float" office:value="1.3475609756097562" table:formula="of:=IFERROR([.H403]/[.F403]; 0)" table:style-name="ce17">
            <text:p>1.347560976</text:p>
          </table:table-cell>
          <table:table-cell office:value-type="float" office:value="6588.5714285714284" table:formula="of:=AVERAGE([.I403:.I409])" table:style-name="ce15">
            <text:p>6589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9-09T00:00:00" table:style-name="ce14">
            <text:p>09-09-2024</text:p>
          </table:table-cell>
          <table:table-cell office:value-type="string" office:string-value="September" table:formula="of:=TEXT([.A404]; &quot;mmmm&quot;)" table:style-name="ce14">
            <text:p>September</text:p>
          </table:table-cell>
          <table:table-cell office:value-type="string" office:string-value="2024-09" table:formula="of:=TEXT([.A404]; &quot;yyyy-mm&quot;)" table:style-name="ce14">
            <text:p>2024-09</text:p>
          </table:table-cell>
          <table:table-cell office:value-type="float" office:value="144" table:style-name="ce9">
            <text:p>144</text:p>
          </table:table-cell>
          <table:table-cell office:value-type="float" office:value="275" table:style-name="ce9">
            <text:p>275</text:p>
          </table:table-cell>
          <table:table-cell office:value-type="float" office:value="190" table:style-name="ce9">
            <text:p>190</text:p>
          </table:table-cell>
          <table:table-cell office:value-type="float" office:value="6353" table:style-name="ce9">
            <text:p>6353</text:p>
          </table:table-cell>
          <table:table-cell office:value-type="float" office:value="141" table:style-name="ce9">
            <text:p>141</text:p>
          </table:table-cell>
          <table:table-cell office:value-type="float" office:value="6628" table:formula="of:=SUM([.G404]+[.E404])" table:style-name="ce15">
            <text:p>6628</text:p>
          </table:table-cell>
          <table:table-cell office:value-type="float" office:value="49" table:formula="of:=[.F404]-[.H404]" table:style-name="ce15">
            <text:p>49</text:p>
          </table:table-cell>
          <table:table-cell office:value-type="percentage" office:value="2.8666264333132166E-3" table:formula="of:=([.I405]-[.I404])/[.I404]" table:style-name="ce16">
            <text:p>0%</text:p>
          </table:table-cell>
          <table:table-cell office:value-type="string" office:string-value="Valid" table:formula="of:=IF([.F404]&lt;=[.E404]; &quot;Valid&quot;; &quot;Invalid&quot;)" table:style-name="ce17">
            <text:p>Valid</text:p>
          </table:table-cell>
          <table:table-cell office:value-type="string" office:string-value="Valid" table:formula="of:=IF([.H404]&lt;=[.G404]; &quot;Valid&quot;; &quot;Invalid&quot;)" table:style-name="ce17">
            <text:p>Valid</text:p>
          </table:table-cell>
          <table:table-cell office:value-type="string" office:string-value="Increasing Pressure" table:formula="of:=IF([.J404]&gt;0; &quot;Increasing Pressure&quot;; &quot;Stable/Reducing&quot;)" table:style-name="ce18">
            <text:p>Increasing Pressure</text:p>
          </table:table-cell>
          <table:table-cell office:value-type="float" office:value="0.74210526315789471" table:formula="of:=IFERROR([.H404]/[.F404]; 0)" table:style-name="ce17">
            <text:p>0.742105263</text:p>
          </table:table-cell>
          <table:table-cell office:value-type="float" office:value="6570.1428571428569" table:formula="of:=AVERAGE([.I404:.I410])" table:style-name="ce15">
            <text:p>6570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9-10T00:00:00" table:style-name="ce14">
            <text:p>10-09-2024</text:p>
          </table:table-cell>
          <table:table-cell office:value-type="string" office:string-value="September" table:formula="of:=TEXT([.A405]; &quot;mmmm&quot;)" table:style-name="ce14">
            <text:p>September</text:p>
          </table:table-cell>
          <table:table-cell office:value-type="string" office:string-value="2024-09" table:formula="of:=TEXT([.A405]; &quot;yyyy-mm&quot;)" table:style-name="ce14">
            <text:p>2024-09</text:p>
          </table:table-cell>
          <table:table-cell office:value-type="float" office:value="131" table:style-name="ce9">
            <text:p>131</text:p>
          </table:table-cell>
          <table:table-cell office:value-type="float" office:value="251" table:style-name="ce9">
            <text:p>251</text:p>
          </table:table-cell>
          <table:table-cell office:value-type="float" office:value="180" table:style-name="ce9">
            <text:p>180</text:p>
          </table:table-cell>
          <table:table-cell office:value-type="float" office:value="6396" table:style-name="ce9">
            <text:p>6396</text:p>
          </table:table-cell>
          <table:table-cell office:value-type="float" office:value="148" table:style-name="ce9">
            <text:p>148</text:p>
          </table:table-cell>
          <table:table-cell office:value-type="float" office:value="6647" table:formula="of:=SUM([.G405]+[.E405])" table:style-name="ce15">
            <text:p>6647</text:p>
          </table:table-cell>
          <table:table-cell office:value-type="float" office:value="32" table:formula="of:=[.F405]-[.H405]" table:style-name="ce15">
            <text:p>32</text:p>
          </table:table-cell>
          <table:table-cell office:value-type="percentage" office:value="1.6548819016097489E-3" table:formula="of:=([.I406]-[.I405])/[.I405]" table:style-name="ce16">
            <text:p>0%</text:p>
          </table:table-cell>
          <table:table-cell office:value-type="string" office:string-value="Valid" table:formula="of:=IF([.F405]&lt;=[.E405]; &quot;Valid&quot;; &quot;Invalid&quot;)" table:style-name="ce17">
            <text:p>Valid</text:p>
          </table:table-cell>
          <table:table-cell office:value-type="string" office:string-value="Valid" table:formula="of:=IF([.H405]&lt;=[.G405]; &quot;Valid&quot;; &quot;Invalid&quot;)" table:style-name="ce17">
            <text:p>Valid</text:p>
          </table:table-cell>
          <table:table-cell office:value-type="string" office:string-value="Increasing Pressure" table:formula="of:=IF([.J405]&gt;0; &quot;Increasing Pressure&quot;; &quot;Stable/Reducing&quot;)" table:style-name="ce18">
            <text:p>Increasing Pressure</text:p>
          </table:table-cell>
          <table:table-cell office:value-type="float" office:value="0.82222222222222219" table:formula="of:=IFERROR([.H405]/[.F405]; 0)" table:style-name="ce17">
            <text:p>0.822222222</text:p>
          </table:table-cell>
          <table:table-cell office:value-type="float" office:value="6556.2857142857147" table:formula="of:=AVERAGE([.I405:.I411])" table:style-name="ce15">
            <text:p>6556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9-11T00:00:00" table:style-name="ce14">
            <text:p>11-09-2024</text:p>
          </table:table-cell>
          <table:table-cell office:value-type="string" office:string-value="September" table:formula="of:=TEXT([.A406]; &quot;mmmm&quot;)" table:style-name="ce14">
            <text:p>September</text:p>
          </table:table-cell>
          <table:table-cell office:value-type="string" office:string-value="2024-09" table:formula="of:=TEXT([.A406]; &quot;yyyy-mm&quot;)" table:style-name="ce14">
            <text:p>2024-09</text:p>
          </table:table-cell>
          <table:table-cell office:value-type="float" office:value="93" table:style-name="ce9">
            <text:p>93</text:p>
          </table:table-cell>
          <table:table-cell office:value-type="float" office:value="248" table:style-name="ce9">
            <text:p>248</text:p>
          </table:table-cell>
          <table:table-cell office:value-type="float" office:value="175" table:style-name="ce9">
            <text:p>175</text:p>
          </table:table-cell>
          <table:table-cell office:value-type="float" office:value="6410" table:style-name="ce9">
            <text:p>6410</text:p>
          </table:table-cell>
          <table:table-cell office:value-type="float" office:value="162" table:style-name="ce9">
            <text:p>162</text:p>
          </table:table-cell>
          <table:table-cell office:value-type="float" office:value="6658" table:formula="of:=SUM([.G406]+[.E406])" table:style-name="ce15">
            <text:p>6658</text:p>
          </table:table-cell>
          <table:table-cell office:value-type="float" office:value="13" table:formula="of:=[.F406]-[.H406]" table:style-name="ce15">
            <text:p>13</text:p>
          </table:table-cell>
          <table:table-cell office:value-type="percentage" office:value="-2.7035145689396217E-3" table:formula="of:=([.I407]-[.I406])/[.I406]" table:style-name="ce16">
            <text:p>0%</text:p>
          </table:table-cell>
          <table:table-cell office:value-type="string" office:string-value="Valid" table:formula="of:=IF([.F406]&lt;=[.E406]; &quot;Valid&quot;; &quot;Invalid&quot;)" table:style-name="ce17">
            <text:p>Valid</text:p>
          </table:table-cell>
          <table:table-cell office:value-type="string" office:string-value="Valid" table:formula="of:=IF([.H406]&lt;=[.G406]; &quot;Valid&quot;; &quot;Invalid&quot;)" table:style-name="ce17">
            <text:p>Valid</text:p>
          </table:table-cell>
          <table:table-cell office:value-type="string" office:string-value="Increasing Pressure" table:formula="of:=IF([.J406]&gt;0; &quot;Increasing Pressure&quot;; &quot;Stable/Reducing&quot;)" table:style-name="ce18">
            <text:p>Increasing Pressure</text:p>
          </table:table-cell>
          <table:table-cell office:value-type="float" office:value="0.92571428571428571" table:formula="of:=IFERROR([.H406]/[.F406]; 0)" table:style-name="ce17">
            <text:p>0.925714286</text:p>
          </table:table-cell>
          <table:table-cell office:value-type="float" office:value="6529.2857142857147" table:formula="of:=AVERAGE([.I406:.I412])" table:style-name="ce15">
            <text:p>6529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9-12T00:00:00" table:style-name="ce14">
            <text:p>12-09-2024</text:p>
          </table:table-cell>
          <table:table-cell office:value-type="string" office:string-value="September" table:formula="of:=TEXT([.A407]; &quot;mmmm&quot;)" table:style-name="ce14">
            <text:p>September</text:p>
          </table:table-cell>
          <table:table-cell office:value-type="string" office:string-value="2024-09" table:formula="of:=TEXT([.A407]; &quot;yyyy-mm&quot;)" table:style-name="ce14">
            <text:p>2024-09</text:p>
          </table:table-cell>
          <table:table-cell office:value-type="float" office:value="184" table:style-name="ce9">
            <text:p>184</text:p>
          </table:table-cell>
          <table:table-cell office:value-type="float" office:value="280" table:style-name="ce9">
            <text:p>280</text:p>
          </table:table-cell>
          <table:table-cell office:value-type="float" office:value="210" table:style-name="ce9">
            <text:p>210</text:p>
          </table:table-cell>
          <table:table-cell office:value-type="float" office:value="6360" table:style-name="ce9">
            <text:p>6360</text:p>
          </table:table-cell>
          <table:table-cell office:value-type="float" office:value="220" table:style-name="ce9">
            <text:p>220</text:p>
          </table:table-cell>
          <table:table-cell office:value-type="float" office:value="6640" table:formula="of:=SUM([.G407]+[.E407])" table:style-name="ce15">
            <text:p>6640</text:p>
          </table:table-cell>
          <table:table-cell office:value-type="float" office:value="-10" table:formula="of:=[.F407]-[.H407]" table:style-name="ce15">
            <text:p>-10</text:p>
          </table:table-cell>
          <table:table-cell office:value-type="percentage" office:value="-1.716867469879518E-2" table:formula="of:=([.I408]-[.I407])/[.I407]" table:style-name="ce16">
            <text:p>-2%</text:p>
          </table:table-cell>
          <table:table-cell office:value-type="string" office:string-value="Valid" table:formula="of:=IF([.F407]&lt;=[.E407]; &quot;Valid&quot;; &quot;Invalid&quot;)" table:style-name="ce17">
            <text:p>Valid</text:p>
          </table:table-cell>
          <table:table-cell office:value-type="string" office:string-value="Valid" table:formula="of:=IF([.H407]&lt;=[.G407]; &quot;Valid&quot;; &quot;Invalid&quot;)" table:style-name="ce17">
            <text:p>Valid</text:p>
          </table:table-cell>
          <table:table-cell office:value-type="string" office:string-value="Stable/Reducing" table:formula="of:=IF([.J407]&gt;0; &quot;Increasing Pressure&quot;; &quot;Stable/Reducing&quot;)" table:style-name="ce18">
            <text:p>Stable/Reducing</text:p>
          </table:table-cell>
          <table:table-cell office:value-type="float" office:value="1.0476190476190477" table:formula="of:=IFERROR([.H407]/[.F407]; 0)" table:style-name="ce17">
            <text:p>1.047619048</text:p>
          </table:table-cell>
          <table:table-cell office:value-type="float" office:value="6501.8571428571431" table:formula="of:=AVERAGE([.I407:.I413])" table:style-name="ce15">
            <text:p>6502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9-13T00:00:00" table:style-name="ce14">
            <text:p>13-09-2024</text:p>
          </table:table-cell>
          <table:table-cell office:value-type="string" office:string-value="September" table:formula="of:=TEXT([.A408]; &quot;mmmm&quot;)" table:style-name="ce14">
            <text:p>September</text:p>
          </table:table-cell>
          <table:table-cell office:value-type="string" office:string-value="2024-09" table:formula="of:=TEXT([.A408]; &quot;yyyy-mm&quot;)" table:style-name="ce14">
            <text:p>2024-09</text:p>
          </table:table-cell>
          <table:table-cell office:value-type="float" office:value="81" table:style-name="ce9">
            <text:p>81</text:p>
          </table:table-cell>
          <table:table-cell office:value-type="float" office:value="200" table:style-name="ce9">
            <text:p>200</text:p>
          </table:table-cell>
          <table:table-cell office:value-type="float" office:value="212" table:style-name="ce9">
            <text:p>212</text:p>
          </table:table-cell>
          <table:table-cell office:value-type="float" office:value="6326" table:style-name="ce9">
            <text:p>6326</text:p>
          </table:table-cell>
          <table:table-cell office:value-type="float" office:value="279" table:style-name="ce9">
            <text:p>279</text:p>
          </table:table-cell>
          <table:table-cell office:value-type="float" office:value="6526" table:formula="of:=SUM([.G408]+[.E408])" table:style-name="ce15">
            <text:p>6526</text:p>
          </table:table-cell>
          <table:table-cell office:value-type="float" office:value="-67" table:formula="of:=[.F408]-[.H408]" table:style-name="ce15">
            <text:p>-67</text:p>
          </table:table-cell>
          <table:table-cell office:value-type="percentage" office:value="-1.1032791909285933E-2" table:formula="of:=([.I409]-[.I408])/[.I408]" table:style-name="ce16">
            <text:p>-1%</text:p>
          </table:table-cell>
          <table:table-cell office:value-type="string" office:string-value="Invalid" table:formula="of:=IF([.F408]&lt;=[.E408]; &quot;Valid&quot;; &quot;Invalid&quot;)" table:style-name="ce17">
            <text:p>Invalid</text:p>
          </table:table-cell>
          <table:table-cell office:value-type="string" office:string-value="Valid" table:formula="of:=IF([.H408]&lt;=[.G408]; &quot;Valid&quot;; &quot;Invalid&quot;)" table:style-name="ce17">
            <text:p>Valid</text:p>
          </table:table-cell>
          <table:table-cell office:value-type="string" office:string-value="Stable/Reducing" table:formula="of:=IF([.J408]&gt;0; &quot;Increasing Pressure&quot;; &quot;Stable/Reducing&quot;)" table:style-name="ce18">
            <text:p>Stable/Reducing</text:p>
          </table:table-cell>
          <table:table-cell office:value-type="float" office:value="1.3160377358490567" table:formula="of:=IFERROR([.H408]/[.F408]; 0)" table:style-name="ce17">
            <text:p>1.316037736</text:p>
          </table:table-cell>
          <table:table-cell office:value-type="float" office:value="6442.2857142857147" table:formula="of:=AVERAGE([.I408:.I414])" table:style-name="ce15">
            <text:p>6442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9-15T00:00:00" table:style-name="ce14">
            <text:p>15-09-2024</text:p>
          </table:table-cell>
          <table:table-cell office:value-type="string" office:string-value="September" table:formula="of:=TEXT([.A409]; &quot;mmmm&quot;)" table:style-name="ce14">
            <text:p>September</text:p>
          </table:table-cell>
          <table:table-cell office:value-type="string" office:string-value="2024-09" table:formula="of:=TEXT([.A409]; &quot;yyyy-mm&quot;)" table:style-name="ce14">
            <text:p>2024-09</text:p>
          </table:table-cell>
          <table:table-cell office:value-type="float" office:value="98" table:style-name="ce9">
            <text:p>98</text:p>
          </table:table-cell>
          <table:table-cell office:value-type="float" office:value="220" table:style-name="ce9">
            <text:p>220</text:p>
          </table:table-cell>
          <table:table-cell office:value-type="float" office:value="167" table:style-name="ce9">
            <text:p>167</text:p>
          </table:table-cell>
          <table:table-cell office:value-type="float" office:value="6234" table:style-name="ce9">
            <text:p>6234</text:p>
          </table:table-cell>
          <table:table-cell office:value-type="float" office:value="210" table:style-name="ce9">
            <text:p>210</text:p>
          </table:table-cell>
          <table:table-cell office:value-type="float" office:value="6454" table:formula="of:=SUM([.G409]+[.E409])" table:style-name="ce15">
            <text:p>6454</text:p>
          </table:table-cell>
          <table:table-cell office:value-type="float" office:value="-43" table:formula="of:=[.F409]-[.H409]" table:style-name="ce15">
            <text:p>-43</text:p>
          </table:table-cell>
          <table:table-cell office:value-type="percentage" office:value="-2.4790827393864272E-3" table:formula="of:=([.I410]-[.I409])/[.I409]" table:style-name="ce16">
            <text:p>0%</text:p>
          </table:table-cell>
          <table:table-cell office:value-type="string" office:string-value="Valid" table:formula="of:=IF([.F409]&lt;=[.E409]; &quot;Valid&quot;; &quot;Invalid&quot;)" table:style-name="ce17">
            <text:p>Valid</text:p>
          </table:table-cell>
          <table:table-cell office:value-type="string" office:string-value="Valid" table:formula="of:=IF([.H409]&lt;=[.G409]; &quot;Valid&quot;; &quot;Invalid&quot;)" table:style-name="ce17">
            <text:p>Valid</text:p>
          </table:table-cell>
          <table:table-cell office:value-type="string" office:string-value="Stable/Reducing" table:formula="of:=IF([.J409]&gt;0; &quot;Increasing Pressure&quot;; &quot;Stable/Reducing&quot;)" table:style-name="ce18">
            <text:p>Stable/Reducing</text:p>
          </table:table-cell>
          <table:table-cell office:value-type="float" office:value="1.2574850299401197" table:formula="of:=IFERROR([.H409]/[.F409]; 0)" table:style-name="ce17">
            <text:p>1.25748503</text:p>
          </table:table-cell>
          <table:table-cell office:value-type="float" office:value="6396.4285714285716" table:formula="of:=AVERAGE([.I409:.I415])" table:style-name="ce15">
            <text:p>6396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9-16T00:00:00" table:style-name="ce14">
            <text:p>16-09-2024</text:p>
          </table:table-cell>
          <table:table-cell office:value-type="string" office:string-value="September" table:formula="of:=TEXT([.A410]; &quot;mmmm&quot;)" table:style-name="ce14">
            <text:p>September</text:p>
          </table:table-cell>
          <table:table-cell office:value-type="string" office:string-value="2024-09" table:formula="of:=TEXT([.A410]; &quot;yyyy-mm&quot;)" table:style-name="ce14">
            <text:p>2024-09</text:p>
          </table:table-cell>
          <table:table-cell office:value-type="float" office:value="113" table:style-name="ce9">
            <text:p>113</text:p>
          </table:table-cell>
          <table:table-cell office:value-type="float" office:value="209" table:style-name="ce9">
            <text:p>209</text:p>
          </table:table-cell>
          <table:table-cell office:value-type="float" office:value="160" table:style-name="ce9">
            <text:p>160</text:p>
          </table:table-cell>
          <table:table-cell office:value-type="float" office:value="6229" table:style-name="ce9">
            <text:p>6229</text:p>
          </table:table-cell>
          <table:table-cell office:value-type="float" office:value="164" table:style-name="ce9">
            <text:p>164</text:p>
          </table:table-cell>
          <table:table-cell office:value-type="float" office:value="6438" table:formula="of:=SUM([.G410]+[.E410])" table:style-name="ce15">
            <text:p>6438</text:p>
          </table:table-cell>
          <table:table-cell office:value-type="float" office:value="-4" table:formula="of:=[.F410]-[.H410]" table:style-name="ce15">
            <text:p>-4</text:p>
          </table:table-cell>
          <table:table-cell office:value-type="percentage" office:value="1.4445479962721343E-2" table:formula="of:=([.I411]-[.I410])/[.I410]" table:style-name="ce16">
            <text:p>1%</text:p>
          </table:table-cell>
          <table:table-cell office:value-type="string" office:string-value="Valid" table:formula="of:=IF([.F410]&lt;=[.E410]; &quot;Valid&quot;; &quot;Invalid&quot;)" table:style-name="ce17">
            <text:p>Valid</text:p>
          </table:table-cell>
          <table:table-cell office:value-type="string" office:string-value="Valid" table:formula="of:=IF([.H410]&lt;=[.G410]; &quot;Valid&quot;; &quot;Invalid&quot;)" table:style-name="ce17">
            <text:p>Valid</text:p>
          </table:table-cell>
          <table:table-cell office:value-type="string" office:string-value="Stable/Reducing" table:formula="of:=IF([.J410]&gt;0; &quot;Increasing Pressure&quot;; &quot;Stable/Reducing&quot;)" table:style-name="ce18">
            <text:p>Stable/Reducing</text:p>
          </table:table-cell>
          <table:table-cell office:value-type="float" office:value="1.0249999999999999" table:formula="of:=IFERROR([.H410]/[.F410]; 0)" table:style-name="ce17">
            <text:p>1.025</text:p>
          </table:table-cell>
          <table:table-cell office:value-type="float" office:value="6371.8571428571431" table:formula="of:=AVERAGE([.I410:.I416])" table:style-name="ce15">
            <text:p>6372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9-17T00:00:00" table:style-name="ce14">
            <text:p>17-09-2024</text:p>
          </table:table-cell>
          <table:table-cell office:value-type="string" office:string-value="September" table:formula="of:=TEXT([.A411]; &quot;mmmm&quot;)" table:style-name="ce14">
            <text:p>September</text:p>
          </table:table-cell>
          <table:table-cell office:value-type="string" office:string-value="2024-09" table:formula="of:=TEXT([.A411]; &quot;yyyy-mm&quot;)" table:style-name="ce14">
            <text:p>2024-09</text:p>
          </table:table-cell>
          <table:table-cell office:value-type="float" office:value="159" table:style-name="ce9">
            <text:p>159</text:p>
          </table:table-cell>
          <table:table-cell office:value-type="float" office:value="304" table:style-name="ce9">
            <text:p>304</text:p>
          </table:table-cell>
          <table:table-cell office:value-type="float" office:value="139" table:style-name="ce9">
            <text:p>139</text:p>
          </table:table-cell>
          <table:table-cell office:value-type="float" office:value="6227" table:style-name="ce9">
            <text:p>6227</text:p>
          </table:table-cell>
          <table:table-cell office:value-type="float" office:value="160" table:style-name="ce9">
            <text:p>160</text:p>
          </table:table-cell>
          <table:table-cell office:value-type="float" office:value="6531" table:formula="of:=SUM([.G411]+[.E411])" table:style-name="ce15">
            <text:p>6531</text:p>
          </table:table-cell>
          <table:table-cell office:value-type="float" office:value="-21" table:formula="of:=[.F411]-[.H411]" table:style-name="ce15">
            <text:p>-21</text:p>
          </table:table-cell>
          <table:table-cell office:value-type="percentage" office:value="-1.1177461338233042E-2" table:formula="of:=([.I412]-[.I411])/[.I411]" table:style-name="ce16">
            <text:p>-1%</text:p>
          </table:table-cell>
          <table:table-cell office:value-type="string" office:string-value="Valid" table:formula="of:=IF([.F411]&lt;=[.E411]; &quot;Valid&quot;; &quot;Invalid&quot;)" table:style-name="ce17">
            <text:p>Valid</text:p>
          </table:table-cell>
          <table:table-cell office:value-type="string" office:string-value="Valid" table:formula="of:=IF([.H411]&lt;=[.G411]; &quot;Valid&quot;; &quot;Invalid&quot;)" table:style-name="ce17">
            <text:p>Valid</text:p>
          </table:table-cell>
          <table:table-cell office:value-type="string" office:string-value="Stable/Reducing" table:formula="of:=IF([.J411]&gt;0; &quot;Increasing Pressure&quot;; &quot;Stable/Reducing&quot;)" table:style-name="ce18">
            <text:p>Stable/Reducing</text:p>
          </table:table-cell>
          <table:table-cell office:value-type="float" office:value="1.1510791366906474" table:formula="of:=IFERROR([.H411]/[.F411]; 0)" table:style-name="ce17">
            <text:p>1.151079137</text:p>
          </table:table-cell>
          <table:table-cell office:value-type="float" office:value="6348.5714285714284" table:formula="of:=AVERAGE([.I411:.I417])" table:style-name="ce15">
            <text:p>6349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9-18T00:00:00" table:style-name="ce14">
            <text:p>18-09-2024</text:p>
          </table:table-cell>
          <table:table-cell office:value-type="string" office:string-value="September" table:formula="of:=TEXT([.A412]; &quot;mmmm&quot;)" table:style-name="ce14">
            <text:p>September</text:p>
          </table:table-cell>
          <table:table-cell office:value-type="string" office:string-value="2024-09" table:formula="of:=TEXT([.A412]; &quot;yyyy-mm&quot;)" table:style-name="ce14">
            <text:p>2024-09</text:p>
          </table:table-cell>
          <table:table-cell office:value-type="float" office:value="116" table:style-name="ce9">
            <text:p>116</text:p>
          </table:table-cell>
          <table:table-cell office:value-type="float" office:value="213" table:style-name="ce9">
            <text:p>213</text:p>
          </table:table-cell>
          <table:table-cell office:value-type="float" office:value="217" table:style-name="ce9">
            <text:p>217</text:p>
          </table:table-cell>
          <table:table-cell office:value-type="float" office:value="6245" table:style-name="ce9">
            <text:p>6245</text:p>
          </table:table-cell>
          <table:table-cell office:value-type="float" office:value="149" table:style-name="ce9">
            <text:p>149</text:p>
          </table:table-cell>
          <table:table-cell office:value-type="float" office:value="6458" table:formula="of:=SUM([.G412]+[.E412])" table:style-name="ce15">
            <text:p>6458</text:p>
          </table:table-cell>
          <table:table-cell office:value-type="float" office:value="68" table:formula="of:=[.F412]-[.H412]" table:style-name="ce15">
            <text:p>68</text:p>
          </table:table-cell>
          <table:table-cell office:value-type="percentage" office:value="1.2387736141220192E-3" table:formula="of:=([.I413]-[.I412])/[.I412]" table:style-name="ce16">
            <text:p>0%</text:p>
          </table:table-cell>
          <table:table-cell office:value-type="string" office:string-value="Invalid" table:formula="of:=IF([.F412]&lt;=[.E412]; &quot;Valid&quot;; &quot;Invalid&quot;)" table:style-name="ce17">
            <text:p>Invalid</text:p>
          </table:table-cell>
          <table:table-cell office:value-type="string" office:string-value="Valid" table:formula="of:=IF([.H412]&lt;=[.G412]; &quot;Valid&quot;; &quot;Invalid&quot;)" table:style-name="ce17">
            <text:p>Valid</text:p>
          </table:table-cell>
          <table:table-cell office:value-type="string" office:string-value="Increasing Pressure" table:formula="of:=IF([.J412]&gt;0; &quot;Increasing Pressure&quot;; &quot;Stable/Reducing&quot;)" table:style-name="ce18">
            <text:p>Increasing Pressure</text:p>
          </table:table-cell>
          <table:table-cell office:value-type="float" office:value="0.68663594470046085" table:formula="of:=IFERROR([.H412]/[.F412]; 0)" table:style-name="ce17">
            <text:p>0.686635945</text:p>
          </table:table-cell>
          <table:table-cell office:value-type="float" office:value="6314" table:formula="of:=AVERAGE([.I412:.I418])" table:style-name="ce15">
            <text:p>6314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9-19T00:00:00" table:style-name="ce14">
            <text:p>19-09-2024</text:p>
          </table:table-cell>
          <table:table-cell office:value-type="string" office:string-value="September" table:formula="of:=TEXT([.A413]; &quot;mmmm&quot;)" table:style-name="ce14">
            <text:p>September</text:p>
          </table:table-cell>
          <table:table-cell office:value-type="string" office:string-value="2024-09" table:formula="of:=TEXT([.A413]; &quot;yyyy-mm&quot;)" table:style-name="ce14">
            <text:p>2024-09</text:p>
          </table:table-cell>
          <table:table-cell office:value-type="float" office:value="93" table:style-name="ce9">
            <text:p>93</text:p>
          </table:table-cell>
          <table:table-cell office:value-type="float" office:value="196" table:style-name="ce9">
            <text:p>196</text:p>
          </table:table-cell>
          <table:table-cell office:value-type="float" office:value="169" table:style-name="ce9">
            <text:p>169</text:p>
          </table:table-cell>
          <table:table-cell office:value-type="float" office:value="6270" table:style-name="ce9">
            <text:p>6270</text:p>
          </table:table-cell>
          <table:table-cell office:value-type="float" office:value="188" table:style-name="ce9">
            <text:p>188</text:p>
          </table:table-cell>
          <table:table-cell office:value-type="float" office:value="6466" table:formula="of:=SUM([.G413]+[.E413])" table:style-name="ce15">
            <text:p>6466</text:p>
          </table:table-cell>
          <table:table-cell office:value-type="float" office:value="-19" table:formula="of:=[.F413]-[.H413]" table:style-name="ce15">
            <text:p>-19</text:p>
          </table:table-cell>
          <table:table-cell office:value-type="percentage" office:value="-3.7581193937519332E-2" table:formula="of:=([.I414]-[.I413])/[.I413]" table:style-name="ce16">
            <text:p>-4%</text:p>
          </table:table-cell>
          <table:table-cell office:value-type="string" office:string-value="Valid" table:formula="of:=IF([.F413]&lt;=[.E413]; &quot;Valid&quot;; &quot;Invalid&quot;)" table:style-name="ce17">
            <text:p>Valid</text:p>
          </table:table-cell>
          <table:table-cell office:value-type="string" office:string-value="Valid" table:formula="of:=IF([.H413]&lt;=[.G413]; &quot;Valid&quot;; &quot;Invalid&quot;)" table:style-name="ce17">
            <text:p>Valid</text:p>
          </table:table-cell>
          <table:table-cell office:value-type="string" office:string-value="Stable/Reducing" table:formula="of:=IF([.J413]&gt;0; &quot;Increasing Pressure&quot;; &quot;Stable/Reducing&quot;)" table:style-name="ce18">
            <text:p>Stable/Reducing</text:p>
          </table:table-cell>
          <table:table-cell office:value-type="float" office:value="1.1124260355029585" table:formula="of:=IFERROR([.H413]/[.F413]; 0)" table:style-name="ce17">
            <text:p>1.112426036</text:p>
          </table:table-cell>
          <table:table-cell office:value-type="float" office:value="6268.2857142857147" table:formula="of:=AVERAGE([.I413:.I419])" table:style-name="ce15">
            <text:p>6268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9-22T00:00:00" table:style-name="ce14">
            <text:p>22-09-2024</text:p>
          </table:table-cell>
          <table:table-cell office:value-type="string" office:string-value="September" table:formula="of:=TEXT([.A414]; &quot;mmmm&quot;)" table:style-name="ce14">
            <text:p>September</text:p>
          </table:table-cell>
          <table:table-cell office:value-type="string" office:string-value="2024-09" table:formula="of:=TEXT([.A414]; &quot;yyyy-mm&quot;)" table:style-name="ce14">
            <text:p>2024-09</text:p>
          </table:table-cell>
          <table:table-cell office:value-type="float" office:value="124" table:style-name="ce9">
            <text:p>124</text:p>
          </table:table-cell>
          <table:table-cell office:value-type="float" office:value="234" table:style-name="ce9">
            <text:p>234</text:p>
          </table:table-cell>
          <table:table-cell office:value-type="float" office:value="161" table:style-name="ce9">
            <text:p>161</text:p>
          </table:table-cell>
          <table:table-cell office:value-type="float" office:value="5989" table:style-name="ce9">
            <text:p>5989</text:p>
          </table:table-cell>
          <table:table-cell office:value-type="float" office:value="197" table:style-name="ce9">
            <text:p>197</text:p>
          </table:table-cell>
          <table:table-cell office:value-type="float" office:value="6223" table:formula="of:=SUM([.G414]+[.E414])" table:style-name="ce15">
            <text:p>6223</text:p>
          </table:table-cell>
          <table:table-cell office:value-type="float" office:value="-36" table:formula="of:=[.F414]-[.H414]" table:style-name="ce15">
            <text:p>-36</text:p>
          </table:table-cell>
          <table:table-cell office:value-type="percentage" office:value="-2.8924955809095294E-3" table:formula="of:=([.I415]-[.I414])/[.I414]" table:style-name="ce16">
            <text:p>0%</text:p>
          </table:table-cell>
          <table:table-cell office:value-type="string" office:string-value="Valid" table:formula="of:=IF([.F414]&lt;=[.E414]; &quot;Valid&quot;; &quot;Invalid&quot;)" table:style-name="ce17">
            <text:p>Valid</text:p>
          </table:table-cell>
          <table:table-cell office:value-type="string" office:string-value="Valid" table:formula="of:=IF([.H414]&lt;=[.G414]; &quot;Valid&quot;; &quot;Invalid&quot;)" table:style-name="ce17">
            <text:p>Valid</text:p>
          </table:table-cell>
          <table:table-cell office:value-type="string" office:string-value="Stable/Reducing" table:formula="of:=IF([.J414]&gt;0; &quot;Increasing Pressure&quot;; &quot;Stable/Reducing&quot;)" table:style-name="ce18">
            <text:p>Stable/Reducing</text:p>
          </table:table-cell>
          <table:table-cell office:value-type="float" office:value="1.2236024844720497" table:formula="of:=IFERROR([.H414]/[.F414]; 0)" table:style-name="ce17">
            <text:p>1.223602484</text:p>
          </table:table-cell>
          <table:table-cell office:value-type="float" office:value="6237.7142857142853" table:formula="of:=AVERAGE([.I414:.I420])" table:style-name="ce15">
            <text:p>6238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9-23T00:00:00" table:style-name="ce14">
            <text:p>23-09-2024</text:p>
          </table:table-cell>
          <table:table-cell office:value-type="string" office:string-value="September" table:formula="of:=TEXT([.A415]; &quot;mmmm&quot;)" table:style-name="ce14">
            <text:p>September</text:p>
          </table:table-cell>
          <table:table-cell office:value-type="string" office:string-value="2024-09" table:formula="of:=TEXT([.A415]; &quot;yyyy-mm&quot;)" table:style-name="ce14">
            <text:p>2024-09</text:p>
          </table:table-cell>
          <table:table-cell office:value-type="float" office:value="92" table:style-name="ce9">
            <text:p>92</text:p>
          </table:table-cell>
          <table:table-cell office:value-type="float" office:value="203" table:style-name="ce9">
            <text:p>203</text:p>
          </table:table-cell>
          <table:table-cell office:value-type="float" office:value="173" table:style-name="ce9">
            <text:p>173</text:p>
          </table:table-cell>
          <table:table-cell office:value-type="float" office:value="6002" table:style-name="ce9">
            <text:p>6002</text:p>
          </table:table-cell>
          <table:table-cell office:value-type="float" office:value="165" table:style-name="ce9">
            <text:p>165</text:p>
          </table:table-cell>
          <table:table-cell office:value-type="float" office:value="6205" table:formula="of:=SUM([.G415]+[.E415])" table:style-name="ce15">
            <text:p>6205</text:p>
          </table:table-cell>
          <table:table-cell office:value-type="float" office:value="8" table:formula="of:=[.F415]-[.H415]" table:style-name="ce15">
            <text:p>8</text:p>
          </table:table-cell>
          <table:table-cell office:value-type="percentage" office:value="1.2409347300564061E-2" table:formula="of:=([.I416]-[.I415])/[.I415]" table:style-name="ce16">
            <text:p>1%</text:p>
          </table:table-cell>
          <table:table-cell office:value-type="string" office:string-value="Valid" table:formula="of:=IF([.F415]&lt;=[.E415]; &quot;Valid&quot;; &quot;Invalid&quot;)" table:style-name="ce17">
            <text:p>Valid</text:p>
          </table:table-cell>
          <table:table-cell office:value-type="string" office:string-value="Valid" table:formula="of:=IF([.H415]&lt;=[.G415]; &quot;Valid&quot;; &quot;Invalid&quot;)" table:style-name="ce17">
            <text:p>Valid</text:p>
          </table:table-cell>
          <table:table-cell office:value-type="string" office:string-value="Increasing Pressure" table:formula="of:=IF([.J415]&gt;0; &quot;Increasing Pressure&quot;; &quot;Stable/Reducing&quot;)" table:style-name="ce18">
            <text:p>Increasing Pressure</text:p>
          </table:table-cell>
          <table:table-cell office:value-type="float" office:value="0.95375722543352603" table:formula="of:=IFERROR([.H415]/[.F415]; 0)" table:style-name="ce17">
            <text:p>0.953757225</text:p>
          </table:table-cell>
          <table:table-cell office:value-type="float" office:value="6256.4285714285716" table:formula="of:=AVERAGE([.I415:.I421])" table:style-name="ce15">
            <text:p>6256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9-24T00:00:00" table:style-name="ce14">
            <text:p>24-09-2024</text:p>
          </table:table-cell>
          <table:table-cell office:value-type="string" office:string-value="September" table:formula="of:=TEXT([.A416]; &quot;mmmm&quot;)" table:style-name="ce14">
            <text:p>September</text:p>
          </table:table-cell>
          <table:table-cell office:value-type="string" office:string-value="2024-09" table:formula="of:=TEXT([.A416]; &quot;yyyy-mm&quot;)" table:style-name="ce14">
            <text:p>2024-09</text:p>
          </table:table-cell>
          <table:table-cell office:value-type="float" office:value="186" table:style-name="ce9">
            <text:p>186</text:p>
          </table:table-cell>
          <table:table-cell office:value-type="float" office:value="259" table:style-name="ce9">
            <text:p>259</text:p>
          </table:table-cell>
          <table:table-cell office:value-type="float" office:value="172" table:style-name="ce9">
            <text:p>172</text:p>
          </table:table-cell>
          <table:table-cell office:value-type="float" office:value="6023" table:style-name="ce9">
            <text:p>6023</text:p>
          </table:table-cell>
          <table:table-cell office:value-type="float" office:value="143" table:style-name="ce9">
            <text:p>143</text:p>
          </table:table-cell>
          <table:table-cell office:value-type="float" office:value="6282" table:formula="of:=SUM([.G416]+[.E416])" table:style-name="ce15">
            <text:p>6282</text:p>
          </table:table-cell>
          <table:table-cell office:value-type="float" office:value="29" table:formula="of:=[.F416]-[.H416]" table:style-name="ce15">
            <text:p>29</text:p>
          </table:table-cell>
          <table:table-cell office:value-type="percentage" office:value="-1.1142948105698821E-3" table:formula="of:=([.I417]-[.I416])/[.I416]" table:style-name="ce16">
            <text:p>0%</text:p>
          </table:table-cell>
          <table:table-cell office:value-type="string" office:string-value="Valid" table:formula="of:=IF([.F416]&lt;=[.E416]; &quot;Valid&quot;; &quot;Invalid&quot;)" table:style-name="ce17">
            <text:p>Valid</text:p>
          </table:table-cell>
          <table:table-cell office:value-type="string" office:string-value="Valid" table:formula="of:=IF([.H416]&lt;=[.G416]; &quot;Valid&quot;; &quot;Invalid&quot;)" table:style-name="ce17">
            <text:p>Valid</text:p>
          </table:table-cell>
          <table:table-cell office:value-type="string" office:string-value="Increasing Pressure" table:formula="of:=IF([.J416]&gt;0; &quot;Increasing Pressure&quot;; &quot;Stable/Reducing&quot;)" table:style-name="ce18">
            <text:p>Increasing Pressure</text:p>
          </table:table-cell>
          <table:table-cell office:value-type="float" office:value="0.83139534883720934" table:formula="of:=IFERROR([.H416]/[.F416]; 0)" table:style-name="ce17">
            <text:p>0.831395349</text:p>
          </table:table-cell>
          <table:table-cell office:value-type="float" office:value="6270.8571428571431" table:formula="of:=AVERAGE([.I416:.I422])" table:style-name="ce15">
            <text:p>6271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9-25T00:00:00" table:style-name="ce14">
            <text:p>25-09-2024</text:p>
          </table:table-cell>
          <table:table-cell office:value-type="string" office:string-value="September" table:formula="of:=TEXT([.A417]; &quot;mmmm&quot;)" table:style-name="ce14">
            <text:p>September</text:p>
          </table:table-cell>
          <table:table-cell office:value-type="string" office:string-value="2024-09" table:formula="of:=TEXT([.A417]; &quot;yyyy-mm&quot;)" table:style-name="ce14">
            <text:p>2024-09</text:p>
          </table:table-cell>
          <table:table-cell office:value-type="float" office:value="154" table:style-name="ce9">
            <text:p>154</text:p>
          </table:table-cell>
          <table:table-cell office:value-type="float" office:value="225" table:style-name="ce9">
            <text:p>225</text:p>
          </table:table-cell>
          <table:table-cell office:value-type="float" office:value="220" table:style-name="ce9">
            <text:p>220</text:p>
          </table:table-cell>
          <table:table-cell office:value-type="float" office:value="6050" table:style-name="ce9">
            <text:p>6050</text:p>
          </table:table-cell>
          <table:table-cell office:value-type="float" office:value="169" table:style-name="ce9">
            <text:p>169</text:p>
          </table:table-cell>
          <table:table-cell office:value-type="float" office:value="6275" table:formula="of:=SUM([.G417]+[.E417])" table:style-name="ce15">
            <text:p>6275</text:p>
          </table:table-cell>
          <table:table-cell office:value-type="float" office:value="51" table:formula="of:=[.F417]-[.H417]" table:style-name="ce15">
            <text:p>51</text:p>
          </table:table-cell>
          <table:table-cell office:value-type="percentage" office:value="2.2310756972111555E-3" table:formula="of:=([.I418]-[.I417])/[.I417]" table:style-name="ce16">
            <text:p>0%</text:p>
          </table:table-cell>
          <table:table-cell office:value-type="string" office:string-value="Valid" table:formula="of:=IF([.F417]&lt;=[.E417]; &quot;Valid&quot;; &quot;Invalid&quot;)" table:style-name="ce17">
            <text:p>Valid</text:p>
          </table:table-cell>
          <table:table-cell office:value-type="string" office:string-value="Valid" table:formula="of:=IF([.H417]&lt;=[.G417]; &quot;Valid&quot;; &quot;Invalid&quot;)" table:style-name="ce17">
            <text:p>Valid</text:p>
          </table:table-cell>
          <table:table-cell office:value-type="string" office:string-value="Increasing Pressure" table:formula="of:=IF([.J417]&gt;0; &quot;Increasing Pressure&quot;; &quot;Stable/Reducing&quot;)" table:style-name="ce18">
            <text:p>Increasing Pressure</text:p>
          </table:table-cell>
          <table:table-cell office:value-type="float" office:value="0.76818181818181819" table:formula="of:=IFERROR([.H417]/[.F417]; 0)" table:style-name="ce17">
            <text:p>0.768181818</text:p>
          </table:table-cell>
          <table:table-cell office:value-type="float" office:value="6270.5714285714284" table:formula="of:=AVERAGE([.I417:.I423])" table:style-name="ce15">
            <text:p>6271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9-26T00:00:00" table:style-name="ce14">
            <text:p>26-09-2024</text:p>
          </table:table-cell>
          <table:table-cell office:value-type="string" office:string-value="September" table:formula="of:=TEXT([.A418]; &quot;mmmm&quot;)" table:style-name="ce14">
            <text:p>September</text:p>
          </table:table-cell>
          <table:table-cell office:value-type="string" office:string-value="2024-09" table:formula="of:=TEXT([.A418]; &quot;yyyy-mm&quot;)" table:style-name="ce14">
            <text:p>2024-09</text:p>
          </table:table-cell>
          <table:table-cell office:value-type="float" office:value="91" table:style-name="ce9">
            <text:p>91</text:p>
          </table:table-cell>
          <table:table-cell office:value-type="float" office:value="199" table:style-name="ce9">
            <text:p>199</text:p>
          </table:table-cell>
          <table:table-cell office:value-type="float" office:value="172" table:style-name="ce9">
            <text:p>172</text:p>
          </table:table-cell>
          <table:table-cell office:value-type="float" office:value="6090" table:style-name="ce9">
            <text:p>6090</text:p>
          </table:table-cell>
          <table:table-cell office:value-type="float" office:value="185" table:style-name="ce9">
            <text:p>185</text:p>
          </table:table-cell>
          <table:table-cell office:value-type="float" office:value="6289" table:formula="of:=SUM([.G418]+[.E418])" table:style-name="ce15">
            <text:p>6289</text:p>
          </table:table-cell>
          <table:table-cell office:value-type="float" office:value="-13" table:formula="of:=[.F418]-[.H418]" table:style-name="ce15">
            <text:p>-13</text:p>
          </table:table-cell>
          <table:table-cell office:value-type="percentage" office:value="-2.4010176498648433E-2" table:formula="of:=([.I419]-[.I418])/[.I418]" table:style-name="ce16">
            <text:p>-2%</text:p>
          </table:table-cell>
          <table:table-cell office:value-type="string" office:string-value="Valid" table:formula="of:=IF([.F418]&lt;=[.E418]; &quot;Valid&quot;; &quot;Invalid&quot;)" table:style-name="ce17">
            <text:p>Valid</text:p>
          </table:table-cell>
          <table:table-cell office:value-type="string" office:string-value="Valid" table:formula="of:=IF([.H418]&lt;=[.G418]; &quot;Valid&quot;; &quot;Invalid&quot;)" table:style-name="ce17">
            <text:p>Valid</text:p>
          </table:table-cell>
          <table:table-cell office:value-type="string" office:string-value="Stable/Reducing" table:formula="of:=IF([.J418]&gt;0; &quot;Increasing Pressure&quot;; &quot;Stable/Reducing&quot;)" table:style-name="ce18">
            <text:p>Stable/Reducing</text:p>
          </table:table-cell>
          <table:table-cell office:value-type="float" office:value="1.0755813953488371" table:formula="of:=IFERROR([.H418]/[.F418]; 0)" table:style-name="ce17">
            <text:p>1.075581395</text:p>
          </table:table-cell>
          <table:table-cell office:value-type="float" office:value="6253.8571428571431" table:formula="of:=AVERAGE([.I418:.I424])" table:style-name="ce15">
            <text:p>6254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9-29T00:00:00" table:style-name="ce14">
            <text:p>29-09-2024</text:p>
          </table:table-cell>
          <table:table-cell office:value-type="string" office:string-value="September" table:formula="of:=TEXT([.A419]; &quot;mmmm&quot;)" table:style-name="ce14">
            <text:p>September</text:p>
          </table:table-cell>
          <table:table-cell office:value-type="string" office:string-value="2024-09" table:formula="of:=TEXT([.A419]; &quot;yyyy-mm&quot;)" table:style-name="ce14">
            <text:p>2024-09</text:p>
          </table:table-cell>
          <table:table-cell office:value-type="float" office:value="81" table:style-name="ce9">
            <text:p>81</text:p>
          </table:table-cell>
          <table:table-cell office:value-type="float" office:value="213" table:style-name="ce9">
            <text:p>213</text:p>
          </table:table-cell>
          <table:table-cell office:value-type="float" office:value="153" table:style-name="ce9">
            <text:p>153</text:p>
          </table:table-cell>
          <table:table-cell office:value-type="float" office:value="5925" table:style-name="ce9">
            <text:p>5925</text:p>
          </table:table-cell>
          <table:table-cell office:value-type="float" office:value="177" table:style-name="ce9">
            <text:p>177</text:p>
          </table:table-cell>
          <table:table-cell office:value-type="float" office:value="6138" table:formula="of:=SUM([.G419]+[.E419])" table:style-name="ce15">
            <text:p>6138</text:p>
          </table:table-cell>
          <table:table-cell office:value-type="float" office:value="-24" table:formula="of:=[.F419]-[.H419]" table:style-name="ce15">
            <text:p>-24</text:p>
          </table:table-cell>
          <table:table-cell office:value-type="percentage" office:value="1.8572825024437929E-2" table:formula="of:=([.I420]-[.I419])/[.I419]" table:style-name="ce16">
            <text:p>2%</text:p>
          </table:table-cell>
          <table:table-cell office:value-type="string" office:string-value="Valid" table:formula="of:=IF([.F419]&lt;=[.E419]; &quot;Valid&quot;; &quot;Invalid&quot;)" table:style-name="ce17">
            <text:p>Valid</text:p>
          </table:table-cell>
          <table:table-cell office:value-type="string" office:string-value="Valid" table:formula="of:=IF([.H419]&lt;=[.G419]; &quot;Valid&quot;; &quot;Invalid&quot;)" table:style-name="ce17">
            <text:p>Valid</text:p>
          </table:table-cell>
          <table:table-cell office:value-type="string" office:string-value="Stable/Reducing" table:formula="of:=IF([.J419]&gt;0; &quot;Increasing Pressure&quot;; &quot;Stable/Reducing&quot;)" table:style-name="ce18">
            <text:p>Stable/Reducing</text:p>
          </table:table-cell>
          <table:table-cell office:value-type="float" office:value="1.1568627450980393" table:formula="of:=IFERROR([.H419]/[.F419]; 0)" table:style-name="ce17">
            <text:p>1.156862745</text:p>
          </table:table-cell>
          <table:table-cell office:value-type="float" office:value="6248.5714285714284" table:formula="of:=AVERAGE([.I419:.I425])" table:style-name="ce15">
            <text:p>6249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09-30T00:00:00" table:style-name="ce14">
            <text:p>30-09-2024</text:p>
          </table:table-cell>
          <table:table-cell office:value-type="string" office:string-value="September" table:formula="of:=TEXT([.A420]; &quot;mmmm&quot;)" table:style-name="ce14">
            <text:p>September</text:p>
          </table:table-cell>
          <table:table-cell office:value-type="string" office:string-value="2024-09" table:formula="of:=TEXT([.A420]; &quot;yyyy-mm&quot;)" table:style-name="ce14">
            <text:p>2024-09</text:p>
          </table:table-cell>
          <table:table-cell office:value-type="float" office:value="209" table:style-name="ce9">
            <text:p>209</text:p>
          </table:table-cell>
          <table:table-cell office:value-type="float" office:value="285" table:style-name="ce9">
            <text:p>285</text:p>
          </table:table-cell>
          <table:table-cell office:value-type="float" office:value="184" table:style-name="ce9">
            <text:p>184</text:p>
          </table:table-cell>
          <table:table-cell office:value-type="float" office:value="5967" table:style-name="ce9">
            <text:p>5967</text:p>
          </table:table-cell>
          <table:table-cell office:value-type="float" office:value="138" table:style-name="ce9">
            <text:p>138</text:p>
          </table:table-cell>
          <table:table-cell office:value-type="float" office:value="6252" table:formula="of:=SUM([.G420]+[.E420])" table:style-name="ce15">
            <text:p>6252</text:p>
          </table:table-cell>
          <table:table-cell office:value-type="float" office:value="46" table:formula="of:=[.F420]-[.H420]" table:style-name="ce15">
            <text:p>46</text:p>
          </table:table-cell>
          <table:table-cell office:value-type="percentage" office:value="1.6314779270633396E-2" table:formula="of:=([.I421]-[.I420])/[.I420]" table:style-name="ce16">
            <text:p>2%</text:p>
          </table:table-cell>
          <table:table-cell office:value-type="string" office:string-value="Valid" table:formula="of:=IF([.F420]&lt;=[.E420]; &quot;Valid&quot;; &quot;Invalid&quot;)" table:style-name="ce17">
            <text:p>Valid</text:p>
          </table:table-cell>
          <table:table-cell office:value-type="string" office:string-value="Valid" table:formula="of:=IF([.H420]&lt;=[.G420]; &quot;Valid&quot;; &quot;Invalid&quot;)" table:style-name="ce17">
            <text:p>Valid</text:p>
          </table:table-cell>
          <table:table-cell office:value-type="string" office:string-value="Increasing Pressure" table:formula="of:=IF([.J420]&gt;0; &quot;Increasing Pressure&quot;; &quot;Stable/Reducing&quot;)" table:style-name="ce18">
            <text:p>Increasing Pressure</text:p>
          </table:table-cell>
          <table:table-cell office:value-type="float" office:value="0.75" table:formula="of:=IFERROR([.H420]/[.F420]; 0)" table:style-name="ce17">
            <text:p>0.75</text:p>
          </table:table-cell>
          <table:table-cell office:value-type="float" office:value="6266.4285714285716" table:formula="of:=AVERAGE([.I420:.I426])" table:style-name="ce15">
            <text:p>6266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10-01T00:00:00" table:style-name="ce14">
            <text:p>01-10-2024</text:p>
          </table:table-cell>
          <table:table-cell office:value-type="string" office:string-value="October" table:formula="of:=TEXT([.A421]; &quot;mmmm&quot;)" table:style-name="ce14">
            <text:p>October</text:p>
          </table:table-cell>
          <table:table-cell office:value-type="string" office:string-value="2024-10" table:formula="of:=TEXT([.A421]; &quot;yyyy-mm&quot;)" table:style-name="ce14">
            <text:p>2024-10</text:p>
          </table:table-cell>
          <table:table-cell office:value-type="float" office:value="184" table:style-name="ce9">
            <text:p>184</text:p>
          </table:table-cell>
          <table:table-cell office:value-type="float" office:value="314" table:style-name="ce9">
            <text:p>314</text:p>
          </table:table-cell>
          <table:table-cell office:value-type="float" office:value="217" table:style-name="ce9">
            <text:p>217</text:p>
          </table:table-cell>
          <table:table-cell office:value-type="float" office:value="6040" table:style-name="ce9">
            <text:p>6040</text:p>
          </table:table-cell>
          <table:table-cell office:value-type="float" office:value="137" table:style-name="ce9">
            <text:p>137</text:p>
          </table:table-cell>
          <table:table-cell office:value-type="float" office:value="6354" table:formula="of:=SUM([.G421]+[.E421])" table:style-name="ce15">
            <text:p>6354</text:p>
          </table:table-cell>
          <table:table-cell office:value-type="float" office:value="80" table:formula="of:=[.F421]-[.H421]" table:style-name="ce15">
            <text:p>80</text:p>
          </table:table-cell>
          <table:table-cell office:value-type="percentage" office:value="-7.5542965061378663E-3" table:formula="of:=([.I422]-[.I421])/[.I421]" table:style-name="ce16">
            <text:p>-1%</text:p>
          </table:table-cell>
          <table:table-cell office:value-type="string" office:string-value="Valid" table:formula="of:=IF([.F421]&lt;=[.E421]; &quot;Valid&quot;; &quot;Invalid&quot;)" table:style-name="ce17">
            <text:p>Valid</text:p>
          </table:table-cell>
          <table:table-cell office:value-type="string" office:string-value="Valid" table:formula="of:=IF([.H421]&lt;=[.G421]; &quot;Valid&quot;; &quot;Invalid&quot;)" table:style-name="ce17">
            <text:p>Valid</text:p>
          </table:table-cell>
          <table:table-cell office:value-type="string" office:string-value="Increasing Pressure" table:formula="of:=IF([.J421]&gt;0; &quot;Increasing Pressure&quot;; &quot;Stable/Reducing&quot;)" table:style-name="ce18">
            <text:p>Increasing Pressure</text:p>
          </table:table-cell>
          <table:table-cell office:value-type="float" office:value="0.63133640552995396" table:formula="of:=IFERROR([.H421]/[.F421]; 0)" table:style-name="ce17">
            <text:p>0.631336406</text:p>
          </table:table-cell>
          <table:table-cell office:value-type="float" office:value="6263.7142857142853" table:formula="of:=AVERAGE([.I421:.I427])" table:style-name="ce15">
            <text:p>6264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10-02T00:00:00" table:style-name="ce14">
            <text:p>02-10-2024</text:p>
          </table:table-cell>
          <table:table-cell office:value-type="string" office:string-value="October" table:formula="of:=TEXT([.A422]; &quot;mmmm&quot;)" table:style-name="ce14">
            <text:p>October</text:p>
          </table:table-cell>
          <table:table-cell office:value-type="string" office:string-value="2024-10" table:formula="of:=TEXT([.A422]; &quot;yyyy-mm&quot;)" table:style-name="ce14">
            <text:p>2024-10</text:p>
          </table:table-cell>
          <table:table-cell office:value-type="float" office:value="107" table:style-name="ce9">
            <text:p>107</text:p>
          </table:table-cell>
          <table:table-cell office:value-type="float" office:value="215" table:style-name="ce9">
            <text:p>215</text:p>
          </table:table-cell>
          <table:table-cell office:value-type="float" office:value="230" table:style-name="ce9">
            <text:p>230</text:p>
          </table:table-cell>
          <table:table-cell office:value-type="float" office:value="6091" table:style-name="ce9">
            <text:p>6091</text:p>
          </table:table-cell>
          <table:table-cell office:value-type="float" office:value="173" table:style-name="ce9">
            <text:p>173</text:p>
          </table:table-cell>
          <table:table-cell office:value-type="float" office:value="6306" table:formula="of:=SUM([.G422]+[.E422])" table:style-name="ce15">
            <text:p>6306</text:p>
          </table:table-cell>
          <table:table-cell office:value-type="float" office:value="57" table:formula="of:=[.F422]-[.H422]" table:style-name="ce15">
            <text:p>57</text:p>
          </table:table-cell>
          <table:table-cell office:value-type="percentage" office:value="-4.1230574056454168E-3" table:formula="of:=([.I423]-[.I422])/[.I422]" table:style-name="ce16">
            <text:p>0%</text:p>
          </table:table-cell>
          <table:table-cell office:value-type="string" office:string-value="Invalid" table:formula="of:=IF([.F422]&lt;=[.E422]; &quot;Valid&quot;; &quot;Invalid&quot;)" table:style-name="ce17">
            <text:p>Invalid</text:p>
          </table:table-cell>
          <table:table-cell office:value-type="string" office:string-value="Valid" table:formula="of:=IF([.H422]&lt;=[.G422]; &quot;Valid&quot;; &quot;Invalid&quot;)" table:style-name="ce17">
            <text:p>Valid</text:p>
          </table:table-cell>
          <table:table-cell office:value-type="string" office:string-value="Increasing Pressure" table:formula="of:=IF([.J422]&gt;0; &quot;Increasing Pressure&quot;; &quot;Stable/Reducing&quot;)" table:style-name="ce18">
            <text:p>Increasing Pressure</text:p>
          </table:table-cell>
          <table:table-cell office:value-type="float" office:value="0.75217391304347825" table:formula="of:=IFERROR([.H422]/[.F422]; 0)" table:style-name="ce17">
            <text:p>0.752173913</text:p>
          </table:table-cell>
          <table:table-cell office:value-type="float" office:value="6229.7142857142853" table:formula="of:=AVERAGE([.I422:.I428])" table:style-name="ce15">
            <text:p>6230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10-03T00:00:00" table:style-name="ce14">
            <text:p>03-10-2024</text:p>
          </table:table-cell>
          <table:table-cell office:value-type="string" office:string-value="October" table:formula="of:=TEXT([.A423]; &quot;mmmm&quot;)" table:style-name="ce14">
            <text:p>October</text:p>
          </table:table-cell>
          <table:table-cell office:value-type="string" office:string-value="2024-10" table:formula="of:=TEXT([.A423]; &quot;yyyy-mm&quot;)" table:style-name="ce14">
            <text:p>2024-10</text:p>
          </table:table-cell>
          <table:table-cell office:value-type="float" office:value="101" table:style-name="ce9">
            <text:p>101</text:p>
          </table:table-cell>
          <table:table-cell office:value-type="float" office:value="162" table:style-name="ce9">
            <text:p>162</text:p>
          </table:table-cell>
          <table:table-cell office:value-type="float" office:value="178" table:style-name="ce9">
            <text:p>178</text:p>
          </table:table-cell>
          <table:table-cell office:value-type="float" office:value="6118" table:style-name="ce9">
            <text:p>6118</text:p>
          </table:table-cell>
          <table:table-cell office:value-type="float" office:value="193" table:style-name="ce9">
            <text:p>193</text:p>
          </table:table-cell>
          <table:table-cell office:value-type="float" office:value="6280" table:formula="of:=SUM([.G423]+[.E423])" table:style-name="ce15">
            <text:p>6280</text:p>
          </table:table-cell>
          <table:table-cell office:value-type="float" office:value="-15" table:formula="of:=[.F423]-[.H423]" table:style-name="ce15">
            <text:p>-15</text:p>
          </table:table-cell>
          <table:table-cell office:value-type="percentage" office:value="-1.9426751592356687E-2" table:formula="of:=([.I424]-[.I423])/[.I423]" table:style-name="ce16">
            <text:p>-2%</text:p>
          </table:table-cell>
          <table:table-cell office:value-type="string" office:string-value="Invalid" table:formula="of:=IF([.F423]&lt;=[.E423]; &quot;Valid&quot;; &quot;Invalid&quot;)" table:style-name="ce17">
            <text:p>Invalid</text:p>
          </table:table-cell>
          <table:table-cell office:value-type="string" office:string-value="Valid" table:formula="of:=IF([.H423]&lt;=[.G423]; &quot;Valid&quot;; &quot;Invalid&quot;)" table:style-name="ce17">
            <text:p>Valid</text:p>
          </table:table-cell>
          <table:table-cell office:value-type="string" office:string-value="Stable/Reducing" table:formula="of:=IF([.J423]&gt;0; &quot;Increasing Pressure&quot;; &quot;Stable/Reducing&quot;)" table:style-name="ce18">
            <text:p>Stable/Reducing</text:p>
          </table:table-cell>
          <table:table-cell office:value-type="float" office:value="1.0842696629213484" table:formula="of:=IFERROR([.H423]/[.F423]; 0)" table:style-name="ce17">
            <text:p>1.084269663</text:p>
          </table:table-cell>
          <table:table-cell office:value-type="float" office:value="6207.2857142857147" table:formula="of:=AVERAGE([.I423:.I429])" table:style-name="ce15">
            <text:p>6207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10-07T00:00:00" table:style-name="ce14">
            <text:p>07-10-2024</text:p>
          </table:table-cell>
          <table:table-cell office:value-type="string" office:string-value="October" table:formula="of:=TEXT([.A424]; &quot;mmmm&quot;)" table:style-name="ce14">
            <text:p>October</text:p>
          </table:table-cell>
          <table:table-cell office:value-type="string" office:string-value="2024-10" table:formula="of:=TEXT([.A424]; &quot;yyyy-mm&quot;)" table:style-name="ce14">
            <text:p>2024-10</text:p>
          </table:table-cell>
          <table:table-cell office:value-type="float" office:value="99" table:style-name="ce9">
            <text:p>99</text:p>
          </table:table-cell>
          <table:table-cell office:value-type="float" office:value="190" table:style-name="ce9">
            <text:p>190</text:p>
          </table:table-cell>
          <table:table-cell office:value-type="float" office:value="176" table:style-name="ce9">
            <text:p>176</text:p>
          </table:table-cell>
          <table:table-cell office:value-type="float" office:value="5968" table:style-name="ce9">
            <text:p>5968</text:p>
          </table:table-cell>
          <table:table-cell office:value-type="float" office:value="153" table:style-name="ce9">
            <text:p>153</text:p>
          </table:table-cell>
          <table:table-cell office:value-type="float" office:value="6158" table:formula="of:=SUM([.G424]+[.E424])" table:style-name="ce15">
            <text:p>6158</text:p>
          </table:table-cell>
          <table:table-cell office:value-type="float" office:value="23" table:formula="of:=[.F424]-[.H424]" table:style-name="ce15">
            <text:p>23</text:p>
          </table:table-cell>
          <table:table-cell office:value-type="percentage" office:value="1.5264696329977265E-2" table:formula="of:=([.I425]-[.I424])/[.I424]" table:style-name="ce16">
            <text:p>2%</text:p>
          </table:table-cell>
          <table:table-cell office:value-type="string" office:string-value="Valid" table:formula="of:=IF([.F424]&lt;=[.E424]; &quot;Valid&quot;; &quot;Invalid&quot;)" table:style-name="ce17">
            <text:p>Valid</text:p>
          </table:table-cell>
          <table:table-cell office:value-type="string" office:string-value="Valid" table:formula="of:=IF([.H424]&lt;=[.G424]; &quot;Valid&quot;; &quot;Invalid&quot;)" table:style-name="ce17">
            <text:p>Valid</text:p>
          </table:table-cell>
          <table:table-cell office:value-type="string" office:string-value="Increasing Pressure" table:formula="of:=IF([.J424]&gt;0; &quot;Increasing Pressure&quot;; &quot;Stable/Reducing&quot;)" table:style-name="ce18">
            <text:p>Increasing Pressure</text:p>
          </table:table-cell>
          <table:table-cell office:value-type="float" office:value="0.86931818181818177" table:formula="of:=IFERROR([.H424]/[.F424]; 0)" table:style-name="ce17">
            <text:p>0.869318182</text:p>
          </table:table-cell>
          <table:table-cell office:value-type="float" office:value="6198.8571428571431" table:formula="of:=AVERAGE([.I424:.I430])" table:style-name="ce15">
            <text:p>6199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10-08T00:00:00" table:style-name="ce14">
            <text:p>08-10-2024</text:p>
          </table:table-cell>
          <table:table-cell office:value-type="string" office:string-value="October" table:formula="of:=TEXT([.A425]; &quot;mmmm&quot;)" table:style-name="ce14">
            <text:p>October</text:p>
          </table:table-cell>
          <table:table-cell office:value-type="string" office:string-value="2024-10" table:formula="of:=TEXT([.A425]; &quot;yyyy-mm&quot;)" table:style-name="ce14">
            <text:p>2024-10</text:p>
          </table:table-cell>
          <table:table-cell office:value-type="float" office:value="167" table:style-name="ce9">
            <text:p>167</text:p>
          </table:table-cell>
          <table:table-cell office:value-type="float" office:value="239" table:style-name="ce9">
            <text:p>239</text:p>
          </table:table-cell>
          <table:table-cell office:value-type="float" office:value="166" table:style-name="ce9">
            <text:p>166</text:p>
          </table:table-cell>
          <table:table-cell office:value-type="float" office:value="6013" table:style-name="ce9">
            <text:p>6013</text:p>
          </table:table-cell>
          <table:table-cell office:value-type="float" office:value="123" table:style-name="ce9">
            <text:p>123</text:p>
          </table:table-cell>
          <table:table-cell office:value-type="float" office:value="6252" table:formula="of:=SUM([.G425]+[.E425])" table:style-name="ce15">
            <text:p>6252</text:p>
          </table:table-cell>
          <table:table-cell office:value-type="float" office:value="43" table:formula="of:=[.F425]-[.H425]" table:style-name="ce15">
            <text:p>43</text:p>
          </table:table-cell>
          <table:table-cell office:value-type="percentage" office:value="1.7594369801663468E-3" table:formula="of:=([.I426]-[.I425])/[.I425]" table:style-name="ce16">
            <text:p>0%</text:p>
          </table:table-cell>
          <table:table-cell office:value-type="string" office:string-value="Valid" table:formula="of:=IF([.F425]&lt;=[.E425]; &quot;Valid&quot;; &quot;Invalid&quot;)" table:style-name="ce17">
            <text:p>Valid</text:p>
          </table:table-cell>
          <table:table-cell office:value-type="string" office:string-value="Valid" table:formula="of:=IF([.H425]&lt;=[.G425]; &quot;Valid&quot;; &quot;Invalid&quot;)" table:style-name="ce17">
            <text:p>Valid</text:p>
          </table:table-cell>
          <table:table-cell office:value-type="string" office:string-value="Increasing Pressure" table:formula="of:=IF([.J425]&gt;0; &quot;Increasing Pressure&quot;; &quot;Stable/Reducing&quot;)" table:style-name="ce18">
            <text:p>Increasing Pressure</text:p>
          </table:table-cell>
          <table:table-cell office:value-type="float" office:value="0.74096385542168675" table:formula="of:=IFERROR([.H425]/[.F425]; 0)" table:style-name="ce17">
            <text:p>0.740963855</text:p>
          </table:table-cell>
          <table:table-cell office:value-type="float" office:value="6222.1428571428569" table:formula="of:=AVERAGE([.I425:.I431])" table:style-name="ce15">
            <text:p>6222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10-09T00:00:00" table:style-name="ce14">
            <text:p>09-10-2024</text:p>
          </table:table-cell>
          <table:table-cell office:value-type="string" office:string-value="October" table:formula="of:=TEXT([.A426]; &quot;mmmm&quot;)" table:style-name="ce14">
            <text:p>October</text:p>
          </table:table-cell>
          <table:table-cell office:value-type="string" office:string-value="2024-10" table:formula="of:=TEXT([.A426]; &quot;yyyy-mm&quot;)" table:style-name="ce14">
            <text:p>2024-10</text:p>
          </table:table-cell>
          <table:table-cell office:value-type="float" office:value="115" table:style-name="ce9">
            <text:p>115</text:p>
          </table:table-cell>
          <table:table-cell office:value-type="float" office:value="216" table:style-name="ce9">
            <text:p>216</text:p>
          </table:table-cell>
          <table:table-cell office:value-type="float" office:value="169" table:style-name="ce9">
            <text:p>169</text:p>
          </table:table-cell>
          <table:table-cell office:value-type="float" office:value="6047" table:style-name="ce9">
            <text:p>6047</text:p>
          </table:table-cell>
          <table:table-cell office:value-type="float" office:value="137" table:style-name="ce9">
            <text:p>137</text:p>
          </table:table-cell>
          <table:table-cell office:value-type="float" office:value="6263" table:formula="of:=SUM([.G426]+[.E426])" table:style-name="ce15">
            <text:p>6263</text:p>
          </table:table-cell>
          <table:table-cell office:value-type="float" office:value="32" table:formula="of:=[.F426]-[.H426]" table:style-name="ce15">
            <text:p>32</text:p>
          </table:table-cell>
          <table:table-cell office:value-type="percentage" office:value="-4.7900367236148808E-3" table:formula="of:=([.I427]-[.I426])/[.I426]" table:style-name="ce16">
            <text:p>0%</text:p>
          </table:table-cell>
          <table:table-cell office:value-type="string" office:string-value="Valid" table:formula="of:=IF([.F426]&lt;=[.E426]; &quot;Valid&quot;; &quot;Invalid&quot;)" table:style-name="ce17">
            <text:p>Valid</text:p>
          </table:table-cell>
          <table:table-cell office:value-type="string" office:string-value="Valid" table:formula="of:=IF([.H426]&lt;=[.G426]; &quot;Valid&quot;; &quot;Invalid&quot;)" table:style-name="ce17">
            <text:p>Valid</text:p>
          </table:table-cell>
          <table:table-cell office:value-type="string" office:string-value="Increasing Pressure" table:formula="of:=IF([.J426]&gt;0; &quot;Increasing Pressure&quot;; &quot;Stable/Reducing&quot;)" table:style-name="ce18">
            <text:p>Increasing Pressure</text:p>
          </table:table-cell>
          <table:table-cell office:value-type="float" office:value="0.81065088757396453" table:formula="of:=IFERROR([.H426]/[.F426]; 0)" table:style-name="ce17">
            <text:p>0.810650888</text:p>
          </table:table-cell>
          <table:table-cell office:value-type="float" office:value="6229.8571428571431" table:formula="of:=AVERAGE([.I426:.I432])" table:style-name="ce15">
            <text:p>6230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10-10T00:00:00" table:style-name="ce14">
            <text:p>10-10-2024</text:p>
          </table:table-cell>
          <table:table-cell office:value-type="string" office:string-value="October" table:formula="of:=TEXT([.A427]; &quot;mmmm&quot;)" table:style-name="ce14">
            <text:p>October</text:p>
          </table:table-cell>
          <table:table-cell office:value-type="string" office:string-value="2024-10" table:formula="of:=TEXT([.A427]; &quot;yyyy-mm&quot;)" table:style-name="ce14">
            <text:p>2024-10</text:p>
          </table:table-cell>
          <table:table-cell office:value-type="float" office:value="84" table:style-name="ce9">
            <text:p>84</text:p>
          </table:table-cell>
          <table:table-cell office:value-type="float" office:value="158" table:style-name="ce9">
            <text:p>158</text:p>
          </table:table-cell>
          <table:table-cell office:value-type="float" office:value="193" table:style-name="ce9">
            <text:p>193</text:p>
          </table:table-cell>
          <table:table-cell office:value-type="float" office:value="6075" table:style-name="ce9">
            <text:p>6075</text:p>
          </table:table-cell>
          <table:table-cell office:value-type="float" office:value="159" table:style-name="ce9">
            <text:p>159</text:p>
          </table:table-cell>
          <table:table-cell office:value-type="float" office:value="6233" table:formula="of:=SUM([.G427]+[.E427])" table:style-name="ce15">
            <text:p>6233</text:p>
          </table:table-cell>
          <table:table-cell office:value-type="float" office:value="34" table:formula="of:=[.F427]-[.H427]" table:style-name="ce15">
            <text:p>34</text:p>
          </table:table-cell>
          <table:table-cell office:value-type="percentage" office:value="-1.8771057275790148E-2" table:formula="of:=([.I428]-[.I427])/[.I427]" table:style-name="ce16">
            <text:p>-2%</text:p>
          </table:table-cell>
          <table:table-cell office:value-type="string" office:string-value="Invalid" table:formula="of:=IF([.F427]&lt;=[.E427]; &quot;Valid&quot;; &quot;Invalid&quot;)" table:style-name="ce17">
            <text:p>Invalid</text:p>
          </table:table-cell>
          <table:table-cell office:value-type="string" office:string-value="Valid" table:formula="of:=IF([.H427]&lt;=[.G427]; &quot;Valid&quot;; &quot;Invalid&quot;)" table:style-name="ce17">
            <text:p>Valid</text:p>
          </table:table-cell>
          <table:table-cell office:value-type="string" office:string-value="Increasing Pressure" table:formula="of:=IF([.J427]&gt;0; &quot;Increasing Pressure&quot;; &quot;Stable/Reducing&quot;)" table:style-name="ce18">
            <text:p>Increasing Pressure</text:p>
          </table:table-cell>
          <table:table-cell office:value-type="float" office:value="0.82383419689119175" table:formula="of:=IFERROR([.H427]/[.F427]; 0)" table:style-name="ce17">
            <text:p>0.823834197</text:p>
          </table:table-cell>
          <table:table-cell office:value-type="float" office:value="6220" table:formula="of:=AVERAGE([.I427:.I433])" table:style-name="ce15">
            <text:p>6220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10-13T00:00:00" table:style-name="ce14">
            <text:p>13-10-2024</text:p>
          </table:table-cell>
          <table:table-cell office:value-type="string" office:string-value="October" table:formula="of:=TEXT([.A428]; &quot;mmmm&quot;)" table:style-name="ce14">
            <text:p>October</text:p>
          </table:table-cell>
          <table:table-cell office:value-type="string" office:string-value="2024-10" table:formula="of:=TEXT([.A428]; &quot;yyyy-mm&quot;)" table:style-name="ce14">
            <text:p>2024-10</text:p>
          </table:table-cell>
          <table:table-cell office:value-type="float" office:value="130" table:style-name="ce9">
            <text:p>130</text:p>
          </table:table-cell>
          <table:table-cell office:value-type="float" office:value="227" table:style-name="ce9">
            <text:p>227</text:p>
          </table:table-cell>
          <table:table-cell office:value-type="float" office:value="192" table:style-name="ce9">
            <text:p>192</text:p>
          </table:table-cell>
          <table:table-cell office:value-type="float" office:value="5889" table:style-name="ce9">
            <text:p>5889</text:p>
          </table:table-cell>
          <table:table-cell office:value-type="float" office:value="210" table:style-name="ce9">
            <text:p>210</text:p>
          </table:table-cell>
          <table:table-cell office:value-type="float" office:value="6116" table:formula="of:=SUM([.G428]+[.E428])" table:style-name="ce15">
            <text:p>6116</text:p>
          </table:table-cell>
          <table:table-cell office:value-type="float" office:value="-18" table:formula="of:=[.F428]-[.H428]" table:style-name="ce15">
            <text:p>-18</text:p>
          </table:table-cell>
          <table:table-cell office:value-type="percentage" office:value="5.3956834532374104E-3" table:formula="of:=([.I429]-[.I428])/[.I428]" table:style-name="ce16">
            <text:p>1%</text:p>
          </table:table-cell>
          <table:table-cell office:value-type="string" office:string-value="Valid" table:formula="of:=IF([.F428]&lt;=[.E428]; &quot;Valid&quot;; &quot;Invalid&quot;)" table:style-name="ce17">
            <text:p>Valid</text:p>
          </table:table-cell>
          <table:table-cell office:value-type="string" office:string-value="Valid" table:formula="of:=IF([.H428]&lt;=[.G428]; &quot;Valid&quot;; &quot;Invalid&quot;)" table:style-name="ce17">
            <text:p>Valid</text:p>
          </table:table-cell>
          <table:table-cell office:value-type="string" office:string-value="Stable/Reducing" table:formula="of:=IF([.J428]&gt;0; &quot;Increasing Pressure&quot;; &quot;Stable/Reducing&quot;)" table:style-name="ce18">
            <text:p>Stable/Reducing</text:p>
          </table:table-cell>
          <table:table-cell office:value-type="float" office:value="1.09375" table:formula="of:=IFERROR([.H428]/[.F428]; 0)" table:style-name="ce17">
            <text:p>1.09375</text:p>
          </table:table-cell>
          <table:table-cell office:value-type="float" office:value="6213.2857142857147" table:formula="of:=AVERAGE([.I428:.I434])" table:style-name="ce15">
            <text:p>6213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10-14T00:00:00" table:style-name="ce14">
            <text:p>14-10-2024</text:p>
          </table:table-cell>
          <table:table-cell office:value-type="string" office:string-value="October" table:formula="of:=TEXT([.A429]; &quot;mmmm&quot;)" table:style-name="ce14">
            <text:p>October</text:p>
          </table:table-cell>
          <table:table-cell office:value-type="string" office:string-value="2024-10" table:formula="of:=TEXT([.A429]; &quot;yyyy-mm&quot;)" table:style-name="ce14">
            <text:p>2024-10</text:p>
          </table:table-cell>
          <table:table-cell office:value-type="float" office:value="88" table:style-name="ce9">
            <text:p>88</text:p>
          </table:table-cell>
          <table:table-cell office:value-type="float" office:value="214" table:style-name="ce9">
            <text:p>214</text:p>
          </table:table-cell>
          <table:table-cell office:value-type="float" office:value="160" table:style-name="ce9">
            <text:p>160</text:p>
          </table:table-cell>
          <table:table-cell office:value-type="float" office:value="5935" table:style-name="ce9">
            <text:p>5935</text:p>
          </table:table-cell>
          <table:table-cell office:value-type="float" office:value="106" table:style-name="ce9">
            <text:p>106</text:p>
          </table:table-cell>
          <table:table-cell office:value-type="float" office:value="6149" table:formula="of:=SUM([.G429]+[.E429])" table:style-name="ce15">
            <text:p>6149</text:p>
          </table:table-cell>
          <table:table-cell office:value-type="float" office:value="54" table:formula="of:=[.F429]-[.H429]" table:style-name="ce15">
            <text:p>54</text:p>
          </table:table-cell>
          <table:table-cell office:value-type="percentage" office:value="1.1709221011546592E-2" table:formula="of:=([.I430]-[.I429])/[.I429]" table:style-name="ce16">
            <text:p>1%</text:p>
          </table:table-cell>
          <table:table-cell office:value-type="string" office:string-value="Valid" table:formula="of:=IF([.F429]&lt;=[.E429]; &quot;Valid&quot;; &quot;Invalid&quot;)" table:style-name="ce17">
            <text:p>Valid</text:p>
          </table:table-cell>
          <table:table-cell office:value-type="string" office:string-value="Valid" table:formula="of:=IF([.H429]&lt;=[.G429]; &quot;Valid&quot;; &quot;Invalid&quot;)" table:style-name="ce17">
            <text:p>Valid</text:p>
          </table:table-cell>
          <table:table-cell office:value-type="string" office:string-value="Increasing Pressure" table:formula="of:=IF([.J429]&gt;0; &quot;Increasing Pressure&quot;; &quot;Stable/Reducing&quot;)" table:style-name="ce18">
            <text:p>Increasing Pressure</text:p>
          </table:table-cell>
          <table:table-cell office:value-type="float" office:value="0.66249999999999998" table:formula="of:=IFERROR([.H429]/[.F429]; 0)" table:style-name="ce17">
            <text:p>0.6625</text:p>
          </table:table-cell>
          <table:table-cell office:value-type="float" office:value="6242.8571428571431" table:formula="of:=AVERAGE([.I429:.I435])" table:style-name="ce15">
            <text:p>6243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10-15T00:00:00" table:style-name="ce14">
            <text:p>15-10-2024</text:p>
          </table:table-cell>
          <table:table-cell office:value-type="string" office:string-value="October" table:formula="of:=TEXT([.A430]; &quot;mmmm&quot;)" table:style-name="ce14">
            <text:p>October</text:p>
          </table:table-cell>
          <table:table-cell office:value-type="string" office:string-value="2024-10" table:formula="of:=TEXT([.A430]; &quot;yyyy-mm&quot;)" table:style-name="ce14">
            <text:p>2024-10</text:p>
          </table:table-cell>
          <table:table-cell office:value-type="float" office:value="113" table:style-name="ce9">
            <text:p>113</text:p>
          </table:table-cell>
          <table:table-cell office:value-type="float" office:value="208" table:style-name="ce9">
            <text:p>208</text:p>
          </table:table-cell>
          <table:table-cell office:value-type="float" office:value="159" table:style-name="ce9">
            <text:p>159</text:p>
          </table:table-cell>
          <table:table-cell office:value-type="float" office:value="6013" table:style-name="ce9">
            <text:p>6013</text:p>
          </table:table-cell>
          <table:table-cell office:value-type="float" office:value="107" table:style-name="ce9">
            <text:p>107</text:p>
          </table:table-cell>
          <table:table-cell office:value-type="float" office:value="6221" table:formula="of:=SUM([.G430]+[.E430])" table:style-name="ce15">
            <text:p>6221</text:p>
          </table:table-cell>
          <table:table-cell office:value-type="float" office:value="52" table:formula="of:=[.F430]-[.H430]" table:style-name="ce15">
            <text:p>52</text:p>
          </table:table-cell>
          <table:table-cell office:value-type="percentage" office:value="1.6074586079408454E-2" table:formula="of:=([.I431]-[.I430])/[.I430]" table:style-name="ce16">
            <text:p>2%</text:p>
          </table:table-cell>
          <table:table-cell office:value-type="string" office:string-value="Valid" table:formula="of:=IF([.F430]&lt;=[.E430]; &quot;Valid&quot;; &quot;Invalid&quot;)" table:style-name="ce17">
            <text:p>Valid</text:p>
          </table:table-cell>
          <table:table-cell office:value-type="string" office:string-value="Valid" table:formula="of:=IF([.H430]&lt;=[.G430]; &quot;Valid&quot;; &quot;Invalid&quot;)" table:style-name="ce17">
            <text:p>Valid</text:p>
          </table:table-cell>
          <table:table-cell office:value-type="string" office:string-value="Increasing Pressure" table:formula="of:=IF([.J430]&gt;0; &quot;Increasing Pressure&quot;; &quot;Stable/Reducing&quot;)" table:style-name="ce18">
            <text:p>Increasing Pressure</text:p>
          </table:table-cell>
          <table:table-cell office:value-type="float" office:value="0.67295597484276726" table:formula="of:=IFERROR([.H430]/[.F430]; 0)" table:style-name="ce17">
            <text:p>0.672955975</text:p>
          </table:table-cell>
          <table:table-cell office:value-type="float" office:value="6274.5714285714284" table:formula="of:=AVERAGE([.I430:.I436])" table:style-name="ce15">
            <text:p>6275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10-16T00:00:00" table:style-name="ce14">
            <text:p>16-10-2024</text:p>
          </table:table-cell>
          <table:table-cell office:value-type="string" office:string-value="October" table:formula="of:=TEXT([.A431]; &quot;mmmm&quot;)" table:style-name="ce14">
            <text:p>October</text:p>
          </table:table-cell>
          <table:table-cell office:value-type="string" office:string-value="2024-10" table:formula="of:=TEXT([.A431]; &quot;yyyy-mm&quot;)" table:style-name="ce14">
            <text:p>2024-10</text:p>
          </table:table-cell>
          <table:table-cell office:value-type="float" office:value="174" table:style-name="ce9">
            <text:p>174</text:p>
          </table:table-cell>
          <table:table-cell office:value-type="float" office:value="285" table:style-name="ce9">
            <text:p>285</text:p>
          </table:table-cell>
          <table:table-cell office:value-type="float" office:value="150" table:style-name="ce9">
            <text:p>150</text:p>
          </table:table-cell>
          <table:table-cell office:value-type="float" office:value="6036" table:style-name="ce9">
            <text:p>6036</text:p>
          </table:table-cell>
          <table:table-cell office:value-type="float" office:value="129" table:style-name="ce9">
            <text:p>129</text:p>
          </table:table-cell>
          <table:table-cell office:value-type="float" office:value="6321" table:formula="of:=SUM([.G431]+[.E431])" table:style-name="ce15">
            <text:p>6321</text:p>
          </table:table-cell>
          <table:table-cell office:value-type="float" office:value="21" table:formula="of:=[.F431]-[.H431]" table:style-name="ce15">
            <text:p>21</text:p>
          </table:table-cell>
          <table:table-cell office:value-type="percentage" office:value="-2.3730422401518746E-3" table:formula="of:=([.I432]-[.I431])/[.I431]" table:style-name="ce16">
            <text:p>0%</text:p>
          </table:table-cell>
          <table:table-cell office:value-type="string" office:string-value="Valid" table:formula="of:=IF([.F431]&lt;=[.E431]; &quot;Valid&quot;; &quot;Invalid&quot;)" table:style-name="ce17">
            <text:p>Valid</text:p>
          </table:table-cell>
          <table:table-cell office:value-type="string" office:string-value="Valid" table:formula="of:=IF([.H431]&lt;=[.G431]; &quot;Valid&quot;; &quot;Invalid&quot;)" table:style-name="ce17">
            <text:p>Valid</text:p>
          </table:table-cell>
          <table:table-cell office:value-type="string" office:string-value="Increasing Pressure" table:formula="of:=IF([.J431]&gt;0; &quot;Increasing Pressure&quot;; &quot;Stable/Reducing&quot;)" table:style-name="ce18">
            <text:p>Increasing Pressure</text:p>
          </table:table-cell>
          <table:table-cell office:value-type="float" office:value="0.86" table:formula="of:=IFERROR([.H431]/[.F431]; 0)" table:style-name="ce17">
            <text:p>0.86</text:p>
          </table:table-cell>
          <table:table-cell office:value-type="float" office:value="6284" table:formula="of:=AVERAGE([.I431:.I437])" table:style-name="ce15">
            <text:p>6284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10-17T00:00:00" table:style-name="ce14">
            <text:p>17-10-2024</text:p>
          </table:table-cell>
          <table:table-cell office:value-type="string" office:string-value="October" table:formula="of:=TEXT([.A432]; &quot;mmmm&quot;)" table:style-name="ce14">
            <text:p>October</text:p>
          </table:table-cell>
          <table:table-cell office:value-type="string" office:string-value="2024-10" table:formula="of:=TEXT([.A432]; &quot;yyyy-mm&quot;)" table:style-name="ce14">
            <text:p>2024-10</text:p>
          </table:table-cell>
          <table:table-cell office:value-type="float" office:value="104" table:style-name="ce9">
            <text:p>104</text:p>
          </table:table-cell>
          <table:table-cell office:value-type="float" office:value="230" table:style-name="ce9">
            <text:p>230</text:p>
          </table:table-cell>
          <table:table-cell office:value-type="float" office:value="206" table:style-name="ce9">
            <text:p>206</text:p>
          </table:table-cell>
          <table:table-cell office:value-type="float" office:value="6076" table:style-name="ce9">
            <text:p>6076</text:p>
          </table:table-cell>
          <table:table-cell office:value-type="float" office:value="160" table:style-name="ce9">
            <text:p>160</text:p>
          </table:table-cell>
          <table:table-cell office:value-type="float" office:value="6306" table:formula="of:=SUM([.G432]+[.E432])" table:style-name="ce15">
            <text:p>6306</text:p>
          </table:table-cell>
          <table:table-cell office:value-type="float" office:value="46" table:formula="of:=[.F432]-[.H432]" table:style-name="ce15">
            <text:p>46</text:p>
          </table:table-cell>
          <table:table-cell office:value-type="percentage" office:value="-1.7760862670472565E-2" table:formula="of:=([.I433]-[.I432])/[.I432]" table:style-name="ce16">
            <text:p>-2%</text:p>
          </table:table-cell>
          <table:table-cell office:value-type="string" office:string-value="Valid" table:formula="of:=IF([.F432]&lt;=[.E432]; &quot;Valid&quot;; &quot;Invalid&quot;)" table:style-name="ce17">
            <text:p>Valid</text:p>
          </table:table-cell>
          <table:table-cell office:value-type="string" office:string-value="Valid" table:formula="of:=IF([.H432]&lt;=[.G432]; &quot;Valid&quot;; &quot;Invalid&quot;)" table:style-name="ce17">
            <text:p>Valid</text:p>
          </table:table-cell>
          <table:table-cell office:value-type="string" office:string-value="Increasing Pressure" table:formula="of:=IF([.J432]&gt;0; &quot;Increasing Pressure&quot;; &quot;Stable/Reducing&quot;)" table:style-name="ce18">
            <text:p>Increasing Pressure</text:p>
          </table:table-cell>
          <table:table-cell office:value-type="float" office:value="0.77669902912621358" table:formula="of:=IFERROR([.H432]/[.F432]; 0)" table:style-name="ce17">
            <text:p>0.776699029</text:p>
          </table:table-cell>
          <table:table-cell office:value-type="float" office:value="6278.1428571428569" table:formula="of:=AVERAGE([.I432:.I438])" table:style-name="ce15">
            <text:p>6278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10-20T00:00:00" table:style-name="ce14">
            <text:p>20-10-2024</text:p>
          </table:table-cell>
          <table:table-cell office:value-type="string" office:string-value="October" table:formula="of:=TEXT([.A433]; &quot;mmmm&quot;)" table:style-name="ce14">
            <text:p>October</text:p>
          </table:table-cell>
          <table:table-cell office:value-type="string" office:string-value="2024-10" table:formula="of:=TEXT([.A433]; &quot;yyyy-mm&quot;)" table:style-name="ce14">
            <text:p>2024-10</text:p>
          </table:table-cell>
          <table:table-cell office:value-type="float" office:value="147" table:style-name="ce9">
            <text:p>147</text:p>
          </table:table-cell>
          <table:table-cell office:value-type="float" office:value="276" table:style-name="ce9">
            <text:p>276</text:p>
          </table:table-cell>
          <table:table-cell office:value-type="float" office:value="214" table:style-name="ce9">
            <text:p>214</text:p>
          </table:table-cell>
          <table:table-cell office:value-type="float" office:value="5918" table:style-name="ce9">
            <text:p>5918</text:p>
          </table:table-cell>
          <table:table-cell office:value-type="float" office:value="195" table:style-name="ce9">
            <text:p>195</text:p>
          </table:table-cell>
          <table:table-cell office:value-type="float" office:value="6194" table:formula="of:=SUM([.G433]+[.E433])" table:style-name="ce15">
            <text:p>6194</text:p>
          </table:table-cell>
          <table:table-cell office:value-type="float" office:value="19" table:formula="of:=[.F433]-[.H433]" table:style-name="ce15">
            <text:p>19</text:p>
          </table:table-cell>
          <table:table-cell office:value-type="percentage" office:value="-1.2915724895059735E-3" table:formula="of:=([.I434]-[.I433])/[.I433]" table:style-name="ce16">
            <text:p>0%</text:p>
          </table:table-cell>
          <table:table-cell office:value-type="string" office:string-value="Valid" table:formula="of:=IF([.F433]&lt;=[.E433]; &quot;Valid&quot;; &quot;Invalid&quot;)" table:style-name="ce17">
            <text:p>Valid</text:p>
          </table:table-cell>
          <table:table-cell office:value-type="string" office:string-value="Valid" table:formula="of:=IF([.H433]&lt;=[.G433]; &quot;Valid&quot;; &quot;Invalid&quot;)" table:style-name="ce17">
            <text:p>Valid</text:p>
          </table:table-cell>
          <table:table-cell office:value-type="string" office:string-value="Increasing Pressure" table:formula="of:=IF([.J433]&gt;0; &quot;Increasing Pressure&quot;; &quot;Stable/Reducing&quot;)" table:style-name="ce18">
            <text:p>Increasing Pressure</text:p>
          </table:table-cell>
          <table:table-cell office:value-type="float" office:value="0.91121495327102808" table:formula="of:=IFERROR([.H433]/[.F433]; 0)" table:style-name="ce17">
            <text:p>0.911214953</text:p>
          </table:table-cell>
          <table:table-cell office:value-type="float" office:value="6289.1428571428569" table:formula="of:=AVERAGE([.I433:.I439])" table:style-name="ce15">
            <text:p>6289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10-21T00:00:00" table:style-name="ce14">
            <text:p>21-10-2024</text:p>
          </table:table-cell>
          <table:table-cell office:value-type="string" office:string-value="October" table:formula="of:=TEXT([.A434]; &quot;mmmm&quot;)" table:style-name="ce14">
            <text:p>October</text:p>
          </table:table-cell>
          <table:table-cell office:value-type="string" office:string-value="2024-10" table:formula="of:=TEXT([.A434]; &quot;yyyy-mm&quot;)" table:style-name="ce14">
            <text:p>2024-10</text:p>
          </table:table-cell>
          <table:table-cell office:value-type="float" office:value="108" table:style-name="ce9">
            <text:p>108</text:p>
          </table:table-cell>
          <table:table-cell office:value-type="float" office:value="220" table:style-name="ce9">
            <text:p>220</text:p>
          </table:table-cell>
          <table:table-cell office:value-type="float" office:value="213" table:style-name="ce9">
            <text:p>213</text:p>
          </table:table-cell>
          <table:table-cell office:value-type="float" office:value="5966" table:style-name="ce9">
            <text:p>5966</text:p>
          </table:table-cell>
          <table:table-cell office:value-type="float" office:value="154" table:style-name="ce9">
            <text:p>154</text:p>
          </table:table-cell>
          <table:table-cell office:value-type="float" office:value="6186" table:formula="of:=SUM([.G434]+[.E434])" table:style-name="ce15">
            <text:p>6186</text:p>
          </table:table-cell>
          <table:table-cell office:value-type="float" office:value="59" table:formula="of:=[.F434]-[.H434]" table:style-name="ce15">
            <text:p>59</text:p>
          </table:table-cell>
          <table:table-cell office:value-type="percentage" office:value="2.2146783058519238E-2" table:formula="of:=([.I435]-[.I434])/[.I434]" table:style-name="ce16">
            <text:p>2%</text:p>
          </table:table-cell>
          <table:table-cell office:value-type="string" office:string-value="Valid" table:formula="of:=IF([.F434]&lt;=[.E434]; &quot;Valid&quot;; &quot;Invalid&quot;)" table:style-name="ce17">
            <text:p>Valid</text:p>
          </table:table-cell>
          <table:table-cell office:value-type="string" office:string-value="Valid" table:formula="of:=IF([.H434]&lt;=[.G434]; &quot;Valid&quot;; &quot;Invalid&quot;)" table:style-name="ce17">
            <text:p>Valid</text:p>
          </table:table-cell>
          <table:table-cell office:value-type="string" office:string-value="Increasing Pressure" table:formula="of:=IF([.J434]&gt;0; &quot;Increasing Pressure&quot;; &quot;Stable/Reducing&quot;)" table:style-name="ce18">
            <text:p>Increasing Pressure</text:p>
          </table:table-cell>
          <table:table-cell office:value-type="float" office:value="0.72300469483568075" table:formula="of:=IFERROR([.H434]/[.F434]; 0)" table:style-name="ce17">
            <text:p>0.723004695</text:p>
          </table:table-cell>
          <table:table-cell office:value-type="float" office:value="6322.1428571428569" table:formula="of:=AVERAGE([.I434:.I440])" table:style-name="ce15">
            <text:p>6322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10-22T00:00:00" table:style-name="ce14">
            <text:p>22-10-2024</text:p>
          </table:table-cell>
          <table:table-cell office:value-type="string" office:string-value="October" table:formula="of:=TEXT([.A435]; &quot;mmmm&quot;)" table:style-name="ce14">
            <text:p>October</text:p>
          </table:table-cell>
          <table:table-cell office:value-type="string" office:string-value="2024-10" table:formula="of:=TEXT([.A435]; &quot;yyyy-mm&quot;)" table:style-name="ce14">
            <text:p>2024-10</text:p>
          </table:table-cell>
          <table:table-cell office:value-type="float" office:value="180" table:style-name="ce9">
            <text:p>180</text:p>
          </table:table-cell>
          <table:table-cell office:value-type="float" office:value="280" table:style-name="ce9">
            <text:p>280</text:p>
          </table:table-cell>
          <table:table-cell office:value-type="float" office:value="146" table:style-name="ce9">
            <text:p>146</text:p>
          </table:table-cell>
          <table:table-cell office:value-type="float" office:value="6043" table:style-name="ce9">
            <text:p>6043</text:p>
          </table:table-cell>
          <table:table-cell office:value-type="float" office:value="109" table:style-name="ce9">
            <text:p>109</text:p>
          </table:table-cell>
          <table:table-cell office:value-type="float" office:value="6323" table:formula="of:=SUM([.G435]+[.E435])" table:style-name="ce15">
            <text:p>6323</text:p>
          </table:table-cell>
          <table:table-cell office:value-type="float" office:value="37" table:formula="of:=[.F435]-[.H435]" table:style-name="ce15">
            <text:p>37</text:p>
          </table:table-cell>
          <table:table-cell office:value-type="percentage" office:value="7.5913332278981496E-3" table:formula="of:=([.I436]-[.I435])/[.I435]" table:style-name="ce16">
            <text:p>1%</text:p>
          </table:table-cell>
          <table:table-cell office:value-type="string" office:string-value="Valid" table:formula="of:=IF([.F435]&lt;=[.E435]; &quot;Valid&quot;; &quot;Invalid&quot;)" table:style-name="ce17">
            <text:p>Valid</text:p>
          </table:table-cell>
          <table:table-cell office:value-type="string" office:string-value="Valid" table:formula="of:=IF([.H435]&lt;=[.G435]; &quot;Valid&quot;; &quot;Invalid&quot;)" table:style-name="ce17">
            <text:p>Valid</text:p>
          </table:table-cell>
          <table:table-cell office:value-type="string" office:string-value="Increasing Pressure" table:formula="of:=IF([.J435]&gt;0; &quot;Increasing Pressure&quot;; &quot;Stable/Reducing&quot;)" table:style-name="ce18">
            <text:p>Increasing Pressure</text:p>
          </table:table-cell>
          <table:table-cell office:value-type="float" office:value="0.74657534246575341" table:formula="of:=IFERROR([.H435]/[.F435]; 0)" table:style-name="ce17">
            <text:p>0.746575342</text:p>
          </table:table-cell>
          <table:table-cell office:value-type="float" office:value="6351.8571428571431" table:formula="of:=AVERAGE([.I435:.I441])" table:style-name="ce15">
            <text:p>6352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10-23T00:00:00" table:style-name="ce14">
            <text:p>23-10-2024</text:p>
          </table:table-cell>
          <table:table-cell office:value-type="string" office:string-value="October" table:formula="of:=TEXT([.A436]; &quot;mmmm&quot;)" table:style-name="ce14">
            <text:p>October</text:p>
          </table:table-cell>
          <table:table-cell office:value-type="string" office:string-value="2024-10" table:formula="of:=TEXT([.A436]; &quot;yyyy-mm&quot;)" table:style-name="ce14">
            <text:p>2024-10</text:p>
          </table:table-cell>
          <table:table-cell office:value-type="float" office:value="134" table:style-name="ce9">
            <text:p>134</text:p>
          </table:table-cell>
          <table:table-cell office:value-type="float" office:value="294" table:style-name="ce9">
            <text:p>294</text:p>
          </table:table-cell>
          <table:table-cell office:value-type="float" office:value="186" table:style-name="ce9">
            <text:p>186</text:p>
          </table:table-cell>
          <table:table-cell office:value-type="float" office:value="6077" table:style-name="ce9">
            <text:p>6077</text:p>
          </table:table-cell>
          <table:table-cell office:value-type="float" office:value="138" table:style-name="ce9">
            <text:p>138</text:p>
          </table:table-cell>
          <table:table-cell office:value-type="float" office:value="6371" table:formula="of:=SUM([.G436]+[.E436])" table:style-name="ce15">
            <text:p>6371</text:p>
          </table:table-cell>
          <table:table-cell office:value-type="float" office:value="48" table:formula="of:=[.F436]-[.H436]" table:style-name="ce15">
            <text:p>48</text:p>
          </table:table-cell>
          <table:table-cell office:value-type="percentage" office:value="-1.3184743368388008E-2" table:formula="of:=([.I437]-[.I436])/[.I436]" table:style-name="ce16">
            <text:p>-1%</text:p>
          </table:table-cell>
          <table:table-cell office:value-type="string" office:string-value="Valid" table:formula="of:=IF([.F436]&lt;=[.E436]; &quot;Valid&quot;; &quot;Invalid&quot;)" table:style-name="ce17">
            <text:p>Valid</text:p>
          </table:table-cell>
          <table:table-cell office:value-type="string" office:string-value="Valid" table:formula="of:=IF([.H436]&lt;=[.G436]; &quot;Valid&quot;; &quot;Invalid&quot;)" table:style-name="ce17">
            <text:p>Valid</text:p>
          </table:table-cell>
          <table:table-cell office:value-type="string" office:string-value="Increasing Pressure" table:formula="of:=IF([.J436]&gt;0; &quot;Increasing Pressure&quot;; &quot;Stable/Reducing&quot;)" table:style-name="ce18">
            <text:p>Increasing Pressure</text:p>
          </table:table-cell>
          <table:table-cell office:value-type="float" office:value="0.74193548387096775" table:formula="of:=IFERROR([.H436]/[.F436]; 0)" table:style-name="ce17">
            <text:p>0.741935484</text:p>
          </table:table-cell>
          <table:table-cell office:value-type="float" office:value="6328.7142857142853" table:formula="of:=AVERAGE([.I436:.I442])" table:style-name="ce15">
            <text:p>6329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10-27T00:00:00" table:style-name="ce14">
            <text:p>27-10-2024</text:p>
          </table:table-cell>
          <table:table-cell office:value-type="string" office:string-value="October" table:formula="of:=TEXT([.A437]; &quot;mmmm&quot;)" table:style-name="ce14">
            <text:p>October</text:p>
          </table:table-cell>
          <table:table-cell office:value-type="string" office:string-value="2024-10" table:formula="of:=TEXT([.A437]; &quot;yyyy-mm&quot;)" table:style-name="ce14">
            <text:p>2024-10</text:p>
          </table:table-cell>
          <table:table-cell office:value-type="float" office:value="202" table:style-name="ce9">
            <text:p>202</text:p>
          </table:table-cell>
          <table:table-cell office:value-type="float" office:value="313" table:style-name="ce9">
            <text:p>313</text:p>
          </table:table-cell>
          <table:table-cell office:value-type="float" office:value="158" table:style-name="ce9">
            <text:p>158</text:p>
          </table:table-cell>
          <table:table-cell office:value-type="float" office:value="5974" table:style-name="ce9">
            <text:p>5974</text:p>
          </table:table-cell>
          <table:table-cell office:value-type="float" office:value="192" table:style-name="ce9">
            <text:p>192</text:p>
          </table:table-cell>
          <table:table-cell office:value-type="float" office:value="6287" table:formula="of:=SUM([.G437]+[.E437])" table:style-name="ce15">
            <text:p>6287</text:p>
          </table:table-cell>
          <table:table-cell office:value-type="float" office:value="-34" table:formula="of:=[.F437]-[.H437]" table:style-name="ce15">
            <text:p>-34</text:p>
          </table:table-cell>
          <table:table-cell office:value-type="percentage" office:value="-1.1134086209638938E-3" table:formula="of:=([.I438]-[.I437])/[.I437]" table:style-name="ce16">
            <text:p>0%</text:p>
          </table:table-cell>
          <table:table-cell office:value-type="string" office:string-value="Valid" table:formula="of:=IF([.F437]&lt;=[.E437]; &quot;Valid&quot;; &quot;Invalid&quot;)" table:style-name="ce17">
            <text:p>Valid</text:p>
          </table:table-cell>
          <table:table-cell office:value-type="string" office:string-value="Valid" table:formula="of:=IF([.H437]&lt;=[.G437]; &quot;Valid&quot;; &quot;Invalid&quot;)" table:style-name="ce17">
            <text:p>Valid</text:p>
          </table:table-cell>
          <table:table-cell office:value-type="string" office:string-value="Stable/Reducing" table:formula="of:=IF([.J437]&gt;0; &quot;Increasing Pressure&quot;; &quot;Stable/Reducing&quot;)" table:style-name="ce18">
            <text:p>Stable/Reducing</text:p>
          </table:table-cell>
          <table:table-cell office:value-type="float" office:value="1.2151898734177216" table:formula="of:=IFERROR([.H437]/[.F437]; 0)" table:style-name="ce17">
            <text:p>1.215189873</text:p>
          </table:table-cell>
          <table:table-cell office:value-type="float" office:value="6306.5714285714284" table:formula="of:=AVERAGE([.I437:.I443])" table:style-name="ce15">
            <text:p>6307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10-28T00:00:00" table:style-name="ce14">
            <text:p>28-10-2024</text:p>
          </table:table-cell>
          <table:table-cell office:value-type="string" office:string-value="October" table:formula="of:=TEXT([.A438]; &quot;mmmm&quot;)" table:style-name="ce14">
            <text:p>October</text:p>
          </table:table-cell>
          <table:table-cell office:value-type="string" office:string-value="2024-10" table:formula="of:=TEXT([.A438]; &quot;yyyy-mm&quot;)" table:style-name="ce14">
            <text:p>2024-10</text:p>
          </table:table-cell>
          <table:table-cell office:value-type="float" office:value="110" table:style-name="ce9">
            <text:p>110</text:p>
          </table:table-cell>
          <table:table-cell office:value-type="float" office:value="272" table:style-name="ce9">
            <text:p>272</text:p>
          </table:table-cell>
          <table:table-cell office:value-type="float" office:value="193" table:style-name="ce9">
            <text:p>193</text:p>
          </table:table-cell>
          <table:table-cell office:value-type="float" office:value="6008" table:style-name="ce9">
            <text:p>6008</text:p>
          </table:table-cell>
          <table:table-cell office:value-type="float" office:value="156" table:style-name="ce9">
            <text:p>156</text:p>
          </table:table-cell>
          <table:table-cell office:value-type="float" office:value="6280" table:formula="of:=SUM([.G438]+[.E438])" table:style-name="ce15">
            <text:p>6280</text:p>
          </table:table-cell>
          <table:table-cell office:value-type="float" office:value="37" table:formula="of:=[.F438]-[.H438]" table:style-name="ce15">
            <text:p>37</text:p>
          </table:table-cell>
          <table:table-cell office:value-type="percentage" office:value="1.6401273885350318E-2" table:formula="of:=([.I439]-[.I438])/[.I438]" table:style-name="ce16">
            <text:p>2%</text:p>
          </table:table-cell>
          <table:table-cell office:value-type="string" office:string-value="Valid" table:formula="of:=IF([.F438]&lt;=[.E438]; &quot;Valid&quot;; &quot;Invalid&quot;)" table:style-name="ce17">
            <text:p>Valid</text:p>
          </table:table-cell>
          <table:table-cell office:value-type="string" office:string-value="Valid" table:formula="of:=IF([.H438]&lt;=[.G438]; &quot;Valid&quot;; &quot;Invalid&quot;)" table:style-name="ce17">
            <text:p>Valid</text:p>
          </table:table-cell>
          <table:table-cell office:value-type="string" office:string-value="Increasing Pressure" table:formula="of:=IF([.J438]&gt;0; &quot;Increasing Pressure&quot;; &quot;Stable/Reducing&quot;)" table:style-name="ce18">
            <text:p>Increasing Pressure</text:p>
          </table:table-cell>
          <table:table-cell office:value-type="float" office:value="0.80829015544041449" table:formula="of:=IFERROR([.H438]/[.F438]; 0)" table:style-name="ce17">
            <text:p>0.808290155</text:p>
          </table:table-cell>
          <table:table-cell office:value-type="float" office:value="6307" table:formula="of:=AVERAGE([.I438:.I444])" table:style-name="ce15">
            <text:p>6307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10-29T00:00:00" table:style-name="ce14">
            <text:p>29-10-2024</text:p>
          </table:table-cell>
          <table:table-cell office:value-type="string" office:string-value="October" table:formula="of:=TEXT([.A439]; &quot;mmmm&quot;)" table:style-name="ce14">
            <text:p>October</text:p>
          </table:table-cell>
          <table:table-cell office:value-type="string" office:string-value="2024-10" table:formula="of:=TEXT([.A439]; &quot;yyyy-mm&quot;)" table:style-name="ce14">
            <text:p>2024-10</text:p>
          </table:table-cell>
          <table:table-cell office:value-type="float" office:value="166" table:style-name="ce9">
            <text:p>166</text:p>
          </table:table-cell>
          <table:table-cell office:value-type="float" office:value="277" table:style-name="ce9">
            <text:p>277</text:p>
          </table:table-cell>
          <table:table-cell office:value-type="float" office:value="229" table:style-name="ce9">
            <text:p>229</text:p>
          </table:table-cell>
          <table:table-cell office:value-type="float" office:value="6106" table:style-name="ce9">
            <text:p>6106</text:p>
          </table:table-cell>
          <table:table-cell office:value-type="float" office:value="126" table:style-name="ce9">
            <text:p>126</text:p>
          </table:table-cell>
          <table:table-cell office:value-type="float" office:value="6383" table:formula="of:=SUM([.G439]+[.E439])" table:style-name="ce15">
            <text:p>6383</text:p>
          </table:table-cell>
          <table:table-cell office:value-type="float" office:value="103" table:formula="of:=[.F439]-[.H439]" table:style-name="ce15">
            <text:p>103</text:p>
          </table:table-cell>
          <table:table-cell office:value-type="percentage" office:value="6.5799780667397771E-3" table:formula="of:=([.I440]-[.I439])/[.I439]" table:style-name="ce16">
            <text:p>1%</text:p>
          </table:table-cell>
          <table:table-cell office:value-type="string" office:string-value="Valid" table:formula="of:=IF([.F439]&lt;=[.E439]; &quot;Valid&quot;; &quot;Invalid&quot;)" table:style-name="ce17">
            <text:p>Valid</text:p>
          </table:table-cell>
          <table:table-cell office:value-type="string" office:string-value="Valid" table:formula="of:=IF([.H439]&lt;=[.G439]; &quot;Valid&quot;; &quot;Invalid&quot;)" table:style-name="ce17">
            <text:p>Valid</text:p>
          </table:table-cell>
          <table:table-cell office:value-type="string" office:string-value="Increasing Pressure" table:formula="of:=IF([.J439]&gt;0; &quot;Increasing Pressure&quot;; &quot;Stable/Reducing&quot;)" table:style-name="ce18">
            <text:p>Increasing Pressure</text:p>
          </table:table-cell>
          <table:table-cell office:value-type="float" office:value="0.55021834061135366" table:formula="of:=IFERROR([.H439]/[.F439]; 0)" table:style-name="ce17">
            <text:p>0.550218341</text:p>
          </table:table-cell>
          <table:table-cell office:value-type="float" office:value="6315.8571428571431" table:formula="of:=AVERAGE([.I439:.I445])" table:style-name="ce15">
            <text:p>6316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10-30T00:00:00" table:style-name="ce14">
            <text:p>30-10-2024</text:p>
          </table:table-cell>
          <table:table-cell office:value-type="string" office:string-value="October" table:formula="of:=TEXT([.A440]; &quot;mmmm&quot;)" table:style-name="ce14">
            <text:p>October</text:p>
          </table:table-cell>
          <table:table-cell office:value-type="string" office:string-value="2024-10" table:formula="of:=TEXT([.A440]; &quot;yyyy-mm&quot;)" table:style-name="ce14">
            <text:p>2024-10</text:p>
          </table:table-cell>
          <table:table-cell office:value-type="float" office:value="136" table:style-name="ce9">
            <text:p>136</text:p>
          </table:table-cell>
          <table:table-cell office:value-type="float" office:value="276" table:style-name="ce9">
            <text:p>276</text:p>
          </table:table-cell>
          <table:table-cell office:value-type="float" office:value="178" table:style-name="ce9">
            <text:p>178</text:p>
          </table:table-cell>
          <table:table-cell office:value-type="float" office:value="6149" table:style-name="ce9">
            <text:p>6149</text:p>
          </table:table-cell>
          <table:table-cell office:value-type="float" office:value="160" table:style-name="ce9">
            <text:p>160</text:p>
          </table:table-cell>
          <table:table-cell office:value-type="float" office:value="6425" table:formula="of:=SUM([.G440]+[.E440])" table:style-name="ce15">
            <text:p>6425</text:p>
          </table:table-cell>
          <table:table-cell office:value-type="float" office:value="18" table:formula="of:=[.F440]-[.H440]" table:style-name="ce15">
            <text:p>18</text:p>
          </table:table-cell>
          <table:table-cell office:value-type="percentage" office:value="-4.8249027237354082E-3" table:formula="of:=([.I441]-[.I440])/[.I440]" table:style-name="ce16">
            <text:p>0%</text:p>
          </table:table-cell>
          <table:table-cell office:value-type="string" office:string-value="Valid" table:formula="of:=IF([.F440]&lt;=[.E440]; &quot;Valid&quot;; &quot;Invalid&quot;)" table:style-name="ce17">
            <text:p>Valid</text:p>
          </table:table-cell>
          <table:table-cell office:value-type="string" office:string-value="Valid" table:formula="of:=IF([.H440]&lt;=[.G440]; &quot;Valid&quot;; &quot;Invalid&quot;)" table:style-name="ce17">
            <text:p>Valid</text:p>
          </table:table-cell>
          <table:table-cell office:value-type="string" office:string-value="Increasing Pressure" table:formula="of:=IF([.J440]&gt;0; &quot;Increasing Pressure&quot;; &quot;Stable/Reducing&quot;)" table:style-name="ce18">
            <text:p>Increasing Pressure</text:p>
          </table:table-cell>
          <table:table-cell office:value-type="float" office:value="0.898876404494382" table:formula="of:=IFERROR([.H440]/[.F440]; 0)" table:style-name="ce17">
            <text:p>0.898876404</text:p>
          </table:table-cell>
          <table:table-cell office:value-type="float" office:value="6306.2857142857147" table:formula="of:=AVERAGE([.I440:.I446])" table:style-name="ce15">
            <text:p>6306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10-31T00:00:00" table:style-name="ce14">
            <text:p>31-10-2024</text:p>
          </table:table-cell>
          <table:table-cell office:value-type="string" office:string-value="October" table:formula="of:=TEXT([.A441]; &quot;mmmm&quot;)" table:style-name="ce14">
            <text:p>October</text:p>
          </table:table-cell>
          <table:table-cell office:value-type="string" office:string-value="2024-10" table:formula="of:=TEXT([.A441]; &quot;yyyy-mm&quot;)" table:style-name="ce14">
            <text:p>2024-10</text:p>
          </table:table-cell>
          <table:table-cell office:value-type="float" office:value="87" table:style-name="ce9">
            <text:p>87</text:p>
          </table:table-cell>
          <table:table-cell office:value-type="float" office:value="246" table:style-name="ce9">
            <text:p>246</text:p>
          </table:table-cell>
          <table:table-cell office:value-type="float" office:value="173" table:style-name="ce9">
            <text:p>173</text:p>
          </table:table-cell>
          <table:table-cell office:value-type="float" office:value="6148" table:style-name="ce9">
            <text:p>6148</text:p>
          </table:table-cell>
          <table:table-cell office:value-type="float" office:value="177" table:style-name="ce9">
            <text:p>177</text:p>
          </table:table-cell>
          <table:table-cell office:value-type="float" office:value="6394" table:formula="of:=SUM([.G441]+[.E441])" table:style-name="ce15">
            <text:p>6394</text:p>
          </table:table-cell>
          <table:table-cell office:value-type="float" office:value="-4" table:formula="of:=[.F441]-[.H441]" table:style-name="ce15">
            <text:p>-4</text:p>
          </table:table-cell>
          <table:table-cell office:value-type="percentage" office:value="-3.6440412887081636E-2" table:formula="of:=([.I442]-[.I441])/[.I441]" table:style-name="ce16">
            <text:p>-4%</text:p>
          </table:table-cell>
          <table:table-cell office:value-type="string" office:string-value="Valid" table:formula="of:=IF([.F441]&lt;=[.E441]; &quot;Valid&quot;; &quot;Invalid&quot;)" table:style-name="ce17">
            <text:p>Valid</text:p>
          </table:table-cell>
          <table:table-cell office:value-type="string" office:string-value="Valid" table:formula="of:=IF([.H441]&lt;=[.G441]; &quot;Valid&quot;; &quot;Invalid&quot;)" table:style-name="ce17">
            <text:p>Valid</text:p>
          </table:table-cell>
          <table:table-cell office:value-type="string" office:string-value="Stable/Reducing" table:formula="of:=IF([.J441]&gt;0; &quot;Increasing Pressure&quot;; &quot;Stable/Reducing&quot;)" table:style-name="ce18">
            <text:p>Stable/Reducing</text:p>
          </table:table-cell>
          <table:table-cell office:value-type="float" office:value="1.023121387283237" table:formula="of:=IFERROR([.H441]/[.F441]; 0)" table:style-name="ce17">
            <text:p>1.023121387</text:p>
          </table:table-cell>
          <table:table-cell office:value-type="float" office:value="6260.1428571428569" table:formula="of:=AVERAGE([.I441:.I447])" table:style-name="ce15">
            <text:p>6260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11-03T00:00:00" table:style-name="ce14">
            <text:p>03-11-2024</text:p>
          </table:table-cell>
          <table:table-cell office:value-type="string" office:string-value="November" table:formula="of:=TEXT([.A442]; &quot;mmmm&quot;)" table:style-name="ce14">
            <text:p>November</text:p>
          </table:table-cell>
          <table:table-cell office:value-type="string" office:string-value="2024-11" table:formula="of:=TEXT([.A442]; &quot;yyyy-mm&quot;)" table:style-name="ce14">
            <text:p>2024-11</text:p>
          </table:table-cell>
          <table:table-cell office:value-type="float" office:value="84" table:style-name="ce9">
            <text:p>84</text:p>
          </table:table-cell>
          <table:table-cell office:value-type="float" office:value="171" table:style-name="ce9">
            <text:p>171</text:p>
          </table:table-cell>
          <table:table-cell office:value-type="float" office:value="157" table:style-name="ce9">
            <text:p>157</text:p>
          </table:table-cell>
          <table:table-cell office:value-type="float" office:value="5990" table:style-name="ce9">
            <text:p>5990</text:p>
          </table:table-cell>
          <table:table-cell office:value-type="float" office:value="184" table:style-name="ce9">
            <text:p>184</text:p>
          </table:table-cell>
          <table:table-cell office:value-type="float" office:value="6161" table:formula="of:=SUM([.G442]+[.E442])" table:style-name="ce15">
            <text:p>6161</text:p>
          </table:table-cell>
          <table:table-cell office:value-type="float" office:value="-27" table:formula="of:=[.F442]-[.H442]" table:style-name="ce15">
            <text:p>-27</text:p>
          </table:table-cell>
          <table:table-cell office:value-type="percentage" office:value="8.927122220418764E-3" table:formula="of:=([.I443]-[.I442])/[.I442]" table:style-name="ce16">
            <text:p>1%</text:p>
          </table:table-cell>
          <table:table-cell office:value-type="string" office:string-value="Valid" table:formula="of:=IF([.F442]&lt;=[.E442]; &quot;Valid&quot;; &quot;Invalid&quot;)" table:style-name="ce17">
            <text:p>Valid</text:p>
          </table:table-cell>
          <table:table-cell office:value-type="string" office:string-value="Valid" table:formula="of:=IF([.H442]&lt;=[.G442]; &quot;Valid&quot;; &quot;Invalid&quot;)" table:style-name="ce17">
            <text:p>Valid</text:p>
          </table:table-cell>
          <table:table-cell office:value-type="string" office:string-value="Stable/Reducing" table:formula="of:=IF([.J442]&gt;0; &quot;Increasing Pressure&quot;; &quot;Stable/Reducing&quot;)" table:style-name="ce18">
            <text:p>Stable/Reducing</text:p>
          </table:table-cell>
          <table:table-cell office:value-type="float" office:value="1.1719745222929936" table:formula="of:=IFERROR([.H442]/[.F442]; 0)" table:style-name="ce17">
            <text:p>1.171974522</text:p>
          </table:table-cell>
          <table:table-cell office:value-type="float" office:value="6233.8571428571431" table:formula="of:=AVERAGE([.I442:.I448])" table:style-name="ce15">
            <text:p>6234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11-04T00:00:00" table:style-name="ce14">
            <text:p>04-11-2024</text:p>
          </table:table-cell>
          <table:table-cell office:value-type="string" office:string-value="November" table:formula="of:=TEXT([.A443]; &quot;mmmm&quot;)" table:style-name="ce14">
            <text:p>November</text:p>
          </table:table-cell>
          <table:table-cell office:value-type="string" office:string-value="2024-11" table:formula="of:=TEXT([.A443]; &quot;yyyy-mm&quot;)" table:style-name="ce14">
            <text:p>2024-11</text:p>
          </table:table-cell>
          <table:table-cell office:value-type="float" office:value="167" table:style-name="ce9">
            <text:p>167</text:p>
          </table:table-cell>
          <table:table-cell office:value-type="float" office:value="209" table:style-name="ce9">
            <text:p>209</text:p>
          </table:table-cell>
          <table:table-cell office:value-type="float" office:value="157" table:style-name="ce9">
            <text:p>157</text:p>
          </table:table-cell>
          <table:table-cell office:value-type="float" office:value="6007" table:style-name="ce9">
            <text:p>6007</text:p>
          </table:table-cell>
          <table:table-cell office:value-type="float" office:value="132" table:style-name="ce9">
            <text:p>132</text:p>
          </table:table-cell>
          <table:table-cell office:value-type="float" office:value="6216" table:formula="of:=SUM([.G443]+[.E443])" table:style-name="ce15">
            <text:p>6216</text:p>
          </table:table-cell>
          <table:table-cell office:value-type="float" office:value="25" table:formula="of:=[.F443]-[.H443]" table:style-name="ce15">
            <text:p>25</text:p>
          </table:table-cell>
          <table:table-cell office:value-type="percentage" office:value="1.1904761904761904E-2" table:formula="of:=([.I444]-[.I443])/[.I443]" table:style-name="ce16">
            <text:p>1%</text:p>
          </table:table-cell>
          <table:table-cell office:value-type="string" office:string-value="Valid" table:formula="of:=IF([.F443]&lt;=[.E443]; &quot;Valid&quot;; &quot;Invalid&quot;)" table:style-name="ce17">
            <text:p>Valid</text:p>
          </table:table-cell>
          <table:table-cell office:value-type="string" office:string-value="Valid" table:formula="of:=IF([.H443]&lt;=[.G443]; &quot;Valid&quot;; &quot;Invalid&quot;)" table:style-name="ce17">
            <text:p>Valid</text:p>
          </table:table-cell>
          <table:table-cell office:value-type="string" office:string-value="Increasing Pressure" table:formula="of:=IF([.J443]&gt;0; &quot;Increasing Pressure&quot;; &quot;Stable/Reducing&quot;)" table:style-name="ce18">
            <text:p>Increasing Pressure</text:p>
          </table:table-cell>
          <table:table-cell office:value-type="float" office:value="0.84076433121019112" table:formula="of:=IFERROR([.H443]/[.F443]; 0)" table:style-name="ce17">
            <text:p>0.840764331</text:p>
          </table:table-cell>
          <table:table-cell office:value-type="float" office:value="6241" table:formula="of:=AVERAGE([.I443:.I449])" table:style-name="ce15">
            <text:p>6241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11-05T00:00:00" table:style-name="ce14">
            <text:p>05-11-2024</text:p>
          </table:table-cell>
          <table:table-cell office:value-type="string" office:string-value="November" table:formula="of:=TEXT([.A444]; &quot;mmmm&quot;)" table:style-name="ce14">
            <text:p>November</text:p>
          </table:table-cell>
          <table:table-cell office:value-type="string" office:string-value="2024-11" table:formula="of:=TEXT([.A444]; &quot;yyyy-mm&quot;)" table:style-name="ce14">
            <text:p>2024-11</text:p>
          </table:table-cell>
          <table:table-cell office:value-type="float" office:value="109" table:style-name="ce9">
            <text:p>109</text:p>
          </table:table-cell>
          <table:table-cell office:value-type="float" office:value="245" table:style-name="ce9">
            <text:p>245</text:p>
          </table:table-cell>
          <table:table-cell office:value-type="float" office:value="159" table:style-name="ce9">
            <text:p>159</text:p>
          </table:table-cell>
          <table:table-cell office:value-type="float" office:value="6045" table:style-name="ce9">
            <text:p>6045</text:p>
          </table:table-cell>
          <table:table-cell office:value-type="float" office:value="126" table:style-name="ce9">
            <text:p>126</text:p>
          </table:table-cell>
          <table:table-cell office:value-type="float" office:value="6290" table:formula="of:=SUM([.G444]+[.E444])" table:style-name="ce15">
            <text:p>6290</text:p>
          </table:table-cell>
          <table:table-cell office:value-type="float" office:value="33" table:formula="of:=[.F444]-[.H444]" table:style-name="ce15">
            <text:p>33</text:p>
          </table:table-cell>
          <table:table-cell office:value-type="percentage" office:value="8.2670906200317962E-3" table:formula="of:=([.I445]-[.I444])/[.I444]" table:style-name="ce16">
            <text:p>1%</text:p>
          </table:table-cell>
          <table:table-cell office:value-type="string" office:string-value="Valid" table:formula="of:=IF([.F444]&lt;=[.E444]; &quot;Valid&quot;; &quot;Invalid&quot;)" table:style-name="ce17">
            <text:p>Valid</text:p>
          </table:table-cell>
          <table:table-cell office:value-type="string" office:string-value="Valid" table:formula="of:=IF([.H444]&lt;=[.G444]; &quot;Valid&quot;; &quot;Invalid&quot;)" table:style-name="ce17">
            <text:p>Valid</text:p>
          </table:table-cell>
          <table:table-cell office:value-type="string" office:string-value="Increasing Pressure" table:formula="of:=IF([.J444]&gt;0; &quot;Increasing Pressure&quot;; &quot;Stable/Reducing&quot;)" table:style-name="ce18">
            <text:p>Increasing Pressure</text:p>
          </table:table-cell>
          <table:table-cell office:value-type="float" office:value="0.79245283018867929" table:formula="of:=IFERROR([.H444]/[.F444]; 0)" table:style-name="ce17">
            <text:p>0.79245283</text:p>
          </table:table-cell>
          <table:table-cell office:value-type="float" office:value="6245" table:formula="of:=AVERAGE([.I444:.I450])" table:style-name="ce15">
            <text:p>6245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11-06T00:00:00" table:style-name="ce14">
            <text:p>06-11-2024</text:p>
          </table:table-cell>
          <table:table-cell office:value-type="string" office:string-value="November" table:formula="of:=TEXT([.A445]; &quot;mmmm&quot;)" table:style-name="ce14">
            <text:p>November</text:p>
          </table:table-cell>
          <table:table-cell office:value-type="string" office:string-value="2024-11" table:formula="of:=TEXT([.A445]; &quot;yyyy-mm&quot;)" table:style-name="ce14">
            <text:p>2024-11</text:p>
          </table:table-cell>
          <table:table-cell office:value-type="float" office:value="156" table:style-name="ce9">
            <text:p>156</text:p>
          </table:table-cell>
          <table:table-cell office:value-type="float" office:value="256" table:style-name="ce9">
            <text:p>256</text:p>
          </table:table-cell>
          <table:table-cell office:value-type="float" office:value="176" table:style-name="ce9">
            <text:p>176</text:p>
          </table:table-cell>
          <table:table-cell office:value-type="float" office:value="6086" table:style-name="ce9">
            <text:p>6086</text:p>
          </table:table-cell>
          <table:table-cell office:value-type="float" office:value="137" table:style-name="ce9">
            <text:p>137</text:p>
          </table:table-cell>
          <table:table-cell office:value-type="float" office:value="6342" table:formula="of:=SUM([.G445]+[.E445])" table:style-name="ce15">
            <text:p>6342</text:p>
          </table:table-cell>
          <table:table-cell office:value-type="float" office:value="39" table:formula="of:=[.F445]-[.H445]" table:style-name="ce15">
            <text:p>39</text:p>
          </table:table-cell>
          <table:table-cell office:value-type="percentage" office:value="-4.0996531062756228E-3" table:formula="of:=([.I446]-[.I445])/[.I445]" table:style-name="ce16">
            <text:p>0%</text:p>
          </table:table-cell>
          <table:table-cell office:value-type="string" office:string-value="Valid" table:formula="of:=IF([.F445]&lt;=[.E445]; &quot;Valid&quot;; &quot;Invalid&quot;)" table:style-name="ce17">
            <text:p>Valid</text:p>
          </table:table-cell>
          <table:table-cell office:value-type="string" office:string-value="Valid" table:formula="of:=IF([.H445]&lt;=[.G445]; &quot;Valid&quot;; &quot;Invalid&quot;)" table:style-name="ce17">
            <text:p>Valid</text:p>
          </table:table-cell>
          <table:table-cell office:value-type="string" office:string-value="Increasing Pressure" table:formula="of:=IF([.J445]&gt;0; &quot;Increasing Pressure&quot;; &quot;Stable/Reducing&quot;)" table:style-name="ce18">
            <text:p>Increasing Pressure</text:p>
          </table:table-cell>
          <table:table-cell office:value-type="float" office:value="0.77840909090909094" table:formula="of:=IFERROR([.H445]/[.F445]; 0)" table:style-name="ce17">
            <text:p>0.778409091</text:p>
          </table:table-cell>
          <table:table-cell office:value-type="float" office:value="6207.2857142857147" table:formula="of:=AVERAGE([.I445:.I451])" table:style-name="ce15">
            <text:p>6207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11-07T00:00:00" table:style-name="ce14">
            <text:p>07-11-2024</text:p>
          </table:table-cell>
          <table:table-cell office:value-type="string" office:string-value="November" table:formula="of:=TEXT([.A446]; &quot;mmmm&quot;)" table:style-name="ce14">
            <text:p>November</text:p>
          </table:table-cell>
          <table:table-cell office:value-type="string" office:string-value="2024-11" table:formula="of:=TEXT([.A446]; &quot;yyyy-mm&quot;)" table:style-name="ce14">
            <text:p>2024-11</text:p>
          </table:table-cell>
          <table:table-cell office:value-type="float" office:value="125" table:style-name="ce9">
            <text:p>125</text:p>
          </table:table-cell>
          <table:table-cell office:value-type="float" office:value="232" table:style-name="ce9">
            <text:p>232</text:p>
          </table:table-cell>
          <table:table-cell office:value-type="float" office:value="192" table:style-name="ce9">
            <text:p>192</text:p>
          </table:table-cell>
          <table:table-cell office:value-type="float" office:value="6084" table:style-name="ce9">
            <text:p>6084</text:p>
          </table:table-cell>
          <table:table-cell office:value-type="float" office:value="177" table:style-name="ce9">
            <text:p>177</text:p>
          </table:table-cell>
          <table:table-cell office:value-type="float" office:value="6316" table:formula="of:=SUM([.G446]+[.E446])" table:style-name="ce15">
            <text:p>6316</text:p>
          </table:table-cell>
          <table:table-cell office:value-type="float" office:value="15" table:formula="of:=[.F446]-[.H446]" table:style-name="ce15">
            <text:p>15</text:p>
          </table:table-cell>
          <table:table-cell office:value-type="percentage" office:value="-3.3882203926535785E-2" table:formula="of:=([.I447]-[.I446])/[.I446]" table:style-name="ce16">
            <text:p>-3%</text:p>
          </table:table-cell>
          <table:table-cell office:value-type="string" office:string-value="Valid" table:formula="of:=IF([.F446]&lt;=[.E446]; &quot;Valid&quot;; &quot;Invalid&quot;)" table:style-name="ce17">
            <text:p>Valid</text:p>
          </table:table-cell>
          <table:table-cell office:value-type="string" office:string-value="Valid" table:formula="of:=IF([.H446]&lt;=[.G446]; &quot;Valid&quot;; &quot;Invalid&quot;)" table:style-name="ce17">
            <text:p>Valid</text:p>
          </table:table-cell>
          <table:table-cell office:value-type="string" office:string-value="Increasing Pressure" table:formula="of:=IF([.J446]&gt;0; &quot;Increasing Pressure&quot;; &quot;Stable/Reducing&quot;)" table:style-name="ce18">
            <text:p>Increasing Pressure</text:p>
          </table:table-cell>
          <table:table-cell office:value-type="float" office:value="0.921875" table:formula="of:=IFERROR([.H446]/[.F446]; 0)" table:style-name="ce17">
            <text:p>0.921875</text:p>
          </table:table-cell>
          <table:table-cell office:value-type="float" office:value="6161.5714285714284" table:formula="of:=AVERAGE([.I446:.I452])" table:style-name="ce15">
            <text:p>6162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11-11T00:00:00" table:style-name="ce14">
            <text:p>11-11-2024</text:p>
          </table:table-cell>
          <table:table-cell office:value-type="string" office:string-value="November" table:formula="of:=TEXT([.A447]; &quot;mmmm&quot;)" table:style-name="ce14">
            <text:p>November</text:p>
          </table:table-cell>
          <table:table-cell office:value-type="string" office:string-value="2024-11" table:formula="of:=TEXT([.A447]; &quot;yyyy-mm&quot;)" table:style-name="ce14">
            <text:p>2024-11</text:p>
          </table:table-cell>
          <table:table-cell office:value-type="float" office:value="118" table:style-name="ce9">
            <text:p>118</text:p>
          </table:table-cell>
          <table:table-cell office:value-type="float" office:value="139" table:style-name="ce9">
            <text:p>139</text:p>
          </table:table-cell>
          <table:table-cell office:value-type="float" office:value="168" table:style-name="ce9">
            <text:p>168</text:p>
          </table:table-cell>
          <table:table-cell office:value-type="float" office:value="5963" table:style-name="ce9">
            <text:p>5963</text:p>
          </table:table-cell>
          <table:table-cell office:value-type="float" office:value="145" table:style-name="ce9">
            <text:p>145</text:p>
          </table:table-cell>
          <table:table-cell office:value-type="float" office:value="6102" table:formula="of:=SUM([.G447]+[.E447])" table:style-name="ce15">
            <text:p>6102</text:p>
          </table:table-cell>
          <table:table-cell office:value-type="float" office:value="23" table:formula="of:=[.F447]-[.H447]" table:style-name="ce15">
            <text:p>23</text:p>
          </table:table-cell>
          <table:table-cell office:value-type="percentage" office:value="1.7699115044247787E-2" table:formula="of:=([.I448]-[.I447])/[.I447]" table:style-name="ce16">
            <text:p>2%</text:p>
          </table:table-cell>
          <table:table-cell office:value-type="string" office:string-value="Invalid" table:formula="of:=IF([.F447]&lt;=[.E447]; &quot;Valid&quot;; &quot;Invalid&quot;)" table:style-name="ce17">
            <text:p>Invalid</text:p>
          </table:table-cell>
          <table:table-cell office:value-type="string" office:string-value="Valid" table:formula="of:=IF([.H447]&lt;=[.G447]; &quot;Valid&quot;; &quot;Invalid&quot;)" table:style-name="ce17">
            <text:p>Valid</text:p>
          </table:table-cell>
          <table:table-cell office:value-type="string" office:string-value="Increasing Pressure" table:formula="of:=IF([.J447]&gt;0; &quot;Increasing Pressure&quot;; &quot;Stable/Reducing&quot;)" table:style-name="ce18">
            <text:p>Increasing Pressure</text:p>
          </table:table-cell>
          <table:table-cell office:value-type="float" office:value="0.86309523809523814" table:formula="of:=IFERROR([.H447]/[.F447]; 0)" table:style-name="ce17">
            <text:p>0.863095238</text:p>
          </table:table-cell>
          <table:table-cell office:value-type="float" office:value="6124" table:formula="of:=AVERAGE([.I447:.I453])" table:style-name="ce15">
            <text:p>6124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11-12T00:00:00" table:style-name="ce14">
            <text:p>12-11-2024</text:p>
          </table:table-cell>
          <table:table-cell office:value-type="string" office:string-value="November" table:formula="of:=TEXT([.A448]; &quot;mmmm&quot;)" table:style-name="ce14">
            <text:p>November</text:p>
          </table:table-cell>
          <table:table-cell office:value-type="string" office:string-value="2024-11" table:formula="of:=TEXT([.A448]; &quot;yyyy-mm&quot;)" table:style-name="ce14">
            <text:p>2024-11</text:p>
          </table:table-cell>
          <table:table-cell office:value-type="float" office:value="142" table:style-name="ce9">
            <text:p>142</text:p>
          </table:table-cell>
          <table:table-cell office:value-type="float" office:value="235" table:style-name="ce9">
            <text:p>235</text:p>
          </table:table-cell>
          <table:table-cell office:value-type="float" office:value="139" table:style-name="ce9">
            <text:p>139</text:p>
          </table:table-cell>
          <table:table-cell office:value-type="float" office:value="5975" table:style-name="ce9">
            <text:p>5975</text:p>
          </table:table-cell>
          <table:table-cell office:value-type="float" office:value="138" table:style-name="ce9">
            <text:p>138</text:p>
          </table:table-cell>
          <table:table-cell office:value-type="float" office:value="6210" table:formula="of:=SUM([.G448]+[.E448])" table:style-name="ce15">
            <text:p>6210</text:p>
          </table:table-cell>
          <table:table-cell office:value-type="float" office:value="1" table:formula="of:=[.F448]-[.H448]" table:style-name="ce15">
            <text:p>1</text:p>
          </table:table-cell>
          <table:table-cell office:value-type="percentage" office:value="1.6103059581320451E-4" table:formula="of:=([.I449]-[.I448])/[.I448]" table:style-name="ce16">
            <text:p>0%</text:p>
          </table:table-cell>
          <table:table-cell office:value-type="string" office:string-value="Valid" table:formula="of:=IF([.F448]&lt;=[.E448]; &quot;Valid&quot;; &quot;Invalid&quot;)" table:style-name="ce17">
            <text:p>Valid</text:p>
          </table:table-cell>
          <table:table-cell office:value-type="string" office:string-value="Valid" table:formula="of:=IF([.H448]&lt;=[.G448]; &quot;Valid&quot;; &quot;Invalid&quot;)" table:style-name="ce17">
            <text:p>Valid</text:p>
          </table:table-cell>
          <table:table-cell office:value-type="string" office:string-value="Increasing Pressure" table:formula="of:=IF([.J448]&gt;0; &quot;Increasing Pressure&quot;; &quot;Stable/Reducing&quot;)" table:style-name="ce18">
            <text:p>Increasing Pressure</text:p>
          </table:table-cell>
          <table:table-cell office:value-type="float" office:value="0.9928057553956835" table:formula="of:=IFERROR([.H448]/[.F448]; 0)" table:style-name="ce17">
            <text:p>0.992805755</text:p>
          </table:table-cell>
          <table:table-cell office:value-type="float" office:value="6122.4285714285716" table:formula="of:=AVERAGE([.I448:.I454])" table:style-name="ce15">
            <text:p>6122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11-13T00:00:00" table:style-name="ce14">
            <text:p>13-11-2024</text:p>
          </table:table-cell>
          <table:table-cell office:value-type="string" office:string-value="November" table:formula="of:=TEXT([.A449]; &quot;mmmm&quot;)" table:style-name="ce14">
            <text:p>November</text:p>
          </table:table-cell>
          <table:table-cell office:value-type="string" office:string-value="2024-11" table:formula="of:=TEXT([.A449]; &quot;yyyy-mm&quot;)" table:style-name="ce14">
            <text:p>2024-11</text:p>
          </table:table-cell>
          <table:table-cell office:value-type="float" office:value="148" table:style-name="ce9">
            <text:p>148</text:p>
          </table:table-cell>
          <table:table-cell office:value-type="float" office:value="245" table:style-name="ce9">
            <text:p>245</text:p>
          </table:table-cell>
          <table:table-cell office:value-type="float" office:value="175" table:style-name="ce9">
            <text:p>175</text:p>
          </table:table-cell>
          <table:table-cell office:value-type="float" office:value="5966" table:style-name="ce9">
            <text:p>5966</text:p>
          </table:table-cell>
          <table:table-cell office:value-type="float" office:value="151" table:style-name="ce9">
            <text:p>151</text:p>
          </table:table-cell>
          <table:table-cell office:value-type="float" office:value="6211" table:formula="of:=SUM([.G449]+[.E449])" table:style-name="ce15">
            <text:p>6211</text:p>
          </table:table-cell>
          <table:table-cell office:value-type="float" office:value="24" table:formula="of:=[.F449]-[.H449]" table:style-name="ce15">
            <text:p>24</text:p>
          </table:table-cell>
          <table:table-cell office:value-type="percentage" office:value="5.3131540814683629E-3" table:formula="of:=([.I450]-[.I449])/[.I449]" table:style-name="ce16">
            <text:p>1%</text:p>
          </table:table-cell>
          <table:table-cell office:value-type="string" office:string-value="Valid" table:formula="of:=IF([.F449]&lt;=[.E449]; &quot;Valid&quot;; &quot;Invalid&quot;)" table:style-name="ce17">
            <text:p>Valid</text:p>
          </table:table-cell>
          <table:table-cell office:value-type="string" office:string-value="Valid" table:formula="of:=IF([.H449]&lt;=[.G449]; &quot;Valid&quot;; &quot;Invalid&quot;)" table:style-name="ce17">
            <text:p>Valid</text:p>
          </table:table-cell>
          <table:table-cell office:value-type="string" office:string-value="Increasing Pressure" table:formula="of:=IF([.J449]&gt;0; &quot;Increasing Pressure&quot;; &quot;Stable/Reducing&quot;)" table:style-name="ce18">
            <text:p>Increasing Pressure</text:p>
          </table:table-cell>
          <table:table-cell office:value-type="float" office:value="0.86285714285714288" table:formula="of:=IFERROR([.H449]/[.F449]; 0)" table:style-name="ce17">
            <text:p>0.862857143</text:p>
          </table:table-cell>
          <table:table-cell office:value-type="float" office:value="6101.5714285714284" table:formula="of:=AVERAGE([.I449:.I455])" table:style-name="ce15">
            <text:p>6102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11-14T00:00:00" table:style-name="ce14">
            <text:p>14-11-2024</text:p>
          </table:table-cell>
          <table:table-cell office:value-type="string" office:string-value="November" table:formula="of:=TEXT([.A450]; &quot;mmmm&quot;)" table:style-name="ce14">
            <text:p>November</text:p>
          </table:table-cell>
          <table:table-cell office:value-type="string" office:string-value="2024-11" table:formula="of:=TEXT([.A450]; &quot;yyyy-mm&quot;)" table:style-name="ce14">
            <text:p>2024-11</text:p>
          </table:table-cell>
          <table:table-cell office:value-type="float" office:value="119" table:style-name="ce9">
            <text:p>119</text:p>
          </table:table-cell>
          <table:table-cell office:value-type="float" office:value="219" table:style-name="ce9">
            <text:p>219</text:p>
          </table:table-cell>
          <table:table-cell office:value-type="float" office:value="210" table:style-name="ce9">
            <text:p>210</text:p>
          </table:table-cell>
          <table:table-cell office:value-type="float" office:value="6025" table:style-name="ce9">
            <text:p>6025</text:p>
          </table:table-cell>
          <table:table-cell office:value-type="float" office:value="172" table:style-name="ce9">
            <text:p>172</text:p>
          </table:table-cell>
          <table:table-cell office:value-type="float" office:value="6244" table:formula="of:=SUM([.G450]+[.E450])" table:style-name="ce15">
            <text:p>6244</text:p>
          </table:table-cell>
          <table:table-cell office:value-type="float" office:value="38" table:formula="of:=[.F450]-[.H450]" table:style-name="ce15">
            <text:p>38</text:p>
          </table:table-cell>
          <table:table-cell office:value-type="percentage" office:value="-3.4913516976297243E-2" table:formula="of:=([.I451]-[.I450])/[.I450]" table:style-name="ce16">
            <text:p>-3%</text:p>
          </table:table-cell>
          <table:table-cell office:value-type="string" office:string-value="Valid" table:formula="of:=IF([.F450]&lt;=[.E450]; &quot;Valid&quot;; &quot;Invalid&quot;)" table:style-name="ce17">
            <text:p>Valid</text:p>
          </table:table-cell>
          <table:table-cell office:value-type="string" office:string-value="Valid" table:formula="of:=IF([.H450]&lt;=[.G450]; &quot;Valid&quot;; &quot;Invalid&quot;)" table:style-name="ce17">
            <text:p>Valid</text:p>
          </table:table-cell>
          <table:table-cell office:value-type="string" office:string-value="Increasing Pressure" table:formula="of:=IF([.J450]&gt;0; &quot;Increasing Pressure&quot;; &quot;Stable/Reducing&quot;)" table:style-name="ce18">
            <text:p>Increasing Pressure</text:p>
          </table:table-cell>
          <table:table-cell office:value-type="float" office:value="0.81904761904761902" table:formula="of:=IFERROR([.H450]/[.F450]; 0)" table:style-name="ce17">
            <text:p>0.819047619</text:p>
          </table:table-cell>
          <table:table-cell office:value-type="float" office:value="6063.8571428571431" table:formula="of:=AVERAGE([.I450:.I456])" table:style-name="ce15">
            <text:p>6064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11-17T00:00:00" table:style-name="ce14">
            <text:p>17-11-2024</text:p>
          </table:table-cell>
          <table:table-cell office:value-type="string" office:string-value="November" table:formula="of:=TEXT([.A451]; &quot;mmmm&quot;)" table:style-name="ce14">
            <text:p>November</text:p>
          </table:table-cell>
          <table:table-cell office:value-type="string" office:string-value="2024-11" table:formula="of:=TEXT([.A451]; &quot;yyyy-mm&quot;)" table:style-name="ce14">
            <text:p>2024-11</text:p>
          </table:table-cell>
          <table:table-cell office:value-type="float" office:value="105" table:style-name="ce9">
            <text:p>105</text:p>
          </table:table-cell>
          <table:table-cell office:value-type="float" office:value="210" table:style-name="ce9">
            <text:p>210</text:p>
          </table:table-cell>
          <table:table-cell office:value-type="float" office:value="149" table:style-name="ce9">
            <text:p>149</text:p>
          </table:table-cell>
          <table:table-cell office:value-type="float" office:value="5816" table:style-name="ce9">
            <text:p>5816</text:p>
          </table:table-cell>
          <table:table-cell office:value-type="float" office:value="195" table:style-name="ce9">
            <text:p>195</text:p>
          </table:table-cell>
          <table:table-cell office:value-type="float" office:value="6026" table:formula="of:=SUM([.G451]+[.E451])" table:style-name="ce15">
            <text:p>6026</text:p>
          </table:table-cell>
          <table:table-cell office:value-type="float" office:value="-46" table:formula="of:=[.F451]-[.H451]" table:style-name="ce15">
            <text:p>-46</text:p>
          </table:table-cell>
          <table:table-cell office:value-type="percentage" office:value="-6.6379024228343847E-4" table:formula="of:=([.I452]-[.I451])/[.I451]" table:style-name="ce16">
            <text:p>0%</text:p>
          </table:table-cell>
          <table:table-cell office:value-type="string" office:string-value="Valid" table:formula="of:=IF([.F451]&lt;=[.E451]; &quot;Valid&quot;; &quot;Invalid&quot;)" table:style-name="ce17">
            <text:p>Valid</text:p>
          </table:table-cell>
          <table:table-cell office:value-type="string" office:string-value="Valid" table:formula="of:=IF([.H451]&lt;=[.G451]; &quot;Valid&quot;; &quot;Invalid&quot;)" table:style-name="ce17">
            <text:p>Valid</text:p>
          </table:table-cell>
          <table:table-cell office:value-type="string" office:string-value="Stable/Reducing" table:formula="of:=IF([.J451]&gt;0; &quot;Increasing Pressure&quot;; &quot;Stable/Reducing&quot;)" table:style-name="ce18">
            <text:p>Stable/Reducing</text:p>
          </table:table-cell>
          <table:table-cell office:value-type="float" office:value="1.3087248322147651" table:formula="of:=IFERROR([.H451]/[.F451]; 0)" table:style-name="ce17">
            <text:p>1.308724832</text:p>
          </table:table-cell>
          <table:table-cell office:value-type="float" office:value="6030.7142857142853" table:formula="of:=AVERAGE([.I451:.I457])" table:style-name="ce15">
            <text:p>6031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11-18T00:00:00" table:style-name="ce14">
            <text:p>18-11-2024</text:p>
          </table:table-cell>
          <table:table-cell office:value-type="string" office:string-value="November" table:formula="of:=TEXT([.A452]; &quot;mmmm&quot;)" table:style-name="ce14">
            <text:p>November</text:p>
          </table:table-cell>
          <table:table-cell office:value-type="string" office:string-value="2024-11" table:formula="of:=TEXT([.A452]; &quot;yyyy-mm&quot;)" table:style-name="ce14">
            <text:p>2024-11</text:p>
          </table:table-cell>
          <table:table-cell office:value-type="float" office:value="143" table:style-name="ce9">
            <text:p>143</text:p>
          </table:table-cell>
          <table:table-cell office:value-type="float" office:value="203" table:style-name="ce9">
            <text:p>203</text:p>
          </table:table-cell>
          <table:table-cell office:value-type="float" office:value="163" table:style-name="ce9">
            <text:p>163</text:p>
          </table:table-cell>
          <table:table-cell office:value-type="float" office:value="5819" table:style-name="ce9">
            <text:p>5819</text:p>
          </table:table-cell>
          <table:table-cell office:value-type="float" office:value="138" table:style-name="ce9">
            <text:p>138</text:p>
          </table:table-cell>
          <table:table-cell office:value-type="float" office:value="6022" table:formula="of:=SUM([.G452]+[.E452])" table:style-name="ce15">
            <text:p>6022</text:p>
          </table:table-cell>
          <table:table-cell office:value-type="float" office:value="25" table:formula="of:=[.F452]-[.H452]" table:style-name="ce15">
            <text:p>25</text:p>
          </table:table-cell>
          <table:table-cell office:value-type="percentage" office:value="5.1477914314181335E-3" table:formula="of:=([.I453]-[.I452])/[.I452]" table:style-name="ce16">
            <text:p>1%</text:p>
          </table:table-cell>
          <table:table-cell office:value-type="string" office:string-value="Valid" table:formula="of:=IF([.F452]&lt;=[.E452]; &quot;Valid&quot;; &quot;Invalid&quot;)" table:style-name="ce17">
            <text:p>Valid</text:p>
          </table:table-cell>
          <table:table-cell office:value-type="string" office:string-value="Valid" table:formula="of:=IF([.H452]&lt;=[.G452]; &quot;Valid&quot;; &quot;Invalid&quot;)" table:style-name="ce17">
            <text:p>Valid</text:p>
          </table:table-cell>
          <table:table-cell office:value-type="string" office:string-value="Increasing Pressure" table:formula="of:=IF([.J452]&gt;0; &quot;Increasing Pressure&quot;; &quot;Stable/Reducing&quot;)" table:style-name="ce18">
            <text:p>Increasing Pressure</text:p>
          </table:table-cell>
          <table:table-cell office:value-type="float" office:value="0.84662576687116564" table:formula="of:=IFERROR([.H452]/[.F452]; 0)" table:style-name="ce17">
            <text:p>0.846625767</text:p>
          </table:table-cell>
          <table:table-cell office:value-type="float" office:value="6041" table:formula="of:=AVERAGE([.I452:.I458])" table:style-name="ce15">
            <text:p>6041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11-19T00:00:00" table:style-name="ce14">
            <text:p>19-11-2024</text:p>
          </table:table-cell>
          <table:table-cell office:value-type="string" office:string-value="November" table:formula="of:=TEXT([.A453]; &quot;mmmm&quot;)" table:style-name="ce14">
            <text:p>November</text:p>
          </table:table-cell>
          <table:table-cell office:value-type="string" office:string-value="2024-11" table:formula="of:=TEXT([.A453]; &quot;yyyy-mm&quot;)" table:style-name="ce14">
            <text:p>2024-11</text:p>
          </table:table-cell>
          <table:table-cell office:value-type="float" office:value="119" table:style-name="ce9">
            <text:p>119</text:p>
          </table:table-cell>
          <table:table-cell office:value-type="float" office:value="209" table:style-name="ce9">
            <text:p>209</text:p>
          </table:table-cell>
          <table:table-cell office:value-type="float" office:value="152" table:style-name="ce9">
            <text:p>152</text:p>
          </table:table-cell>
          <table:table-cell office:value-type="float" office:value="5844" table:style-name="ce9">
            <text:p>5844</text:p>
          </table:table-cell>
          <table:table-cell office:value-type="float" office:value="146" table:style-name="ce9">
            <text:p>146</text:p>
          </table:table-cell>
          <table:table-cell office:value-type="float" office:value="6053" table:formula="of:=SUM([.G453]+[.E453])" table:style-name="ce15">
            <text:p>6053</text:p>
          </table:table-cell>
          <table:table-cell office:value-type="float" office:value="6" table:formula="of:=[.F453]-[.H453]" table:style-name="ce15">
            <text:p>6</text:p>
          </table:table-cell>
          <table:table-cell office:value-type="percentage" office:value="6.2778787378159591E-3" table:formula="of:=([.I454]-[.I453])/[.I453]" table:style-name="ce16">
            <text:p>1%</text:p>
          </table:table-cell>
          <table:table-cell office:value-type="string" office:string-value="Valid" table:formula="of:=IF([.F453]&lt;=[.E453]; &quot;Valid&quot;; &quot;Invalid&quot;)" table:style-name="ce17">
            <text:p>Valid</text:p>
          </table:table-cell>
          <table:table-cell office:value-type="string" office:string-value="Valid" table:formula="of:=IF([.H453]&lt;=[.G453]; &quot;Valid&quot;; &quot;Invalid&quot;)" table:style-name="ce17">
            <text:p>Valid</text:p>
          </table:table-cell>
          <table:table-cell office:value-type="string" office:string-value="Increasing Pressure" table:formula="of:=IF([.J453]&gt;0; &quot;Increasing Pressure&quot;; &quot;Stable/Reducing&quot;)" table:style-name="ce18">
            <text:p>Increasing Pressure</text:p>
          </table:table-cell>
          <table:table-cell office:value-type="float" office:value="0.96052631578947367" table:formula="of:=IFERROR([.H453]/[.F453]; 0)" table:style-name="ce17">
            <text:p>0.960526316</text:p>
          </table:table-cell>
          <table:table-cell office:value-type="float" office:value="6070.5714285714284" table:formula="of:=AVERAGE([.I453:.I459])" table:style-name="ce15">
            <text:p>6071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11-20T00:00:00" table:style-name="ce14">
            <text:p>20-11-2024</text:p>
          </table:table-cell>
          <table:table-cell office:value-type="string" office:string-value="November" table:formula="of:=TEXT([.A454]; &quot;mmmm&quot;)" table:style-name="ce14">
            <text:p>November</text:p>
          </table:table-cell>
          <table:table-cell office:value-type="string" office:string-value="2024-11" table:formula="of:=TEXT([.A454]; &quot;yyyy-mm&quot;)" table:style-name="ce14">
            <text:p>2024-11</text:p>
          </table:table-cell>
          <table:table-cell office:value-type="float" office:value="155" table:style-name="ce9">
            <text:p>155</text:p>
          </table:table-cell>
          <table:table-cell office:value-type="float" office:value="212" table:style-name="ce9">
            <text:p>212</text:p>
          </table:table-cell>
          <table:table-cell office:value-type="float" office:value="181" table:style-name="ce9">
            <text:p>181</text:p>
          </table:table-cell>
          <table:table-cell office:value-type="float" office:value="5879" table:style-name="ce9">
            <text:p>5879</text:p>
          </table:table-cell>
          <table:table-cell office:value-type="float" office:value="148" table:style-name="ce9">
            <text:p>148</text:p>
          </table:table-cell>
          <table:table-cell office:value-type="float" office:value="6091" table:formula="of:=SUM([.G454]+[.E454])" table:style-name="ce15">
            <text:p>6091</text:p>
          </table:table-cell>
          <table:table-cell office:value-type="float" office:value="33" table:formula="of:=[.F454]-[.H454]" table:style-name="ce15">
            <text:p>33</text:p>
          </table:table-cell>
          <table:table-cell office:value-type="percentage" office:value="-4.4327696601543258E-3" table:formula="of:=([.I455]-[.I454])/[.I454]" table:style-name="ce16">
            <text:p>0%</text:p>
          </table:table-cell>
          <table:table-cell office:value-type="string" office:string-value="Valid" table:formula="of:=IF([.F454]&lt;=[.E454]; &quot;Valid&quot;; &quot;Invalid&quot;)" table:style-name="ce17">
            <text:p>Valid</text:p>
          </table:table-cell>
          <table:table-cell office:value-type="string" office:string-value="Valid" table:formula="of:=IF([.H454]&lt;=[.G454]; &quot;Valid&quot;; &quot;Invalid&quot;)" table:style-name="ce17">
            <text:p>Valid</text:p>
          </table:table-cell>
          <table:table-cell office:value-type="string" office:string-value="Increasing Pressure" table:formula="of:=IF([.J454]&gt;0; &quot;Increasing Pressure&quot;; &quot;Stable/Reducing&quot;)" table:style-name="ce18">
            <text:p>Increasing Pressure</text:p>
          </table:table-cell>
          <table:table-cell office:value-type="float" office:value="0.81767955801104975" table:formula="of:=IFERROR([.H454]/[.F454]; 0)" table:style-name="ce17">
            <text:p>0.817679558</text:p>
          </table:table-cell>
          <table:table-cell office:value-type="float" office:value="6097.7142857142853" table:formula="of:=AVERAGE([.I454:.I460])" table:style-name="ce15">
            <text:p>6098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11-21T00:00:00" table:style-name="ce14">
            <text:p>21-11-2024</text:p>
          </table:table-cell>
          <table:table-cell office:value-type="string" office:string-value="November" table:formula="of:=TEXT([.A455]; &quot;mmmm&quot;)" table:style-name="ce14">
            <text:p>November</text:p>
          </table:table-cell>
          <table:table-cell office:value-type="string" office:string-value="2024-11" table:formula="of:=TEXT([.A455]; &quot;yyyy-mm&quot;)" table:style-name="ce14">
            <text:p>2024-11</text:p>
          </table:table-cell>
          <table:table-cell office:value-type="float" office:value="109" table:style-name="ce9">
            <text:p>109</text:p>
          </table:table-cell>
          <table:table-cell office:value-type="float" office:value="214" table:style-name="ce9">
            <text:p>214</text:p>
          </table:table-cell>
          <table:table-cell office:value-type="float" office:value="173" table:style-name="ce9">
            <text:p>173</text:p>
          </table:table-cell>
          <table:table-cell office:value-type="float" office:value="5850" table:style-name="ce9">
            <text:p>5850</text:p>
          </table:table-cell>
          <table:table-cell office:value-type="float" office:value="210" table:style-name="ce9">
            <text:p>210</text:p>
          </table:table-cell>
          <table:table-cell office:value-type="float" office:value="6064" table:formula="of:=SUM([.G455]+[.E455])" table:style-name="ce15">
            <text:p>6064</text:p>
          </table:table-cell>
          <table:table-cell office:value-type="float" office:value="-37" table:formula="of:=[.F455]-[.H455]" table:style-name="ce15">
            <text:p>-37</text:p>
          </table:table-cell>
          <table:table-cell office:value-type="percentage" office:value="-1.9294195250659632E-2" table:formula="of:=([.I456]-[.I455])/[.I455]" table:style-name="ce16">
            <text:p>-2%</text:p>
          </table:table-cell>
          <table:table-cell office:value-type="string" office:string-value="Valid" table:formula="of:=IF([.F455]&lt;=[.E455]; &quot;Valid&quot;; &quot;Invalid&quot;)" table:style-name="ce17">
            <text:p>Valid</text:p>
          </table:table-cell>
          <table:table-cell office:value-type="string" office:string-value="Valid" table:formula="of:=IF([.H455]&lt;=[.G455]; &quot;Valid&quot;; &quot;Invalid&quot;)" table:style-name="ce17">
            <text:p>Valid</text:p>
          </table:table-cell>
          <table:table-cell office:value-type="string" office:string-value="Stable/Reducing" table:formula="of:=IF([.J455]&gt;0; &quot;Increasing Pressure&quot;; &quot;Stable/Reducing&quot;)" table:style-name="ce18">
            <text:p>Stable/Reducing</text:p>
          </table:table-cell>
          <table:table-cell office:value-type="float" office:value="1.2138728323699421" table:formula="of:=IFERROR([.H455]/[.F455]; 0)" table:style-name="ce17">
            <text:p>1.213872832</text:p>
          </table:table-cell>
          <table:table-cell office:value-type="float" office:value="6126.4285714285716" table:formula="of:=AVERAGE([.I455:.I461])" table:style-name="ce15">
            <text:p>6126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11-24T00:00:00" table:style-name="ce14">
            <text:p>24-11-2024</text:p>
          </table:table-cell>
          <table:table-cell office:value-type="string" office:string-value="November" table:formula="of:=TEXT([.A456]; &quot;mmmm&quot;)" table:style-name="ce14">
            <text:p>November</text:p>
          </table:table-cell>
          <table:table-cell office:value-type="string" office:string-value="2024-11" table:formula="of:=TEXT([.A456]; &quot;yyyy-mm&quot;)" table:style-name="ce14">
            <text:p>2024-11</text:p>
          </table:table-cell>
          <table:table-cell office:value-type="float" office:value="191" table:style-name="ce9">
            <text:p>191</text:p>
          </table:table-cell>
          <table:table-cell office:value-type="float" office:value="283" table:style-name="ce9">
            <text:p>283</text:p>
          </table:table-cell>
          <table:table-cell office:value-type="float" office:value="192" table:style-name="ce9">
            <text:p>192</text:p>
          </table:table-cell>
          <table:table-cell office:value-type="float" office:value="5664" table:style-name="ce9">
            <text:p>5664</text:p>
          </table:table-cell>
          <table:table-cell office:value-type="float" office:value="207" table:style-name="ce9">
            <text:p>207</text:p>
          </table:table-cell>
          <table:table-cell office:value-type="float" office:value="5947" table:formula="of:=SUM([.G456]+[.E456])" table:style-name="ce15">
            <text:p>5947</text:p>
          </table:table-cell>
          <table:table-cell office:value-type="float" office:value="-15" table:formula="of:=[.F456]-[.H456]" table:style-name="ce15">
            <text:p>-15</text:p>
          </table:table-cell>
          <table:table-cell office:value-type="percentage" office:value="1.0929880612073315E-2" table:formula="of:=([.I457]-[.I456])/[.I456]" table:style-name="ce16">
            <text:p>1%</text:p>
          </table:table-cell>
          <table:table-cell office:value-type="string" office:string-value="Valid" table:formula="of:=IF([.F456]&lt;=[.E456]; &quot;Valid&quot;; &quot;Invalid&quot;)" table:style-name="ce17">
            <text:p>Valid</text:p>
          </table:table-cell>
          <table:table-cell office:value-type="string" office:string-value="Valid" table:formula="of:=IF([.H456]&lt;=[.G456]; &quot;Valid&quot;; &quot;Invalid&quot;)" table:style-name="ce17">
            <text:p>Valid</text:p>
          </table:table-cell>
          <table:table-cell office:value-type="string" office:string-value="Stable/Reducing" table:formula="of:=IF([.J456]&gt;0; &quot;Increasing Pressure&quot;; &quot;Stable/Reducing&quot;)" table:style-name="ce18">
            <text:p>Stable/Reducing</text:p>
          </table:table-cell>
          <table:table-cell office:value-type="float" office:value="1.078125" table:formula="of:=IFERROR([.H456]/[.F456]; 0)" table:style-name="ce17">
            <text:p>1.078125</text:p>
          </table:table-cell>
          <table:table-cell office:value-type="float" office:value="6173.1428571428569" table:formula="of:=AVERAGE([.I456:.I462])" table:style-name="ce15">
            <text:p>6173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11-25T00:00:00" table:style-name="ce14">
            <text:p>25-11-2024</text:p>
          </table:table-cell>
          <table:table-cell office:value-type="string" office:string-value="November" table:formula="of:=TEXT([.A457]; &quot;mmmm&quot;)" table:style-name="ce14">
            <text:p>November</text:p>
          </table:table-cell>
          <table:table-cell office:value-type="string" office:string-value="2024-11" table:formula="of:=TEXT([.A457]; &quot;yyyy-mm&quot;)" table:style-name="ce14">
            <text:p>2024-11</text:p>
          </table:table-cell>
          <table:table-cell office:value-type="float" office:value="170" table:style-name="ce9">
            <text:p>170</text:p>
          </table:table-cell>
          <table:table-cell office:value-type="float" office:value="297" table:style-name="ce9">
            <text:p>297</text:p>
          </table:table-cell>
          <table:table-cell office:value-type="float" office:value="196" table:style-name="ce9">
            <text:p>196</text:p>
          </table:table-cell>
          <table:table-cell office:value-type="float" office:value="5715" table:style-name="ce9">
            <text:p>5715</text:p>
          </table:table-cell>
          <table:table-cell office:value-type="float" office:value="129" table:style-name="ce9">
            <text:p>129</text:p>
          </table:table-cell>
          <table:table-cell office:value-type="float" office:value="6012" table:formula="of:=SUM([.G457]+[.E457])" table:style-name="ce15">
            <text:p>6012</text:p>
          </table:table-cell>
          <table:table-cell office:value-type="float" office:value="67" table:formula="of:=[.F457]-[.H457]" table:style-name="ce15">
            <text:p>67</text:p>
          </table:table-cell>
          <table:table-cell office:value-type="percentage" office:value="1.4304723885562209E-2" table:formula="of:=([.I458]-[.I457])/[.I457]" table:style-name="ce16">
            <text:p>1%</text:p>
          </table:table-cell>
          <table:table-cell office:value-type="string" office:string-value="Valid" table:formula="of:=IF([.F457]&lt;=[.E457]; &quot;Valid&quot;; &quot;Invalid&quot;)" table:style-name="ce17">
            <text:p>Valid</text:p>
          </table:table-cell>
          <table:table-cell office:value-type="string" office:string-value="Valid" table:formula="of:=IF([.H457]&lt;=[.G457]; &quot;Valid&quot;; &quot;Invalid&quot;)" table:style-name="ce17">
            <text:p>Valid</text:p>
          </table:table-cell>
          <table:table-cell office:value-type="string" office:string-value="Increasing Pressure" table:formula="of:=IF([.J457]&gt;0; &quot;Increasing Pressure&quot;; &quot;Stable/Reducing&quot;)" table:style-name="ce18">
            <text:p>Increasing Pressure</text:p>
          </table:table-cell>
          <table:table-cell office:value-type="float" office:value="0.65816326530612246" table:formula="of:=IFERROR([.H457]/[.F457]; 0)" table:style-name="ce17">
            <text:p>0.658163265</text:p>
          </table:table-cell>
          <table:table-cell office:value-type="float" office:value="6241" table:formula="of:=AVERAGE([.I457:.I463])" table:style-name="ce15">
            <text:p>6241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11-26T00:00:00" table:style-name="ce14">
            <text:p>26-11-2024</text:p>
          </table:table-cell>
          <table:table-cell office:value-type="string" office:string-value="November" table:formula="of:=TEXT([.A458]; &quot;mmmm&quot;)" table:style-name="ce14">
            <text:p>November</text:p>
          </table:table-cell>
          <table:table-cell office:value-type="string" office:string-value="2024-11" table:formula="of:=TEXT([.A458]; &quot;yyyy-mm&quot;)" table:style-name="ce14">
            <text:p>2024-11</text:p>
          </table:table-cell>
          <table:table-cell office:value-type="float" office:value="152" table:style-name="ce9">
            <text:p>152</text:p>
          </table:table-cell>
          <table:table-cell office:value-type="float" office:value="272" table:style-name="ce9">
            <text:p>272</text:p>
          </table:table-cell>
          <table:table-cell office:value-type="float" office:value="214" table:style-name="ce9">
            <text:p>214</text:p>
          </table:table-cell>
          <table:table-cell office:value-type="float" office:value="5826" table:style-name="ce9">
            <text:p>5826</text:p>
          </table:table-cell>
          <table:table-cell office:value-type="float" office:value="112" table:style-name="ce9">
            <text:p>112</text:p>
          </table:table-cell>
          <table:table-cell office:value-type="float" office:value="6098" table:formula="of:=SUM([.G458]+[.E458])" table:style-name="ce15">
            <text:p>6098</text:p>
          </table:table-cell>
          <table:table-cell office:value-type="float" office:value="102" table:formula="of:=[.F458]-[.H458]" table:style-name="ce15">
            <text:p>102</text:p>
          </table:table-cell>
          <table:table-cell office:value-type="percentage" office:value="2.1482453263365037E-2" table:formula="of:=([.I459]-[.I458])/[.I458]" table:style-name="ce16">
            <text:p>2%</text:p>
          </table:table-cell>
          <table:table-cell office:value-type="string" office:string-value="Valid" table:formula="of:=IF([.F458]&lt;=[.E458]; &quot;Valid&quot;; &quot;Invalid&quot;)" table:style-name="ce17">
            <text:p>Valid</text:p>
          </table:table-cell>
          <table:table-cell office:value-type="string" office:string-value="Valid" table:formula="of:=IF([.H458]&lt;=[.G458]; &quot;Valid&quot;; &quot;Invalid&quot;)" table:style-name="ce17">
            <text:p>Valid</text:p>
          </table:table-cell>
          <table:table-cell office:value-type="string" office:string-value="Increasing Pressure" table:formula="of:=IF([.J458]&gt;0; &quot;Increasing Pressure&quot;; &quot;Stable/Reducing&quot;)" table:style-name="ce18">
            <text:p>Increasing Pressure</text:p>
          </table:table-cell>
          <table:table-cell office:value-type="float" office:value="0.52336448598130836" table:formula="of:=IFERROR([.H458]/[.F458]; 0)" table:style-name="ce17">
            <text:p>0.523364486</text:p>
          </table:table-cell>
          <table:table-cell office:value-type="float" office:value="6312.7142857142853" table:formula="of:=AVERAGE([.I458:.I464])" table:style-name="ce15">
            <text:p>6313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11-27T00:00:00" table:style-name="ce14">
            <text:p>27-11-2024</text:p>
          </table:table-cell>
          <table:table-cell office:value-type="string" office:string-value="November" table:formula="of:=TEXT([.A459]; &quot;mmmm&quot;)" table:style-name="ce14">
            <text:p>November</text:p>
          </table:table-cell>
          <table:table-cell office:value-type="string" office:string-value="2024-11" table:formula="of:=TEXT([.A459]; &quot;yyyy-mm&quot;)" table:style-name="ce14">
            <text:p>2024-11</text:p>
          </table:table-cell>
          <table:table-cell office:value-type="float" office:value="239" table:style-name="ce9">
            <text:p>239</text:p>
          </table:table-cell>
          <table:table-cell office:value-type="float" office:value="367" table:style-name="ce9">
            <text:p>367</text:p>
          </table:table-cell>
          <table:table-cell office:value-type="float" office:value="224" table:style-name="ce9">
            <text:p>224</text:p>
          </table:table-cell>
          <table:table-cell office:value-type="float" office:value="5862" table:style-name="ce9">
            <text:p>5862</text:p>
          </table:table-cell>
          <table:table-cell office:value-type="float" office:value="211" table:style-name="ce9">
            <text:p>211</text:p>
          </table:table-cell>
          <table:table-cell office:value-type="float" office:value="6229" table:formula="of:=SUM([.G459]+[.E459])" table:style-name="ce15">
            <text:p>6229</text:p>
          </table:table-cell>
          <table:table-cell office:value-type="float" office:value="13" table:formula="of:=[.F459]-[.H459]" table:style-name="ce15">
            <text:p>13</text:p>
          </table:table-cell>
          <table:table-cell office:value-type="percentage" office:value="2.2475517739605072E-3" table:formula="of:=([.I460]-[.I459])/[.I459]" table:style-name="ce16">
            <text:p>0%</text:p>
          </table:table-cell>
          <table:table-cell office:value-type="string" office:string-value="Valid" table:formula="of:=IF([.F459]&lt;=[.E459]; &quot;Valid&quot;; &quot;Invalid&quot;)" table:style-name="ce17">
            <text:p>Valid</text:p>
          </table:table-cell>
          <table:table-cell office:value-type="string" office:string-value="Valid" table:formula="of:=IF([.H459]&lt;=[.G459]; &quot;Valid&quot;; &quot;Invalid&quot;)" table:style-name="ce17">
            <text:p>Valid</text:p>
          </table:table-cell>
          <table:table-cell office:value-type="string" office:string-value="Increasing Pressure" table:formula="of:=IF([.J459]&gt;0; &quot;Increasing Pressure&quot;; &quot;Stable/Reducing&quot;)" table:style-name="ce18">
            <text:p>Increasing Pressure</text:p>
          </table:table-cell>
          <table:table-cell office:value-type="float" office:value="0.9419642857142857" table:formula="of:=IFERROR([.H459]/[.F459]; 0)" table:style-name="ce17">
            <text:p>0.941964286</text:p>
          </table:table-cell>
          <table:table-cell office:value-type="float" office:value="6383.4285714285716" table:formula="of:=AVERAGE([.I459:.I465])" table:style-name="ce15">
            <text:p>6383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11-28T00:00:00" table:style-name="ce14">
            <text:p>28-11-2024</text:p>
          </table:table-cell>
          <table:table-cell office:value-type="string" office:string-value="November" table:formula="of:=TEXT([.A460]; &quot;mmmm&quot;)" table:style-name="ce14">
            <text:p>November</text:p>
          </table:table-cell>
          <table:table-cell office:value-type="string" office:string-value="2024-11" table:formula="of:=TEXT([.A460]; &quot;yyyy-mm&quot;)" table:style-name="ce14">
            <text:p>2024-11</text:p>
          </table:table-cell>
          <table:table-cell office:value-type="float" office:value="113" table:style-name="ce9">
            <text:p>113</text:p>
          </table:table-cell>
          <table:table-cell office:value-type="float" office:value="280" table:style-name="ce9">
            <text:p>280</text:p>
          </table:table-cell>
          <table:table-cell office:value-type="float" office:value="237" table:style-name="ce9">
            <text:p>237</text:p>
          </table:table-cell>
          <table:table-cell office:value-type="float" office:value="5963" table:style-name="ce9">
            <text:p>5963</text:p>
          </table:table-cell>
          <table:table-cell office:value-type="float" office:value="143" table:style-name="ce9">
            <text:p>143</text:p>
          </table:table-cell>
          <table:table-cell office:value-type="float" office:value="6243" table:formula="of:=SUM([.G460]+[.E460])" table:style-name="ce15">
            <text:p>6243</text:p>
          </table:table-cell>
          <table:table-cell office:value-type="float" office:value="94" table:formula="of:=[.F460]-[.H460]" table:style-name="ce15">
            <text:p>94</text:p>
          </table:table-cell>
          <table:table-cell office:value-type="percentage" office:value="7.8487906455229853E-3" table:formula="of:=([.I461]-[.I460])/[.I460]" table:style-name="ce16">
            <text:p>1%</text:p>
          </table:table-cell>
          <table:table-cell office:value-type="string" office:string-value="Valid" table:formula="of:=IF([.F460]&lt;=[.E460]; &quot;Valid&quot;; &quot;Invalid&quot;)" table:style-name="ce17">
            <text:p>Valid</text:p>
          </table:table-cell>
          <table:table-cell office:value-type="string" office:string-value="Valid" table:formula="of:=IF([.H460]&lt;=[.G460]; &quot;Valid&quot;; &quot;Invalid&quot;)" table:style-name="ce17">
            <text:p>Valid</text:p>
          </table:table-cell>
          <table:table-cell office:value-type="string" office:string-value="Increasing Pressure" table:formula="of:=IF([.J460]&gt;0; &quot;Increasing Pressure&quot;; &quot;Stable/Reducing&quot;)" table:style-name="ce18">
            <text:p>Increasing Pressure</text:p>
          </table:table-cell>
          <table:table-cell office:value-type="float" office:value="0.6033755274261603" table:formula="of:=IFERROR([.H460]/[.F460]; 0)" table:style-name="ce17">
            <text:p>0.603375527</text:p>
          </table:table-cell>
          <table:table-cell office:value-type="float" office:value="6426.2857142857147" table:formula="of:=AVERAGE([.I460:.I466])" table:style-name="ce15">
            <text:p>6426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12-01T00:00:00" table:style-name="ce14">
            <text:p>01-12-2024</text:p>
          </table:table-cell>
          <table:table-cell office:value-type="string" office:string-value="December" table:formula="of:=TEXT([.A461]; &quot;mmmm&quot;)" table:style-name="ce14">
            <text:p>December</text:p>
          </table:table-cell>
          <table:table-cell office:value-type="string" office:string-value="2024-12" table:formula="of:=TEXT([.A461]; &quot;yyyy-mm&quot;)" table:style-name="ce14">
            <text:p>2024-12</text:p>
          </table:table-cell>
          <table:table-cell office:value-type="float" office:value="196" table:style-name="ce9">
            <text:p>196</text:p>
          </table:table-cell>
          <table:table-cell office:value-type="float" office:value="306" table:style-name="ce9">
            <text:p>306</text:p>
          </table:table-cell>
          <table:table-cell office:value-type="float" office:value="187" table:style-name="ce9">
            <text:p>187</text:p>
          </table:table-cell>
          <table:table-cell office:value-type="float" office:value="5986" table:style-name="ce9">
            <text:p>5986</text:p>
          </table:table-cell>
          <table:table-cell office:value-type="float" office:value="149" table:style-name="ce9">
            <text:p>149</text:p>
          </table:table-cell>
          <table:table-cell office:value-type="float" office:value="6292" table:formula="of:=SUM([.G461]+[.E461])" table:style-name="ce15">
            <text:p>6292</text:p>
          </table:table-cell>
          <table:table-cell office:value-type="float" office:value="38" table:formula="of:=[.F461]-[.H461]" table:style-name="ce15">
            <text:p>38</text:p>
          </table:table-cell>
          <table:table-cell office:value-type="percentage" office:value="1.5734265734265736E-2" table:formula="of:=([.I462]-[.I461])/[.I461]" table:style-name="ce16">
            <text:p>2%</text:p>
          </table:table-cell>
          <table:table-cell office:value-type="string" office:string-value="Valid" table:formula="of:=IF([.F461]&lt;=[.E461]; &quot;Valid&quot;; &quot;Invalid&quot;)" table:style-name="ce17">
            <text:p>Valid</text:p>
          </table:table-cell>
          <table:table-cell office:value-type="string" office:string-value="Valid" table:formula="of:=IF([.H461]&lt;=[.G461]; &quot;Valid&quot;; &quot;Invalid&quot;)" table:style-name="ce17">
            <text:p>Valid</text:p>
          </table:table-cell>
          <table:table-cell office:value-type="string" office:string-value="Increasing Pressure" table:formula="of:=IF([.J461]&gt;0; &quot;Increasing Pressure&quot;; &quot;Stable/Reducing&quot;)" table:style-name="ce18">
            <text:p>Increasing Pressure</text:p>
          </table:table-cell>
          <table:table-cell office:value-type="float" office:value="0.79679144385026734" table:formula="of:=IFERROR([.H461]/[.F461]; 0)" table:style-name="ce17">
            <text:p>0.796791444</text:p>
          </table:table-cell>
          <table:table-cell office:value-type="float" office:value="6474.8571428571431" table:formula="of:=AVERAGE([.I461:.I467])" table:style-name="ce15">
            <text:p>6475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12-02T00:00:00" table:style-name="ce14">
            <text:p>02-12-2024</text:p>
          </table:table-cell>
          <table:table-cell office:value-type="string" office:string-value="December" table:formula="of:=TEXT([.A462]; &quot;mmmm&quot;)" table:style-name="ce14">
            <text:p>December</text:p>
          </table:table-cell>
          <table:table-cell office:value-type="string" office:string-value="2024-12" table:formula="of:=TEXT([.A462]; &quot;yyyy-mm&quot;)" table:style-name="ce14">
            <text:p>2024-12</text:p>
          </table:table-cell>
          <table:table-cell office:value-type="float" office:value="236" table:style-name="ce9">
            <text:p>236</text:p>
          </table:table-cell>
          <table:table-cell office:value-type="float" office:value="330" table:style-name="ce9">
            <text:p>330</text:p>
          </table:table-cell>
          <table:table-cell office:value-type="float" office:value="222" table:style-name="ce9">
            <text:p>222</text:p>
          </table:table-cell>
          <table:table-cell office:value-type="float" office:value="6061" table:style-name="ce9">
            <text:p>6061</text:p>
          </table:table-cell>
          <table:table-cell office:value-type="float" office:value="115" table:style-name="ce9">
            <text:p>115</text:p>
          </table:table-cell>
          <table:table-cell office:value-type="float" office:value="6391" table:formula="of:=SUM([.G462]+[.E462])" table:style-name="ce15">
            <text:p>6391</text:p>
          </table:table-cell>
          <table:table-cell office:value-type="float" office:value="107" table:formula="of:=[.F462]-[.H462]" table:style-name="ce15">
            <text:p>107</text:p>
          </table:table-cell>
          <table:table-cell office:value-type="percentage" office:value="4.8505711156313566E-3" table:formula="of:=([.I463]-[.I462])/[.I462]" table:style-name="ce16">
            <text:p>0%</text:p>
          </table:table-cell>
          <table:table-cell office:value-type="string" office:string-value="Valid" table:formula="of:=IF([.F462]&lt;=[.E462]; &quot;Valid&quot;; &quot;Invalid&quot;)" table:style-name="ce17">
            <text:p>Valid</text:p>
          </table:table-cell>
          <table:table-cell office:value-type="string" office:string-value="Valid" table:formula="of:=IF([.H462]&lt;=[.G462]; &quot;Valid&quot;; &quot;Invalid&quot;)" table:style-name="ce17">
            <text:p>Valid</text:p>
          </table:table-cell>
          <table:table-cell office:value-type="string" office:string-value="Increasing Pressure" table:formula="of:=IF([.J462]&gt;0; &quot;Increasing Pressure&quot;; &quot;Stable/Reducing&quot;)" table:style-name="ce18">
            <text:p>Increasing Pressure</text:p>
          </table:table-cell>
          <table:table-cell office:value-type="float" office:value="0.51801801801801806" table:formula="of:=IFERROR([.H462]/[.F462]; 0)" table:style-name="ce17">
            <text:p>0.518018018</text:p>
          </table:table-cell>
          <table:table-cell office:value-type="float" office:value="6524" table:formula="of:=AVERAGE([.I462:.I468])" table:style-name="ce15">
            <text:p>6524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12-03T00:00:00" table:style-name="ce14">
            <text:p>03-12-2024</text:p>
          </table:table-cell>
          <table:table-cell office:value-type="string" office:string-value="December" table:formula="of:=TEXT([.A463]; &quot;mmmm&quot;)" table:style-name="ce14">
            <text:p>December</text:p>
          </table:table-cell>
          <table:table-cell office:value-type="string" office:string-value="2024-12" table:formula="of:=TEXT([.A463]; &quot;yyyy-mm&quot;)" table:style-name="ce14">
            <text:p>2024-12</text:p>
          </table:table-cell>
          <table:table-cell office:value-type="float" office:value="81" table:style-name="ce9">
            <text:p>81</text:p>
          </table:table-cell>
          <table:table-cell office:value-type="float" office:value="230" table:style-name="ce9">
            <text:p>230</text:p>
          </table:table-cell>
          <table:table-cell office:value-type="float" office:value="242" table:style-name="ce9">
            <text:p>242</text:p>
          </table:table-cell>
          <table:table-cell office:value-type="float" office:value="6192" table:style-name="ce9">
            <text:p>6192</text:p>
          </table:table-cell>
          <table:table-cell office:value-type="float" office:value="107" table:style-name="ce9">
            <text:p>107</text:p>
          </table:table-cell>
          <table:table-cell office:value-type="float" office:value="6422" table:formula="of:=SUM([.G463]+[.E463])" table:style-name="ce15">
            <text:p>6422</text:p>
          </table:table-cell>
          <table:table-cell office:value-type="float" office:value="135" table:formula="of:=[.F463]-[.H463]" table:style-name="ce15">
            <text:p>135</text:p>
          </table:table-cell>
          <table:table-cell office:value-type="percentage" office:value="1.4325755216443475E-2" table:formula="of:=([.I464]-[.I463])/[.I463]" table:style-name="ce16">
            <text:p>1%</text:p>
          </table:table-cell>
          <table:table-cell office:value-type="string" office:string-value="Invalid" table:formula="of:=IF([.F463]&lt;=[.E463]; &quot;Valid&quot;; &quot;Invalid&quot;)" table:style-name="ce17">
            <text:p>Invalid</text:p>
          </table:table-cell>
          <table:table-cell office:value-type="string" office:string-value="Valid" table:formula="of:=IF([.H463]&lt;=[.G463]; &quot;Valid&quot;; &quot;Invalid&quot;)" table:style-name="ce17">
            <text:p>Valid</text:p>
          </table:table-cell>
          <table:table-cell office:value-type="string" office:string-value="Increasing Pressure" table:formula="of:=IF([.J463]&gt;0; &quot;Increasing Pressure&quot;; &quot;Stable/Reducing&quot;)" table:style-name="ce18">
            <text:p>Increasing Pressure</text:p>
          </table:table-cell>
          <table:table-cell office:value-type="float" office:value="0.44214876033057854" table:formula="of:=IFERROR([.H463]/[.F463]; 0)" table:style-name="ce17">
            <text:p>0.44214876</text:p>
          </table:table-cell>
          <table:table-cell office:value-type="float" office:value="6576" table:formula="of:=AVERAGE([.I463:.I469])" table:style-name="ce15">
            <text:p>6576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12-04T00:00:00" table:style-name="ce14">
            <text:p>04-12-2024</text:p>
          </table:table-cell>
          <table:table-cell office:value-type="string" office:string-value="December" table:formula="of:=TEXT([.A464]; &quot;mmmm&quot;)" table:style-name="ce14">
            <text:p>December</text:p>
          </table:table-cell>
          <table:table-cell office:value-type="string" office:string-value="2024-12" table:formula="of:=TEXT([.A464]; &quot;yyyy-mm&quot;)" table:style-name="ce14">
            <text:p>2024-12</text:p>
          </table:table-cell>
          <table:table-cell office:value-type="float" office:value="118" table:style-name="ce9">
            <text:p>118</text:p>
          </table:table-cell>
          <table:table-cell office:value-type="float" office:value="245" table:style-name="ce9">
            <text:p>245</text:p>
          </table:table-cell>
          <table:table-cell office:value-type="float" office:value="160" table:style-name="ce9">
            <text:p>160</text:p>
          </table:table-cell>
          <table:table-cell office:value-type="float" office:value="6269" table:style-name="ce9">
            <text:p>6269</text:p>
          </table:table-cell>
          <table:table-cell office:value-type="float" office:value="115" table:style-name="ce9">
            <text:p>115</text:p>
          </table:table-cell>
          <table:table-cell office:value-type="float" office:value="6514" table:formula="of:=SUM([.G464]+[.E464])" table:style-name="ce15">
            <text:p>6514</text:p>
          </table:table-cell>
          <table:table-cell office:value-type="float" office:value="45" table:formula="of:=[.F464]-[.H464]" table:style-name="ce15">
            <text:p>45</text:p>
          </table:table-cell>
          <table:table-cell office:value-type="percentage" office:value="1.2127724900214921E-2" table:formula="of:=([.I465]-[.I464])/[.I464]" table:style-name="ce16">
            <text:p>1%</text:p>
          </table:table-cell>
          <table:table-cell office:value-type="string" office:string-value="Valid" table:formula="of:=IF([.F464]&lt;=[.E464]; &quot;Valid&quot;; &quot;Invalid&quot;)" table:style-name="ce17">
            <text:p>Valid</text:p>
          </table:table-cell>
          <table:table-cell office:value-type="string" office:string-value="Valid" table:formula="of:=IF([.H464]&lt;=[.G464]; &quot;Valid&quot;; &quot;Invalid&quot;)" table:style-name="ce17">
            <text:p>Valid</text:p>
          </table:table-cell>
          <table:table-cell office:value-type="string" office:string-value="Increasing Pressure" table:formula="of:=IF([.J464]&gt;0; &quot;Increasing Pressure&quot;; &quot;Stable/Reducing&quot;)" table:style-name="ce18">
            <text:p>Increasing Pressure</text:p>
          </table:table-cell>
          <table:table-cell office:value-type="float" office:value="0.71875" table:formula="of:=IFERROR([.H464]/[.F464]; 0)" table:style-name="ce17">
            <text:p>0.71875</text:p>
          </table:table-cell>
          <table:table-cell office:value-type="float" office:value="6620.5714285714284" table:formula="of:=AVERAGE([.I464:.I470])" table:style-name="ce15">
            <text:p>6621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12-05T00:00:00" table:style-name="ce14">
            <text:p>05-12-2024</text:p>
          </table:table-cell>
          <table:table-cell office:value-type="string" office:string-value="December" table:formula="of:=TEXT([.A465]; &quot;mmmm&quot;)" table:style-name="ce14">
            <text:p>December</text:p>
          </table:table-cell>
          <table:table-cell office:value-type="string" office:string-value="2024-12" table:formula="of:=TEXT([.A465]; &quot;yyyy-mm&quot;)" table:style-name="ce14">
            <text:p>2024-12</text:p>
          </table:table-cell>
          <table:table-cell office:value-type="float" office:value="218" table:style-name="ce9">
            <text:p>218</text:p>
          </table:table-cell>
          <table:table-cell office:value-type="float" office:value="283" table:style-name="ce9">
            <text:p>283</text:p>
          </table:table-cell>
          <table:table-cell office:value-type="float" office:value="208" table:style-name="ce9">
            <text:p>208</text:p>
          </table:table-cell>
          <table:table-cell office:value-type="float" office:value="6310" table:style-name="ce9">
            <text:p>6310</text:p>
          </table:table-cell>
          <table:table-cell office:value-type="float" office:value="150" table:style-name="ce9">
            <text:p>150</text:p>
          </table:table-cell>
          <table:table-cell office:value-type="float" office:value="6593" table:formula="of:=SUM([.G465]+[.E465])" table:style-name="ce15">
            <text:p>6593</text:p>
          </table:table-cell>
          <table:table-cell office:value-type="float" office:value="58" table:formula="of:=[.F465]-[.H465]" table:style-name="ce15">
            <text:p>58</text:p>
          </table:table-cell>
          <table:table-cell office:value-type="percentage" office:value="-9.7072652813590173E-3" table:formula="of:=([.I466]-[.I465])/[.I465]" table:style-name="ce16">
            <text:p>-1%</text:p>
          </table:table-cell>
          <table:table-cell office:value-type="string" office:string-value="Valid" table:formula="of:=IF([.F465]&lt;=[.E465]; &quot;Valid&quot;; &quot;Invalid&quot;)" table:style-name="ce17">
            <text:p>Valid</text:p>
          </table:table-cell>
          <table:table-cell office:value-type="string" office:string-value="Valid" table:formula="of:=IF([.H465]&lt;=[.G465]; &quot;Valid&quot;; &quot;Invalid&quot;)" table:style-name="ce17">
            <text:p>Valid</text:p>
          </table:table-cell>
          <table:table-cell office:value-type="string" office:string-value="Increasing Pressure" table:formula="of:=IF([.J465]&gt;0; &quot;Increasing Pressure&quot;; &quot;Stable/Reducing&quot;)" table:style-name="ce18">
            <text:p>Increasing Pressure</text:p>
          </table:table-cell>
          <table:table-cell office:value-type="float" office:value="0.72115384615384615" table:formula="of:=IFERROR([.H465]/[.F465]; 0)" table:style-name="ce17">
            <text:p>0.721153846</text:p>
          </table:table-cell>
          <table:table-cell office:value-type="float" office:value="6653.5714285714284" table:formula="of:=AVERAGE([.I465:.I471])" table:style-name="ce15">
            <text:p>6654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12-08T00:00:00" table:style-name="ce14">
            <text:p>08-12-2024</text:p>
          </table:table-cell>
          <table:table-cell office:value-type="string" office:string-value="December" table:formula="of:=TEXT([.A466]; &quot;mmmm&quot;)" table:style-name="ce14">
            <text:p>December</text:p>
          </table:table-cell>
          <table:table-cell office:value-type="string" office:string-value="2024-12" table:formula="of:=TEXT([.A466]; &quot;yyyy-mm&quot;)" table:style-name="ce14">
            <text:p>2024-12</text:p>
          </table:table-cell>
          <table:table-cell office:value-type="float" office:value="132" table:style-name="ce9">
            <text:p>132</text:p>
          </table:table-cell>
          <table:table-cell office:value-type="float" office:value="243" table:style-name="ce9">
            <text:p>243</text:p>
          </table:table-cell>
          <table:table-cell office:value-type="float" office:value="183" table:style-name="ce9">
            <text:p>183</text:p>
          </table:table-cell>
          <table:table-cell office:value-type="float" office:value="6286" table:style-name="ce9">
            <text:p>6286</text:p>
          </table:table-cell>
          <table:table-cell office:value-type="float" office:value="172" table:style-name="ce9">
            <text:p>172</text:p>
          </table:table-cell>
          <table:table-cell office:value-type="float" office:value="6529" table:formula="of:=SUM([.G466]+[.E466])" table:style-name="ce15">
            <text:p>6529</text:p>
          </table:table-cell>
          <table:table-cell office:value-type="float" office:value="11" table:formula="of:=[.F466]-[.H466]" table:style-name="ce15">
            <text:p>11</text:p>
          </table:table-cell>
          <table:table-cell office:value-type="percentage" office:value="8.2707918517383981E-3" table:formula="of:=([.I467]-[.I466])/[.I466]" table:style-name="ce16">
            <text:p>1%</text:p>
          </table:table-cell>
          <table:table-cell office:value-type="string" office:string-value="Valid" table:formula="of:=IF([.F466]&lt;=[.E466]; &quot;Valid&quot;; &quot;Invalid&quot;)" table:style-name="ce17">
            <text:p>Valid</text:p>
          </table:table-cell>
          <table:table-cell office:value-type="string" office:string-value="Valid" table:formula="of:=IF([.H466]&lt;=[.G466]; &quot;Valid&quot;; &quot;Invalid&quot;)" table:style-name="ce17">
            <text:p>Valid</text:p>
          </table:table-cell>
          <table:table-cell office:value-type="string" office:string-value="Increasing Pressure" table:formula="of:=IF([.J466]&gt;0; &quot;Increasing Pressure&quot;; &quot;Stable/Reducing&quot;)" table:style-name="ce18">
            <text:p>Increasing Pressure</text:p>
          </table:table-cell>
          <table:table-cell office:value-type="float" office:value="0.93989071038251371" table:formula="of:=IFERROR([.H466]/[.F466]; 0)" table:style-name="ce17">
            <text:p>0.93989071</text:p>
          </table:table-cell>
          <table:table-cell office:value-type="float" office:value="6674.7142857142853" table:formula="of:=AVERAGE([.I466:.I472])" table:style-name="ce15">
            <text:p>6675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12-09T00:00:00" table:style-name="ce14">
            <text:p>09-12-2024</text:p>
          </table:table-cell>
          <table:table-cell office:value-type="string" office:string-value="December" table:formula="of:=TEXT([.A467]; &quot;mmmm&quot;)" table:style-name="ce14">
            <text:p>December</text:p>
          </table:table-cell>
          <table:table-cell office:value-type="string" office:string-value="2024-12" table:formula="of:=TEXT([.A467]; &quot;yyyy-mm&quot;)" table:style-name="ce14">
            <text:p>2024-12</text:p>
          </table:table-cell>
          <table:table-cell office:value-type="float" office:value="224" table:style-name="ce9">
            <text:p>224</text:p>
          </table:table-cell>
          <table:table-cell office:value-type="float" office:value="315" table:style-name="ce9">
            <text:p>315</text:p>
          </table:table-cell>
          <table:table-cell office:value-type="float" office:value="152" table:style-name="ce9">
            <text:p>152</text:p>
          </table:table-cell>
          <table:table-cell office:value-type="float" office:value="6268" table:style-name="ce9">
            <text:p>6268</text:p>
          </table:table-cell>
          <table:table-cell office:value-type="float" office:value="174" table:style-name="ce9">
            <text:p>174</text:p>
          </table:table-cell>
          <table:table-cell office:value-type="float" office:value="6583" table:formula="of:=SUM([.G467]+[.E467])" table:style-name="ce15">
            <text:p>6583</text:p>
          </table:table-cell>
          <table:table-cell office:value-type="float" office:value="-22" table:formula="of:=[.F467]-[.H467]" table:style-name="ce15">
            <text:p>-22</text:p>
          </table:table-cell>
          <table:table-cell office:value-type="percentage" office:value="8.0510405590156469E-3" table:formula="of:=([.I468]-[.I467])/[.I467]" table:style-name="ce16">
            <text:p>1%</text:p>
          </table:table-cell>
          <table:table-cell office:value-type="string" office:string-value="Valid" table:formula="of:=IF([.F467]&lt;=[.E467]; &quot;Valid&quot;; &quot;Invalid&quot;)" table:style-name="ce17">
            <text:p>Valid</text:p>
          </table:table-cell>
          <table:table-cell office:value-type="string" office:string-value="Valid" table:formula="of:=IF([.H467]&lt;=[.G467]; &quot;Valid&quot;; &quot;Invalid&quot;)" table:style-name="ce17">
            <text:p>Valid</text:p>
          </table:table-cell>
          <table:table-cell office:value-type="string" office:string-value="Stable/Reducing" table:formula="of:=IF([.J467]&gt;0; &quot;Increasing Pressure&quot;; &quot;Stable/Reducing&quot;)" table:style-name="ce18">
            <text:p>Stable/Reducing</text:p>
          </table:table-cell>
          <table:table-cell office:value-type="float" office:value="1.1447368421052631" table:formula="of:=IFERROR([.H467]/[.F467]; 0)" table:style-name="ce17">
            <text:p>1.144736842</text:p>
          </table:table-cell>
          <table:table-cell office:value-type="float" office:value="6715.7142857142853" table:formula="of:=AVERAGE([.I467:.I473])" table:style-name="ce15">
            <text:p>6716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12-10T00:00:00" table:style-name="ce14">
            <text:p>10-12-2024</text:p>
          </table:table-cell>
          <table:table-cell office:value-type="string" office:string-value="December" table:formula="of:=TEXT([.A468]; &quot;mmmm&quot;)" table:style-name="ce14">
            <text:p>December</text:p>
          </table:table-cell>
          <table:table-cell office:value-type="string" office:string-value="2024-12" table:formula="of:=TEXT([.A468]; &quot;yyyy-mm&quot;)" table:style-name="ce14">
            <text:p>2024-12</text:p>
          </table:table-cell>
          <table:table-cell office:value-type="float" office:value="167" table:style-name="ce9">
            <text:p>167</text:p>
          </table:table-cell>
          <table:table-cell office:value-type="float" office:value="326" table:style-name="ce9">
            <text:p>326</text:p>
          </table:table-cell>
          <table:table-cell office:value-type="float" office:value="213" table:style-name="ce9">
            <text:p>213</text:p>
          </table:table-cell>
          <table:table-cell office:value-type="float" office:value="6310" table:style-name="ce9">
            <text:p>6310</text:p>
          </table:table-cell>
          <table:table-cell office:value-type="float" office:value="149" table:style-name="ce9">
            <text:p>149</text:p>
          </table:table-cell>
          <table:table-cell office:value-type="float" office:value="6636" table:formula="of:=SUM([.G468]+[.E468])" table:style-name="ce15">
            <text:p>6636</text:p>
          </table:table-cell>
          <table:table-cell office:value-type="float" office:value="64" table:formula="of:=[.F468]-[.H468]" table:style-name="ce15">
            <text:p>64</text:p>
          </table:table-cell>
          <table:table-cell office:value-type="percentage" office:value="1.7932489451476793E-2" table:formula="of:=([.I469]-[.I468])/[.I468]" table:style-name="ce16">
            <text:p>2%</text:p>
          </table:table-cell>
          <table:table-cell office:value-type="string" office:string-value="Valid" table:formula="of:=IF([.F468]&lt;=[.E468]; &quot;Valid&quot;; &quot;Invalid&quot;)" table:style-name="ce17">
            <text:p>Valid</text:p>
          </table:table-cell>
          <table:table-cell office:value-type="string" office:string-value="Valid" table:formula="of:=IF([.H468]&lt;=[.G468]; &quot;Valid&quot;; &quot;Invalid&quot;)" table:style-name="ce17">
            <text:p>Valid</text:p>
          </table:table-cell>
          <table:table-cell office:value-type="string" office:string-value="Increasing Pressure" table:formula="of:=IF([.J468]&gt;0; &quot;Increasing Pressure&quot;; &quot;Stable/Reducing&quot;)" table:style-name="ce18">
            <text:p>Increasing Pressure</text:p>
          </table:table-cell>
          <table:table-cell office:value-type="float" office:value="0.69953051643192488" table:formula="of:=IFERROR([.H468]/[.F468]; 0)" table:style-name="ce17">
            <text:p>0.699530516</text:p>
          </table:table-cell>
          <table:table-cell office:value-type="float" office:value="6758.5714285714284" table:formula="of:=AVERAGE([.I468:.I474])" table:style-name="ce15">
            <text:p>6759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12-11T00:00:00" table:style-name="ce14">
            <text:p>11-12-2024</text:p>
          </table:table-cell>
          <table:table-cell office:value-type="string" office:string-value="December" table:formula="of:=TEXT([.A469]; &quot;mmmm&quot;)" table:style-name="ce14">
            <text:p>December</text:p>
          </table:table-cell>
          <table:table-cell office:value-type="string" office:string-value="2024-12" table:formula="of:=TEXT([.A469]; &quot;yyyy-mm&quot;)" table:style-name="ce14">
            <text:p>2024-12</text:p>
          </table:table-cell>
          <table:table-cell office:value-type="float" office:value="209" table:style-name="ce9">
            <text:p>209</text:p>
          </table:table-cell>
          <table:table-cell office:value-type="float" office:value="353" table:style-name="ce9">
            <text:p>353</text:p>
          </table:table-cell>
          <table:table-cell office:value-type="float" office:value="232" table:style-name="ce9">
            <text:p>232</text:p>
          </table:table-cell>
          <table:table-cell office:value-type="float" office:value="6402" table:style-name="ce9">
            <text:p>6402</text:p>
          </table:table-cell>
          <table:table-cell office:value-type="float" office:value="152" table:style-name="ce9">
            <text:p>152</text:p>
          </table:table-cell>
          <table:table-cell office:value-type="float" office:value="6755" table:formula="of:=SUM([.G469]+[.E469])" table:style-name="ce15">
            <text:p>6755</text:p>
          </table:table-cell>
          <table:table-cell office:value-type="float" office:value="80" table:formula="of:=[.F469]-[.H469]" table:style-name="ce15">
            <text:p>80</text:p>
          </table:table-cell>
          <table:table-cell office:value-type="percentage" office:value="-3.1088082901554403E-3" table:formula="of:=([.I470]-[.I469])/[.I469]" table:style-name="ce16">
            <text:p>0%</text:p>
          </table:table-cell>
          <table:table-cell office:value-type="string" office:string-value="Valid" table:formula="of:=IF([.F469]&lt;=[.E469]; &quot;Valid&quot;; &quot;Invalid&quot;)" table:style-name="ce17">
            <text:p>Valid</text:p>
          </table:table-cell>
          <table:table-cell office:value-type="string" office:string-value="Valid" table:formula="of:=IF([.H469]&lt;=[.G469]; &quot;Valid&quot;; &quot;Invalid&quot;)" table:style-name="ce17">
            <text:p>Valid</text:p>
          </table:table-cell>
          <table:table-cell office:value-type="string" office:string-value="Increasing Pressure" table:formula="of:=IF([.J469]&gt;0; &quot;Increasing Pressure&quot;; &quot;Stable/Reducing&quot;)" table:style-name="ce18">
            <text:p>Increasing Pressure</text:p>
          </table:table-cell>
          <table:table-cell office:value-type="float" office:value="0.65517241379310343" table:formula="of:=IFERROR([.H469]/[.F469]; 0)" table:style-name="ce17">
            <text:p>0.655172414</text:p>
          </table:table-cell>
          <table:table-cell office:value-type="float" office:value="6812.2857142857147" table:formula="of:=AVERAGE([.I469:.I475])" table:style-name="ce15">
            <text:p>6812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12-12T00:00:00" table:style-name="ce14">
            <text:p>12-12-2024</text:p>
          </table:table-cell>
          <table:table-cell office:value-type="string" office:string-value="December" table:formula="of:=TEXT([.A470]; &quot;mmmm&quot;)" table:style-name="ce14">
            <text:p>December</text:p>
          </table:table-cell>
          <table:table-cell office:value-type="string" office:string-value="2024-12" table:formula="of:=TEXT([.A470]; &quot;yyyy-mm&quot;)" table:style-name="ce14">
            <text:p>2024-12</text:p>
          </table:table-cell>
          <table:table-cell office:value-type="float" office:value="153" table:style-name="ce9">
            <text:p>153</text:p>
          </table:table-cell>
          <table:table-cell office:value-type="float" office:value="253" table:style-name="ce9">
            <text:p>253</text:p>
          </table:table-cell>
          <table:table-cell office:value-type="float" office:value="286" table:style-name="ce9">
            <text:p>286</text:p>
          </table:table-cell>
          <table:table-cell office:value-type="float" office:value="6481" table:style-name="ce9">
            <text:p>6481</text:p>
          </table:table-cell>
          <table:table-cell office:value-type="float" office:value="194" table:style-name="ce9">
            <text:p>194</text:p>
          </table:table-cell>
          <table:table-cell office:value-type="float" office:value="6734" table:formula="of:=SUM([.G470]+[.E470])" table:style-name="ce15">
            <text:p>6734</text:p>
          </table:table-cell>
          <table:table-cell office:value-type="float" office:value="92" table:formula="of:=[.F470]-[.H470]" table:style-name="ce15">
            <text:p>92</text:p>
          </table:table-cell>
          <table:table-cell office:value-type="percentage" office:value="1.6335016335016334E-3" table:formula="of:=([.I471]-[.I470])/[.I470]" table:style-name="ce16">
            <text:p>0%</text:p>
          </table:table-cell>
          <table:table-cell office:value-type="string" office:string-value="Invalid" table:formula="of:=IF([.F470]&lt;=[.E470]; &quot;Valid&quot;; &quot;Invalid&quot;)" table:style-name="ce17">
            <text:p>Invalid</text:p>
          </table:table-cell>
          <table:table-cell office:value-type="string" office:string-value="Valid" table:formula="of:=IF([.H470]&lt;=[.G470]; &quot;Valid&quot;; &quot;Invalid&quot;)" table:style-name="ce17">
            <text:p>Valid</text:p>
          </table:table-cell>
          <table:table-cell office:value-type="string" office:string-value="Increasing Pressure" table:formula="of:=IF([.J470]&gt;0; &quot;Increasing Pressure&quot;; &quot;Stable/Reducing&quot;)" table:style-name="ce18">
            <text:p>Increasing Pressure</text:p>
          </table:table-cell>
          <table:table-cell office:value-type="float" office:value="0.67832167832167833" table:formula="of:=IFERROR([.H470]/[.F470]; 0)" table:style-name="ce17">
            <text:p>0.678321678</text:p>
          </table:table-cell>
          <table:table-cell office:value-type="float" office:value="6825.8571428571431" table:formula="of:=AVERAGE([.I470:.I476])" table:style-name="ce15">
            <text:p>6826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12-15T00:00:00" table:style-name="ce14">
            <text:p>15-12-2024</text:p>
          </table:table-cell>
          <table:table-cell office:value-type="string" office:string-value="December" table:formula="of:=TEXT([.A471]; &quot;mmmm&quot;)" table:style-name="ce14">
            <text:p>December</text:p>
          </table:table-cell>
          <table:table-cell office:value-type="string" office:string-value="2024-12" table:formula="of:=TEXT([.A471]; &quot;yyyy-mm&quot;)" table:style-name="ce14">
            <text:p>2024-12</text:p>
          </table:table-cell>
          <table:table-cell office:value-type="float" office:value="180" table:style-name="ce9">
            <text:p>180</text:p>
          </table:table-cell>
          <table:table-cell office:value-type="float" office:value="337" table:style-name="ce9">
            <text:p>337</text:p>
          </table:table-cell>
          <table:table-cell office:value-type="float" office:value="219" table:style-name="ce9">
            <text:p>219</text:p>
          </table:table-cell>
          <table:table-cell office:value-type="float" office:value="6408" table:style-name="ce9">
            <text:p>6408</text:p>
          </table:table-cell>
          <table:table-cell office:value-type="float" office:value="224" table:style-name="ce9">
            <text:p>224</text:p>
          </table:table-cell>
          <table:table-cell office:value-type="float" office:value="6745" table:formula="of:=SUM([.G471]+[.E471])" table:style-name="ce15">
            <text:p>6745</text:p>
          </table:table-cell>
          <table:table-cell office:value-type="float" office:value="-5" table:formula="of:=[.F471]-[.H471]" table:style-name="ce15">
            <text:p>-5</text:p>
          </table:table-cell>
          <table:table-cell office:value-type="percentage" office:value="-5.9303187546330617E-4" table:formula="of:=([.I472]-[.I471])/[.I471]" table:style-name="ce16">
            <text:p>0%</text:p>
          </table:table-cell>
          <table:table-cell office:value-type="string" office:string-value="Valid" table:formula="of:=IF([.F471]&lt;=[.E471]; &quot;Valid&quot;; &quot;Invalid&quot;)" table:style-name="ce17">
            <text:p>Valid</text:p>
          </table:table-cell>
          <table:table-cell office:value-type="string" office:string-value="Valid" table:formula="of:=IF([.H471]&lt;=[.G471]; &quot;Valid&quot;; &quot;Invalid&quot;)" table:style-name="ce17">
            <text:p>Valid</text:p>
          </table:table-cell>
          <table:table-cell office:value-type="string" office:string-value="Stable/Reducing" table:formula="of:=IF([.J471]&gt;0; &quot;Increasing Pressure&quot;; &quot;Stable/Reducing&quot;)" table:style-name="ce18">
            <text:p>Stable/Reducing</text:p>
          </table:table-cell>
          <table:table-cell office:value-type="float" office:value="1.0228310502283104" table:formula="of:=IFERROR([.H471]/[.F471]; 0)" table:style-name="ce17">
            <text:p>1.02283105</text:p>
          </table:table-cell>
          <table:table-cell office:value-type="float" office:value="6841.2857142857147" table:formula="of:=AVERAGE([.I471:.I477])" table:style-name="ce15">
            <text:p>6841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12-16T00:00:00" table:style-name="ce14">
            <text:p>16-12-2024</text:p>
          </table:table-cell>
          <table:table-cell office:value-type="string" office:string-value="December" table:formula="of:=TEXT([.A472]; &quot;mmmm&quot;)" table:style-name="ce14">
            <text:p>December</text:p>
          </table:table-cell>
          <table:table-cell office:value-type="string" office:string-value="2024-12" table:formula="of:=TEXT([.A472]; &quot;yyyy-mm&quot;)" table:style-name="ce14">
            <text:p>2024-12</text:p>
          </table:table-cell>
          <table:table-cell office:value-type="float" office:value="133" table:style-name="ce9">
            <text:p>133</text:p>
          </table:table-cell>
          <table:table-cell office:value-type="float" office:value="287" table:style-name="ce9">
            <text:p>287</text:p>
          </table:table-cell>
          <table:table-cell office:value-type="float" office:value="189" table:style-name="ce9">
            <text:p>189</text:p>
          </table:table-cell>
          <table:table-cell office:value-type="float" office:value="6454" table:style-name="ce9">
            <text:p>6454</text:p>
          </table:table-cell>
          <table:table-cell office:value-type="float" office:value="149" table:style-name="ce9">
            <text:p>149</text:p>
          </table:table-cell>
          <table:table-cell office:value-type="float" office:value="6741" table:formula="of:=SUM([.G472]+[.E472])" table:style-name="ce15">
            <text:p>6741</text:p>
          </table:table-cell>
          <table:table-cell office:value-type="float" office:value="40" table:formula="of:=[.F472]-[.H472]" table:style-name="ce15">
            <text:p>40</text:p>
          </table:table-cell>
          <table:table-cell office:value-type="percentage" office:value="1.1125945705384957E-2" table:formula="of:=([.I473]-[.I472])/[.I472]" table:style-name="ce16">
            <text:p>1%</text:p>
          </table:table-cell>
          <table:table-cell office:value-type="string" office:string-value="Valid" table:formula="of:=IF([.F472]&lt;=[.E472]; &quot;Valid&quot;; &quot;Invalid&quot;)" table:style-name="ce17">
            <text:p>Valid</text:p>
          </table:table-cell>
          <table:table-cell office:value-type="string" office:string-value="Valid" table:formula="of:=IF([.H472]&lt;=[.G472]; &quot;Valid&quot;; &quot;Invalid&quot;)" table:style-name="ce17">
            <text:p>Valid</text:p>
          </table:table-cell>
          <table:table-cell office:value-type="string" office:string-value="Increasing Pressure" table:formula="of:=IF([.J472]&gt;0; &quot;Increasing Pressure&quot;; &quot;Stable/Reducing&quot;)" table:style-name="ce18">
            <text:p>Increasing Pressure</text:p>
          </table:table-cell>
          <table:table-cell office:value-type="float" office:value="0.78835978835978837" table:formula="of:=IFERROR([.H472]/[.F472]; 0)" table:style-name="ce17">
            <text:p>0.788359788</text:p>
          </table:table-cell>
          <table:table-cell office:value-type="float" office:value="6867.1428571428569" table:formula="of:=AVERAGE([.I472:.I478])" table:style-name="ce15">
            <text:p>6867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12-17T00:00:00" table:style-name="ce14">
            <text:p>17-12-2024</text:p>
          </table:table-cell>
          <table:table-cell office:value-type="string" office:string-value="December" table:formula="of:=TEXT([.A473]; &quot;mmmm&quot;)" table:style-name="ce14">
            <text:p>December</text:p>
          </table:table-cell>
          <table:table-cell office:value-type="string" office:string-value="2024-12" table:formula="of:=TEXT([.A473]; &quot;yyyy-mm&quot;)" table:style-name="ce14">
            <text:p>2024-12</text:p>
          </table:table-cell>
          <table:table-cell office:value-type="float" office:value="187" table:style-name="ce9">
            <text:p>187</text:p>
          </table:table-cell>
          <table:table-cell office:value-type="float" office:value="310" table:style-name="ce9">
            <text:p>310</text:p>
          </table:table-cell>
          <table:table-cell office:value-type="float" office:value="247" table:style-name="ce9">
            <text:p>247</text:p>
          </table:table-cell>
          <table:table-cell office:value-type="float" office:value="6506" table:style-name="ce9">
            <text:p>6506</text:p>
          </table:table-cell>
          <table:table-cell office:value-type="float" office:value="151" table:style-name="ce9">
            <text:p>151</text:p>
          </table:table-cell>
          <table:table-cell office:value-type="float" office:value="6816" table:formula="of:=SUM([.G473]+[.E473])" table:style-name="ce15">
            <text:p>6816</text:p>
          </table:table-cell>
          <table:table-cell office:value-type="float" office:value="96" table:formula="of:=[.F473]-[.H473]" table:style-name="ce15">
            <text:p>96</text:p>
          </table:table-cell>
          <table:table-cell office:value-type="percentage" office:value="9.8298122065727696E-3" table:formula="of:=([.I474]-[.I473])/[.I473]" table:style-name="ce16">
            <text:p>1%</text:p>
          </table:table-cell>
          <table:table-cell office:value-type="string" office:string-value="Valid" table:formula="of:=IF([.F473]&lt;=[.E473]; &quot;Valid&quot;; &quot;Invalid&quot;)" table:style-name="ce17">
            <text:p>Valid</text:p>
          </table:table-cell>
          <table:table-cell office:value-type="string" office:string-value="Valid" table:formula="of:=IF([.H473]&lt;=[.G473]; &quot;Valid&quot;; &quot;Invalid&quot;)" table:style-name="ce17">
            <text:p>Valid</text:p>
          </table:table-cell>
          <table:table-cell office:value-type="string" office:string-value="Increasing Pressure" table:formula="of:=IF([.J473]&gt;0; &quot;Increasing Pressure&quot;; &quot;Stable/Reducing&quot;)" table:style-name="ce18">
            <text:p>Increasing Pressure</text:p>
          </table:table-cell>
          <table:table-cell office:value-type="float" office:value="0.61133603238866396" table:formula="of:=IFERROR([.H473]/[.F473]; 0)" table:style-name="ce17">
            <text:p>0.611336032</text:p>
          </table:table-cell>
          <table:table-cell office:value-type="float" office:value="6882.8571428571431" table:formula="of:=AVERAGE([.I473:.I479])" table:style-name="ce15">
            <text:p>6883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12-18T00:00:00" table:style-name="ce14">
            <text:p>18-12-2024</text:p>
          </table:table-cell>
          <table:table-cell office:value-type="string" office:string-value="December" table:formula="of:=TEXT([.A474]; &quot;mmmm&quot;)" table:style-name="ce14">
            <text:p>December</text:p>
          </table:table-cell>
          <table:table-cell office:value-type="string" office:string-value="2024-12" table:formula="of:=TEXT([.A474]; &quot;yyyy-mm&quot;)" table:style-name="ce14">
            <text:p>2024-12</text:p>
          </table:table-cell>
          <table:table-cell office:value-type="float" office:value="168" table:style-name="ce9">
            <text:p>168</text:p>
          </table:table-cell>
          <table:table-cell office:value-type="float" office:value="285" table:style-name="ce9">
            <text:p>285</text:p>
          </table:table-cell>
          <table:table-cell office:value-type="float" office:value="210" table:style-name="ce9">
            <text:p>210</text:p>
          </table:table-cell>
          <table:table-cell office:value-type="float" office:value="6598" table:style-name="ce9">
            <text:p>6598</text:p>
          </table:table-cell>
          <table:table-cell office:value-type="float" office:value="134" table:style-name="ce9">
            <text:p>134</text:p>
          </table:table-cell>
          <table:table-cell office:value-type="float" office:value="6883" table:formula="of:=SUM([.G474]+[.E474])" table:style-name="ce15">
            <text:p>6883</text:p>
          </table:table-cell>
          <table:table-cell office:value-type="float" office:value="76" table:formula="of:=[.F474]-[.H474]" table:style-name="ce15">
            <text:p>76</text:p>
          </table:table-cell>
          <table:table-cell office:value-type="percentage" office:value="1.8741827691413627E-2" table:formula="of:=([.I475]-[.I474])/[.I474]" table:style-name="ce16">
            <text:p>2%</text:p>
          </table:table-cell>
          <table:table-cell office:value-type="string" office:string-value="Valid" table:formula="of:=IF([.F474]&lt;=[.E474]; &quot;Valid&quot;; &quot;Invalid&quot;)" table:style-name="ce17">
            <text:p>Valid</text:p>
          </table:table-cell>
          <table:table-cell office:value-type="string" office:string-value="Valid" table:formula="of:=IF([.H474]&lt;=[.G474]; &quot;Valid&quot;; &quot;Invalid&quot;)" table:style-name="ce17">
            <text:p>Valid</text:p>
          </table:table-cell>
          <table:table-cell office:value-type="string" office:string-value="Increasing Pressure" table:formula="of:=IF([.J474]&gt;0; &quot;Increasing Pressure&quot;; &quot;Stable/Reducing&quot;)" table:style-name="ce18">
            <text:p>Increasing Pressure</text:p>
          </table:table-cell>
          <table:table-cell office:value-type="float" office:value="0.63809523809523805" table:formula="of:=IFERROR([.H474]/[.F474]; 0)" table:style-name="ce17">
            <text:p>0.638095238</text:p>
          </table:table-cell>
          <table:table-cell office:value-type="float" office:value="6884.7142857142853" table:formula="of:=AVERAGE([.I474:.I480])" table:style-name="ce15">
            <text:p>6885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12-19T00:00:00" table:style-name="ce14">
            <text:p>19-12-2024</text:p>
          </table:table-cell>
          <table:table-cell office:value-type="string" office:string-value="December" table:formula="of:=TEXT([.A475]; &quot;mmmm&quot;)" table:style-name="ce14">
            <text:p>December</text:p>
          </table:table-cell>
          <table:table-cell office:value-type="string" office:string-value="2024-12" table:formula="of:=TEXT([.A475]; &quot;yyyy-mm&quot;)" table:style-name="ce14">
            <text:p>2024-12</text:p>
          </table:table-cell>
          <table:table-cell office:value-type="float" office:value="269" table:style-name="ce9">
            <text:p>269</text:p>
          </table:table-cell>
          <table:table-cell office:value-type="float" office:value="412" table:style-name="ce9">
            <text:p>412</text:p>
          </table:table-cell>
          <table:table-cell office:value-type="float" office:value="204" table:style-name="ce9">
            <text:p>204</text:p>
          </table:table-cell>
          <table:table-cell office:value-type="float" office:value="6600" table:style-name="ce9">
            <text:p>6600</text:p>
          </table:table-cell>
          <table:table-cell office:value-type="float" office:value="238" table:style-name="ce9">
            <text:p>238</text:p>
          </table:table-cell>
          <table:table-cell office:value-type="float" office:value="7012" table:formula="of:=SUM([.G475]+[.E475])" table:style-name="ce15">
            <text:p>7012</text:p>
          </table:table-cell>
          <table:table-cell office:value-type="float" office:value="-34" table:formula="of:=[.F475]-[.H475]" table:style-name="ce15">
            <text:p>-34</text:p>
          </table:table-cell>
          <table:table-cell office:value-type="percentage" office:value="-2.3103251568739304E-2" table:formula="of:=([.I476]-[.I475])/[.I475]" table:style-name="ce16">
            <text:p>-2%</text:p>
          </table:table-cell>
          <table:table-cell office:value-type="string" office:string-value="Valid" table:formula="of:=IF([.F475]&lt;=[.E475]; &quot;Valid&quot;; &quot;Invalid&quot;)" table:style-name="ce17">
            <text:p>Valid</text:p>
          </table:table-cell>
          <table:table-cell office:value-type="string" office:string-value="Valid" table:formula="of:=IF([.H475]&lt;=[.G475]; &quot;Valid&quot;; &quot;Invalid&quot;)" table:style-name="ce17">
            <text:p>Valid</text:p>
          </table:table-cell>
          <table:table-cell office:value-type="string" office:string-value="Stable/Reducing" table:formula="of:=IF([.J475]&gt;0; &quot;Increasing Pressure&quot;; &quot;Stable/Reducing&quot;)" table:style-name="ce18">
            <text:p>Stable/Reducing</text:p>
          </table:table-cell>
          <table:table-cell office:value-type="float" office:value="1.1666666666666667" table:formula="of:=IFERROR([.H475]/[.F475]; 0)" table:style-name="ce17">
            <text:p>1.166666667</text:p>
          </table:table-cell>
          <table:table-cell office:value-type="float" office:value="6849.2857142857147" table:formula="of:=AVERAGE([.I475:.I481])" table:style-name="ce15">
            <text:p>6849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12-22T00:00:00" table:style-name="ce14">
            <text:p>22-12-2024</text:p>
          </table:table-cell>
          <table:table-cell office:value-type="string" office:string-value="December" table:formula="of:=TEXT([.A476]; &quot;mmmm&quot;)" table:style-name="ce14">
            <text:p>December</text:p>
          </table:table-cell>
          <table:table-cell office:value-type="string" office:string-value="2024-12" table:formula="of:=TEXT([.A476]; &quot;yyyy-mm&quot;)" table:style-name="ce14">
            <text:p>2024-12</text:p>
          </table:table-cell>
          <table:table-cell office:value-type="float" office:value="100" table:style-name="ce9">
            <text:p>100</text:p>
          </table:table-cell>
          <table:table-cell office:value-type="float" office:value="255" table:style-name="ce9">
            <text:p>255</text:p>
          </table:table-cell>
          <table:table-cell office:value-type="float" office:value="236" table:style-name="ce9">
            <text:p>236</text:p>
          </table:table-cell>
          <table:table-cell office:value-type="float" office:value="6595" table:style-name="ce9">
            <text:p>6595</text:p>
          </table:table-cell>
          <table:table-cell office:value-type="float" office:value="268" table:style-name="ce9">
            <text:p>268</text:p>
          </table:table-cell>
          <table:table-cell office:value-type="float" office:value="6850" table:formula="of:=SUM([.G476]+[.E476])" table:style-name="ce15">
            <text:p>6850</text:p>
          </table:table-cell>
          <table:table-cell office:value-type="float" office:value="-32" table:formula="of:=[.F476]-[.H476]" table:style-name="ce15">
            <text:p>-32</text:p>
          </table:table-cell>
          <table:table-cell office:value-type="percentage" office:value="-1.1678832116788322E-3" table:formula="of:=([.I477]-[.I476])/[.I476]" table:style-name="ce16">
            <text:p>0%</text:p>
          </table:table-cell>
          <table:table-cell office:value-type="string" office:string-value="Valid" table:formula="of:=IF([.F476]&lt;=[.E476]; &quot;Valid&quot;; &quot;Invalid&quot;)" table:style-name="ce17">
            <text:p>Valid</text:p>
          </table:table-cell>
          <table:table-cell office:value-type="string" office:string-value="Valid" table:formula="of:=IF([.H476]&lt;=[.G476]; &quot;Valid&quot;; &quot;Invalid&quot;)" table:style-name="ce17">
            <text:p>Valid</text:p>
          </table:table-cell>
          <table:table-cell office:value-type="string" office:string-value="Stable/Reducing" table:formula="of:=IF([.J476]&gt;0; &quot;Increasing Pressure&quot;; &quot;Stable/Reducing&quot;)" table:style-name="ce18">
            <text:p>Stable/Reducing</text:p>
          </table:table-cell>
          <table:table-cell office:value-type="float" office:value="1.1355932203389831" table:formula="of:=IFERROR([.H476]/[.F476]; 0)" table:style-name="ce17">
            <text:p>1.13559322</text:p>
          </table:table-cell>
          <table:table-cell office:value-type="float" office:value="6791.8571428571431" table:formula="of:=AVERAGE([.I476:.I482])" table:style-name="ce15">
            <text:p>6792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12-23T00:00:00" table:style-name="ce14">
            <text:p>23-12-2024</text:p>
          </table:table-cell>
          <table:table-cell office:value-type="string" office:string-value="December" table:formula="of:=TEXT([.A477]; &quot;mmmm&quot;)" table:style-name="ce14">
            <text:p>December</text:p>
          </table:table-cell>
          <table:table-cell office:value-type="string" office:string-value="2024-12" table:formula="of:=TEXT([.A477]; &quot;yyyy-mm&quot;)" table:style-name="ce14">
            <text:p>2024-12</text:p>
          </table:table-cell>
          <table:table-cell office:value-type="float" office:value="205" table:style-name="ce9">
            <text:p>205</text:p>
          </table:table-cell>
          <table:table-cell office:value-type="float" office:value="294" table:style-name="ce9">
            <text:p>294</text:p>
          </table:table-cell>
          <table:table-cell office:value-type="float" office:value="177" table:style-name="ce9">
            <text:p>177</text:p>
          </table:table-cell>
          <table:table-cell office:value-type="float" office:value="6548" table:style-name="ce9">
            <text:p>6548</text:p>
          </table:table-cell>
          <table:table-cell office:value-type="float" office:value="231" table:style-name="ce9">
            <text:p>231</text:p>
          </table:table-cell>
          <table:table-cell office:value-type="float" office:value="6842" table:formula="of:=SUM([.G477]+[.E477])" table:style-name="ce15">
            <text:p>6842</text:p>
          </table:table-cell>
          <table:table-cell office:value-type="float" office:value="-54" table:formula="of:=[.F477]-[.H477]" table:style-name="ce15">
            <text:p>-54</text:p>
          </table:table-cell>
          <table:table-cell office:value-type="percentage" office:value="1.2277111955568546E-2" table:formula="of:=([.I478]-[.I477])/[.I477]" table:style-name="ce16">
            <text:p>1%</text:p>
          </table:table-cell>
          <table:table-cell office:value-type="string" office:string-value="Valid" table:formula="of:=IF([.F477]&lt;=[.E477]; &quot;Valid&quot;; &quot;Invalid&quot;)" table:style-name="ce17">
            <text:p>Valid</text:p>
          </table:table-cell>
          <table:table-cell office:value-type="string" office:string-value="Valid" table:formula="of:=IF([.H477]&lt;=[.G477]; &quot;Valid&quot;; &quot;Invalid&quot;)" table:style-name="ce17">
            <text:p>Valid</text:p>
          </table:table-cell>
          <table:table-cell office:value-type="string" office:string-value="Stable/Reducing" table:formula="of:=IF([.J477]&gt;0; &quot;Increasing Pressure&quot;; &quot;Stable/Reducing&quot;)" table:style-name="ce18">
            <text:p>Stable/Reducing</text:p>
          </table:table-cell>
          <table:table-cell office:value-type="float" office:value="1.3050847457627119" table:formula="of:=IFERROR([.H477]/[.F477]; 0)" table:style-name="ce17">
            <text:p>1.305084746</text:p>
          </table:table-cell>
          <table:table-cell office:value-type="float" office:value="6737.7142857142853" table:formula="of:=AVERAGE([.I477:.I483])" table:style-name="ce15">
            <text:p>6738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12-24T00:00:00" table:style-name="ce14">
            <text:p>24-12-2024</text:p>
          </table:table-cell>
          <table:table-cell office:value-type="string" office:string-value="December" table:formula="of:=TEXT([.A478]; &quot;mmmm&quot;)" table:style-name="ce14">
            <text:p>December</text:p>
          </table:table-cell>
          <table:table-cell office:value-type="string" office:string-value="2024-12" table:formula="of:=TEXT([.A478]; &quot;yyyy-mm&quot;)" table:style-name="ce14">
            <text:p>2024-12</text:p>
          </table:table-cell>
          <table:table-cell office:value-type="float" office:value="161" table:style-name="ce9">
            <text:p>161</text:p>
          </table:table-cell>
          <table:table-cell office:value-type="float" office:value="304" table:style-name="ce9">
            <text:p>304</text:p>
          </table:table-cell>
          <table:table-cell office:value-type="float" office:value="211" table:style-name="ce9">
            <text:p>211</text:p>
          </table:table-cell>
          <table:table-cell office:value-type="float" office:value="6622" table:style-name="ce9">
            <text:p>6622</text:p>
          </table:table-cell>
          <table:table-cell office:value-type="float" office:value="155" table:style-name="ce9">
            <text:p>155</text:p>
          </table:table-cell>
          <table:table-cell office:value-type="float" office:value="6926" table:formula="of:=SUM([.G478]+[.E478])" table:style-name="ce15">
            <text:p>6926</text:p>
          </table:table-cell>
          <table:table-cell office:value-type="float" office:value="56" table:formula="of:=[.F478]-[.H478]" table:style-name="ce15">
            <text:p>56</text:p>
          </table:table-cell>
          <table:table-cell office:value-type="percentage" office:value="-1.0828761189719895E-2" table:formula="of:=([.I479]-[.I478])/[.I478]" table:style-name="ce16">
            <text:p>-1%</text:p>
          </table:table-cell>
          <table:table-cell office:value-type="string" office:string-value="Valid" table:formula="of:=IF([.F478]&lt;=[.E478]; &quot;Valid&quot;; &quot;Invalid&quot;)" table:style-name="ce17">
            <text:p>Valid</text:p>
          </table:table-cell>
          <table:table-cell office:value-type="string" office:string-value="Valid" table:formula="of:=IF([.H478]&lt;=[.G478]; &quot;Valid&quot;; &quot;Invalid&quot;)" table:style-name="ce17">
            <text:p>Valid</text:p>
          </table:table-cell>
          <table:table-cell office:value-type="string" office:string-value="Increasing Pressure" table:formula="of:=IF([.J478]&gt;0; &quot;Increasing Pressure&quot;; &quot;Stable/Reducing&quot;)" table:style-name="ce18">
            <text:p>Increasing Pressure</text:p>
          </table:table-cell>
          <table:table-cell office:value-type="float" office:value="0.7345971563981043" table:formula="of:=IFERROR([.H478]/[.F478]; 0)" table:style-name="ce17">
            <text:p>0.734597156</text:p>
          </table:table-cell>
          <table:table-cell office:value-type="float" office:value="6669.1428571428569" table:formula="of:=AVERAGE([.I478:.I484])" table:style-name="ce15">
            <text:p>6669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12-25T00:00:00" table:style-name="ce14">
            <text:p>25-12-2024</text:p>
          </table:table-cell>
          <table:table-cell office:value-type="string" office:string-value="December" table:formula="of:=TEXT([.A479]; &quot;mmmm&quot;)" table:style-name="ce14">
            <text:p>December</text:p>
          </table:table-cell>
          <table:table-cell office:value-type="string" office:string-value="2024-12" table:formula="of:=TEXT([.A479]; &quot;yyyy-mm&quot;)" table:style-name="ce14">
            <text:p>2024-12</text:p>
          </table:table-cell>
          <table:table-cell office:value-type="float" office:value="57" table:style-name="ce9">
            <text:p>57</text:p>
          </table:table-cell>
          <table:table-cell office:value-type="float" office:value="162" table:style-name="ce9">
            <text:p>162</text:p>
          </table:table-cell>
          <table:table-cell office:value-type="float" office:value="193" table:style-name="ce9">
            <text:p>193</text:p>
          </table:table-cell>
          <table:table-cell office:value-type="float" office:value="6689" table:style-name="ce9">
            <text:p>6689</text:p>
          </table:table-cell>
          <table:table-cell office:value-type="float" office:value="107" table:style-name="ce9">
            <text:p>107</text:p>
          </table:table-cell>
          <table:table-cell office:value-type="float" office:value="6851" table:formula="of:=SUM([.G479]+[.E479])" table:style-name="ce15">
            <text:p>6851</text:p>
          </table:table-cell>
          <table:table-cell office:value-type="float" office:value="86" table:formula="of:=[.F479]-[.H479]" table:style-name="ce15">
            <text:p>86</text:p>
          </table:table-cell>
          <table:table-cell office:value-type="percentage" office:value="-3.2112100423295868E-3" table:formula="of:=([.I480]-[.I479])/[.I479]" table:style-name="ce16">
            <text:p>0%</text:p>
          </table:table-cell>
          <table:table-cell office:value-type="string" office:string-value="Invalid" table:formula="of:=IF([.F479]&lt;=[.E479]; &quot;Valid&quot;; &quot;Invalid&quot;)" table:style-name="ce17">
            <text:p>Invalid</text:p>
          </table:table-cell>
          <table:table-cell office:value-type="string" office:string-value="Valid" table:formula="of:=IF([.H479]&lt;=[.G479]; &quot;Valid&quot;; &quot;Invalid&quot;)" table:style-name="ce17">
            <text:p>Valid</text:p>
          </table:table-cell>
          <table:table-cell office:value-type="string" office:string-value="Increasing Pressure" table:formula="of:=IF([.J479]&gt;0; &quot;Increasing Pressure&quot;; &quot;Stable/Reducing&quot;)" table:style-name="ce18">
            <text:p>Increasing Pressure</text:p>
          </table:table-cell>
          <table:table-cell office:value-type="float" office:value="0.55440414507772018" table:formula="of:=IFERROR([.H479]/[.F479]; 0)" table:style-name="ce17">
            <text:p>0.554404145</text:p>
          </table:table-cell>
          <table:table-cell office:value-type="float" office:value="6530.4285714285716" table:formula="of:=AVERAGE([.I479:.I485])" table:style-name="ce15">
            <text:p>6530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12-26T00:00:00" table:style-name="ce14">
            <text:p>26-12-2024</text:p>
          </table:table-cell>
          <table:table-cell office:value-type="string" office:string-value="December" table:formula="of:=TEXT([.A480]; &quot;mmmm&quot;)" table:style-name="ce14">
            <text:p>December</text:p>
          </table:table-cell>
          <table:table-cell office:value-type="string" office:string-value="2024-12" table:formula="of:=TEXT([.A480]; &quot;yyyy-mm&quot;)" table:style-name="ce14">
            <text:p>2024-12</text:p>
          </table:table-cell>
          <table:table-cell office:value-type="float" office:value="80" table:style-name="ce9">
            <text:p>80</text:p>
          </table:table-cell>
          <table:table-cell office:value-type="float" office:value="122" table:style-name="ce9">
            <text:p>122</text:p>
          </table:table-cell>
          <table:table-cell office:value-type="float" office:value="152" table:style-name="ce9">
            <text:p>152</text:p>
          </table:table-cell>
          <table:table-cell office:value-type="float" office:value="6707" table:style-name="ce9">
            <text:p>6707</text:p>
          </table:table-cell>
          <table:table-cell office:value-type="float" office:value="135" table:style-name="ce9">
            <text:p>135</text:p>
          </table:table-cell>
          <table:table-cell office:value-type="float" office:value="6829" table:formula="of:=SUM([.G480]+[.E480])" table:style-name="ce15">
            <text:p>6829</text:p>
          </table:table-cell>
          <table:table-cell office:value-type="float" office:value="17" table:formula="of:=[.F480]-[.H480]" table:style-name="ce15">
            <text:p>17</text:p>
          </table:table-cell>
          <table:table-cell office:value-type="percentage" office:value="-2.8408258895885195E-2" table:formula="of:=([.I481]-[.I480])/[.I480]" table:style-name="ce16">
            <text:p>-3%</text:p>
          </table:table-cell>
          <table:table-cell office:value-type="string" office:string-value="Invalid" table:formula="of:=IF([.F480]&lt;=[.E480]; &quot;Valid&quot;; &quot;Invalid&quot;)" table:style-name="ce17">
            <text:p>Invalid</text:p>
          </table:table-cell>
          <table:table-cell office:value-type="string" office:string-value="Valid" table:formula="of:=IF([.H480]&lt;=[.G480]; &quot;Valid&quot;; &quot;Invalid&quot;)" table:style-name="ce17">
            <text:p>Valid</text:p>
          </table:table-cell>
          <table:table-cell office:value-type="string" office:string-value="Increasing Pressure" table:formula="of:=IF([.J480]&gt;0; &quot;Increasing Pressure&quot;; &quot;Stable/Reducing&quot;)" table:style-name="ce18">
            <text:p>Increasing Pressure</text:p>
          </table:table-cell>
          <table:table-cell office:value-type="float" office:value="0.88815789473684215" table:formula="of:=IFERROR([.H480]/[.F480]; 0)" table:style-name="ce17">
            <text:p>0.888157895</text:p>
          </table:table-cell>
          <table:table-cell office:value-type="float" office:value="6384.4285714285716" table:formula="of:=AVERAGE([.I480:.I486])" table:style-name="ce15">
            <text:p>6384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12-29T00:00:00" table:style-name="ce14">
            <text:p>29-12-2024</text:p>
          </table:table-cell>
          <table:table-cell office:value-type="string" office:string-value="December" table:formula="of:=TEXT([.A481]; &quot;mmmm&quot;)" table:style-name="ce14">
            <text:p>December</text:p>
          </table:table-cell>
          <table:table-cell office:value-type="string" office:string-value="2024-12" table:formula="of:=TEXT([.A481]; &quot;yyyy-mm&quot;)" table:style-name="ce14">
            <text:p>2024-12</text:p>
          </table:table-cell>
          <table:table-cell office:value-type="float" office:value="107" table:style-name="ce9">
            <text:p>107</text:p>
          </table:table-cell>
          <table:table-cell office:value-type="float" office:value="170" table:style-name="ce9">
            <text:p>170</text:p>
          </table:table-cell>
          <table:table-cell office:value-type="float" office:value="133" table:style-name="ce9">
            <text:p>133</text:p>
          </table:table-cell>
          <table:table-cell office:value-type="float" office:value="6465" table:style-name="ce9">
            <text:p>6465</text:p>
          </table:table-cell>
          <table:table-cell office:value-type="float" office:value="216" table:style-name="ce9">
            <text:p>216</text:p>
          </table:table-cell>
          <table:table-cell office:value-type="float" office:value="6635" table:formula="of:=SUM([.G481]+[.E481])" table:style-name="ce15">
            <text:p>6635</text:p>
          </table:table-cell>
          <table:table-cell office:value-type="float" office:value="-83" table:formula="of:=[.F481]-[.H481]" table:style-name="ce15">
            <text:p>-83</text:p>
          </table:table-cell>
          <table:table-cell office:value-type="percentage" office:value="-3.7678975131876413E-3" table:formula="of:=([.I482]-[.I481])/[.I481]" table:style-name="ce16">
            <text:p>0%</text:p>
          </table:table-cell>
          <table:table-cell office:value-type="string" office:string-value="Valid" table:formula="of:=IF([.F481]&lt;=[.E481]; &quot;Valid&quot;; &quot;Invalid&quot;)" table:style-name="ce17">
            <text:p>Valid</text:p>
          </table:table-cell>
          <table:table-cell office:value-type="string" office:string-value="Valid" table:formula="of:=IF([.H481]&lt;=[.G481]; &quot;Valid&quot;; &quot;Invalid&quot;)" table:style-name="ce17">
            <text:p>Valid</text:p>
          </table:table-cell>
          <table:table-cell office:value-type="string" office:string-value="Stable/Reducing" table:formula="of:=IF([.J481]&gt;0; &quot;Increasing Pressure&quot;; &quot;Stable/Reducing&quot;)" table:style-name="ce18">
            <text:p>Stable/Reducing</text:p>
          </table:table-cell>
          <table:table-cell office:value-type="float" office:value="1.6240601503759398" table:formula="of:=IFERROR([.H481]/[.F481]; 0)" table:style-name="ce17">
            <text:p>1.62406015</text:p>
          </table:table-cell>
          <table:table-cell office:value-type="float" office:value="6235.4285714285716" table:formula="of:=AVERAGE([.I481:.I487])" table:style-name="ce15">
            <text:p>6235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4-12-30T00:00:00" table:style-name="ce14">
            <text:p>30-12-2024</text:p>
          </table:table-cell>
          <table:table-cell office:value-type="string" office:string-value="December" table:formula="of:=TEXT([.A482]; &quot;mmmm&quot;)" table:style-name="ce14">
            <text:p>December</text:p>
          </table:table-cell>
          <table:table-cell office:value-type="string" office:string-value="2024-12" table:formula="of:=TEXT([.A482]; &quot;yyyy-mm&quot;)" table:style-name="ce14">
            <text:p>2024-12</text:p>
          </table:table-cell>
          <table:table-cell office:value-type="float" office:value="99" table:style-name="ce9">
            <text:p>99</text:p>
          </table:table-cell>
          <table:table-cell office:value-type="float" office:value="156" table:style-name="ce9">
            <text:p>156</text:p>
          </table:table-cell>
          <table:table-cell office:value-type="float" office:value="139" table:style-name="ce9">
            <text:p>139</text:p>
          </table:table-cell>
          <table:table-cell office:value-type="float" office:value="6454" table:style-name="ce9">
            <text:p>6454</text:p>
          </table:table-cell>
          <table:table-cell office:value-type="float" office:value="177" table:style-name="ce9">
            <text:p>177</text:p>
          </table:table-cell>
          <table:table-cell office:value-type="float" office:value="6610" table:formula="of:=SUM([.G482]+[.E482])" table:style-name="ce15">
            <text:p>6610</text:p>
          </table:table-cell>
          <table:table-cell office:value-type="float" office:value="-38" table:formula="of:=[.F482]-[.H482]" table:style-name="ce15">
            <text:p>-38</text:p>
          </table:table-cell>
          <table:table-cell office:value-type="percentage" office:value="-2.102874432677761E-2" table:formula="of:=([.I483]-[.I482])/[.I482]" table:style-name="ce16">
            <text:p>-2%</text:p>
          </table:table-cell>
          <table:table-cell office:value-type="string" office:string-value="Valid" table:formula="of:=IF([.F482]&lt;=[.E482]; &quot;Valid&quot;; &quot;Invalid&quot;)" table:style-name="ce17">
            <text:p>Valid</text:p>
          </table:table-cell>
          <table:table-cell office:value-type="string" office:string-value="Valid" table:formula="of:=IF([.H482]&lt;=[.G482]; &quot;Valid&quot;; &quot;Invalid&quot;)" table:style-name="ce17">
            <text:p>Valid</text:p>
          </table:table-cell>
          <table:table-cell office:value-type="string" office:string-value="Stable/Reducing" table:formula="of:=IF([.J482]&gt;0; &quot;Increasing Pressure&quot;; &quot;Stable/Reducing&quot;)" table:style-name="ce18">
            <text:p>Stable/Reducing</text:p>
          </table:table-cell>
          <table:table-cell office:value-type="float" office:value="1.2733812949640289" table:formula="of:=IFERROR([.H482]/[.F482]; 0)" table:style-name="ce17">
            <text:p>1.273381295</text:p>
          </table:table-cell>
          <table:table-cell office:value-type="float" office:value="6099.7142857142853" table:formula="of:=AVERAGE([.I482:.I488])" table:style-name="ce15">
            <text:p>6100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1-01T00:00:00" table:style-name="ce14">
            <text:p>01-01-2025</text:p>
          </table:table-cell>
          <table:table-cell office:value-type="string" office:string-value="January" table:formula="of:=TEXT([.A483]; &quot;mmmm&quot;)" table:style-name="ce14">
            <text:p>January</text:p>
          </table:table-cell>
          <table:table-cell office:value-type="string" office:string-value="2025-01" table:formula="of:=TEXT([.A483]; &quot;yyyy-mm&quot;)" table:style-name="ce14">
            <text:p>2025-01</text:p>
          </table:table-cell>
          <table:table-cell office:value-type="float" office:value="25" table:style-name="ce9">
            <text:p>25</text:p>
          </table:table-cell>
          <table:table-cell office:value-type="float" office:value="66" table:style-name="ce9">
            <text:p>66</text:p>
          </table:table-cell>
          <table:table-cell office:value-type="float" office:value="94" table:style-name="ce9">
            <text:p>94</text:p>
          </table:table-cell>
          <table:table-cell office:value-type="float" office:value="6405" table:style-name="ce9">
            <text:p>6405</text:p>
          </table:table-cell>
          <table:table-cell office:value-type="float" office:value="144" table:style-name="ce9">
            <text:p>144</text:p>
          </table:table-cell>
          <table:table-cell office:value-type="float" office:value="6471" table:formula="of:=SUM([.G483]+[.E483])" table:style-name="ce15">
            <text:p>6471</text:p>
          </table:table-cell>
          <table:table-cell office:value-type="float" office:value="-50" table:formula="of:=[.F483]-[.H483]" table:style-name="ce15">
            <text:p>-50</text:p>
          </table:table-cell>
          <table:table-cell office:value-type="percentage" office:value="-1.6844382630196261E-2" table:formula="of:=([.I484]-[.I483])/[.I483]" table:style-name="ce16">
            <text:p>-2%</text:p>
          </table:table-cell>
          <table:table-cell office:value-type="string" office:string-value="Invalid" table:formula="of:=IF([.F483]&lt;=[.E483]; &quot;Valid&quot;; &quot;Invalid&quot;)" table:style-name="ce17">
            <text:p>Invalid</text:p>
          </table:table-cell>
          <table:table-cell office:value-type="string" office:string-value="Valid" table:formula="of:=IF([.H483]&lt;=[.G483]; &quot;Valid&quot;; &quot;Invalid&quot;)" table:style-name="ce17">
            <text:p>Valid</text:p>
          </table:table-cell>
          <table:table-cell office:value-type="string" office:string-value="Stable/Reducing" table:formula="of:=IF([.J483]&gt;0; &quot;Increasing Pressure&quot;; &quot;Stable/Reducing&quot;)" table:style-name="ce18">
            <text:p>Stable/Reducing</text:p>
          </table:table-cell>
          <table:table-cell office:value-type="float" office:value="1.5319148936170213" table:formula="of:=IFERROR([.H483]/[.F483]; 0)" table:style-name="ce17">
            <text:p>1.531914894</text:p>
          </table:table-cell>
          <table:table-cell office:value-type="float" office:value="5953.8571428571431" table:formula="of:=AVERAGE([.I483:.I489])" table:style-name="ce15">
            <text:p>5954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1-02T00:00:00" table:style-name="ce14">
            <text:p>02-01-2025</text:p>
          </table:table-cell>
          <table:table-cell office:value-type="string" office:string-value="January" table:formula="of:=TEXT([.A484]; &quot;mmmm&quot;)" table:style-name="ce14">
            <text:p>January</text:p>
          </table:table-cell>
          <table:table-cell office:value-type="string" office:string-value="2025-01" table:formula="of:=TEXT([.A484]; &quot;yyyy-mm&quot;)" table:style-name="ce14">
            <text:p>2025-01</text:p>
          </table:table-cell>
          <table:table-cell office:value-type="float" office:value="35" table:style-name="ce9">
            <text:p>35</text:p>
          </table:table-cell>
          <table:table-cell office:value-type="float" office:value="70" table:style-name="ce9">
            <text:p>70</text:p>
          </table:table-cell>
          <table:table-cell office:value-type="float" office:value="53" table:style-name="ce9">
            <text:p>53</text:p>
          </table:table-cell>
          <table:table-cell office:value-type="float" office:value="6292" table:style-name="ce9">
            <text:p>6292</text:p>
          </table:table-cell>
          <table:table-cell office:value-type="float" office:value="170" table:style-name="ce9">
            <text:p>170</text:p>
          </table:table-cell>
          <table:table-cell office:value-type="float" office:value="6362" table:formula="of:=SUM([.G484]+[.E484])" table:style-name="ce15">
            <text:p>6362</text:p>
          </table:table-cell>
          <table:table-cell office:value-type="float" office:value="-117" table:formula="of:=[.F484]-[.H484]" table:style-name="ce15">
            <text:p>-117</text:p>
          </table:table-cell>
          <table:table-cell office:value-type="percentage" office:value="-6.3973593209682489E-2" table:formula="of:=([.I485]-[.I484])/[.I484]" table:style-name="ce16">
            <text:p>-6%</text:p>
          </table:table-cell>
          <table:table-cell office:value-type="string" office:string-value="Valid" table:formula="of:=IF([.F484]&lt;=[.E484]; &quot;Valid&quot;; &quot;Invalid&quot;)" table:style-name="ce17">
            <text:p>Valid</text:p>
          </table:table-cell>
          <table:table-cell office:value-type="string" office:string-value="Valid" table:formula="of:=IF([.H484]&lt;=[.G484]; &quot;Valid&quot;; &quot;Invalid&quot;)" table:style-name="ce17">
            <text:p>Valid</text:p>
          </table:table-cell>
          <table:table-cell office:value-type="string" office:string-value="Stable/Reducing" table:formula="of:=IF([.J484]&gt;0; &quot;Increasing Pressure&quot;; &quot;Stable/Reducing&quot;)" table:style-name="ce18">
            <text:p>Stable/Reducing</text:p>
          </table:table-cell>
          <table:table-cell office:value-type="float" office:value="3.2075471698113209" table:formula="of:=IFERROR([.H484]/[.F484]; 0)" table:style-name="ce17">
            <text:p>3.20754717</text:p>
          </table:table-cell>
          <table:table-cell office:value-type="float" office:value="5771.5714285714284" table:formula="of:=AVERAGE([.I484:.I490])" table:style-name="ce15">
            <text:p>5772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1-05T00:00:00" table:style-name="ce14">
            <text:p>05-01-2025</text:p>
          </table:table-cell>
          <table:table-cell office:value-type="string" office:string-value="January" table:formula="of:=TEXT([.A485]; &quot;mmmm&quot;)" table:style-name="ce14">
            <text:p>January</text:p>
          </table:table-cell>
          <table:table-cell office:value-type="string" office:string-value="2025-01" table:formula="of:=TEXT([.A485]; &quot;yyyy-mm&quot;)" table:style-name="ce14">
            <text:p>2025-01</text:p>
          </table:table-cell>
          <table:table-cell office:value-type="float" office:value="43" table:style-name="ce9">
            <text:p>43</text:p>
          </table:table-cell>
          <table:table-cell office:value-type="float" office:value="73" table:style-name="ce9">
            <text:p>73</text:p>
          </table:table-cell>
          <table:table-cell office:value-type="float" office:value="64" table:style-name="ce9">
            <text:p>64</text:p>
          </table:table-cell>
          <table:table-cell office:value-type="float" office:value="5882" table:style-name="ce9">
            <text:p>5882</text:p>
          </table:table-cell>
          <table:table-cell office:value-type="float" office:value="185" table:style-name="ce9">
            <text:p>185</text:p>
          </table:table-cell>
          <table:table-cell office:value-type="float" office:value="5955" table:formula="of:=SUM([.G485]+[.E485])" table:style-name="ce15">
            <text:p>5955</text:p>
          </table:table-cell>
          <table:table-cell office:value-type="float" office:value="-121" table:formula="of:=[.F485]-[.H485]" table:style-name="ce15">
            <text:p>-121</text:p>
          </table:table-cell>
          <table:table-cell office:value-type="percentage" office:value="-2.1158690176322419E-2" table:formula="of:=([.I486]-[.I485])/[.I485]" table:style-name="ce16">
            <text:p>-2%</text:p>
          </table:table-cell>
          <table:table-cell office:value-type="string" office:string-value="Valid" table:formula="of:=IF([.F485]&lt;=[.E485]; &quot;Valid&quot;; &quot;Invalid&quot;)" table:style-name="ce17">
            <text:p>Valid</text:p>
          </table:table-cell>
          <table:table-cell office:value-type="string" office:string-value="Valid" table:formula="of:=IF([.H485]&lt;=[.G485]; &quot;Valid&quot;; &quot;Invalid&quot;)" table:style-name="ce17">
            <text:p>Valid</text:p>
          </table:table-cell>
          <table:table-cell office:value-type="string" office:string-value="Stable/Reducing" table:formula="of:=IF([.J485]&gt;0; &quot;Increasing Pressure&quot;; &quot;Stable/Reducing&quot;)" table:style-name="ce18">
            <text:p>Stable/Reducing</text:p>
          </table:table-cell>
          <table:table-cell office:value-type="float" office:value="2.890625" table:formula="of:=IFERROR([.H485]/[.F485]; 0)" table:style-name="ce17">
            <text:p>2.890625</text:p>
          </table:table-cell>
          <table:table-cell office:value-type="float" office:value="5595" table:formula="of:=AVERAGE([.I485:.I491])" table:style-name="ce15">
            <text:p>5595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1-06T00:00:00" table:style-name="ce14">
            <text:p>06-01-2025</text:p>
          </table:table-cell>
          <table:table-cell office:value-type="string" office:string-value="January" table:formula="of:=TEXT([.A486]; &quot;mmmm&quot;)" table:style-name="ce14">
            <text:p>January</text:p>
          </table:table-cell>
          <table:table-cell office:value-type="string" office:string-value="2025-01" table:formula="of:=TEXT([.A486]; &quot;yyyy-mm&quot;)" table:style-name="ce14">
            <text:p>2025-01</text:p>
          </table:table-cell>
          <table:table-cell office:value-type="float" office:value="41" table:style-name="ce9">
            <text:p>41</text:p>
          </table:table-cell>
          <table:table-cell office:value-type="float" office:value="60" table:style-name="ce9">
            <text:p>60</text:p>
          </table:table-cell>
          <table:table-cell office:value-type="float" office:value="71" table:style-name="ce9">
            <text:p>71</text:p>
          </table:table-cell>
          <table:table-cell office:value-type="float" office:value="5769" table:style-name="ce9">
            <text:p>5769</text:p>
          </table:table-cell>
          <table:table-cell office:value-type="float" office:value="190" table:style-name="ce9">
            <text:p>190</text:p>
          </table:table-cell>
          <table:table-cell office:value-type="float" office:value="5829" table:formula="of:=SUM([.G486]+[.E486])" table:style-name="ce15">
            <text:p>5829</text:p>
          </table:table-cell>
          <table:table-cell office:value-type="float" office:value="-119" table:formula="of:=[.F486]-[.H486]" table:style-name="ce15">
            <text:p>-119</text:p>
          </table:table-cell>
          <table:table-cell office:value-type="percentage" office:value="-7.3769085606450509E-3" table:formula="of:=([.I487]-[.I486])/[.I486]" table:style-name="ce16">
            <text:p>-1%</text:p>
          </table:table-cell>
          <table:table-cell office:value-type="string" office:string-value="Invalid" table:formula="of:=IF([.F486]&lt;=[.E486]; &quot;Valid&quot;; &quot;Invalid&quot;)" table:style-name="ce17">
            <text:p>Invalid</text:p>
          </table:table-cell>
          <table:table-cell office:value-type="string" office:string-value="Valid" table:formula="of:=IF([.H486]&lt;=[.G486]; &quot;Valid&quot;; &quot;Invalid&quot;)" table:style-name="ce17">
            <text:p>Valid</text:p>
          </table:table-cell>
          <table:table-cell office:value-type="string" office:string-value="Stable/Reducing" table:formula="of:=IF([.J486]&gt;0; &quot;Increasing Pressure&quot;; &quot;Stable/Reducing&quot;)" table:style-name="ce18">
            <text:p>Stable/Reducing</text:p>
          </table:table-cell>
          <table:table-cell office:value-type="float" office:value="2.676056338028169" table:formula="of:=IFERROR([.H486]/[.F486]; 0)" table:style-name="ce17">
            <text:p>2.676056338</text:p>
          </table:table-cell>
          <table:table-cell office:value-type="float" office:value="5470.1428571428569" table:formula="of:=AVERAGE([.I486:.I492])" table:style-name="ce15">
            <text:p>5470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1-07T00:00:00" table:style-name="ce14">
            <text:p>07-01-2025</text:p>
          </table:table-cell>
          <table:table-cell office:value-type="string" office:string-value="January" table:formula="of:=TEXT([.A487]; &quot;mmmm&quot;)" table:style-name="ce14">
            <text:p>January</text:p>
          </table:table-cell>
          <table:table-cell office:value-type="string" office:string-value="2025-01" table:formula="of:=TEXT([.A487]; &quot;yyyy-mm&quot;)" table:style-name="ce14">
            <text:p>2025-01</text:p>
          </table:table-cell>
          <table:table-cell office:value-type="float" office:value="65" table:style-name="ce9">
            <text:p>65</text:p>
          </table:table-cell>
          <table:table-cell office:value-type="float" office:value="83" table:style-name="ce9">
            <text:p>83</text:p>
          </table:table-cell>
          <table:table-cell office:value-type="float" office:value="65" table:style-name="ce9">
            <text:p>65</text:p>
          </table:table-cell>
          <table:table-cell office:value-type="float" office:value="5703" table:style-name="ce9">
            <text:p>5703</text:p>
          </table:table-cell>
          <table:table-cell office:value-type="float" office:value="133" table:style-name="ce9">
            <text:p>133</text:p>
          </table:table-cell>
          <table:table-cell office:value-type="float" office:value="5786" table:formula="of:=SUM([.G487]+[.E487])" table:style-name="ce15">
            <text:p>5786</text:p>
          </table:table-cell>
          <table:table-cell office:value-type="float" office:value="-68" table:formula="of:=[.F487]-[.H487]" table:style-name="ce15">
            <text:p>-68</text:p>
          </table:table-cell>
          <table:table-cell office:value-type="percentage" office:value="-1.7455928102315936E-2" table:formula="of:=([.I488]-[.I487])/[.I487]" table:style-name="ce16">
            <text:p>-2%</text:p>
          </table:table-cell>
          <table:table-cell office:value-type="string" office:string-value="Valid" table:formula="of:=IF([.F487]&lt;=[.E487]; &quot;Valid&quot;; &quot;Invalid&quot;)" table:style-name="ce17">
            <text:p>Valid</text:p>
          </table:table-cell>
          <table:table-cell office:value-type="string" office:string-value="Valid" table:formula="of:=IF([.H487]&lt;=[.G487]; &quot;Valid&quot;; &quot;Invalid&quot;)" table:style-name="ce17">
            <text:p>Valid</text:p>
          </table:table-cell>
          <table:table-cell office:value-type="string" office:string-value="Stable/Reducing" table:formula="of:=IF([.J487]&gt;0; &quot;Increasing Pressure&quot;; &quot;Stable/Reducing&quot;)" table:style-name="ce18">
            <text:p>Stable/Reducing</text:p>
          </table:table-cell>
          <table:table-cell office:value-type="float" office:value="2.046153846153846" table:formula="of:=IFERROR([.H487]/[.F487]; 0)" table:style-name="ce17">
            <text:p>2.046153846</text:p>
          </table:table-cell>
          <table:table-cell office:value-type="float" office:value="5361" table:formula="of:=AVERAGE([.I487:.I493])" table:style-name="ce15">
            <text:p>5361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1-08T00:00:00" table:style-name="ce14">
            <text:p>08-01-2025</text:p>
          </table:table-cell>
          <table:table-cell office:value-type="string" office:string-value="January" table:formula="of:=TEXT([.A488]; &quot;mmmm&quot;)" table:style-name="ce14">
            <text:p>January</text:p>
          </table:table-cell>
          <table:table-cell office:value-type="string" office:string-value="2025-01" table:formula="of:=TEXT([.A488]; &quot;yyyy-mm&quot;)" table:style-name="ce14">
            <text:p>2025-01</text:p>
          </table:table-cell>
          <table:table-cell office:value-type="float" office:value="38" table:style-name="ce9">
            <text:p>38</text:p>
          </table:table-cell>
          <table:table-cell office:value-type="float" office:value="80" table:style-name="ce9">
            <text:p>80</text:p>
          </table:table-cell>
          <table:table-cell office:value-type="float" office:value="82" table:style-name="ce9">
            <text:p>82</text:p>
          </table:table-cell>
          <table:table-cell office:value-type="float" office:value="5605" table:style-name="ce9">
            <text:p>5605</text:p>
          </table:table-cell>
          <table:table-cell office:value-type="float" office:value="184" table:style-name="ce9">
            <text:p>184</text:p>
          </table:table-cell>
          <table:table-cell office:value-type="float" office:value="5685" table:formula="of:=SUM([.G488]+[.E488])" table:style-name="ce15">
            <text:p>5685</text:p>
          </table:table-cell>
          <table:table-cell office:value-type="float" office:value="-102" table:formula="of:=[.F488]-[.H488]" table:style-name="ce15">
            <text:p>-102</text:p>
          </table:table-cell>
          <table:table-cell office:value-type="percentage" office:value="-1.6886543535620052E-2" table:formula="of:=([.I489]-[.I488])/[.I488]" table:style-name="ce16">
            <text:p>-2%</text:p>
          </table:table-cell>
          <table:table-cell office:value-type="string" office:string-value="Invalid" table:formula="of:=IF([.F488]&lt;=[.E488]; &quot;Valid&quot;; &quot;Invalid&quot;)" table:style-name="ce17">
            <text:p>Invalid</text:p>
          </table:table-cell>
          <table:table-cell office:value-type="string" office:string-value="Valid" table:formula="of:=IF([.H488]&lt;=[.G488]; &quot;Valid&quot;; &quot;Invalid&quot;)" table:style-name="ce17">
            <text:p>Valid</text:p>
          </table:table-cell>
          <table:table-cell office:value-type="string" office:string-value="Stable/Reducing" table:formula="of:=IF([.J488]&gt;0; &quot;Increasing Pressure&quot;; &quot;Stable/Reducing&quot;)" table:style-name="ce18">
            <text:p>Stable/Reducing</text:p>
          </table:table-cell>
          <table:table-cell office:value-type="float" office:value="2.2439024390243905" table:formula="of:=IFERROR([.H488]/[.F488]; 0)" table:style-name="ce17">
            <text:p>2.243902439</text:p>
          </table:table-cell>
          <table:table-cell office:value-type="float" office:value="5259.7142857142853" table:formula="of:=AVERAGE([.I488:.I494])" table:style-name="ce15">
            <text:p>5260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1-09T00:00:00" table:style-name="ce14">
            <text:p>09-01-2025</text:p>
          </table:table-cell>
          <table:table-cell office:value-type="string" office:string-value="January" table:formula="of:=TEXT([.A489]; &quot;mmmm&quot;)" table:style-name="ce14">
            <text:p>January</text:p>
          </table:table-cell>
          <table:table-cell office:value-type="string" office:string-value="2025-01" table:formula="of:=TEXT([.A489]; &quot;yyyy-mm&quot;)" table:style-name="ce14">
            <text:p>2025-01</text:p>
          </table:table-cell>
          <table:table-cell office:value-type="float" office:value="56" table:style-name="ce9">
            <text:p>56</text:p>
          </table:table-cell>
          <table:table-cell office:value-type="float" office:value="82" table:style-name="ce9">
            <text:p>82</text:p>
          </table:table-cell>
          <table:table-cell office:value-type="float" office:value="68" table:style-name="ce9">
            <text:p>68</text:p>
          </table:table-cell>
          <table:table-cell office:value-type="float" office:value="5507" table:style-name="ce9">
            <text:p>5507</text:p>
          </table:table-cell>
          <table:table-cell office:value-type="float" office:value="164" table:style-name="ce9">
            <text:p>164</text:p>
          </table:table-cell>
          <table:table-cell office:value-type="float" office:value="5589" table:formula="of:=SUM([.G489]+[.E489])" table:style-name="ce15">
            <text:p>5589</text:p>
          </table:table-cell>
          <table:table-cell office:value-type="float" office:value="-96" table:formula="of:=[.F489]-[.H489]" table:style-name="ce15">
            <text:p>-96</text:p>
          </table:table-cell>
          <table:table-cell office:value-type="percentage" office:value="-7.0495616389336199E-2" table:formula="of:=([.I490]-[.I489])/[.I489]" table:style-name="ce16">
            <text:p>-7%</text:p>
          </table:table-cell>
          <table:table-cell office:value-type="string" office:string-value="Valid" table:formula="of:=IF([.F489]&lt;=[.E489]; &quot;Valid&quot;; &quot;Invalid&quot;)" table:style-name="ce17">
            <text:p>Valid</text:p>
          </table:table-cell>
          <table:table-cell office:value-type="string" office:string-value="Valid" table:formula="of:=IF([.H489]&lt;=[.G489]; &quot;Valid&quot;; &quot;Invalid&quot;)" table:style-name="ce17">
            <text:p>Valid</text:p>
          </table:table-cell>
          <table:table-cell office:value-type="string" office:string-value="Stable/Reducing" table:formula="of:=IF([.J489]&gt;0; &quot;Increasing Pressure&quot;; &quot;Stable/Reducing&quot;)" table:style-name="ce18">
            <text:p>Stable/Reducing</text:p>
          </table:table-cell>
          <table:table-cell office:value-type="float" office:value="2.4117647058823528" table:formula="of:=IFERROR([.H489]/[.F489]; 0)" table:style-name="ce17">
            <text:p>2.411764706</text:p>
          </table:table-cell>
          <table:table-cell office:value-type="float" office:value="5130.4285714285716" table:formula="of:=AVERAGE([.I489:.I495])" table:style-name="ce15">
            <text:p>5130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1-12T00:00:00" table:style-name="ce14">
            <text:p>12-01-2025</text:p>
          </table:table-cell>
          <table:table-cell office:value-type="string" office:string-value="January" table:formula="of:=TEXT([.A490]; &quot;mmmm&quot;)" table:style-name="ce14">
            <text:p>January</text:p>
          </table:table-cell>
          <table:table-cell office:value-type="string" office:string-value="2025-01" table:formula="of:=TEXT([.A490]; &quot;yyyy-mm&quot;)" table:style-name="ce14">
            <text:p>2025-01</text:p>
          </table:table-cell>
          <table:table-cell office:value-type="float" office:value="74" table:style-name="ce9">
            <text:p>74</text:p>
          </table:table-cell>
          <table:table-cell office:value-type="float" office:value="103" table:style-name="ce9">
            <text:p>103</text:p>
          </table:table-cell>
          <table:table-cell office:value-type="float" office:value="80" table:style-name="ce9">
            <text:p>80</text:p>
          </table:table-cell>
          <table:table-cell office:value-type="float" office:value="5092" table:style-name="ce9">
            <text:p>5092</text:p>
          </table:table-cell>
          <table:table-cell office:value-type="float" office:value="235" table:style-name="ce9">
            <text:p>235</text:p>
          </table:table-cell>
          <table:table-cell office:value-type="float" office:value="5195" table:formula="of:=SUM([.G490]+[.E490])" table:style-name="ce15">
            <text:p>5195</text:p>
          </table:table-cell>
          <table:table-cell office:value-type="float" office:value="-155" table:formula="of:=[.F490]-[.H490]" table:style-name="ce15">
            <text:p>-155</text:p>
          </table:table-cell>
          <table:table-cell office:value-type="percentage" office:value="-1.3282001924927815E-2" table:formula="of:=([.I491]-[.I490])/[.I490]" table:style-name="ce16">
            <text:p>-1%</text:p>
          </table:table-cell>
          <table:table-cell office:value-type="string" office:string-value="Valid" table:formula="of:=IF([.F490]&lt;=[.E490]; &quot;Valid&quot;; &quot;Invalid&quot;)" table:style-name="ce17">
            <text:p>Valid</text:p>
          </table:table-cell>
          <table:table-cell office:value-type="string" office:string-value="Valid" table:formula="of:=IF([.H490]&lt;=[.G490]; &quot;Valid&quot;; &quot;Invalid&quot;)" table:style-name="ce17">
            <text:p>Valid</text:p>
          </table:table-cell>
          <table:table-cell office:value-type="string" office:string-value="Stable/Reducing" table:formula="of:=IF([.J490]&gt;0; &quot;Increasing Pressure&quot;; &quot;Stable/Reducing&quot;)" table:style-name="ce18">
            <text:p>Stable/Reducing</text:p>
          </table:table-cell>
          <table:table-cell office:value-type="float" office:value="2.9375" table:formula="of:=IFERROR([.H490]/[.F490]; 0)" table:style-name="ce17">
            <text:p>2.9375</text:p>
          </table:table-cell>
          <table:table-cell office:value-type="float" office:value="5011.4285714285716" table:formula="of:=AVERAGE([.I490:.I496])" table:style-name="ce15">
            <text:p>5011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1-13T00:00:00" table:style-name="ce14">
            <text:p>13-01-2025</text:p>
          </table:table-cell>
          <table:table-cell office:value-type="string" office:string-value="January" table:formula="of:=TEXT([.A491]; &quot;mmmm&quot;)" table:style-name="ce14">
            <text:p>January</text:p>
          </table:table-cell>
          <table:table-cell office:value-type="string" office:string-value="2025-01" table:formula="of:=TEXT([.A491]; &quot;yyyy-mm&quot;)" table:style-name="ce14">
            <text:p>2025-01</text:p>
          </table:table-cell>
          <table:table-cell office:value-type="float" office:value="68" table:style-name="ce9">
            <text:p>68</text:p>
          </table:table-cell>
          <table:table-cell office:value-type="float" office:value="107" table:style-name="ce9">
            <text:p>107</text:p>
          </table:table-cell>
          <table:table-cell office:value-type="float" office:value="102" table:style-name="ce9">
            <text:p>102</text:p>
          </table:table-cell>
          <table:table-cell office:value-type="float" office:value="5019" table:style-name="ce9">
            <text:p>5019</text:p>
          </table:table-cell>
          <table:table-cell office:value-type="float" office:value="181" table:style-name="ce9">
            <text:p>181</text:p>
          </table:table-cell>
          <table:table-cell office:value-type="float" office:value="5126" table:formula="of:=SUM([.G491]+[.E491])" table:style-name="ce15">
            <text:p>5126</text:p>
          </table:table-cell>
          <table:table-cell office:value-type="float" office:value="-79" table:formula="of:=[.F491]-[.H491]" table:style-name="ce15">
            <text:p>-79</text:p>
          </table:table-cell>
          <table:table-cell office:value-type="percentage" office:value="-8.7787748731954739E-3" table:formula="of:=([.I492]-[.I491])/[.I491]" table:style-name="ce16">
            <text:p>-1%</text:p>
          </table:table-cell>
          <table:table-cell office:value-type="string" office:string-value="Valid" table:formula="of:=IF([.F491]&lt;=[.E491]; &quot;Valid&quot;; &quot;Invalid&quot;)" table:style-name="ce17">
            <text:p>Valid</text:p>
          </table:table-cell>
          <table:table-cell office:value-type="string" office:string-value="Valid" table:formula="of:=IF([.H491]&lt;=[.G491]; &quot;Valid&quot;; &quot;Invalid&quot;)" table:style-name="ce17">
            <text:p>Valid</text:p>
          </table:table-cell>
          <table:table-cell office:value-type="string" office:string-value="Stable/Reducing" table:formula="of:=IF([.J491]&gt;0; &quot;Increasing Pressure&quot;; &quot;Stable/Reducing&quot;)" table:style-name="ce18">
            <text:p>Stable/Reducing</text:p>
          </table:table-cell>
          <table:table-cell office:value-type="float" office:value="1.7745098039215685" table:formula="of:=IFERROR([.H491]/[.F491]; 0)" table:style-name="ce17">
            <text:p>1.774509804</text:p>
          </table:table-cell>
          <table:table-cell office:value-type="float" office:value="4953.8571428571431" table:formula="of:=AVERAGE([.I491:.I497])" table:style-name="ce15">
            <text:p>4954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1-14T00:00:00" table:style-name="ce14">
            <text:p>14-01-2025</text:p>
          </table:table-cell>
          <table:table-cell office:value-type="string" office:string-value="January" table:formula="of:=TEXT([.A492]; &quot;mmmm&quot;)" table:style-name="ce14">
            <text:p>January</text:p>
          </table:table-cell>
          <table:table-cell office:value-type="string" office:string-value="2025-01" table:formula="of:=TEXT([.A492]; &quot;yyyy-mm&quot;)" table:style-name="ce14">
            <text:p>2025-01</text:p>
          </table:table-cell>
          <table:table-cell office:value-type="float" office:value="92" table:style-name="ce9">
            <text:p>92</text:p>
          </table:table-cell>
          <table:table-cell office:value-type="float" office:value="124" table:style-name="ce9">
            <text:p>124</text:p>
          </table:table-cell>
          <table:table-cell office:value-type="float" office:value="93" table:style-name="ce9">
            <text:p>93</text:p>
          </table:table-cell>
          <table:table-cell office:value-type="float" office:value="4957" table:style-name="ce9">
            <text:p>4957</text:p>
          </table:table-cell>
          <table:table-cell office:value-type="float" office:value="139" table:style-name="ce9">
            <text:p>139</text:p>
          </table:table-cell>
          <table:table-cell office:value-type="float" office:value="5081" table:formula="of:=SUM([.G492]+[.E492])" table:style-name="ce15">
            <text:p>5081</text:p>
          </table:table-cell>
          <table:table-cell office:value-type="float" office:value="-46" table:formula="of:=[.F492]-[.H492]" table:style-name="ce15">
            <text:p>-46</text:p>
          </table:table-cell>
          <table:table-cell office:value-type="percentage" office:value="-3.1489864199960639E-3" table:formula="of:=([.I493]-[.I492])/[.I492]" table:style-name="ce16">
            <text:p>0%</text:p>
          </table:table-cell>
          <table:table-cell office:value-type="string" office:string-value="Valid" table:formula="of:=IF([.F492]&lt;=[.E492]; &quot;Valid&quot;; &quot;Invalid&quot;)" table:style-name="ce17">
            <text:p>Valid</text:p>
          </table:table-cell>
          <table:table-cell office:value-type="string" office:string-value="Valid" table:formula="of:=IF([.H492]&lt;=[.G492]; &quot;Valid&quot;; &quot;Invalid&quot;)" table:style-name="ce17">
            <text:p>Valid</text:p>
          </table:table-cell>
          <table:table-cell office:value-type="string" office:string-value="Stable/Reducing" table:formula="of:=IF([.J492]&gt;0; &quot;Increasing Pressure&quot;; &quot;Stable/Reducing&quot;)" table:style-name="ce18">
            <text:p>Stable/Reducing</text:p>
          </table:table-cell>
          <table:table-cell office:value-type="float" office:value="1.4946236559139785" table:formula="of:=IFERROR([.H492]/[.F492]; 0)" table:style-name="ce17">
            <text:p>1.494623656</text:p>
          </table:table-cell>
          <table:table-cell office:value-type="float" office:value="4909.2857142857147" table:formula="of:=AVERAGE([.I492:.I498])" table:style-name="ce15">
            <text:p>4909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1-15T00:00:00" table:style-name="ce14">
            <text:p>15-01-2025</text:p>
          </table:table-cell>
          <table:table-cell office:value-type="string" office:string-value="January" table:formula="of:=TEXT([.A493]; &quot;mmmm&quot;)" table:style-name="ce14">
            <text:p>January</text:p>
          </table:table-cell>
          <table:table-cell office:value-type="string" office:string-value="2025-01" table:formula="of:=TEXT([.A493]; &quot;yyyy-mm&quot;)" table:style-name="ce14">
            <text:p>2025-01</text:p>
          </table:table-cell>
          <table:table-cell office:value-type="float" office:value="113" table:style-name="ce9">
            <text:p>113</text:p>
          </table:table-cell>
          <table:table-cell office:value-type="float" office:value="162" table:style-name="ce9">
            <text:p>162</text:p>
          </table:table-cell>
          <table:table-cell office:value-type="float" office:value="107" table:style-name="ce9">
            <text:p>107</text:p>
          </table:table-cell>
          <table:table-cell office:value-type="float" office:value="4903" table:style-name="ce9">
            <text:p>4903</text:p>
          </table:table-cell>
          <table:table-cell office:value-type="float" office:value="164" table:style-name="ce9">
            <text:p>164</text:p>
          </table:table-cell>
          <table:table-cell office:value-type="float" office:value="5065" table:formula="of:=SUM([.G493]+[.E493])" table:style-name="ce15">
            <text:p>5065</text:p>
          </table:table-cell>
          <table:table-cell office:value-type="float" office:value="-57" table:formula="of:=[.F493]-[.H493]" table:style-name="ce15">
            <text:p>-57</text:p>
          </table:table-cell>
          <table:table-cell office:value-type="percentage" office:value="2.3692003948667323E-3" table:formula="of:=([.I494]-[.I493])/[.I493]" table:style-name="ce16">
            <text:p>0%</text:p>
          </table:table-cell>
          <table:table-cell office:value-type="string" office:string-value="Valid" table:formula="of:=IF([.F493]&lt;=[.E493]; &quot;Valid&quot;; &quot;Invalid&quot;)" table:style-name="ce17">
            <text:p>Valid</text:p>
          </table:table-cell>
          <table:table-cell office:value-type="string" office:string-value="Valid" table:formula="of:=IF([.H493]&lt;=[.G493]; &quot;Valid&quot;; &quot;Invalid&quot;)" table:style-name="ce17">
            <text:p>Valid</text:p>
          </table:table-cell>
          <table:table-cell office:value-type="string" office:string-value="Stable/Reducing" table:formula="of:=IF([.J493]&gt;0; &quot;Increasing Pressure&quot;; &quot;Stable/Reducing&quot;)" table:style-name="ce18">
            <text:p>Stable/Reducing</text:p>
          </table:table-cell>
          <table:table-cell office:value-type="float" office:value="1.5327102803738317" table:formula="of:=IFERROR([.H493]/[.F493]; 0)" table:style-name="ce17">
            <text:p>1.53271028</text:p>
          </table:table-cell>
          <table:table-cell office:value-type="float" office:value="4854.2857142857147" table:formula="of:=AVERAGE([.I493:.I499])" table:style-name="ce15">
            <text:p>4854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1-16T00:00:00" table:style-name="ce14">
            <text:p>16-01-2025</text:p>
          </table:table-cell>
          <table:table-cell office:value-type="string" office:string-value="January" table:formula="of:=TEXT([.A494]; &quot;mmmm&quot;)" table:style-name="ce14">
            <text:p>January</text:p>
          </table:table-cell>
          <table:table-cell office:value-type="string" office:string-value="2025-01" table:formula="of:=TEXT([.A494]; &quot;yyyy-mm&quot;)" table:style-name="ce14">
            <text:p>2025-01</text:p>
          </table:table-cell>
          <table:table-cell office:value-type="float" office:value="106" table:style-name="ce9">
            <text:p>106</text:p>
          </table:table-cell>
          <table:table-cell office:value-type="float" office:value="196" table:style-name="ce9">
            <text:p>196</text:p>
          </table:table-cell>
          <table:table-cell office:value-type="float" office:value="131" table:style-name="ce9">
            <text:p>131</text:p>
          </table:table-cell>
          <table:table-cell office:value-type="float" office:value="4881" table:style-name="ce9">
            <text:p>4881</text:p>
          </table:table-cell>
          <table:table-cell office:value-type="float" office:value="159" table:style-name="ce9">
            <text:p>159</text:p>
          </table:table-cell>
          <table:table-cell office:value-type="float" office:value="5077" table:formula="of:=SUM([.G494]+[.E494])" table:style-name="ce15">
            <text:p>5077</text:p>
          </table:table-cell>
          <table:table-cell office:value-type="float" office:value="-28" table:formula="of:=[.F494]-[.H494]" table:style-name="ce15">
            <text:p>-28</text:p>
          </table:table-cell>
          <table:table-cell office:value-type="percentage" office:value="-5.8499113649793183E-2" table:formula="of:=([.I495]-[.I494])/[.I494]" table:style-name="ce16">
            <text:p>-6%</text:p>
          </table:table-cell>
          <table:table-cell office:value-type="string" office:string-value="Valid" table:formula="of:=IF([.F494]&lt;=[.E494]; &quot;Valid&quot;; &quot;Invalid&quot;)" table:style-name="ce17">
            <text:p>Valid</text:p>
          </table:table-cell>
          <table:table-cell office:value-type="string" office:string-value="Valid" table:formula="of:=IF([.H494]&lt;=[.G494]; &quot;Valid&quot;; &quot;Invalid&quot;)" table:style-name="ce17">
            <text:p>Valid</text:p>
          </table:table-cell>
          <table:table-cell office:value-type="string" office:string-value="Stable/Reducing" table:formula="of:=IF([.J494]&gt;0; &quot;Increasing Pressure&quot;; &quot;Stable/Reducing&quot;)" table:style-name="ce18">
            <text:p>Stable/Reducing</text:p>
          </table:table-cell>
          <table:table-cell office:value-type="float" office:value="1.2137404580152671" table:formula="of:=IFERROR([.H494]/[.F494]; 0)" table:style-name="ce17">
            <text:p>1.213740458</text:p>
          </table:table-cell>
          <table:table-cell office:value-type="float" office:value="4743.8571428571431" table:formula="of:=AVERAGE([.I494:.I500])" table:style-name="ce15">
            <text:p>4744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1-19T00:00:00" table:style-name="ce14">
            <text:p>19-01-2025</text:p>
          </table:table-cell>
          <table:table-cell office:value-type="string" office:string-value="January" table:formula="of:=TEXT([.A495]; &quot;mmmm&quot;)" table:style-name="ce14">
            <text:p>January</text:p>
          </table:table-cell>
          <table:table-cell office:value-type="string" office:string-value="2025-01" table:formula="of:=TEXT([.A495]; &quot;yyyy-mm&quot;)" table:style-name="ce14">
            <text:p>2025-01</text:p>
          </table:table-cell>
          <table:table-cell office:value-type="float" office:value="86" table:style-name="ce9">
            <text:p>86</text:p>
          </table:table-cell>
          <table:table-cell office:value-type="float" office:value="152" table:style-name="ce9">
            <text:p>152</text:p>
          </table:table-cell>
          <table:table-cell office:value-type="float" office:value="168" table:style-name="ce9">
            <text:p>168</text:p>
          </table:table-cell>
          <table:table-cell office:value-type="float" office:value="4628" table:style-name="ce9">
            <text:p>4628</text:p>
          </table:table-cell>
          <table:table-cell office:value-type="float" office:value="176" table:style-name="ce9">
            <text:p>176</text:p>
          </table:table-cell>
          <table:table-cell office:value-type="float" office:value="4780" table:formula="of:=SUM([.G495]+[.E495])" table:style-name="ce15">
            <text:p>4780</text:p>
          </table:table-cell>
          <table:table-cell office:value-type="float" office:value="-8" table:formula="of:=[.F495]-[.H495]" table:style-name="ce15">
            <text:p>-8</text:p>
          </table:table-cell>
          <table:table-cell office:value-type="percentage" office:value="-5.0209205020920501E-3" table:formula="of:=([.I496]-[.I495])/[.I495]" table:style-name="ce16">
            <text:p>-1%</text:p>
          </table:table-cell>
          <table:table-cell office:value-type="string" office:string-value="Invalid" table:formula="of:=IF([.F495]&lt;=[.E495]; &quot;Valid&quot;; &quot;Invalid&quot;)" table:style-name="ce17">
            <text:p>Invalid</text:p>
          </table:table-cell>
          <table:table-cell office:value-type="string" office:string-value="Valid" table:formula="of:=IF([.H495]&lt;=[.G495]; &quot;Valid&quot;; &quot;Invalid&quot;)" table:style-name="ce17">
            <text:p>Valid</text:p>
          </table:table-cell>
          <table:table-cell office:value-type="string" office:string-value="Stable/Reducing" table:formula="of:=IF([.J495]&gt;0; &quot;Increasing Pressure&quot;; &quot;Stable/Reducing&quot;)" table:style-name="ce18">
            <text:p>Stable/Reducing</text:p>
          </table:table-cell>
          <table:table-cell office:value-type="float" office:value="1.0476190476190477" table:formula="of:=IFERROR([.H495]/[.F495]; 0)" table:style-name="ce17">
            <text:p>1.047619048</text:p>
          </table:table-cell>
          <table:table-cell office:value-type="float" office:value="4620.5714285714284" table:formula="of:=AVERAGE([.I495:.I501])" table:style-name="ce15">
            <text:p>4621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1-20T00:00:00" table:style-name="ce14">
            <text:p>20-01-2025</text:p>
          </table:table-cell>
          <table:table-cell office:value-type="string" office:string-value="January" table:formula="of:=TEXT([.A496]; &quot;mmmm&quot;)" table:style-name="ce14">
            <text:p>January</text:p>
          </table:table-cell>
          <table:table-cell office:value-type="string" office:string-value="2025-01" table:formula="of:=TEXT([.A496]; &quot;yyyy-mm&quot;)" table:style-name="ce14">
            <text:p>2025-01</text:p>
          </table:table-cell>
          <table:table-cell office:value-type="float" office:value="84" table:style-name="ce9">
            <text:p>84</text:p>
          </table:table-cell>
          <table:table-cell office:value-type="float" office:value="118" table:style-name="ce9">
            <text:p>118</text:p>
          </table:table-cell>
          <table:table-cell office:value-type="float" office:value="136" table:style-name="ce9">
            <text:p>136</text:p>
          </table:table-cell>
          <table:table-cell office:value-type="float" office:value="4638" table:style-name="ce9">
            <text:p>4638</text:p>
          </table:table-cell>
          <table:table-cell office:value-type="float" office:value="127" table:style-name="ce9">
            <text:p>127</text:p>
          </table:table-cell>
          <table:table-cell office:value-type="float" office:value="4756" table:formula="of:=SUM([.G496]+[.E496])" table:style-name="ce15">
            <text:p>4756</text:p>
          </table:table-cell>
          <table:table-cell office:value-type="float" office:value="9" table:formula="of:=[.F496]-[.H496]" table:style-name="ce15">
            <text:p>9</text:p>
          </table:table-cell>
          <table:table-cell office:value-type="percentage" office:value="7.569386038687973E-3" table:formula="of:=([.I497]-[.I496])/[.I496]" table:style-name="ce16">
            <text:p>1%</text:p>
          </table:table-cell>
          <table:table-cell office:value-type="string" office:string-value="Invalid" table:formula="of:=IF([.F496]&lt;=[.E496]; &quot;Valid&quot;; &quot;Invalid&quot;)" table:style-name="ce17">
            <text:p>Invalid</text:p>
          </table:table-cell>
          <table:table-cell office:value-type="string" office:string-value="Valid" table:formula="of:=IF([.H496]&lt;=[.G496]; &quot;Valid&quot;; &quot;Invalid&quot;)" table:style-name="ce17">
            <text:p>Valid</text:p>
          </table:table-cell>
          <table:table-cell office:value-type="string" office:string-value="Increasing Pressure" table:formula="of:=IF([.J496]&gt;0; &quot;Increasing Pressure&quot;; &quot;Stable/Reducing&quot;)" table:style-name="ce18">
            <text:p>Increasing Pressure</text:p>
          </table:table-cell>
          <table:table-cell office:value-type="float" office:value="0.93382352941176472" table:formula="of:=IFERROR([.H496]/[.F496]; 0)" table:style-name="ce17">
            <text:p>0.933823529</text:p>
          </table:table-cell>
          <table:table-cell office:value-type="float" office:value="4529.8571428571431" table:formula="of:=AVERAGE([.I496:.I502])" table:style-name="ce15">
            <text:p>4530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1-21T00:00:00" table:style-name="ce14">
            <text:p>21-01-2025</text:p>
          </table:table-cell>
          <table:table-cell office:value-type="string" office:string-value="January" table:formula="of:=TEXT([.A497]; &quot;mmmm&quot;)" table:style-name="ce14">
            <text:p>January</text:p>
          </table:table-cell>
          <table:table-cell office:value-type="string" office:string-value="2025-01" table:formula="of:=TEXT([.A497]; &quot;yyyy-mm&quot;)" table:style-name="ce14">
            <text:p>2025-01</text:p>
          </table:table-cell>
          <table:table-cell office:value-type="float" office:value="59" table:style-name="ce9">
            <text:p>59</text:p>
          </table:table-cell>
          <table:table-cell office:value-type="float" office:value="64" table:style-name="ce9">
            <text:p>64</text:p>
          </table:table-cell>
          <table:table-cell office:value-type="float" office:value="117" table:style-name="ce9">
            <text:p>117</text:p>
          </table:table-cell>
          <table:table-cell office:value-type="float" office:value="4728" table:style-name="ce9">
            <text:p>4728</text:p>
          </table:table-cell>
          <table:table-cell office:value-type="float" office:value="54" table:style-name="ce9">
            <text:p>54</text:p>
          </table:table-cell>
          <table:table-cell office:value-type="float" office:value="4792" table:formula="of:=SUM([.G497]+[.E497])" table:style-name="ce15">
            <text:p>4792</text:p>
          </table:table-cell>
          <table:table-cell office:value-type="float" office:value="63" table:formula="of:=[.F497]-[.H497]" table:style-name="ce15">
            <text:p>63</text:p>
          </table:table-cell>
          <table:table-cell office:value-type="percentage" office:value="4.5909849749582636E-3" table:formula="of:=([.I498]-[.I497])/[.I497]" table:style-name="ce16">
            <text:p>0%</text:p>
          </table:table-cell>
          <table:table-cell office:value-type="string" office:string-value="Invalid" table:formula="of:=IF([.F497]&lt;=[.E497]; &quot;Valid&quot;; &quot;Invalid&quot;)" table:style-name="ce17">
            <text:p>Invalid</text:p>
          </table:table-cell>
          <table:table-cell office:value-type="string" office:string-value="Valid" table:formula="of:=IF([.H497]&lt;=[.G497]; &quot;Valid&quot;; &quot;Invalid&quot;)" table:style-name="ce17">
            <text:p>Valid</text:p>
          </table:table-cell>
          <table:table-cell office:value-type="string" office:string-value="Increasing Pressure" table:formula="of:=IF([.J497]&gt;0; &quot;Increasing Pressure&quot;; &quot;Stable/Reducing&quot;)" table:style-name="ce18">
            <text:p>Increasing Pressure</text:p>
          </table:table-cell>
          <table:table-cell office:value-type="float" office:value="0.46153846153846156" table:formula="of:=IFERROR([.H497]/[.F497]; 0)" table:style-name="ce17">
            <text:p>0.461538462</text:p>
          </table:table-cell>
          <table:table-cell office:value-type="float" office:value="4434.1428571428569" table:formula="of:=AVERAGE([.I497:.I503])" table:style-name="ce15">
            <text:p>4434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1-22T00:00:00" table:style-name="ce14">
            <text:p>22-01-2025</text:p>
          </table:table-cell>
          <table:table-cell office:value-type="string" office:string-value="January" table:formula="of:=TEXT([.A498]; &quot;mmmm&quot;)" table:style-name="ce14">
            <text:p>January</text:p>
          </table:table-cell>
          <table:table-cell office:value-type="string" office:string-value="2025-01" table:formula="of:=TEXT([.A498]; &quot;yyyy-mm&quot;)" table:style-name="ce14">
            <text:p>2025-01</text:p>
          </table:table-cell>
          <table:table-cell office:value-type="float" office:value="62" table:style-name="ce9">
            <text:p>62</text:p>
          </table:table-cell>
          <table:table-cell office:value-type="float" office:value="97" table:style-name="ce9">
            <text:p>97</text:p>
          </table:table-cell>
          <table:table-cell office:value-type="float" office:value="52" table:style-name="ce9">
            <text:p>52</text:p>
          </table:table-cell>
          <table:table-cell office:value-type="float" office:value="4717" table:style-name="ce9">
            <text:p>4717</text:p>
          </table:table-cell>
          <table:table-cell office:value-type="float" office:value="83" table:style-name="ce9">
            <text:p>83</text:p>
          </table:table-cell>
          <table:table-cell office:value-type="float" office:value="4814" table:formula="of:=SUM([.G498]+[.E498])" table:style-name="ce15">
            <text:p>4814</text:p>
          </table:table-cell>
          <table:table-cell office:value-type="float" office:value="-31" table:formula="of:=[.F498]-[.H498]" table:style-name="ce15">
            <text:p>-31</text:p>
          </table:table-cell>
          <table:table-cell office:value-type="percentage" office:value="-2.4511840465309513E-2" table:formula="of:=([.I499]-[.I498])/[.I498]" table:style-name="ce16">
            <text:p>-2%</text:p>
          </table:table-cell>
          <table:table-cell office:value-type="string" office:string-value="Valid" table:formula="of:=IF([.F498]&lt;=[.E498]; &quot;Valid&quot;; &quot;Invalid&quot;)" table:style-name="ce17">
            <text:p>Valid</text:p>
          </table:table-cell>
          <table:table-cell office:value-type="string" office:string-value="Valid" table:formula="of:=IF([.H498]&lt;=[.G498]; &quot;Valid&quot;; &quot;Invalid&quot;)" table:style-name="ce17">
            <text:p>Valid</text:p>
          </table:table-cell>
          <table:table-cell office:value-type="string" office:string-value="Stable/Reducing" table:formula="of:=IF([.J498]&gt;0; &quot;Increasing Pressure&quot;; &quot;Stable/Reducing&quot;)" table:style-name="ce18">
            <text:p>Stable/Reducing</text:p>
          </table:table-cell>
          <table:table-cell office:value-type="float" office:value="1.5961538461538463" table:formula="of:=IFERROR([.H498]/[.F498]; 0)" table:style-name="ce17">
            <text:p>1.596153846</text:p>
          </table:table-cell>
          <table:table-cell office:value-type="float" office:value="4316" table:formula="of:=AVERAGE([.I498:.I504])" table:style-name="ce15">
            <text:p>4316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1-23T00:00:00" table:style-name="ce14">
            <text:p>23-01-2025</text:p>
          </table:table-cell>
          <table:table-cell office:value-type="string" office:string-value="January" table:formula="of:=TEXT([.A499]; &quot;mmmm&quot;)" table:style-name="ce14">
            <text:p>January</text:p>
          </table:table-cell>
          <table:table-cell office:value-type="string" office:string-value="2025-01" table:formula="of:=TEXT([.A499]; &quot;yyyy-mm&quot;)" table:style-name="ce14">
            <text:p>2025-01</text:p>
          </table:table-cell>
          <table:table-cell office:value-type="float" office:value="91" table:style-name="ce9">
            <text:p>91</text:p>
          </table:table-cell>
          <table:table-cell office:value-type="float" office:value="75" table:style-name="ce9">
            <text:p>75</text:p>
          </table:table-cell>
          <table:table-cell office:value-type="float" office:value="97" table:style-name="ce9">
            <text:p>97</text:p>
          </table:table-cell>
          <table:table-cell office:value-type="float" office:value="4621" table:style-name="ce9">
            <text:p>4621</text:p>
          </table:table-cell>
          <table:table-cell office:value-type="float" office:value="174" table:style-name="ce9">
            <text:p>174</text:p>
          </table:table-cell>
          <table:table-cell office:value-type="float" office:value="4696" table:formula="of:=SUM([.G499]+[.E499])" table:style-name="ce15">
            <text:p>4696</text:p>
          </table:table-cell>
          <table:table-cell office:value-type="float" office:value="-77" table:formula="of:=[.F499]-[.H499]" table:style-name="ce15">
            <text:p>-77</text:p>
          </table:table-cell>
          <table:table-cell office:value-type="percentage" office:value="-8.603066439522998E-2" table:formula="of:=([.I500]-[.I499])/[.I499]" table:style-name="ce16">
            <text:p>-9%</text:p>
          </table:table-cell>
          <table:table-cell office:value-type="string" office:string-value="Invalid" table:formula="of:=IF([.F499]&lt;=[.E499]; &quot;Valid&quot;; &quot;Invalid&quot;)" table:style-name="ce17">
            <text:p>Invalid</text:p>
          </table:table-cell>
          <table:table-cell office:value-type="string" office:string-value="Valid" table:formula="of:=IF([.H499]&lt;=[.G499]; &quot;Valid&quot;; &quot;Invalid&quot;)" table:style-name="ce17">
            <text:p>Valid</text:p>
          </table:table-cell>
          <table:table-cell office:value-type="string" office:string-value="Stable/Reducing" table:formula="of:=IF([.J499]&gt;0; &quot;Increasing Pressure&quot;; &quot;Stable/Reducing&quot;)" table:style-name="ce18">
            <text:p>Stable/Reducing</text:p>
          </table:table-cell>
          <table:table-cell office:value-type="float" office:value="1.7938144329896908" table:formula="of:=IFERROR([.H499]/[.F499]; 0)" table:style-name="ce17">
            <text:p>1.793814433</text:p>
          </table:table-cell>
          <table:table-cell office:value-type="float" office:value="4129" table:formula="of:=AVERAGE([.I499:.I505])" table:style-name="ce15">
            <text:p>4129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1-26T00:00:00" table:style-name="ce14">
            <text:p>26-01-2025</text:p>
          </table:table-cell>
          <table:table-cell office:value-type="string" office:string-value="January" table:formula="of:=TEXT([.A500]; &quot;mmmm&quot;)" table:style-name="ce14">
            <text:p>January</text:p>
          </table:table-cell>
          <table:table-cell office:value-type="string" office:string-value="2025-01" table:formula="of:=TEXT([.A500]; &quot;yyyy-mm&quot;)" table:style-name="ce14">
            <text:p>2025-01</text:p>
          </table:table-cell>
          <table:table-cell office:value-type="float" office:value="29" table:style-name="ce9">
            <text:p>29</text:p>
          </table:table-cell>
          <table:table-cell office:value-type="float" office:value="51" table:style-name="ce9">
            <text:p>51</text:p>
          </table:table-cell>
          <table:table-cell office:value-type="float" office:value="11" table:style-name="ce9">
            <text:p>11</text:p>
          </table:table-cell>
          <table:table-cell office:value-type="float" office:value="4241" table:style-name="ce9">
            <text:p>4241</text:p>
          </table:table-cell>
          <table:table-cell office:value-type="float" office:value="182" table:style-name="ce9">
            <text:p>182</text:p>
          </table:table-cell>
          <table:table-cell office:value-type="float" office:value="4292" table:formula="of:=SUM([.G500]+[.E500])" table:style-name="ce15">
            <text:p>4292</text:p>
          </table:table-cell>
          <table:table-cell office:value-type="float" office:value="-171" table:formula="of:=[.F500]-[.H500]" table:style-name="ce15">
            <text:p>-171</text:p>
          </table:table-cell>
          <table:table-cell office:value-type="percentage" office:value="-1.8173345759552657E-2" table:formula="of:=([.I501]-[.I500])/[.I500]" table:style-name="ce16">
            <text:p>-2%</text:p>
          </table:table-cell>
          <table:table-cell office:value-type="string" office:string-value="Valid" table:formula="of:=IF([.F500]&lt;=[.E500]; &quot;Valid&quot;; &quot;Invalid&quot;)" table:style-name="ce17">
            <text:p>Valid</text:p>
          </table:table-cell>
          <table:table-cell office:value-type="string" office:string-value="Valid" table:formula="of:=IF([.H500]&lt;=[.G500]; &quot;Valid&quot;; &quot;Invalid&quot;)" table:style-name="ce17">
            <text:p>Valid</text:p>
          </table:table-cell>
          <table:table-cell office:value-type="string" office:string-value="Stable/Reducing" table:formula="of:=IF([.J500]&gt;0; &quot;Increasing Pressure&quot;; &quot;Stable/Reducing&quot;)" table:style-name="ce18">
            <text:p>Stable/Reducing</text:p>
          </table:table-cell>
          <table:table-cell office:value-type="float" office:value="16.545454545454547" table:formula="of:=IFERROR([.H500]/[.F500]; 0)" table:style-name="ce17">
            <text:p>16.54545455</text:p>
          </table:table-cell>
          <table:table-cell office:value-type="float" office:value="3950.7142857142858" table:formula="of:=AVERAGE([.I500:.I506])" table:style-name="ce15">
            <text:p>3951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1-27T00:00:00" table:style-name="ce14">
            <text:p>27-01-2025</text:p>
          </table:table-cell>
          <table:table-cell office:value-type="string" office:string-value="January" table:formula="of:=TEXT([.A501]; &quot;mmmm&quot;)" table:style-name="ce14">
            <text:p>January</text:p>
          </table:table-cell>
          <table:table-cell office:value-type="string" office:string-value="2025-01" table:formula="of:=TEXT([.A501]; &quot;yyyy-mm&quot;)" table:style-name="ce14">
            <text:p>2025-01</text:p>
          </table:table-cell>
          <table:table-cell office:value-type="float" office:value="33" table:style-name="ce9">
            <text:p>33</text:p>
          </table:table-cell>
          <table:table-cell office:value-type="float" office:value="53" table:style-name="ce9">
            <text:p>53</text:p>
          </table:table-cell>
          <table:table-cell office:value-type="float" office:value="34" table:style-name="ce9">
            <text:p>34</text:p>
          </table:table-cell>
          <table:table-cell office:value-type="float" office:value="4161" table:style-name="ce9">
            <text:p>4161</text:p>
          </table:table-cell>
          <table:table-cell office:value-type="float" office:value="127" table:style-name="ce9">
            <text:p>127</text:p>
          </table:table-cell>
          <table:table-cell office:value-type="float" office:value="4214" table:formula="of:=SUM([.G501]+[.E501])" table:style-name="ce15">
            <text:p>4214</text:p>
          </table:table-cell>
          <table:table-cell office:value-type="float" office:value="-93" table:formula="of:=[.F501]-[.H501]" table:style-name="ce15">
            <text:p>-93</text:p>
          </table:table-cell>
          <table:table-cell office:value-type="percentage" office:value="-1.6373991457047935E-2" table:formula="of:=([.I502]-[.I501])/[.I501]" table:style-name="ce16">
            <text:p>-2%</text:p>
          </table:table-cell>
          <table:table-cell office:value-type="string" office:string-value="Valid" table:formula="of:=IF([.F501]&lt;=[.E501]; &quot;Valid&quot;; &quot;Invalid&quot;)" table:style-name="ce17">
            <text:p>Valid</text:p>
          </table:table-cell>
          <table:table-cell office:value-type="string" office:string-value="Valid" table:formula="of:=IF([.H501]&lt;=[.G501]; &quot;Valid&quot;; &quot;Invalid&quot;)" table:style-name="ce17">
            <text:p>Valid</text:p>
          </table:table-cell>
          <table:table-cell office:value-type="string" office:string-value="Stable/Reducing" table:formula="of:=IF([.J501]&gt;0; &quot;Increasing Pressure&quot;; &quot;Stable/Reducing&quot;)" table:style-name="ce18">
            <text:p>Stable/Reducing</text:p>
          </table:table-cell>
          <table:table-cell office:value-type="float" office:value="3.7352941176470589" table:formula="of:=IFERROR([.H501]/[.F501]; 0)" table:style-name="ce17">
            <text:p>3.735294118</text:p>
          </table:table-cell>
          <table:table-cell office:value-type="float" office:value="3825.1428571428573" table:formula="of:=AVERAGE([.I501:.I507])" table:style-name="ce15">
            <text:p>3825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1-28T00:00:00" table:style-name="ce14">
            <text:p>28-01-2025</text:p>
          </table:table-cell>
          <table:table-cell office:value-type="string" office:string-value="January" table:formula="of:=TEXT([.A502]; &quot;mmmm&quot;)" table:style-name="ce14">
            <text:p>January</text:p>
          </table:table-cell>
          <table:table-cell office:value-type="string" office:string-value="2025-01" table:formula="of:=TEXT([.A502]; &quot;yyyy-mm&quot;)" table:style-name="ce14">
            <text:p>2025-01</text:p>
          </table:table-cell>
          <table:table-cell office:value-type="float" office:value="32" table:style-name="ce9">
            <text:p>32</text:p>
          </table:table-cell>
          <table:table-cell office:value-type="float" office:value="49" table:style-name="ce9">
            <text:p>49</text:p>
          </table:table-cell>
          <table:table-cell office:value-type="float" office:value="39" table:style-name="ce9">
            <text:p>39</text:p>
          </table:table-cell>
          <table:table-cell office:value-type="float" office:value="4096" table:style-name="ce9">
            <text:p>4096</text:p>
          </table:table-cell>
          <table:table-cell office:value-type="float" office:value="101" table:style-name="ce9">
            <text:p>101</text:p>
          </table:table-cell>
          <table:table-cell office:value-type="float" office:value="4145" table:formula="of:=SUM([.G502]+[.E502])" table:style-name="ce15">
            <text:p>4145</text:p>
          </table:table-cell>
          <table:table-cell office:value-type="float" office:value="-62" table:formula="of:=[.F502]-[.H502]" table:style-name="ce15">
            <text:p>-62</text:p>
          </table:table-cell>
          <table:table-cell office:value-type="percentage" office:value="-1.4234016887816647E-2" table:formula="of:=([.I503]-[.I502])/[.I502]" table:style-name="ce16">
            <text:p>-1%</text:p>
          </table:table-cell>
          <table:table-cell office:value-type="string" office:string-value="Valid" table:formula="of:=IF([.F502]&lt;=[.E502]; &quot;Valid&quot;; &quot;Invalid&quot;)" table:style-name="ce17">
            <text:p>Valid</text:p>
          </table:table-cell>
          <table:table-cell office:value-type="string" office:string-value="Valid" table:formula="of:=IF([.H502]&lt;=[.G502]; &quot;Valid&quot;; &quot;Invalid&quot;)" table:style-name="ce17">
            <text:p>Valid</text:p>
          </table:table-cell>
          <table:table-cell office:value-type="string" office:string-value="Stable/Reducing" table:formula="of:=IF([.J502]&gt;0; &quot;Increasing Pressure&quot;; &quot;Stable/Reducing&quot;)" table:style-name="ce18">
            <text:p>Stable/Reducing</text:p>
          </table:table-cell>
          <table:table-cell office:value-type="float" office:value="2.5897435897435899" table:formula="of:=IFERROR([.H502]/[.F502]; 0)" table:style-name="ce17">
            <text:p>2.58974359</text:p>
          </table:table-cell>
          <table:table-cell office:value-type="float" office:value="3698.2857142857142" table:formula="of:=AVERAGE([.I502:.I508])" table:style-name="ce15">
            <text:p>3698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1-29T00:00:00" table:style-name="ce14">
            <text:p>29-01-2025</text:p>
          </table:table-cell>
          <table:table-cell office:value-type="string" office:string-value="January" table:formula="of:=TEXT([.A503]; &quot;mmmm&quot;)" table:style-name="ce14">
            <text:p>January</text:p>
          </table:table-cell>
          <table:table-cell office:value-type="string" office:string-value="2025-01" table:formula="of:=TEXT([.A503]; &quot;yyyy-mm&quot;)" table:style-name="ce14">
            <text:p>2025-01</text:p>
          </table:table-cell>
          <table:table-cell office:value-type="float" office:value="32" table:style-name="ce9">
            <text:p>32</text:p>
          </table:table-cell>
          <table:table-cell office:value-type="float" office:value="50" table:style-name="ce9">
            <text:p>50</text:p>
          </table:table-cell>
          <table:table-cell office:value-type="float" office:value="39" table:style-name="ce9">
            <text:p>39</text:p>
          </table:table-cell>
          <table:table-cell office:value-type="float" office:value="4036" table:style-name="ce9">
            <text:p>4036</text:p>
          </table:table-cell>
          <table:table-cell office:value-type="float" office:value="99" table:style-name="ce9">
            <text:p>99</text:p>
          </table:table-cell>
          <table:table-cell office:value-type="float" office:value="4086" table:formula="of:=SUM([.G503]+[.E503])" table:style-name="ce15">
            <text:p>4086</text:p>
          </table:table-cell>
          <table:table-cell office:value-type="float" office:value="-60" table:formula="of:=[.F503]-[.H503]" table:style-name="ce15">
            <text:p>-60</text:p>
          </table:table-cell>
          <table:table-cell office:value-type="percentage" office:value="-2.9613313754282916E-2" table:formula="of:=([.I504]-[.I503])/[.I503]" table:style-name="ce16">
            <text:p>-3%</text:p>
          </table:table-cell>
          <table:table-cell office:value-type="string" office:string-value="Valid" table:formula="of:=IF([.F503]&lt;=[.E503]; &quot;Valid&quot;; &quot;Invalid&quot;)" table:style-name="ce17">
            <text:p>Valid</text:p>
          </table:table-cell>
          <table:table-cell office:value-type="string" office:string-value="Valid" table:formula="of:=IF([.H503]&lt;=[.G503]; &quot;Valid&quot;; &quot;Invalid&quot;)" table:style-name="ce17">
            <text:p>Valid</text:p>
          </table:table-cell>
          <table:table-cell office:value-type="string" office:string-value="Stable/Reducing" table:formula="of:=IF([.J503]&gt;0; &quot;Increasing Pressure&quot;; &quot;Stable/Reducing&quot;)" table:style-name="ce18">
            <text:p>Stable/Reducing</text:p>
          </table:table-cell>
          <table:table-cell office:value-type="float" office:value="2.5384615384615383" table:formula="of:=IFERROR([.H503]/[.F503]; 0)" table:style-name="ce17">
            <text:p>2.538461538</text:p>
          </table:table-cell>
          <table:table-cell office:value-type="float" office:value="3565.1428571428573" table:formula="of:=AVERAGE([.I503:.I509])" table:style-name="ce15">
            <text:p>3565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1-30T00:00:00" table:style-name="ce14">
            <text:p>30-01-2025</text:p>
          </table:table-cell>
          <table:table-cell office:value-type="string" office:string-value="January" table:formula="of:=TEXT([.A504]; &quot;mmmm&quot;)" table:style-name="ce14">
            <text:p>January</text:p>
          </table:table-cell>
          <table:table-cell office:value-type="string" office:string-value="2025-01" table:formula="of:=TEXT([.A504]; &quot;yyyy-mm&quot;)" table:style-name="ce14">
            <text:p>2025-01</text:p>
          </table:table-cell>
          <table:table-cell office:value-type="float" office:value="47" table:style-name="ce9">
            <text:p>47</text:p>
          </table:table-cell>
          <table:table-cell office:value-type="float" office:value="42" table:style-name="ce9">
            <text:p>42</text:p>
          </table:table-cell>
          <table:table-cell office:value-type="float" office:value="47" table:style-name="ce9">
            <text:p>47</text:p>
          </table:table-cell>
          <table:table-cell office:value-type="float" office:value="3923" table:style-name="ce9">
            <text:p>3923</text:p>
          </table:table-cell>
          <table:table-cell office:value-type="float" office:value="159" table:style-name="ce9">
            <text:p>159</text:p>
          </table:table-cell>
          <table:table-cell office:value-type="float" office:value="3965" table:formula="of:=SUM([.G504]+[.E504])" table:style-name="ce15">
            <text:p>3965</text:p>
          </table:table-cell>
          <table:table-cell office:value-type="float" office:value="-112" table:formula="of:=[.F504]-[.H504]" table:style-name="ce15">
            <text:p>-112</text:p>
          </table:table-cell>
          <table:table-cell office:value-type="percentage" office:value="-0.11601513240857503" table:formula="of:=([.I505]-[.I504])/[.I504]" table:style-name="ce16">
            <text:p>-12%</text:p>
          </table:table-cell>
          <table:table-cell office:value-type="string" office:string-value="Invalid" table:formula="of:=IF([.F504]&lt;=[.E504]; &quot;Valid&quot;; &quot;Invalid&quot;)" table:style-name="ce17">
            <text:p>Invalid</text:p>
          </table:table-cell>
          <table:table-cell office:value-type="string" office:string-value="Valid" table:formula="of:=IF([.H504]&lt;=[.G504]; &quot;Valid&quot;; &quot;Invalid&quot;)" table:style-name="ce17">
            <text:p>Valid</text:p>
          </table:table-cell>
          <table:table-cell office:value-type="string" office:string-value="Stable/Reducing" table:formula="of:=IF([.J504]&gt;0; &quot;Increasing Pressure&quot;; &quot;Stable/Reducing&quot;)" table:style-name="ce18">
            <text:p>Stable/Reducing</text:p>
          </table:table-cell>
          <table:table-cell office:value-type="float" office:value="3.3829787234042552" table:formula="of:=IFERROR([.H504]/[.F504]; 0)" table:style-name="ce17">
            <text:p>3.382978723</text:p>
          </table:table-cell>
          <table:table-cell office:value-type="float" office:value="3394.4285714285716" table:formula="of:=AVERAGE([.I504:.I510])" table:style-name="ce15">
            <text:p>3394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2-02T00:00:00" table:style-name="ce14">
            <text:p>02-02-2025</text:p>
          </table:table-cell>
          <table:table-cell office:value-type="string" office:string-value="February" table:formula="of:=TEXT([.A505]; &quot;mmmm&quot;)" table:style-name="ce14">
            <text:p>February</text:p>
          </table:table-cell>
          <table:table-cell office:value-type="string" office:string-value="2025-02" table:formula="of:=TEXT([.A505]; &quot;yyyy-mm&quot;)" table:style-name="ce14">
            <text:p>2025-02</text:p>
          </table:table-cell>
          <table:table-cell office:value-type="float" office:value="20" table:style-name="ce9">
            <text:p>20</text:p>
          </table:table-cell>
          <table:table-cell office:value-type="float" office:value="22" table:style-name="ce9">
            <text:p>22</text:p>
          </table:table-cell>
          <table:table-cell office:value-type="float" office:value="41" table:style-name="ce9">
            <text:p>41</text:p>
          </table:table-cell>
          <table:table-cell office:value-type="float" office:value="3483" table:style-name="ce9">
            <text:p>3483</text:p>
          </table:table-cell>
          <table:table-cell office:value-type="float" office:value="168" table:style-name="ce9">
            <text:p>168</text:p>
          </table:table-cell>
          <table:table-cell office:value-type="float" office:value="3505" table:formula="of:=SUM([.G505]+[.E505])" table:style-name="ce15">
            <text:p>3505</text:p>
          </table:table-cell>
          <table:table-cell office:value-type="float" office:value="-127" table:formula="of:=[.F505]-[.H505]" table:style-name="ce15">
            <text:p>-127</text:p>
          </table:table-cell>
          <table:table-cell office:value-type="percentage" office:value="-1.6262482168330955E-2" table:formula="of:=([.I506]-[.I505])/[.I505]" table:style-name="ce16">
            <text:p>-2%</text:p>
          </table:table-cell>
          <table:table-cell office:value-type="string" office:string-value="Invalid" table:formula="of:=IF([.F505]&lt;=[.E505]; &quot;Valid&quot;; &quot;Invalid&quot;)" table:style-name="ce17">
            <text:p>Invalid</text:p>
          </table:table-cell>
          <table:table-cell office:value-type="string" office:string-value="Valid" table:formula="of:=IF([.H505]&lt;=[.G505]; &quot;Valid&quot;; &quot;Invalid&quot;)" table:style-name="ce17">
            <text:p>Valid</text:p>
          </table:table-cell>
          <table:table-cell office:value-type="string" office:string-value="Stable/Reducing" table:formula="of:=IF([.J505]&gt;0; &quot;Increasing Pressure&quot;; &quot;Stable/Reducing&quot;)" table:style-name="ce18">
            <text:p>Stable/Reducing</text:p>
          </table:table-cell>
          <table:table-cell office:value-type="float" office:value="4.0975609756097562" table:formula="of:=IFERROR([.H505]/[.F505]; 0)" table:style-name="ce17">
            <text:p>4.097560976</text:p>
          </table:table-cell>
          <table:table-cell office:value-type="float" office:value="3235.4285714285716" table:formula="of:=AVERAGE([.I505:.I511])" table:style-name="ce15">
            <text:p>3235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2-03T00:00:00" table:style-name="ce14">
            <text:p>03-02-2025</text:p>
          </table:table-cell>
          <table:table-cell office:value-type="string" office:string-value="February" table:formula="of:=TEXT([.A506]; &quot;mmmm&quot;)" table:style-name="ce14">
            <text:p>February</text:p>
          </table:table-cell>
          <table:table-cell office:value-type="string" office:string-value="2025-02" table:formula="of:=TEXT([.A506]; &quot;yyyy-mm&quot;)" table:style-name="ce14">
            <text:p>2025-02</text:p>
          </table:table-cell>
          <table:table-cell office:value-type="float" office:value="23" table:style-name="ce9">
            <text:p>23</text:p>
          </table:table-cell>
          <table:table-cell office:value-type="float" office:value="45" table:style-name="ce9">
            <text:p>45</text:p>
          </table:table-cell>
          <table:table-cell office:value-type="float" office:value="11" table:style-name="ce9">
            <text:p>11</text:p>
          </table:table-cell>
          <table:table-cell office:value-type="float" office:value="3403" table:style-name="ce9">
            <text:p>3403</text:p>
          </table:table-cell>
          <table:table-cell office:value-type="float" office:value="102" table:style-name="ce9">
            <text:p>102</text:p>
          </table:table-cell>
          <table:table-cell office:value-type="float" office:value="3448" table:formula="of:=SUM([.G506]+[.E506])" table:style-name="ce15">
            <text:p>3448</text:p>
          </table:table-cell>
          <table:table-cell office:value-type="float" office:value="-91" table:formula="of:=[.F506]-[.H506]" table:style-name="ce15">
            <text:p>-91</text:p>
          </table:table-cell>
          <table:table-cell office:value-type="percentage" office:value="-1.0150812064965197E-2" table:formula="of:=([.I507]-[.I506])/[.I506]" table:style-name="ce16">
            <text:p>-1%</text:p>
          </table:table-cell>
          <table:table-cell office:value-type="string" office:string-value="Valid" table:formula="of:=IF([.F506]&lt;=[.E506]; &quot;Valid&quot;; &quot;Invalid&quot;)" table:style-name="ce17">
            <text:p>Valid</text:p>
          </table:table-cell>
          <table:table-cell office:value-type="string" office:string-value="Valid" table:formula="of:=IF([.H506]&lt;=[.G506]; &quot;Valid&quot;; &quot;Invalid&quot;)" table:style-name="ce17">
            <text:p>Valid</text:p>
          </table:table-cell>
          <table:table-cell office:value-type="string" office:string-value="Stable/Reducing" table:formula="of:=IF([.J506]&gt;0; &quot;Increasing Pressure&quot;; &quot;Stable/Reducing&quot;)" table:style-name="ce18">
            <text:p>Stable/Reducing</text:p>
          </table:table-cell>
          <table:table-cell office:value-type="float" office:value="9.2727272727272734" table:formula="of:=IFERROR([.H506]/[.F506]; 0)" table:style-name="ce17">
            <text:p>9.272727273</text:p>
          </table:table-cell>
          <table:table-cell office:value-type="float" office:value="3137.7142857142858" table:formula="of:=AVERAGE([.I506:.I512])" table:style-name="ce15">
            <text:p>3138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2-04T00:00:00" table:style-name="ce14">
            <text:p>04-02-2025</text:p>
          </table:table-cell>
          <table:table-cell office:value-type="string" office:string-value="February" table:formula="of:=TEXT([.A507]; &quot;mmmm&quot;)" table:style-name="ce14">
            <text:p>February</text:p>
          </table:table-cell>
          <table:table-cell office:value-type="string" office:string-value="2025-02" table:formula="of:=TEXT([.A507]; &quot;yyyy-mm&quot;)" table:style-name="ce14">
            <text:p>2025-02</text:p>
          </table:table-cell>
          <table:table-cell office:value-type="float" office:value="34" table:style-name="ce9">
            <text:p>34</text:p>
          </table:table-cell>
          <table:table-cell office:value-type="float" office:value="54" table:style-name="ce9">
            <text:p>54</text:p>
          </table:table-cell>
          <table:table-cell office:value-type="float" office:value="29" table:style-name="ce9">
            <text:p>29</text:p>
          </table:table-cell>
          <table:table-cell office:value-type="float" office:value="3359" table:style-name="ce9">
            <text:p>3359</text:p>
          </table:table-cell>
          <table:table-cell office:value-type="float" office:value="74" table:style-name="ce9">
            <text:p>74</text:p>
          </table:table-cell>
          <table:table-cell office:value-type="float" office:value="3413" table:formula="of:=SUM([.G507]+[.E507])" table:style-name="ce15">
            <text:p>3413</text:p>
          </table:table-cell>
          <table:table-cell office:value-type="float" office:value="-45" table:formula="of:=[.F507]-[.H507]" table:style-name="ce15">
            <text:p>-45</text:p>
          </table:table-cell>
          <table:table-cell office:value-type="percentage" office:value="-2.5490770583064752E-2" table:formula="of:=([.I508]-[.I507])/[.I507]" table:style-name="ce16">
            <text:p>-3%</text:p>
          </table:table-cell>
          <table:table-cell office:value-type="string" office:string-value="Valid" table:formula="of:=IF([.F507]&lt;=[.E507]; &quot;Valid&quot;; &quot;Invalid&quot;)" table:style-name="ce17">
            <text:p>Valid</text:p>
          </table:table-cell>
          <table:table-cell office:value-type="string" office:string-value="Valid" table:formula="of:=IF([.H507]&lt;=[.G507]; &quot;Valid&quot;; &quot;Invalid&quot;)" table:style-name="ce17">
            <text:p>Valid</text:p>
          </table:table-cell>
          <table:table-cell office:value-type="string" office:string-value="Stable/Reducing" table:formula="of:=IF([.J507]&gt;0; &quot;Increasing Pressure&quot;; &quot;Stable/Reducing&quot;)" table:style-name="ce18">
            <text:p>Stable/Reducing</text:p>
          </table:table-cell>
          <table:table-cell office:value-type="float" office:value="2.5517241379310347" table:formula="of:=IFERROR([.H507]/[.F507]; 0)" table:style-name="ce17">
            <text:p>2.551724138</text:p>
          </table:table-cell>
          <table:table-cell office:value-type="float" office:value="3041.1428571428573" table:formula="of:=AVERAGE([.I507:.I513])" table:style-name="ce15">
            <text:p>3041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2-05T00:00:00" table:style-name="ce14">
            <text:p>05-02-2025</text:p>
          </table:table-cell>
          <table:table-cell office:value-type="string" office:string-value="February" table:formula="of:=TEXT([.A508]; &quot;mmmm&quot;)" table:style-name="ce14">
            <text:p>February</text:p>
          </table:table-cell>
          <table:table-cell office:value-type="string" office:string-value="2025-02" table:formula="of:=TEXT([.A508]; &quot;yyyy-mm&quot;)" table:style-name="ce14">
            <text:p>2025-02</text:p>
          </table:table-cell>
          <table:table-cell office:value-type="float" office:value="26" table:style-name="ce9">
            <text:p>26</text:p>
          </table:table-cell>
          <table:table-cell office:value-type="float" office:value="36" table:style-name="ce9">
            <text:p>36</text:p>
          </table:table-cell>
          <table:table-cell office:value-type="float" office:value="36" table:style-name="ce9">
            <text:p>36</text:p>
          </table:table-cell>
          <table:table-cell office:value-type="float" office:value="3290" table:style-name="ce9">
            <text:p>3290</text:p>
          </table:table-cell>
          <table:table-cell office:value-type="float" office:value="104" table:style-name="ce9">
            <text:p>104</text:p>
          </table:table-cell>
          <table:table-cell office:value-type="float" office:value="3326" table:formula="of:=SUM([.G508]+[.E508])" table:style-name="ce15">
            <text:p>3326</text:p>
          </table:table-cell>
          <table:table-cell office:value-type="float" office:value="-68" table:formula="of:=[.F508]-[.H508]" table:style-name="ce15">
            <text:p>-68</text:p>
          </table:table-cell>
          <table:table-cell office:value-type="percentage" office:value="-3.3974744437763077E-2" table:formula="of:=([.I509]-[.I508])/[.I508]" table:style-name="ce16">
            <text:p>-3%</text:p>
          </table:table-cell>
          <table:table-cell office:value-type="string" office:string-value="Valid" table:formula="of:=IF([.F508]&lt;=[.E508]; &quot;Valid&quot;; &quot;Invalid&quot;)" table:style-name="ce17">
            <text:p>Valid</text:p>
          </table:table-cell>
          <table:table-cell office:value-type="string" office:string-value="Valid" table:formula="of:=IF([.H508]&lt;=[.G508]; &quot;Valid&quot;; &quot;Invalid&quot;)" table:style-name="ce17">
            <text:p>Valid</text:p>
          </table:table-cell>
          <table:table-cell office:value-type="string" office:string-value="Stable/Reducing" table:formula="of:=IF([.J508]&gt;0; &quot;Increasing Pressure&quot;; &quot;Stable/Reducing&quot;)" table:style-name="ce18">
            <text:p>Stable/Reducing</text:p>
          </table:table-cell>
          <table:table-cell office:value-type="float" office:value="2.8888888888888888" table:formula="of:=IFERROR([.H508]/[.F508]; 0)" table:style-name="ce17">
            <text:p>2.888888889</text:p>
          </table:table-cell>
          <table:table-cell office:value-type="float" office:value="2941.1428571428573" table:formula="of:=AVERAGE([.I508:.I514])" table:style-name="ce15">
            <text:p>2941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2-06T00:00:00" table:style-name="ce14">
            <text:p>06-02-2025</text:p>
          </table:table-cell>
          <table:table-cell office:value-type="string" office:string-value="February" table:formula="of:=TEXT([.A509]; &quot;mmmm&quot;)" table:style-name="ce14">
            <text:p>February</text:p>
          </table:table-cell>
          <table:table-cell office:value-type="string" office:string-value="2025-02" table:formula="of:=TEXT([.A509]; &quot;yyyy-mm&quot;)" table:style-name="ce14">
            <text:p>2025-02</text:p>
          </table:table-cell>
          <table:table-cell office:value-type="float" office:value="25" table:style-name="ce9">
            <text:p>25</text:p>
          </table:table-cell>
          <table:table-cell office:value-type="float" office:value="32" table:style-name="ce9">
            <text:p>32</text:p>
          </table:table-cell>
          <table:table-cell office:value-type="float" office:value="27" table:style-name="ce9">
            <text:p>27</text:p>
          </table:table-cell>
          <table:table-cell office:value-type="float" office:value="3181" table:style-name="ce9">
            <text:p>3181</text:p>
          </table:table-cell>
          <table:table-cell office:value-type="float" office:value="145" table:style-name="ce9">
            <text:p>145</text:p>
          </table:table-cell>
          <table:table-cell office:value-type="float" office:value="3213" table:formula="of:=SUM([.G509]+[.E509])" table:style-name="ce15">
            <text:p>3213</text:p>
          </table:table-cell>
          <table:table-cell office:value-type="float" office:value="-118" table:formula="of:=[.F509]-[.H509]" table:style-name="ce15">
            <text:p>-118</text:p>
          </table:table-cell>
          <table:table-cell office:value-type="percentage" office:value="-0.10021786492374728" table:formula="of:=([.I510]-[.I509])/[.I509]" table:style-name="ce16">
            <text:p>-10%</text:p>
          </table:table-cell>
          <table:table-cell office:value-type="string" office:string-value="Valid" table:formula="of:=IF([.F509]&lt;=[.E509]; &quot;Valid&quot;; &quot;Invalid&quot;)" table:style-name="ce17">
            <text:p>Valid</text:p>
          </table:table-cell>
          <table:table-cell office:value-type="string" office:string-value="Valid" table:formula="of:=IF([.H509]&lt;=[.G509]; &quot;Valid&quot;; &quot;Invalid&quot;)" table:style-name="ce17">
            <text:p>Valid</text:p>
          </table:table-cell>
          <table:table-cell office:value-type="string" office:string-value="Stable/Reducing" table:formula="of:=IF([.J509]&gt;0; &quot;Increasing Pressure&quot;; &quot;Stable/Reducing&quot;)" table:style-name="ce18">
            <text:p>Stable/Reducing</text:p>
          </table:table-cell>
          <table:table-cell office:value-type="float" office:value="5.3703703703703702" table:formula="of:=IFERROR([.H509]/[.F509]; 0)" table:style-name="ce17">
            <text:p>5.37037037</text:p>
          </table:table-cell>
          <table:table-cell office:value-type="float" office:value="2830.1428571428573" table:formula="of:=AVERAGE([.I509:.I515])" table:style-name="ce15">
            <text:p>2830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2-09T00:00:00" table:style-name="ce14">
            <text:p>09-02-2025</text:p>
          </table:table-cell>
          <table:table-cell office:value-type="string" office:string-value="February" table:formula="of:=TEXT([.A510]; &quot;mmmm&quot;)" table:style-name="ce14">
            <text:p>February</text:p>
          </table:table-cell>
          <table:table-cell office:value-type="string" office:string-value="2025-02" table:formula="of:=TEXT([.A510]; &quot;yyyy-mm&quot;)" table:style-name="ce14">
            <text:p>2025-02</text:p>
          </table:table-cell>
          <table:table-cell office:value-type="float" office:value="15" table:style-name="ce9">
            <text:p>15</text:p>
          </table:table-cell>
          <table:table-cell office:value-type="float" office:value="13" table:style-name="ce9">
            <text:p>13</text:p>
          </table:table-cell>
          <table:table-cell office:value-type="float" office:value="23" table:style-name="ce9">
            <text:p>23</text:p>
          </table:table-cell>
          <table:table-cell office:value-type="float" office:value="2878" table:style-name="ce9">
            <text:p>2878</text:p>
          </table:table-cell>
          <table:table-cell office:value-type="float" office:value="99" table:style-name="ce9">
            <text:p>99</text:p>
          </table:table-cell>
          <table:table-cell office:value-type="float" office:value="2891" table:formula="of:=SUM([.G510]+[.E510])" table:style-name="ce15">
            <text:p>2891</text:p>
          </table:table-cell>
          <table:table-cell office:value-type="float" office:value="-76" table:formula="of:=[.F510]-[.H510]" table:style-name="ce15">
            <text:p>-76</text:p>
          </table:table-cell>
          <table:table-cell office:value-type="percentage" office:value="-1.349014181943964E-2" table:formula="of:=([.I511]-[.I510])/[.I510]" table:style-name="ce16">
            <text:p>-1%</text:p>
          </table:table-cell>
          <table:table-cell office:value-type="string" office:string-value="Invalid" table:formula="of:=IF([.F510]&lt;=[.E510]; &quot;Valid&quot;; &quot;Invalid&quot;)" table:style-name="ce17">
            <text:p>Invalid</text:p>
          </table:table-cell>
          <table:table-cell office:value-type="string" office:string-value="Valid" table:formula="of:=IF([.H510]&lt;=[.G510]; &quot;Valid&quot;; &quot;Invalid&quot;)" table:style-name="ce17">
            <text:p>Valid</text:p>
          </table:table-cell>
          <table:table-cell office:value-type="string" office:string-value="Stable/Reducing" table:formula="of:=IF([.J510]&gt;0; &quot;Increasing Pressure&quot;; &quot;Stable/Reducing&quot;)" table:style-name="ce18">
            <text:p>Stable/Reducing</text:p>
          </table:table-cell>
          <table:table-cell office:value-type="float" office:value="4.3043478260869561" table:formula="of:=IFERROR([.H510]/[.F510]; 0)" table:style-name="ce17">
            <text:p>4.304347826</text:p>
          </table:table-cell>
          <table:table-cell office:value-type="float" office:value="2736.1428571428573" table:formula="of:=AVERAGE([.I510:.I516])" table:style-name="ce15">
            <text:p>2736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2-10T00:00:00" table:style-name="ce14">
            <text:p>10-02-2025</text:p>
          </table:table-cell>
          <table:table-cell office:value-type="string" office:string-value="February" table:formula="of:=TEXT([.A511]; &quot;mmmm&quot;)" table:style-name="ce14">
            <text:p>February</text:p>
          </table:table-cell>
          <table:table-cell office:value-type="string" office:string-value="2025-02" table:formula="of:=TEXT([.A511]; &quot;yyyy-mm&quot;)" table:style-name="ce14">
            <text:p>2025-02</text:p>
          </table:table-cell>
          <table:table-cell office:value-type="float" office:value="16" table:style-name="ce9">
            <text:p>16</text:p>
          </table:table-cell>
          <table:table-cell office:value-type="float" office:value="18" table:style-name="ce9">
            <text:p>18</text:p>
          </table:table-cell>
          <table:table-cell office:value-type="float" office:value="15" table:style-name="ce9">
            <text:p>15</text:p>
          </table:table-cell>
          <table:table-cell office:value-type="float" office:value="2834" table:style-name="ce9">
            <text:p>2834</text:p>
          </table:table-cell>
          <table:table-cell office:value-type="float" office:value="63" table:style-name="ce9">
            <text:p>63</text:p>
          </table:table-cell>
          <table:table-cell office:value-type="float" office:value="2852" table:formula="of:=SUM([.G511]+[.E511])" table:style-name="ce15">
            <text:p>2852</text:p>
          </table:table-cell>
          <table:table-cell office:value-type="float" office:value="-48" table:formula="of:=[.F511]-[.H511]" table:style-name="ce15">
            <text:p>-48</text:p>
          </table:table-cell>
          <table:table-cell office:value-type="percentage" office:value="-1.0869565217391304E-2" table:formula="of:=([.I512]-[.I511])/[.I511]" table:style-name="ce16">
            <text:p>-1%</text:p>
          </table:table-cell>
          <table:table-cell office:value-type="string" office:string-value="Valid" table:formula="of:=IF([.F511]&lt;=[.E511]; &quot;Valid&quot;; &quot;Invalid&quot;)" table:style-name="ce17">
            <text:p>Valid</text:p>
          </table:table-cell>
          <table:table-cell office:value-type="string" office:string-value="Valid" table:formula="of:=IF([.H511]&lt;=[.G511]; &quot;Valid&quot;; &quot;Invalid&quot;)" table:style-name="ce17">
            <text:p>Valid</text:p>
          </table:table-cell>
          <table:table-cell office:value-type="string" office:string-value="Stable/Reducing" table:formula="of:=IF([.J511]&gt;0; &quot;Increasing Pressure&quot;; &quot;Stable/Reducing&quot;)" table:style-name="ce18">
            <text:p>Stable/Reducing</text:p>
          </table:table-cell>
          <table:table-cell office:value-type="float" office:value="4.2" table:formula="of:=IFERROR([.H511]/[.F511]; 0)" table:style-name="ce17">
            <text:p>4.2</text:p>
          </table:table-cell>
          <table:table-cell office:value-type="float" office:value="2686.7142857142858" table:formula="of:=AVERAGE([.I511:.I517])" table:style-name="ce15">
            <text:p>2687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2-11T00:00:00" table:style-name="ce14">
            <text:p>11-02-2025</text:p>
          </table:table-cell>
          <table:table-cell office:value-type="string" office:string-value="February" table:formula="of:=TEXT([.A512]; &quot;mmmm&quot;)" table:style-name="ce14">
            <text:p>February</text:p>
          </table:table-cell>
          <table:table-cell office:value-type="string" office:string-value="2025-02" table:formula="of:=TEXT([.A512]; &quot;yyyy-mm&quot;)" table:style-name="ce14">
            <text:p>2025-02</text:p>
          </table:table-cell>
          <table:table-cell office:value-type="float" office:value="11" table:style-name="ce9">
            <text:p>11</text:p>
          </table:table-cell>
          <table:table-cell office:value-type="float" office:value="22" table:style-name="ce9">
            <text:p>22</text:p>
          </table:table-cell>
          <table:table-cell office:value-type="float" office:value="12" table:style-name="ce9">
            <text:p>12</text:p>
          </table:table-cell>
          <table:table-cell office:value-type="float" office:value="2799" table:style-name="ce9">
            <text:p>2799</text:p>
          </table:table-cell>
          <table:table-cell office:value-type="float" office:value="50" table:style-name="ce9">
            <text:p>50</text:p>
          </table:table-cell>
          <table:table-cell office:value-type="float" office:value="2821" table:formula="of:=SUM([.G512]+[.E512])" table:style-name="ce15">
            <text:p>2821</text:p>
          </table:table-cell>
          <table:table-cell office:value-type="float" office:value="-38" table:formula="of:=[.F512]-[.H512]" table:style-name="ce15">
            <text:p>-38</text:p>
          </table:table-cell>
          <table:table-cell office:value-type="percentage" office:value="-1.7369727047146403E-2" table:formula="of:=([.I513]-[.I512])/[.I512]" table:style-name="ce16">
            <text:p>-2%</text:p>
          </table:table-cell>
          <table:table-cell office:value-type="string" office:string-value="Valid" table:formula="of:=IF([.F512]&lt;=[.E512]; &quot;Valid&quot;; &quot;Invalid&quot;)" table:style-name="ce17">
            <text:p>Valid</text:p>
          </table:table-cell>
          <table:table-cell office:value-type="string" office:string-value="Valid" table:formula="of:=IF([.H512]&lt;=[.G512]; &quot;Valid&quot;; &quot;Invalid&quot;)" table:style-name="ce17">
            <text:p>Valid</text:p>
          </table:table-cell>
          <table:table-cell office:value-type="string" office:string-value="Stable/Reducing" table:formula="of:=IF([.J512]&gt;0; &quot;Increasing Pressure&quot;; &quot;Stable/Reducing&quot;)" table:style-name="ce18">
            <text:p>Stable/Reducing</text:p>
          </table:table-cell>
          <table:table-cell office:value-type="float" office:value="4.166666666666667" table:formula="of:=IFERROR([.H512]/[.F512]; 0)" table:style-name="ce17">
            <text:p>4.166666667</text:p>
          </table:table-cell>
          <table:table-cell office:value-type="float" office:value="2642.8571428571427" table:formula="of:=AVERAGE([.I512:.I518])" table:style-name="ce15">
            <text:p>2643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2-12T00:00:00" table:style-name="ce14">
            <text:p>12-02-2025</text:p>
          </table:table-cell>
          <table:table-cell office:value-type="string" office:string-value="February" table:formula="of:=TEXT([.A513]; &quot;mmmm&quot;)" table:style-name="ce14">
            <text:p>February</text:p>
          </table:table-cell>
          <table:table-cell office:value-type="string" office:string-value="2025-02" table:formula="of:=TEXT([.A513]; &quot;yyyy-mm&quot;)" table:style-name="ce14">
            <text:p>2025-02</text:p>
          </table:table-cell>
          <table:table-cell office:value-type="float" office:value="16" table:style-name="ce9">
            <text:p>16</text:p>
          </table:table-cell>
          <table:table-cell office:value-type="float" office:value="20" table:style-name="ce9">
            <text:p>20</text:p>
          </table:table-cell>
          <table:table-cell office:value-type="float" office:value="20" table:style-name="ce9">
            <text:p>20</text:p>
          </table:table-cell>
          <table:table-cell office:value-type="float" office:value="2752" table:style-name="ce9">
            <text:p>2752</text:p>
          </table:table-cell>
          <table:table-cell office:value-type="float" office:value="66" table:style-name="ce9">
            <text:p>66</text:p>
          </table:table-cell>
          <table:table-cell office:value-type="float" office:value="2772" table:formula="of:=SUM([.G513]+[.E513])" table:style-name="ce15">
            <text:p>2772</text:p>
          </table:table-cell>
          <table:table-cell office:value-type="float" office:value="-46" table:formula="of:=[.F513]-[.H513]" table:style-name="ce15">
            <text:p>-46</text:p>
          </table:table-cell>
          <table:table-cell office:value-type="percentage" office:value="-2.1284271284271284E-2" table:formula="of:=([.I514]-[.I513])/[.I513]" table:style-name="ce16">
            <text:p>-2%</text:p>
          </table:table-cell>
          <table:table-cell office:value-type="string" office:string-value="Valid" table:formula="of:=IF([.F513]&lt;=[.E513]; &quot;Valid&quot;; &quot;Invalid&quot;)" table:style-name="ce17">
            <text:p>Valid</text:p>
          </table:table-cell>
          <table:table-cell office:value-type="string" office:string-value="Valid" table:formula="of:=IF([.H513]&lt;=[.G513]; &quot;Valid&quot;; &quot;Invalid&quot;)" table:style-name="ce17">
            <text:p>Valid</text:p>
          </table:table-cell>
          <table:table-cell office:value-type="string" office:string-value="Stable/Reducing" table:formula="of:=IF([.J513]&gt;0; &quot;Increasing Pressure&quot;; &quot;Stable/Reducing&quot;)" table:style-name="ce18">
            <text:p>Stable/Reducing</text:p>
          </table:table-cell>
          <table:table-cell office:value-type="float" office:value="3.3" table:formula="of:=IFERROR([.H513]/[.F513]; 0)" table:style-name="ce17">
            <text:p>3.3</text:p>
          </table:table-cell>
          <table:table-cell office:value-type="float" office:value="2588.2857142857142" table:formula="of:=AVERAGE([.I513:.I519])" table:style-name="ce15">
            <text:p>2588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2-13T00:00:00" table:style-name="ce14">
            <text:p>13-02-2025</text:p>
          </table:table-cell>
          <table:table-cell office:value-type="string" office:string-value="February" table:formula="of:=TEXT([.A514]; &quot;mmmm&quot;)" table:style-name="ce14">
            <text:p>February</text:p>
          </table:table-cell>
          <table:table-cell office:value-type="string" office:string-value="2025-02" table:formula="of:=TEXT([.A514]; &quot;yyyy-mm&quot;)" table:style-name="ce14">
            <text:p>2025-02</text:p>
          </table:table-cell>
          <table:table-cell office:value-type="float" office:value="15" table:style-name="ce9">
            <text:p>15</text:p>
          </table:table-cell>
          <table:table-cell office:value-type="float" office:value="10" table:style-name="ce9">
            <text:p>10</text:p>
          </table:table-cell>
          <table:table-cell office:value-type="float" office:value="23" table:style-name="ce9">
            <text:p>23</text:p>
          </table:table-cell>
          <table:table-cell office:value-type="float" office:value="2703" table:style-name="ce9">
            <text:p>2703</text:p>
          </table:table-cell>
          <table:table-cell office:value-type="float" office:value="72" table:style-name="ce9">
            <text:p>72</text:p>
          </table:table-cell>
          <table:table-cell office:value-type="float" office:value="2713" table:formula="of:=SUM([.G514]+[.E514])" table:style-name="ce15">
            <text:p>2713</text:p>
          </table:table-cell>
          <table:table-cell office:value-type="float" office:value="-49" table:formula="of:=[.F514]-[.H514]" table:style-name="ce15">
            <text:p>-49</text:p>
          </table:table-cell>
          <table:table-cell office:value-type="percentage" office:value="-6.0449686693697012E-2" table:formula="of:=([.I515]-[.I514])/[.I514]" table:style-name="ce16">
            <text:p>-6%</text:p>
          </table:table-cell>
          <table:table-cell office:value-type="string" office:string-value="Invalid" table:formula="of:=IF([.F514]&lt;=[.E514]; &quot;Valid&quot;; &quot;Invalid&quot;)" table:style-name="ce17">
            <text:p>Invalid</text:p>
          </table:table-cell>
          <table:table-cell office:value-type="string" office:string-value="Valid" table:formula="of:=IF([.H514]&lt;=[.G514]; &quot;Valid&quot;; &quot;Invalid&quot;)" table:style-name="ce17">
            <text:p>Valid</text:p>
          </table:table-cell>
          <table:table-cell office:value-type="string" office:string-value="Stable/Reducing" table:formula="of:=IF([.J514]&gt;0; &quot;Increasing Pressure&quot;; &quot;Stable/Reducing&quot;)" table:style-name="ce18">
            <text:p>Stable/Reducing</text:p>
          </table:table-cell>
          <table:table-cell office:value-type="float" office:value="3.1304347826086958" table:formula="of:=IFERROR([.H514]/[.F514]; 0)" table:style-name="ce17">
            <text:p>3.130434783</text:p>
          </table:table-cell>
          <table:table-cell office:value-type="float" office:value="2540.1428571428573" table:formula="of:=AVERAGE([.I514:.I520])" table:style-name="ce15">
            <text:p>2540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2-17T00:00:00" table:style-name="ce14">
            <text:p>17-02-2025</text:p>
          </table:table-cell>
          <table:table-cell office:value-type="string" office:string-value="February" table:formula="of:=TEXT([.A515]; &quot;mmmm&quot;)" table:style-name="ce14">
            <text:p>February</text:p>
          </table:table-cell>
          <table:table-cell office:value-type="string" office:string-value="2025-02" table:formula="of:=TEXT([.A515]; &quot;yyyy-mm&quot;)" table:style-name="ce14">
            <text:p>2025-02</text:p>
          </table:table-cell>
          <table:table-cell office:value-type="float" office:value="8" table:style-name="ce9">
            <text:p>8</text:p>
          </table:table-cell>
          <table:table-cell office:value-type="float" office:value="17" table:style-name="ce9">
            <text:p>17</text:p>
          </table:table-cell>
          <table:table-cell office:value-type="float" office:value="14" table:style-name="ce9">
            <text:p>14</text:p>
          </table:table-cell>
          <table:table-cell office:value-type="float" office:value="2532" table:style-name="ce9">
            <text:p>2532</text:p>
          </table:table-cell>
          <table:table-cell office:value-type="float" office:value="15" table:style-name="ce9">
            <text:p>15</text:p>
          </table:table-cell>
          <table:table-cell office:value-type="float" office:value="2549" table:formula="of:=SUM([.G515]+[.E515])" table:style-name="ce15">
            <text:p>2549</text:p>
          </table:table-cell>
          <table:table-cell office:value-type="float" office:value="-1" table:formula="of:=[.F515]-[.H515]" table:style-name="ce15">
            <text:p>-1</text:p>
          </table:table-cell>
          <table:table-cell office:value-type="percentage" office:value="2.3538642604943117E-3" table:formula="of:=([.I516]-[.I515])/[.I515]" table:style-name="ce16">
            <text:p>0%</text:p>
          </table:table-cell>
          <table:table-cell office:value-type="string" office:string-value="Valid" table:formula="of:=IF([.F515]&lt;=[.E515]; &quot;Valid&quot;; &quot;Invalid&quot;)" table:style-name="ce17">
            <text:p>Valid</text:p>
          </table:table-cell>
          <table:table-cell office:value-type="string" office:string-value="Valid" table:formula="of:=IF([.H515]&lt;=[.G515]; &quot;Valid&quot;; &quot;Invalid&quot;)" table:style-name="ce17">
            <text:p>Valid</text:p>
          </table:table-cell>
          <table:table-cell office:value-type="string" office:string-value="Stable/Reducing" table:formula="of:=IF([.J515]&gt;0; &quot;Increasing Pressure&quot;; &quot;Stable/Reducing&quot;)" table:style-name="ce18">
            <text:p>Stable/Reducing</text:p>
          </table:table-cell>
          <table:table-cell office:value-type="float" office:value="1.0714285714285714" table:formula="of:=IFERROR([.H515]/[.F515]; 0)" table:style-name="ce17">
            <text:p>1.071428571</text:p>
          </table:table-cell>
          <table:table-cell office:value-type="float" office:value="2498.2857142857142" table:formula="of:=AVERAGE([.I515:.I521])" table:style-name="ce15">
            <text:p>2498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2-18T00:00:00" table:style-name="ce14">
            <text:p>18-02-2025</text:p>
          </table:table-cell>
          <table:table-cell office:value-type="string" office:string-value="February" table:formula="of:=TEXT([.A516]; &quot;mmmm&quot;)" table:style-name="ce14">
            <text:p>February</text:p>
          </table:table-cell>
          <table:table-cell office:value-type="string" office:string-value="2025-02" table:formula="of:=TEXT([.A516]; &quot;yyyy-mm&quot;)" table:style-name="ce14">
            <text:p>2025-02</text:p>
          </table:table-cell>
          <table:table-cell office:value-type="float" office:value="18" table:style-name="ce9">
            <text:p>18</text:p>
          </table:table-cell>
          <table:table-cell office:value-type="float" office:value="19" table:style-name="ce9">
            <text:p>19</text:p>
          </table:table-cell>
          <table:table-cell office:value-type="float" office:value="11" table:style-name="ce9">
            <text:p>11</text:p>
          </table:table-cell>
          <table:table-cell office:value-type="float" office:value="2536" table:style-name="ce9">
            <text:p>2536</text:p>
          </table:table-cell>
          <table:table-cell office:value-type="float" office:value="9" table:style-name="ce9">
            <text:p>9</text:p>
          </table:table-cell>
          <table:table-cell office:value-type="float" office:value="2555" table:formula="of:=SUM([.G516]+[.E516])" table:style-name="ce15">
            <text:p>2555</text:p>
          </table:table-cell>
          <table:table-cell office:value-type="float" office:value="2" table:formula="of:=[.F516]-[.H516]" table:style-name="ce15">
            <text:p>2</text:p>
          </table:table-cell>
          <table:table-cell office:value-type="percentage" office:value="-3.9138943248532287E-3" table:formula="of:=([.I517]-[.I516])/[.I516]" table:style-name="ce16">
            <text:p>0%</text:p>
          </table:table-cell>
          <table:table-cell office:value-type="string" office:string-value="Valid" table:formula="of:=IF([.F516]&lt;=[.E516]; &quot;Valid&quot;; &quot;Invalid&quot;)" table:style-name="ce17">
            <text:p>Valid</text:p>
          </table:table-cell>
          <table:table-cell office:value-type="string" office:string-value="Valid" table:formula="of:=IF([.H516]&lt;=[.G516]; &quot;Valid&quot;; &quot;Invalid&quot;)" table:style-name="ce17">
            <text:p>Valid</text:p>
          </table:table-cell>
          <table:table-cell office:value-type="string" office:string-value="Increasing Pressure" table:formula="of:=IF([.J516]&gt;0; &quot;Increasing Pressure&quot;; &quot;Stable/Reducing&quot;)" table:style-name="ce18">
            <text:p>Increasing Pressure</text:p>
          </table:table-cell>
          <table:table-cell office:value-type="float" office:value="0.81818181818181823" table:formula="of:=IFERROR([.H516]/[.F516]; 0)" table:style-name="ce17">
            <text:p>0.818181818</text:p>
          </table:table-cell>
          <table:table-cell office:value-type="float" office:value="2481.5714285714284" table:formula="of:=AVERAGE([.I516:.I522])" table:style-name="ce15">
            <text:p>2482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2-19T00:00:00" table:style-name="ce14">
            <text:p>19-02-2025</text:p>
          </table:table-cell>
          <table:table-cell office:value-type="string" office:string-value="February" table:formula="of:=TEXT([.A517]; &quot;mmmm&quot;)" table:style-name="ce14">
            <text:p>February</text:p>
          </table:table-cell>
          <table:table-cell office:value-type="string" office:string-value="2025-02" table:formula="of:=TEXT([.A517]; &quot;yyyy-mm&quot;)" table:style-name="ce14">
            <text:p>2025-02</text:p>
          </table:table-cell>
          <table:table-cell office:value-type="float" office:value="12" table:style-name="ce9">
            <text:p>12</text:p>
          </table:table-cell>
          <table:table-cell office:value-type="float" office:value="17" table:style-name="ce9">
            <text:p>17</text:p>
          </table:table-cell>
          <table:table-cell office:value-type="float" office:value="17" table:style-name="ce9">
            <text:p>17</text:p>
          </table:table-cell>
          <table:table-cell office:value-type="float" office:value="2528" table:style-name="ce9">
            <text:p>2528</text:p>
          </table:table-cell>
          <table:table-cell office:value-type="float" office:value="19" table:style-name="ce9">
            <text:p>19</text:p>
          </table:table-cell>
          <table:table-cell office:value-type="float" office:value="2545" table:formula="of:=SUM([.G517]+[.E517])" table:style-name="ce15">
            <text:p>2545</text:p>
          </table:table-cell>
          <table:table-cell office:value-type="float" office:value="-2" table:formula="of:=[.F517]-[.H517]" table:style-name="ce15">
            <text:p>-2</text:p>
          </table:table-cell>
          <table:table-cell office:value-type="percentage" office:value="0" table:formula="of:=([.I518]-[.I517])/[.I517]" table:style-name="ce16">
            <text:p>0%</text:p>
          </table:table-cell>
          <table:table-cell office:value-type="string" office:string-value="Valid" table:formula="of:=IF([.F517]&lt;=[.E517]; &quot;Valid&quot;; &quot;Invalid&quot;)" table:style-name="ce17">
            <text:p>Valid</text:p>
          </table:table-cell>
          <table:table-cell office:value-type="string" office:string-value="Valid" table:formula="of:=IF([.H517]&lt;=[.G517]; &quot;Valid&quot;; &quot;Invalid&quot;)" table:style-name="ce17">
            <text:p>Valid</text:p>
          </table:table-cell>
          <table:table-cell office:value-type="string" office:string-value="Stable/Reducing" table:formula="of:=IF([.J517]&gt;0; &quot;Increasing Pressure&quot;; &quot;Stable/Reducing&quot;)" table:style-name="ce18">
            <text:p>Stable/Reducing</text:p>
          </table:table-cell>
          <table:table-cell office:value-type="float" office:value="1.1176470588235294" table:formula="of:=IFERROR([.H517]/[.F517]; 0)" table:style-name="ce17">
            <text:p>1.117647059</text:p>
          </table:table-cell>
          <table:table-cell office:value-type="float" office:value="2460.2857142857142" table:formula="of:=AVERAGE([.I517:.I523])" table:style-name="ce15">
            <text:p>2460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2-20T00:00:00" table:style-name="ce14">
            <text:p>20-02-2025</text:p>
          </table:table-cell>
          <table:table-cell office:value-type="string" office:string-value="February" table:formula="of:=TEXT([.A518]; &quot;mmmm&quot;)" table:style-name="ce14">
            <text:p>February</text:p>
          </table:table-cell>
          <table:table-cell office:value-type="string" office:string-value="2025-02" table:formula="of:=TEXT([.A518]; &quot;yyyy-mm&quot;)" table:style-name="ce14">
            <text:p>2025-02</text:p>
          </table:table-cell>
          <table:table-cell office:value-type="float" office:value="13" table:style-name="ce9">
            <text:p>13</text:p>
          </table:table-cell>
          <table:table-cell office:value-type="float" office:value="25" table:style-name="ce9">
            <text:p>25</text:p>
          </table:table-cell>
          <table:table-cell office:value-type="float" office:value="15" table:style-name="ce9">
            <text:p>15</text:p>
          </table:table-cell>
          <table:table-cell office:value-type="float" office:value="2520" table:style-name="ce9">
            <text:p>2520</text:p>
          </table:table-cell>
          <table:table-cell office:value-type="float" office:value="32" table:style-name="ce9">
            <text:p>32</text:p>
          </table:table-cell>
          <table:table-cell office:value-type="float" office:value="2545" table:formula="of:=SUM([.G518]+[.E518])" table:style-name="ce15">
            <text:p>2545</text:p>
          </table:table-cell>
          <table:table-cell office:value-type="float" office:value="-17" table:formula="of:=[.F518]-[.H518]" table:style-name="ce15">
            <text:p>-17</text:p>
          </table:table-cell>
          <table:table-cell office:value-type="percentage" office:value="-4.1650294695481337E-2" table:formula="of:=([.I519]-[.I518])/[.I518]" table:style-name="ce16">
            <text:p>-4%</text:p>
          </table:table-cell>
          <table:table-cell office:value-type="string" office:string-value="Valid" table:formula="of:=IF([.F518]&lt;=[.E518]; &quot;Valid&quot;; &quot;Invalid&quot;)" table:style-name="ce17">
            <text:p>Valid</text:p>
          </table:table-cell>
          <table:table-cell office:value-type="string" office:string-value="Valid" table:formula="of:=IF([.H518]&lt;=[.G518]; &quot;Valid&quot;; &quot;Invalid&quot;)" table:style-name="ce17">
            <text:p>Valid</text:p>
          </table:table-cell>
          <table:table-cell office:value-type="string" office:string-value="Stable/Reducing" table:formula="of:=IF([.J518]&gt;0; &quot;Increasing Pressure&quot;; &quot;Stable/Reducing&quot;)" table:style-name="ce18">
            <text:p>Stable/Reducing</text:p>
          </table:table-cell>
          <table:table-cell office:value-type="float" office:value="2.1333333333333333" table:formula="of:=IFERROR([.H518]/[.F518]; 0)" table:style-name="ce17">
            <text:p>2.133333333</text:p>
          </table:table-cell>
          <table:table-cell office:value-type="float" office:value="2428.2857142857142" table:formula="of:=AVERAGE([.I518:.I524])" table:style-name="ce15">
            <text:p>2428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2-23T00:00:00" table:style-name="ce14">
            <text:p>23-02-2025</text:p>
          </table:table-cell>
          <table:table-cell office:value-type="string" office:string-value="February" table:formula="of:=TEXT([.A519]; &quot;mmmm&quot;)" table:style-name="ce14">
            <text:p>February</text:p>
          </table:table-cell>
          <table:table-cell office:value-type="string" office:string-value="2025-02" table:formula="of:=TEXT([.A519]; &quot;yyyy-mm&quot;)" table:style-name="ce14">
            <text:p>2025-02</text:p>
          </table:table-cell>
          <table:table-cell office:value-type="float" office:value="7" table:style-name="ce9">
            <text:p>7</text:p>
          </table:table-cell>
          <table:table-cell office:value-type="float" office:value="16" table:style-name="ce9">
            <text:p>16</text:p>
          </table:table-cell>
          <table:table-cell office:value-type="float" office:value="8" table:style-name="ce9">
            <text:p>8</text:p>
          </table:table-cell>
          <table:table-cell office:value-type="float" office:value="2423" table:style-name="ce9">
            <text:p>2423</text:p>
          </table:table-cell>
          <table:table-cell office:value-type="float" office:value="35" table:style-name="ce9">
            <text:p>35</text:p>
          </table:table-cell>
          <table:table-cell office:value-type="float" office:value="2439" table:formula="of:=SUM([.G519]+[.E519])" table:style-name="ce15">
            <text:p>2439</text:p>
          </table:table-cell>
          <table:table-cell office:value-type="float" office:value="-27" table:formula="of:=[.F519]-[.H519]" table:style-name="ce15">
            <text:p>-27</text:p>
          </table:table-cell>
          <table:table-cell office:value-type="percentage" office:value="-1.6400164001640015E-3" table:formula="of:=([.I520]-[.I519])/[.I519]" table:style-name="ce16">
            <text:p>0%</text:p>
          </table:table-cell>
          <table:table-cell office:value-type="string" office:string-value="Valid" table:formula="of:=IF([.F519]&lt;=[.E519]; &quot;Valid&quot;; &quot;Invalid&quot;)" table:style-name="ce17">
            <text:p>Valid</text:p>
          </table:table-cell>
          <table:table-cell office:value-type="string" office:string-value="Valid" table:formula="of:=IF([.H519]&lt;=[.G519]; &quot;Valid&quot;; &quot;Invalid&quot;)" table:style-name="ce17">
            <text:p>Valid</text:p>
          </table:table-cell>
          <table:table-cell office:value-type="string" office:string-value="Stable/Reducing" table:formula="of:=IF([.J519]&gt;0; &quot;Increasing Pressure&quot;; &quot;Stable/Reducing&quot;)" table:style-name="ce18">
            <text:p>Stable/Reducing</text:p>
          </table:table-cell>
          <table:table-cell office:value-type="float" office:value="4.375" table:formula="of:=IFERROR([.H519]/[.F519]; 0)" table:style-name="ce17">
            <text:p>4.375</text:p>
          </table:table-cell>
          <table:table-cell office:value-type="float" office:value="2395.5714285714284" table:formula="of:=AVERAGE([.I519:.I525])" table:style-name="ce15">
            <text:p>2396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2-24T00:00:00" table:style-name="ce14">
            <text:p>24-02-2025</text:p>
          </table:table-cell>
          <table:table-cell office:value-type="string" office:string-value="February" table:formula="of:=TEXT([.A520]; &quot;mmmm&quot;)" table:style-name="ce14">
            <text:p>February</text:p>
          </table:table-cell>
          <table:table-cell office:value-type="string" office:string-value="2025-02" table:formula="of:=TEXT([.A520]; &quot;yyyy-mm&quot;)" table:style-name="ce14">
            <text:p>2025-02</text:p>
          </table:table-cell>
          <table:table-cell office:value-type="float" office:value="20" table:style-name="ce9">
            <text:p>20</text:p>
          </table:table-cell>
          <table:table-cell office:value-type="float" office:value="22" table:style-name="ce9">
            <text:p>22</text:p>
          </table:table-cell>
          <table:table-cell office:value-type="float" office:value="14" table:style-name="ce9">
            <text:p>14</text:p>
          </table:table-cell>
          <table:table-cell office:value-type="float" office:value="2413" table:style-name="ce9">
            <text:p>2413</text:p>
          </table:table-cell>
          <table:table-cell office:value-type="float" office:value="24" table:style-name="ce9">
            <text:p>24</text:p>
          </table:table-cell>
          <table:table-cell office:value-type="float" office:value="2435" table:formula="of:=SUM([.G520]+[.E520])" table:style-name="ce15">
            <text:p>2435</text:p>
          </table:table-cell>
          <table:table-cell office:value-type="float" office:value="-10" table:formula="of:=[.F520]-[.H520]" table:style-name="ce15">
            <text:p>-10</text:p>
          </table:table-cell>
          <table:table-cell office:value-type="percentage" office:value="-6.1601642710472282E-3" table:formula="of:=([.I521]-[.I520])/[.I520]" table:style-name="ce16">
            <text:p>-1%</text:p>
          </table:table-cell>
          <table:table-cell office:value-type="string" office:string-value="Valid" table:formula="of:=IF([.F520]&lt;=[.E520]; &quot;Valid&quot;; &quot;Invalid&quot;)" table:style-name="ce17">
            <text:p>Valid</text:p>
          </table:table-cell>
          <table:table-cell office:value-type="string" office:string-value="Valid" table:formula="of:=IF([.H520]&lt;=[.G520]; &quot;Valid&quot;; &quot;Invalid&quot;)" table:style-name="ce17">
            <text:p>Valid</text:p>
          </table:table-cell>
          <table:table-cell office:value-type="string" office:string-value="Stable/Reducing" table:formula="of:=IF([.J520]&gt;0; &quot;Increasing Pressure&quot;; &quot;Stable/Reducing&quot;)" table:style-name="ce18">
            <text:p>Stable/Reducing</text:p>
          </table:table-cell>
          <table:table-cell office:value-type="float" office:value="1.7142857142857142" table:formula="of:=IFERROR([.H520]/[.F520]; 0)" table:style-name="ce17">
            <text:p>1.714285714</text:p>
          </table:table-cell>
          <table:table-cell office:value-type="float" office:value="2375.2857142857142" table:formula="of:=AVERAGE([.I520:.I526])" table:style-name="ce15">
            <text:p>2375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2-25T00:00:00" table:style-name="ce14">
            <text:p>25-02-2025</text:p>
          </table:table-cell>
          <table:table-cell office:value-type="string" office:string-value="February" table:formula="of:=TEXT([.A521]; &quot;mmmm&quot;)" table:style-name="ce14">
            <text:p>February</text:p>
          </table:table-cell>
          <table:table-cell office:value-type="string" office:string-value="2025-02" table:formula="of:=TEXT([.A521]; &quot;yyyy-mm&quot;)" table:style-name="ce14">
            <text:p>2025-02</text:p>
          </table:table-cell>
          <table:table-cell office:value-type="float" office:value="11" table:style-name="ce9">
            <text:p>11</text:p>
          </table:table-cell>
          <table:table-cell office:value-type="float" office:value="7" table:style-name="ce9">
            <text:p>7</text:p>
          </table:table-cell>
          <table:table-cell office:value-type="float" office:value="7" table:style-name="ce9">
            <text:p>7</text:p>
          </table:table-cell>
          <table:table-cell office:value-type="float" office:value="2413" table:style-name="ce9">
            <text:p>2413</text:p>
          </table:table-cell>
          <table:table-cell office:value-type="float" office:value="23" table:style-name="ce9">
            <text:p>23</text:p>
          </table:table-cell>
          <table:table-cell office:value-type="float" office:value="2420" table:formula="of:=SUM([.G521]+[.E521])" table:style-name="ce15">
            <text:p>2420</text:p>
          </table:table-cell>
          <table:table-cell office:value-type="float" office:value="-16" table:formula="of:=[.F521]-[.H521]" table:style-name="ce15">
            <text:p>-16</text:p>
          </table:table-cell>
          <table:table-cell office:value-type="percentage" office:value="4.9586776859504135E-3" table:formula="of:=([.I522]-[.I521])/[.I521]" table:style-name="ce16">
            <text:p>0%</text:p>
          </table:table-cell>
          <table:table-cell office:value-type="string" office:string-value="Valid" table:formula="of:=IF([.F521]&lt;=[.E521]; &quot;Valid&quot;; &quot;Invalid&quot;)" table:style-name="ce17">
            <text:p>Valid</text:p>
          </table:table-cell>
          <table:table-cell office:value-type="string" office:string-value="Valid" table:formula="of:=IF([.H521]&lt;=[.G521]; &quot;Valid&quot;; &quot;Invalid&quot;)" table:style-name="ce17">
            <text:p>Valid</text:p>
          </table:table-cell>
          <table:table-cell office:value-type="string" office:string-value="Stable/Reducing" table:formula="of:=IF([.J521]&gt;0; &quot;Increasing Pressure&quot;; &quot;Stable/Reducing&quot;)" table:style-name="ce18">
            <text:p>Stable/Reducing</text:p>
          </table:table-cell>
          <table:table-cell office:value-type="float" office:value="3.2857142857142856" table:formula="of:=IFERROR([.H521]/[.F521]; 0)" table:style-name="ce17">
            <text:p>3.285714286</text:p>
          </table:table-cell>
          <table:table-cell office:value-type="float" office:value="2350" table:formula="of:=AVERAGE([.I521:.I527])" table:style-name="ce15">
            <text:p>2350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2-26T00:00:00" table:style-name="ce14">
            <text:p>26-02-2025</text:p>
          </table:table-cell>
          <table:table-cell office:value-type="string" office:string-value="February" table:formula="of:=TEXT([.A522]; &quot;mmmm&quot;)" table:style-name="ce14">
            <text:p>February</text:p>
          </table:table-cell>
          <table:table-cell office:value-type="string" office:string-value="2025-02" table:formula="of:=TEXT([.A522]; &quot;yyyy-mm&quot;)" table:style-name="ce14">
            <text:p>2025-02</text:p>
          </table:table-cell>
          <table:table-cell office:value-type="float" office:value="12" table:style-name="ce9">
            <text:p>12</text:p>
          </table:table-cell>
          <table:table-cell office:value-type="float" office:value="21" table:style-name="ce9">
            <text:p>21</text:p>
          </table:table-cell>
          <table:table-cell office:value-type="float" office:value="1" table:style-name="ce9">
            <text:p>1</text:p>
          </table:table-cell>
          <table:table-cell office:value-type="float" office:value="2411" table:style-name="ce9">
            <text:p>2411</text:p>
          </table:table-cell>
          <table:table-cell office:value-type="float" office:value="23" table:style-name="ce9">
            <text:p>23</text:p>
          </table:table-cell>
          <table:table-cell office:value-type="float" office:value="2432" table:formula="of:=SUM([.G522]+[.E522])" table:style-name="ce15">
            <text:p>2432</text:p>
          </table:table-cell>
          <table:table-cell office:value-type="float" office:value="-22" table:formula="of:=[.F522]-[.H522]" table:style-name="ce15">
            <text:p>-22</text:p>
          </table:table-cell>
          <table:table-cell office:value-type="percentage" office:value="-1.0690789473684211E-2" table:formula="of:=([.I523]-[.I522])/[.I522]" table:style-name="ce16">
            <text:p>-1%</text:p>
          </table:table-cell>
          <table:table-cell office:value-type="string" office:string-value="Valid" table:formula="of:=IF([.F522]&lt;=[.E522]; &quot;Valid&quot;; &quot;Invalid&quot;)" table:style-name="ce17">
            <text:p>Valid</text:p>
          </table:table-cell>
          <table:table-cell office:value-type="string" office:string-value="Valid" table:formula="of:=IF([.H522]&lt;=[.G522]; &quot;Valid&quot;; &quot;Invalid&quot;)" table:style-name="ce17">
            <text:p>Valid</text:p>
          </table:table-cell>
          <table:table-cell office:value-type="string" office:string-value="Stable/Reducing" table:formula="of:=IF([.J522]&gt;0; &quot;Increasing Pressure&quot;; &quot;Stable/Reducing&quot;)" table:style-name="ce18">
            <text:p>Stable/Reducing</text:p>
          </table:table-cell>
          <table:table-cell office:value-type="float" office:value="23" table:formula="of:=IFERROR([.H522]/[.F522]; 0)" table:style-name="ce17">
            <text:p>23</text:p>
          </table:table-cell>
          <table:table-cell office:value-type="float" office:value="2325" table:formula="of:=AVERAGE([.I522:.I528])" table:style-name="ce15">
            <text:p>2325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2-27T00:00:00" table:style-name="ce14">
            <text:p>27-02-2025</text:p>
          </table:table-cell>
          <table:table-cell office:value-type="string" office:string-value="February" table:formula="of:=TEXT([.A523]; &quot;mmmm&quot;)" table:style-name="ce14">
            <text:p>February</text:p>
          </table:table-cell>
          <table:table-cell office:value-type="string" office:string-value="2025-02" table:formula="of:=TEXT([.A523]; &quot;yyyy-mm&quot;)" table:style-name="ce14">
            <text:p>2025-02</text:p>
          </table:table-cell>
          <table:table-cell office:value-type="float" office:value="10" table:style-name="ce9">
            <text:p>10</text:p>
          </table:table-cell>
          <table:table-cell office:value-type="float" office:value="15" table:style-name="ce9">
            <text:p>15</text:p>
          </table:table-cell>
          <table:table-cell office:value-type="float" office:value="17" table:style-name="ce9">
            <text:p>17</text:p>
          </table:table-cell>
          <table:table-cell office:value-type="float" office:value="2391" table:style-name="ce9">
            <text:p>2391</text:p>
          </table:table-cell>
          <table:table-cell office:value-type="float" office:value="37" table:style-name="ce9">
            <text:p>37</text:p>
          </table:table-cell>
          <table:table-cell office:value-type="float" office:value="2406" table:formula="of:=SUM([.G523]+[.E523])" table:style-name="ce15">
            <text:p>2406</text:p>
          </table:table-cell>
          <table:table-cell office:value-type="float" office:value="-20" table:formula="of:=[.F523]-[.H523]" table:style-name="ce15">
            <text:p>-20</text:p>
          </table:table-cell>
          <table:table-cell office:value-type="percentage" office:value="-3.5328345802161265E-2" table:formula="of:=([.I524]-[.I523])/[.I523]" table:style-name="ce16">
            <text:p>-4%</text:p>
          </table:table-cell>
          <table:table-cell office:value-type="string" office:string-value="Invalid" table:formula="of:=IF([.F523]&lt;=[.E523]; &quot;Valid&quot;; &quot;Invalid&quot;)" table:style-name="ce17">
            <text:p>Invalid</text:p>
          </table:table-cell>
          <table:table-cell office:value-type="string" office:string-value="Valid" table:formula="of:=IF([.H523]&lt;=[.G523]; &quot;Valid&quot;; &quot;Invalid&quot;)" table:style-name="ce17">
            <text:p>Valid</text:p>
          </table:table-cell>
          <table:table-cell office:value-type="string" office:string-value="Stable/Reducing" table:formula="of:=IF([.J523]&gt;0; &quot;Increasing Pressure&quot;; &quot;Stable/Reducing&quot;)" table:style-name="ce18">
            <text:p>Stable/Reducing</text:p>
          </table:table-cell>
          <table:table-cell office:value-type="float" office:value="2.1764705882352939" table:formula="of:=IFERROR([.H523]/[.F523]; 0)" table:style-name="ce17">
            <text:p>2.176470588</text:p>
          </table:table-cell>
          <table:table-cell office:value-type="float" office:value="2286.4285714285716" table:formula="of:=AVERAGE([.I523:.I529])" table:style-name="ce15">
            <text:p>2286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3-02T00:00:00" table:style-name="ce14">
            <text:p>02-03-2025</text:p>
          </table:table-cell>
          <table:table-cell office:value-type="string" office:string-value="March" table:formula="of:=TEXT([.A524]; &quot;mmmm&quot;)" table:style-name="ce14">
            <text:p>March</text:p>
          </table:table-cell>
          <table:table-cell office:value-type="string" office:string-value="2025-03" table:formula="of:=TEXT([.A524]; &quot;yyyy-mm&quot;)" table:style-name="ce14">
            <text:p>2025-03</text:p>
          </table:table-cell>
          <table:table-cell office:value-type="float" office:value="12" table:style-name="ce9">
            <text:p>12</text:p>
          </table:table-cell>
          <table:table-cell office:value-type="float" office:value="24" table:style-name="ce9">
            <text:p>24</text:p>
          </table:table-cell>
          <table:table-cell office:value-type="float" office:value="4" table:style-name="ce9">
            <text:p>4</text:p>
          </table:table-cell>
          <table:table-cell office:value-type="float" office:value="2297" table:style-name="ce9">
            <text:p>2297</text:p>
          </table:table-cell>
          <table:table-cell office:value-type="float" office:value="31" table:style-name="ce9">
            <text:p>31</text:p>
          </table:table-cell>
          <table:table-cell office:value-type="float" office:value="2321" table:formula="of:=SUM([.G524]+[.E524])" table:style-name="ce15">
            <text:p>2321</text:p>
          </table:table-cell>
          <table:table-cell office:value-type="float" office:value="-27" table:formula="of:=[.F524]-[.H524]" table:style-name="ce15">
            <text:p>-27</text:p>
          </table:table-cell>
          <table:table-cell office:value-type="percentage" office:value="-2.1542438604049978E-3" table:formula="of:=([.I525]-[.I524])/[.I524]" table:style-name="ce16">
            <text:p>0%</text:p>
          </table:table-cell>
          <table:table-cell office:value-type="string" office:string-value="Valid" table:formula="of:=IF([.F524]&lt;=[.E524]; &quot;Valid&quot;; &quot;Invalid&quot;)" table:style-name="ce17">
            <text:p>Valid</text:p>
          </table:table-cell>
          <table:table-cell office:value-type="string" office:string-value="Valid" table:formula="of:=IF([.H524]&lt;=[.G524]; &quot;Valid&quot;; &quot;Invalid&quot;)" table:style-name="ce17">
            <text:p>Valid</text:p>
          </table:table-cell>
          <table:table-cell office:value-type="string" office:string-value="Stable/Reducing" table:formula="of:=IF([.J524]&gt;0; &quot;Increasing Pressure&quot;; &quot;Stable/Reducing&quot;)" table:style-name="ce18">
            <text:p>Stable/Reducing</text:p>
          </table:table-cell>
          <table:table-cell office:value-type="float" office:value="7.75" table:formula="of:=IFERROR([.H524]/[.F524]; 0)" table:style-name="ce17">
            <text:p>7.75</text:p>
          </table:table-cell>
          <table:table-cell office:value-type="float" office:value="2250.2857142857142" table:formula="of:=AVERAGE([.I524:.I530])" table:style-name="ce15">
            <text:p>2250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3-03T00:00:00" table:style-name="ce14">
            <text:p>03-03-2025</text:p>
          </table:table-cell>
          <table:table-cell office:value-type="string" office:string-value="March" table:formula="of:=TEXT([.A525]; &quot;mmmm&quot;)" table:style-name="ce14">
            <text:p>March</text:p>
          </table:table-cell>
          <table:table-cell office:value-type="string" office:string-value="2025-03" table:formula="of:=TEXT([.A525]; &quot;yyyy-mm&quot;)" table:style-name="ce14">
            <text:p>2025-03</text:p>
          </table:table-cell>
          <table:table-cell office:value-type="float" office:value="8" table:style-name="ce9">
            <text:p>8</text:p>
          </table:table-cell>
          <table:table-cell office:value-type="float" office:value="29" table:style-name="ce9">
            <text:p>29</text:p>
          </table:table-cell>
          <table:table-cell office:value-type="float" office:value="18" table:style-name="ce9">
            <text:p>18</text:p>
          </table:table-cell>
          <table:table-cell office:value-type="float" office:value="2287" table:style-name="ce9">
            <text:p>2287</text:p>
          </table:table-cell>
          <table:table-cell office:value-type="float" office:value="25" table:style-name="ce9">
            <text:p>25</text:p>
          </table:table-cell>
          <table:table-cell office:value-type="float" office:value="2316" table:formula="of:=SUM([.G525]+[.E525])" table:style-name="ce15">
            <text:p>2316</text:p>
          </table:table-cell>
          <table:table-cell office:value-type="float" office:value="-7" table:formula="of:=[.F525]-[.H525]" table:style-name="ce15">
            <text:p>-7</text:p>
          </table:table-cell>
          <table:table-cell office:value-type="percentage" office:value="-8.2037996545768575E-3" table:formula="of:=([.I526]-[.I525])/[.I525]" table:style-name="ce16">
            <text:p>-1%</text:p>
          </table:table-cell>
          <table:table-cell office:value-type="string" office:string-value="Valid" table:formula="of:=IF([.F525]&lt;=[.E525]; &quot;Valid&quot;; &quot;Invalid&quot;)" table:style-name="ce17">
            <text:p>Valid</text:p>
          </table:table-cell>
          <table:table-cell office:value-type="string" office:string-value="Valid" table:formula="of:=IF([.H525]&lt;=[.G525]; &quot;Valid&quot;; &quot;Invalid&quot;)" table:style-name="ce17">
            <text:p>Valid</text:p>
          </table:table-cell>
          <table:table-cell office:value-type="string" office:string-value="Stable/Reducing" table:formula="of:=IF([.J525]&gt;0; &quot;Increasing Pressure&quot;; &quot;Stable/Reducing&quot;)" table:style-name="ce18">
            <text:p>Stable/Reducing</text:p>
          </table:table-cell>
          <table:table-cell office:value-type="float" office:value="1.3888888888888888" table:formula="of:=IFERROR([.H525]/[.F525]; 0)" table:style-name="ce17">
            <text:p>1.388888889</text:p>
          </table:table-cell>
          <table:table-cell office:value-type="float" office:value="2222.5714285714284" table:formula="of:=AVERAGE([.I525:.I531])" table:style-name="ce15">
            <text:p>2223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3-04T00:00:00" table:style-name="ce14">
            <text:p>04-03-2025</text:p>
          </table:table-cell>
          <table:table-cell office:value-type="string" office:string-value="March" table:formula="of:=TEXT([.A526]; &quot;mmmm&quot;)" table:style-name="ce14">
            <text:p>March</text:p>
          </table:table-cell>
          <table:table-cell office:value-type="string" office:string-value="2025-03" table:formula="of:=TEXT([.A526]; &quot;yyyy-mm&quot;)" table:style-name="ce14">
            <text:p>2025-03</text:p>
          </table:table-cell>
          <table:table-cell office:value-type="float" office:value="4" table:style-name="ce9">
            <text:p>4</text:p>
          </table:table-cell>
          <table:table-cell office:value-type="float" office:value="25" table:style-name="ce9">
            <text:p>25</text:p>
          </table:table-cell>
          <table:table-cell office:value-type="float" office:value="10" table:style-name="ce9">
            <text:p>10</text:p>
          </table:table-cell>
          <table:table-cell office:value-type="float" office:value="2272" table:style-name="ce9">
            <text:p>2272</text:p>
          </table:table-cell>
          <table:table-cell office:value-type="float" office:value="30" table:style-name="ce9">
            <text:p>30</text:p>
          </table:table-cell>
          <table:table-cell office:value-type="float" office:value="2297" table:formula="of:=SUM([.G526]+[.E526])" table:style-name="ce15">
            <text:p>2297</text:p>
          </table:table-cell>
          <table:table-cell office:value-type="float" office:value="-20" table:formula="of:=[.F526]-[.H526]" table:style-name="ce15">
            <text:p>-20</text:p>
          </table:table-cell>
          <table:table-cell office:value-type="percentage" office:value="-1.697866782760122E-2" table:formula="of:=([.I527]-[.I526])/[.I526]" table:style-name="ce16">
            <text:p>-2%</text:p>
          </table:table-cell>
          <table:table-cell office:value-type="string" office:string-value="Valid" table:formula="of:=IF([.F526]&lt;=[.E526]; &quot;Valid&quot;; &quot;Invalid&quot;)" table:style-name="ce17">
            <text:p>Valid</text:p>
          </table:table-cell>
          <table:table-cell office:value-type="string" office:string-value="Valid" table:formula="of:=IF([.H526]&lt;=[.G526]; &quot;Valid&quot;; &quot;Invalid&quot;)" table:style-name="ce17">
            <text:p>Valid</text:p>
          </table:table-cell>
          <table:table-cell office:value-type="string" office:string-value="Stable/Reducing" table:formula="of:=IF([.J526]&gt;0; &quot;Increasing Pressure&quot;; &quot;Stable/Reducing&quot;)" table:style-name="ce18">
            <text:p>Stable/Reducing</text:p>
          </table:table-cell>
          <table:table-cell office:value-type="float" office:value="3" table:formula="of:=IFERROR([.H526]/[.F526]; 0)" table:style-name="ce17">
            <text:p>3</text:p>
          </table:table-cell>
          <table:table-cell office:value-type="float" office:value="2196.1428571428573" table:formula="of:=AVERAGE([.I526:.I532])" table:style-name="ce15">
            <text:p>2196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3-05T00:00:00" table:style-name="ce14">
            <text:p>05-03-2025</text:p>
          </table:table-cell>
          <table:table-cell office:value-type="string" office:string-value="March" table:formula="of:=TEXT([.A527]; &quot;mmmm&quot;)" table:style-name="ce14">
            <text:p>March</text:p>
          </table:table-cell>
          <table:table-cell office:value-type="string" office:string-value="2025-03" table:formula="of:=TEXT([.A527]; &quot;yyyy-mm&quot;)" table:style-name="ce14">
            <text:p>2025-03</text:p>
          </table:table-cell>
          <table:table-cell office:value-type="float" office:value="5" table:style-name="ce9">
            <text:p>5</text:p>
          </table:table-cell>
          <table:table-cell office:value-type="float" office:value="20" table:style-name="ce9">
            <text:p>20</text:p>
          </table:table-cell>
          <table:table-cell office:value-type="float" office:value="4" table:style-name="ce9">
            <text:p>4</text:p>
          </table:table-cell>
          <table:table-cell office:value-type="float" office:value="2238" table:style-name="ce9">
            <text:p>2238</text:p>
          </table:table-cell>
          <table:table-cell office:value-type="float" office:value="40" table:style-name="ce9">
            <text:p>40</text:p>
          </table:table-cell>
          <table:table-cell office:value-type="float" office:value="2258" table:formula="of:=SUM([.G527]+[.E527])" table:style-name="ce15">
            <text:p>2258</text:p>
          </table:table-cell>
          <table:table-cell office:value-type="float" office:value="-36" table:formula="of:=[.F527]-[.H527]" table:style-name="ce15">
            <text:p>-36</text:p>
          </table:table-cell>
          <table:table-cell office:value-type="percentage" office:value="-5.7573073516386181E-3" table:formula="of:=([.I528]-[.I527])/[.I527]" table:style-name="ce16">
            <text:p>-1%</text:p>
          </table:table-cell>
          <table:table-cell office:value-type="string" office:string-value="Valid" table:formula="of:=IF([.F527]&lt;=[.E527]; &quot;Valid&quot;; &quot;Invalid&quot;)" table:style-name="ce17">
            <text:p>Valid</text:p>
          </table:table-cell>
          <table:table-cell office:value-type="string" office:string-value="Valid" table:formula="of:=IF([.H527]&lt;=[.G527]; &quot;Valid&quot;; &quot;Invalid&quot;)" table:style-name="ce17">
            <text:p>Valid</text:p>
          </table:table-cell>
          <table:table-cell office:value-type="string" office:string-value="Stable/Reducing" table:formula="of:=IF([.J527]&gt;0; &quot;Increasing Pressure&quot;; &quot;Stable/Reducing&quot;)" table:style-name="ce18">
            <text:p>Stable/Reducing</text:p>
          </table:table-cell>
          <table:table-cell office:value-type="float" office:value="10" table:formula="of:=IFERROR([.H527]/[.F527]; 0)" table:style-name="ce17">
            <text:p>10</text:p>
          </table:table-cell>
          <table:table-cell office:value-type="float" office:value="2173.1428571428573" table:formula="of:=AVERAGE([.I527:.I533])" table:style-name="ce15">
            <text:p>2173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3-06T00:00:00" table:style-name="ce14">
            <text:p>06-03-2025</text:p>
          </table:table-cell>
          <table:table-cell office:value-type="string" office:string-value="March" table:formula="of:=TEXT([.A528]; &quot;mmmm&quot;)" table:style-name="ce14">
            <text:p>March</text:p>
          </table:table-cell>
          <table:table-cell office:value-type="string" office:string-value="2025-03" table:formula="of:=TEXT([.A528]; &quot;yyyy-mm&quot;)" table:style-name="ce14">
            <text:p>2025-03</text:p>
          </table:table-cell>
          <table:table-cell office:value-type="float" office:value="7" table:style-name="ce9">
            <text:p>7</text:p>
          </table:table-cell>
          <table:table-cell office:value-type="float" office:value="27" table:style-name="ce9">
            <text:p>27</text:p>
          </table:table-cell>
          <table:table-cell office:value-type="float" office:value="6" table:style-name="ce9">
            <text:p>6</text:p>
          </table:table-cell>
          <table:table-cell office:value-type="float" office:value="2218" table:style-name="ce9">
            <text:p>2218</text:p>
          </table:table-cell>
          <table:table-cell office:value-type="float" office:value="33" table:style-name="ce9">
            <text:p>33</text:p>
          </table:table-cell>
          <table:table-cell office:value-type="float" office:value="2245" table:formula="of:=SUM([.G528]+[.E528])" table:style-name="ce15">
            <text:p>2245</text:p>
          </table:table-cell>
          <table:table-cell office:value-type="float" office:value="-27" table:formula="of:=[.F528]-[.H528]" table:style-name="ce15">
            <text:p>-27</text:p>
          </table:table-cell>
          <table:table-cell office:value-type="percentage" office:value="-3.6971046770601333E-2" table:formula="of:=([.I529]-[.I528])/[.I528]" table:style-name="ce16">
            <text:p>-4%</text:p>
          </table:table-cell>
          <table:table-cell office:value-type="string" office:string-value="Valid" table:formula="of:=IF([.F528]&lt;=[.E528]; &quot;Valid&quot;; &quot;Invalid&quot;)" table:style-name="ce17">
            <text:p>Valid</text:p>
          </table:table-cell>
          <table:table-cell office:value-type="string" office:string-value="Valid" table:formula="of:=IF([.H528]&lt;=[.G528]; &quot;Valid&quot;; &quot;Invalid&quot;)" table:style-name="ce17">
            <text:p>Valid</text:p>
          </table:table-cell>
          <table:table-cell office:value-type="string" office:string-value="Stable/Reducing" table:formula="of:=IF([.J528]&gt;0; &quot;Increasing Pressure&quot;; &quot;Stable/Reducing&quot;)" table:style-name="ce18">
            <text:p>Stable/Reducing</text:p>
          </table:table-cell>
          <table:table-cell office:value-type="float" office:value="5.5" table:formula="of:=IFERROR([.H528]/[.F528]; 0)" table:style-name="ce17">
            <text:p>5.5</text:p>
          </table:table-cell>
          <table:table-cell office:value-type="float" office:value="2154.2857142857142" table:formula="of:=AVERAGE([.I528:.I534])" table:style-name="ce15">
            <text:p>2154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3-09T00:00:00" table:style-name="ce14">
            <text:p>09-03-2025</text:p>
          </table:table-cell>
          <table:table-cell office:value-type="string" office:string-value="March" table:formula="of:=TEXT([.A529]; &quot;mmmm&quot;)" table:style-name="ce14">
            <text:p>March</text:p>
          </table:table-cell>
          <table:table-cell office:value-type="string" office:string-value="2025-03" table:formula="of:=TEXT([.A529]; &quot;yyyy-mm&quot;)" table:style-name="ce14">
            <text:p>2025-03</text:p>
          </table:table-cell>
          <table:table-cell office:value-type="float" office:value="12" table:style-name="ce9">
            <text:p>12</text:p>
          </table:table-cell>
          <table:table-cell office:value-type="float" office:value="25" table:style-name="ce9">
            <text:p>25</text:p>
          </table:table-cell>
          <table:table-cell office:value-type="float" office:value="15" table:style-name="ce9">
            <text:p>15</text:p>
          </table:table-cell>
          <table:table-cell office:value-type="float" office:value="2137" table:style-name="ce9">
            <text:p>2137</text:p>
          </table:table-cell>
          <table:table-cell office:value-type="float" office:value="30" table:style-name="ce9">
            <text:p>30</text:p>
          </table:table-cell>
          <table:table-cell office:value-type="float" office:value="2162" table:formula="of:=SUM([.G529]+[.E529])" table:style-name="ce15">
            <text:p>2162</text:p>
          </table:table-cell>
          <table:table-cell office:value-type="float" office:value="-15" table:formula="of:=[.F529]-[.H529]" table:style-name="ce15">
            <text:p>-15</text:p>
          </table:table-cell>
          <table:table-cell office:value-type="percentage" office:value="-4.1628122109158188E-3" table:formula="of:=([.I530]-[.I529])/[.I529]" table:style-name="ce16">
            <text:p>0%</text:p>
          </table:table-cell>
          <table:table-cell office:value-type="string" office:string-value="Valid" table:formula="of:=IF([.F529]&lt;=[.E529]; &quot;Valid&quot;; &quot;Invalid&quot;)" table:style-name="ce17">
            <text:p>Valid</text:p>
          </table:table-cell>
          <table:table-cell office:value-type="string" office:string-value="Valid" table:formula="of:=IF([.H529]&lt;=[.G529]; &quot;Valid&quot;; &quot;Invalid&quot;)" table:style-name="ce17">
            <text:p>Valid</text:p>
          </table:table-cell>
          <table:table-cell office:value-type="string" office:string-value="Stable/Reducing" table:formula="of:=IF([.J529]&gt;0; &quot;Increasing Pressure&quot;; &quot;Stable/Reducing&quot;)" table:style-name="ce18">
            <text:p>Stable/Reducing</text:p>
          </table:table-cell>
          <table:table-cell office:value-type="float" office:value="2" table:formula="of:=IFERROR([.H529]/[.F529]; 0)" table:style-name="ce17">
            <text:p>2</text:p>
          </table:table-cell>
          <table:table-cell office:value-type="float" office:value="2137.1428571428573" table:formula="of:=AVERAGE([.I529:.I535])" table:style-name="ce15">
            <text:p>2137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3-10T00:00:00" table:style-name="ce14">
            <text:p>10-03-2025</text:p>
          </table:table-cell>
          <table:table-cell office:value-type="string" office:string-value="March" table:formula="of:=TEXT([.A530]; &quot;mmmm&quot;)" table:style-name="ce14">
            <text:p>March</text:p>
          </table:table-cell>
          <table:table-cell office:value-type="string" office:string-value="2025-03" table:formula="of:=TEXT([.A530]; &quot;yyyy-mm&quot;)" table:style-name="ce14">
            <text:p>2025-03</text:p>
          </table:table-cell>
          <table:table-cell office:value-type="float" office:value="6" table:style-name="ce9">
            <text:p>6</text:p>
          </table:table-cell>
          <table:table-cell office:value-type="float" office:value="28" table:style-name="ce9">
            <text:p>28</text:p>
          </table:table-cell>
          <table:table-cell office:value-type="float" office:value="8" table:style-name="ce9">
            <text:p>8</text:p>
          </table:table-cell>
          <table:table-cell office:value-type="float" office:value="2125" table:style-name="ce9">
            <text:p>2125</text:p>
          </table:table-cell>
          <table:table-cell office:value-type="float" office:value="23" table:style-name="ce9">
            <text:p>23</text:p>
          </table:table-cell>
          <table:table-cell office:value-type="float" office:value="2153" table:formula="of:=SUM([.G530]+[.E530])" table:style-name="ce15">
            <text:p>2153</text:p>
          </table:table-cell>
          <table:table-cell office:value-type="float" office:value="-15" table:formula="of:=[.F530]-[.H530]" table:style-name="ce15">
            <text:p>-15</text:p>
          </table:table-cell>
          <table:table-cell office:value-type="percentage" office:value="-1.2076172782164421E-2" table:formula="of:=([.I531]-[.I530])/[.I530]" table:style-name="ce16">
            <text:p>-1%</text:p>
          </table:table-cell>
          <table:table-cell office:value-type="string" office:string-value="Valid" table:formula="of:=IF([.F530]&lt;=[.E530]; &quot;Valid&quot;; &quot;Invalid&quot;)" table:style-name="ce17">
            <text:p>Valid</text:p>
          </table:table-cell>
          <table:table-cell office:value-type="string" office:string-value="Valid" table:formula="of:=IF([.H530]&lt;=[.G530]; &quot;Valid&quot;; &quot;Invalid&quot;)" table:style-name="ce17">
            <text:p>Valid</text:p>
          </table:table-cell>
          <table:table-cell office:value-type="string" office:string-value="Stable/Reducing" table:formula="of:=IF([.J530]&gt;0; &quot;Increasing Pressure&quot;; &quot;Stable/Reducing&quot;)" table:style-name="ce18">
            <text:p>Stable/Reducing</text:p>
          </table:table-cell>
          <table:table-cell office:value-type="float" office:value="2.875" table:formula="of:=IFERROR([.H530]/[.F530]; 0)" table:style-name="ce17">
            <text:p>2.875</text:p>
          </table:table-cell>
          <table:table-cell office:value-type="float" office:value="2134.4285714285716" table:formula="of:=AVERAGE([.I530:.I536])" table:style-name="ce15">
            <text:p>2134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3-11T00:00:00" table:style-name="ce14">
            <text:p>11-03-2025</text:p>
          </table:table-cell>
          <table:table-cell office:value-type="string" office:string-value="March" table:formula="of:=TEXT([.A531]; &quot;mmmm&quot;)" table:style-name="ce14">
            <text:p>March</text:p>
          </table:table-cell>
          <table:table-cell office:value-type="string" office:string-value="2025-03" table:formula="of:=TEXT([.A531]; &quot;yyyy-mm&quot;)" table:style-name="ce14">
            <text:p>2025-03</text:p>
          </table:table-cell>
          <table:table-cell office:value-type="float" office:value="3" table:style-name="ce9">
            <text:p>3</text:p>
          </table:table-cell>
          <table:table-cell office:value-type="float" office:value="11" table:style-name="ce9">
            <text:p>11</text:p>
          </table:table-cell>
          <table:table-cell office:value-type="float" office:value="7" table:style-name="ce9">
            <text:p>7</text:p>
          </table:table-cell>
          <table:table-cell office:value-type="float" office:value="2116" table:style-name="ce9">
            <text:p>2116</text:p>
          </table:table-cell>
          <table:table-cell office:value-type="float" office:value="20" table:style-name="ce9">
            <text:p>20</text:p>
          </table:table-cell>
          <table:table-cell office:value-type="float" office:value="2127" table:formula="of:=SUM([.G531]+[.E531])" table:style-name="ce15">
            <text:p>2127</text:p>
          </table:table-cell>
          <table:table-cell office:value-type="float" office:value="-13" table:formula="of:=[.F531]-[.H531]" table:style-name="ce15">
            <text:p>-13</text:p>
          </table:table-cell>
          <table:table-cell office:value-type="percentage" office:value="1.8805829807240243E-3" table:formula="of:=([.I532]-[.I531])/[.I531]" table:style-name="ce16">
            <text:p>0%</text:p>
          </table:table-cell>
          <table:table-cell office:value-type="string" office:string-value="Valid" table:formula="of:=IF([.F531]&lt;=[.E531]; &quot;Valid&quot;; &quot;Invalid&quot;)" table:style-name="ce17">
            <text:p>Valid</text:p>
          </table:table-cell>
          <table:table-cell office:value-type="string" office:string-value="Valid" table:formula="of:=IF([.H531]&lt;=[.G531]; &quot;Valid&quot;; &quot;Invalid&quot;)" table:style-name="ce17">
            <text:p>Valid</text:p>
          </table:table-cell>
          <table:table-cell office:value-type="string" office:string-value="Stable/Reducing" table:formula="of:=IF([.J531]&gt;0; &quot;Increasing Pressure&quot;; &quot;Stable/Reducing&quot;)" table:style-name="ce18">
            <text:p>Stable/Reducing</text:p>
          </table:table-cell>
          <table:table-cell office:value-type="float" office:value="2.8571428571428572" table:formula="of:=IFERROR([.H531]/[.F531]; 0)" table:style-name="ce17">
            <text:p>2.857142857</text:p>
          </table:table-cell>
          <table:table-cell office:value-type="float" office:value="2132.7142857142858" table:formula="of:=AVERAGE([.I531:.I537])" table:style-name="ce15">
            <text:p>2133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3-12T00:00:00" table:style-name="ce14">
            <text:p>12-03-2025</text:p>
          </table:table-cell>
          <table:table-cell office:value-type="string" office:string-value="March" table:formula="of:=TEXT([.A532]; &quot;mmmm&quot;)" table:style-name="ce14">
            <text:p>March</text:p>
          </table:table-cell>
          <table:table-cell office:value-type="string" office:string-value="2025-03" table:formula="of:=TEXT([.A532]; &quot;yyyy-mm&quot;)" table:style-name="ce14">
            <text:p>2025-03</text:p>
          </table:table-cell>
          <table:table-cell office:value-type="float" office:value="6" table:style-name="ce9">
            <text:p>6</text:p>
          </table:table-cell>
          <table:table-cell office:value-type="float" office:value="18" table:style-name="ce9">
            <text:p>18</text:p>
          </table:table-cell>
          <table:table-cell office:value-type="float" office:value="2" table:style-name="ce9">
            <text:p>2</text:p>
          </table:table-cell>
          <table:table-cell office:value-type="float" office:value="2113" table:style-name="ce9">
            <text:p>2113</text:p>
          </table:table-cell>
          <table:table-cell office:value-type="float" office:value="8" table:style-name="ce9">
            <text:p>8</text:p>
          </table:table-cell>
          <table:table-cell office:value-type="float" office:value="2131" table:formula="of:=SUM([.G532]+[.E532])" table:style-name="ce15">
            <text:p>2131</text:p>
          </table:table-cell>
          <table:table-cell office:value-type="float" office:value="-6" table:formula="of:=[.F532]-[.H532]" table:style-name="ce15">
            <text:p>-6</text:p>
          </table:table-cell>
          <table:table-cell office:value-type="percentage" office:value="2.346316283435007E-3" table:formula="of:=([.I533]-[.I532])/[.I532]" table:style-name="ce16">
            <text:p>0%</text:p>
          </table:table-cell>
          <table:table-cell office:value-type="string" office:string-value="Valid" table:formula="of:=IF([.F532]&lt;=[.E532]; &quot;Valid&quot;; &quot;Invalid&quot;)" table:style-name="ce17">
            <text:p>Valid</text:p>
          </table:table-cell>
          <table:table-cell office:value-type="string" office:string-value="Valid" table:formula="of:=IF([.H532]&lt;=[.G532]; &quot;Valid&quot;; &quot;Invalid&quot;)" table:style-name="ce17">
            <text:p>Valid</text:p>
          </table:table-cell>
          <table:table-cell office:value-type="string" office:string-value="Stable/Reducing" table:formula="of:=IF([.J532]&gt;0; &quot;Increasing Pressure&quot;; &quot;Stable/Reducing&quot;)" table:style-name="ce18">
            <text:p>Stable/Reducing</text:p>
          </table:table-cell>
          <table:table-cell office:value-type="float" office:value="4" table:formula="of:=IFERROR([.H532]/[.F532]; 0)" table:style-name="ce17">
            <text:p>4</text:p>
          </table:table-cell>
          <table:table-cell office:value-type="float" office:value="2135.1428571428573" table:formula="of:=AVERAGE([.I532:.I538])" table:style-name="ce15">
            <text:p>2135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3-13T00:00:00" table:style-name="ce14">
            <text:p>13-03-2025</text:p>
          </table:table-cell>
          <table:table-cell office:value-type="string" office:string-value="March" table:formula="of:=TEXT([.A533]; &quot;mmmm&quot;)" table:style-name="ce14">
            <text:p>March</text:p>
          </table:table-cell>
          <table:table-cell office:value-type="string" office:string-value="2025-03" table:formula="of:=TEXT([.A533]; &quot;yyyy-mm&quot;)" table:style-name="ce14">
            <text:p>2025-03</text:p>
          </table:table-cell>
          <table:table-cell office:value-type="float" office:value="4" table:style-name="ce9">
            <text:p>4</text:p>
          </table:table-cell>
          <table:table-cell office:value-type="float" office:value="20" table:style-name="ce9">
            <text:p>20</text:p>
          </table:table-cell>
          <table:table-cell office:value-type="float" office:value="9" table:style-name="ce9">
            <text:p>9</text:p>
          </table:table-cell>
          <table:table-cell office:value-type="float" office:value="2116" table:style-name="ce9">
            <text:p>2116</text:p>
          </table:table-cell>
          <table:table-cell office:value-type="float" office:value="6" table:style-name="ce9">
            <text:p>6</text:p>
          </table:table-cell>
          <table:table-cell office:value-type="float" office:value="2136" table:formula="of:=SUM([.G533]+[.E533])" table:style-name="ce15">
            <text:p>2136</text:p>
          </table:table-cell>
          <table:table-cell office:value-type="float" office:value="3" table:formula="of:=[.F533]-[.H533]" table:style-name="ce15">
            <text:p>3</text:p>
          </table:table-cell>
          <table:table-cell office:value-type="percentage" office:value="-4.6816479400749065E-3" table:formula="of:=([.I534]-[.I533])/[.I533]" table:style-name="ce16">
            <text:p>0%</text:p>
          </table:table-cell>
          <table:table-cell office:value-type="string" office:string-value="Valid" table:formula="of:=IF([.F533]&lt;=[.E533]; &quot;Valid&quot;; &quot;Invalid&quot;)" table:style-name="ce17">
            <text:p>Valid</text:p>
          </table:table-cell>
          <table:table-cell office:value-type="string" office:string-value="Valid" table:formula="of:=IF([.H533]&lt;=[.G533]; &quot;Valid&quot;; &quot;Invalid&quot;)" table:style-name="ce17">
            <text:p>Valid</text:p>
          </table:table-cell>
          <table:table-cell office:value-type="string" office:string-value="Increasing Pressure" table:formula="of:=IF([.J533]&gt;0; &quot;Increasing Pressure&quot;; &quot;Stable/Reducing&quot;)" table:style-name="ce18">
            <text:p>Increasing Pressure</text:p>
          </table:table-cell>
          <table:table-cell office:value-type="float" office:value="0.66666666666666663" table:formula="of:=IFERROR([.H533]/[.F533]; 0)" table:style-name="ce17">
            <text:p>0.666666667</text:p>
          </table:table-cell>
          <table:table-cell office:value-type="float" office:value="2140" table:formula="of:=AVERAGE([.I533:.I539])" table:style-name="ce15">
            <text:p>2140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3-16T00:00:00" table:style-name="ce14">
            <text:p>16-03-2025</text:p>
          </table:table-cell>
          <table:table-cell office:value-type="string" office:string-value="March" table:formula="of:=TEXT([.A534]; &quot;mmmm&quot;)" table:style-name="ce14">
            <text:p>March</text:p>
          </table:table-cell>
          <table:table-cell office:value-type="string" office:string-value="2025-03" table:formula="of:=TEXT([.A534]; &quot;yyyy-mm&quot;)" table:style-name="ce14">
            <text:p>2025-03</text:p>
          </table:table-cell>
          <table:table-cell office:value-type="float" office:value="1" table:style-name="ce9">
            <text:p>1</text:p>
          </table:table-cell>
          <table:table-cell office:value-type="float" office:value="9" table:style-name="ce9">
            <text:p>9</text:p>
          </table:table-cell>
          <table:table-cell office:value-type="float" office:value="8" table:style-name="ce9">
            <text:p>8</text:p>
          </table:table-cell>
          <table:table-cell office:value-type="float" office:value="2117" table:style-name="ce9">
            <text:p>2117</text:p>
          </table:table-cell>
          <table:table-cell office:value-type="float" office:value="5" table:style-name="ce9">
            <text:p>5</text:p>
          </table:table-cell>
          <table:table-cell office:value-type="float" office:value="2126" table:formula="of:=SUM([.G534]+[.E534])" table:style-name="ce15">
            <text:p>2126</text:p>
          </table:table-cell>
          <table:table-cell office:value-type="float" office:value="3" table:formula="of:=[.F534]-[.H534]" table:style-name="ce15">
            <text:p>3</text:p>
          </table:table-cell>
          <table:table-cell office:value-type="percentage" office:value="-4.7036688617121356E-4" table:formula="of:=([.I535]-[.I534])/[.I534]" table:style-name="ce16">
            <text:p>0%</text:p>
          </table:table-cell>
          <table:table-cell office:value-type="string" office:string-value="Valid" table:formula="of:=IF([.F534]&lt;=[.E534]; &quot;Valid&quot;; &quot;Invalid&quot;)" table:style-name="ce17">
            <text:p>Valid</text:p>
          </table:table-cell>
          <table:table-cell office:value-type="string" office:string-value="Valid" table:formula="of:=IF([.H534]&lt;=[.G534]; &quot;Valid&quot;; &quot;Invalid&quot;)" table:style-name="ce17">
            <text:p>Valid</text:p>
          </table:table-cell>
          <table:table-cell office:value-type="string" office:string-value="Increasing Pressure" table:formula="of:=IF([.J534]&gt;0; &quot;Increasing Pressure&quot;; &quot;Stable/Reducing&quot;)" table:style-name="ce18">
            <text:p>Increasing Pressure</text:p>
          </table:table-cell>
          <table:table-cell office:value-type="float" office:value="0.625" table:formula="of:=IFERROR([.H534]/[.F534]; 0)" table:style-name="ce17">
            <text:p>0.625</text:p>
          </table:table-cell>
          <table:table-cell office:value-type="float" office:value="2142.2857142857142" table:formula="of:=AVERAGE([.I534:.I540])" table:style-name="ce15">
            <text:p>2142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3-17T00:00:00" table:style-name="ce14">
            <text:p>17-03-2025</text:p>
          </table:table-cell>
          <table:table-cell office:value-type="string" office:string-value="March" table:formula="of:=TEXT([.A535]; &quot;mmmm&quot;)" table:style-name="ce14">
            <text:p>March</text:p>
          </table:table-cell>
          <table:table-cell office:value-type="string" office:string-value="2025-03" table:formula="of:=TEXT([.A535]; &quot;yyyy-mm&quot;)" table:style-name="ce14">
            <text:p>2025-03</text:p>
          </table:table-cell>
          <table:table-cell office:value-type="float" office:value="5" table:style-name="ce9">
            <text:p>5</text:p>
          </table:table-cell>
          <table:table-cell office:value-type="float" office:value="14" table:style-name="ce9">
            <text:p>14</text:p>
          </table:table-cell>
          <table:table-cell office:value-type="float" office:value="0" table:style-name="ce9">
            <text:p>0</text:p>
          </table:table-cell>
          <table:table-cell office:value-type="float" office:value="2111" table:style-name="ce9">
            <text:p>2111</text:p>
          </table:table-cell>
          <table:table-cell office:value-type="float" office:value="8" table:style-name="ce9">
            <text:p>8</text:p>
          </table:table-cell>
          <table:table-cell office:value-type="float" office:value="2125" table:formula="of:=SUM([.G535]+[.E535])" table:style-name="ce15">
            <text:p>2125</text:p>
          </table:table-cell>
          <table:table-cell office:value-type="float" office:value="-8" table:formula="of:=[.F535]-[.H535]" table:style-name="ce15">
            <text:p>-8</text:p>
          </table:table-cell>
          <table:table-cell office:value-type="percentage" office:value="8.4705882352941169E-3" table:formula="of:=([.I536]-[.I535])/[.I535]" table:style-name="ce16">
            <text:p>1%</text:p>
          </table:table-cell>
          <table:table-cell office:value-type="string" office:string-value="Valid" table:formula="of:=IF([.F535]&lt;=[.E535]; &quot;Valid&quot;; &quot;Invalid&quot;)" table:style-name="ce17">
            <text:p>Valid</text:p>
          </table:table-cell>
          <table:table-cell office:value-type="string" office:string-value="Valid" table:formula="of:=IF([.H535]&lt;=[.G535]; &quot;Valid&quot;; &quot;Invalid&quot;)" table:style-name="ce17">
            <text:p>Valid</text:p>
          </table:table-cell>
          <table:table-cell office:value-type="string" office:string-value="Stable/Reducing" table:formula="of:=IF([.J535]&gt;0; &quot;Increasing Pressure&quot;; &quot;Stable/Reducing&quot;)" table:style-name="ce18">
            <text:p>Stable/Reducing</text:p>
          </table:table-cell>
          <table:table-cell office:value-type="float" office:value="0" table:formula="of:=IFERROR([.H535]/[.F535]; 0)" table:style-name="ce17">
            <text:p>0</text:p>
          </table:table-cell>
          <table:table-cell office:value-type="float" office:value="2147.7142857142858" table:formula="of:=AVERAGE([.I535:.I541])" table:style-name="ce15">
            <text:p>2148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3-18T00:00:00" table:style-name="ce14">
            <text:p>18-03-2025</text:p>
          </table:table-cell>
          <table:table-cell office:value-type="string" office:string-value="March" table:formula="of:=TEXT([.A536]; &quot;mmmm&quot;)" table:style-name="ce14">
            <text:p>March</text:p>
          </table:table-cell>
          <table:table-cell office:value-type="string" office:string-value="2025-03" table:formula="of:=TEXT([.A536]; &quot;yyyy-mm&quot;)" table:style-name="ce14">
            <text:p>2025-03</text:p>
          </table:table-cell>
          <table:table-cell office:value-type="float" office:value="19" table:style-name="ce9">
            <text:p>19</text:p>
          </table:table-cell>
          <table:table-cell office:value-type="float" office:value="34" table:style-name="ce9">
            <text:p>34</text:p>
          </table:table-cell>
          <table:table-cell office:value-type="float" office:value="6" table:style-name="ce9">
            <text:p>6</text:p>
          </table:table-cell>
          <table:table-cell office:value-type="float" office:value="2109" table:style-name="ce9">
            <text:p>2109</text:p>
          </table:table-cell>
          <table:table-cell office:value-type="float" office:value="8" table:style-name="ce9">
            <text:p>8</text:p>
          </table:table-cell>
          <table:table-cell office:value-type="float" office:value="2143" table:formula="of:=SUM([.G536]+[.E536])" table:style-name="ce15">
            <text:p>2143</text:p>
          </table:table-cell>
          <table:table-cell office:value-type="float" office:value="-2" table:formula="of:=[.F536]-[.H536]" table:style-name="ce15">
            <text:p>-2</text:p>
          </table:table-cell>
          <table:table-cell office:value-type="percentage" office:value="-9.3327111525898275E-4" table:formula="of:=([.I537]-[.I536])/[.I536]" table:style-name="ce16">
            <text:p>0%</text:p>
          </table:table-cell>
          <table:table-cell office:value-type="string" office:string-value="Valid" table:formula="of:=IF([.F536]&lt;=[.E536]; &quot;Valid&quot;; &quot;Invalid&quot;)" table:style-name="ce17">
            <text:p>Valid</text:p>
          </table:table-cell>
          <table:table-cell office:value-type="string" office:string-value="Valid" table:formula="of:=IF([.H536]&lt;=[.G536]; &quot;Valid&quot;; &quot;Invalid&quot;)" table:style-name="ce17">
            <text:p>Valid</text:p>
          </table:table-cell>
          <table:table-cell office:value-type="string" office:string-value="Stable/Reducing" table:formula="of:=IF([.J536]&gt;0; &quot;Increasing Pressure&quot;; &quot;Stable/Reducing&quot;)" table:style-name="ce18">
            <text:p>Stable/Reducing</text:p>
          </table:table-cell>
          <table:table-cell office:value-type="float" office:value="1.3333333333333333" table:formula="of:=IFERROR([.H536]/[.F536]; 0)" table:style-name="ce17">
            <text:p>1.333333333</text:p>
          </table:table-cell>
          <table:table-cell office:value-type="float" office:value="2155.5714285714284" table:formula="of:=AVERAGE([.I536:.I542])" table:style-name="ce15">
            <text:p>2156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3-19T00:00:00" table:style-name="ce14">
            <text:p>19-03-2025</text:p>
          </table:table-cell>
          <table:table-cell office:value-type="string" office:string-value="March" table:formula="of:=TEXT([.A537]; &quot;mmmm&quot;)" table:style-name="ce14">
            <text:p>March</text:p>
          </table:table-cell>
          <table:table-cell office:value-type="string" office:string-value="2025-03" table:formula="of:=TEXT([.A537]; &quot;yyyy-mm&quot;)" table:style-name="ce14">
            <text:p>2025-03</text:p>
          </table:table-cell>
          <table:table-cell office:value-type="float" office:value="6" table:style-name="ce9">
            <text:p>6</text:p>
          </table:table-cell>
          <table:table-cell office:value-type="float" office:value="22" table:style-name="ce9">
            <text:p>22</text:p>
          </table:table-cell>
          <table:table-cell office:value-type="float" office:value="14" table:style-name="ce9">
            <text:p>14</text:p>
          </table:table-cell>
          <table:table-cell office:value-type="float" office:value="2119" table:style-name="ce9">
            <text:p>2119</text:p>
          </table:table-cell>
          <table:table-cell office:value-type="float" office:value="9" table:style-name="ce9">
            <text:p>9</text:p>
          </table:table-cell>
          <table:table-cell office:value-type="float" office:value="2141" table:formula="of:=SUM([.G537]+[.E537])" table:style-name="ce15">
            <text:p>2141</text:p>
          </table:table-cell>
          <table:table-cell office:value-type="float" office:value="5" table:formula="of:=[.F537]-[.H537]" table:style-name="ce15">
            <text:p>5</text:p>
          </table:table-cell>
          <table:table-cell office:value-type="percentage" office:value="1.4012143858010276E-3" table:formula="of:=([.I538]-[.I537])/[.I537]" table:style-name="ce16">
            <text:p>0%</text:p>
          </table:table-cell>
          <table:table-cell office:value-type="string" office:string-value="Valid" table:formula="of:=IF([.F537]&lt;=[.E537]; &quot;Valid&quot;; &quot;Invalid&quot;)" table:style-name="ce17">
            <text:p>Valid</text:p>
          </table:table-cell>
          <table:table-cell office:value-type="string" office:string-value="Valid" table:formula="of:=IF([.H537]&lt;=[.G537]; &quot;Valid&quot;; &quot;Invalid&quot;)" table:style-name="ce17">
            <text:p>Valid</text:p>
          </table:table-cell>
          <table:table-cell office:value-type="string" office:string-value="Increasing Pressure" table:formula="of:=IF([.J537]&gt;0; &quot;Increasing Pressure&quot;; &quot;Stable/Reducing&quot;)" table:style-name="ce18">
            <text:p>Increasing Pressure</text:p>
          </table:table-cell>
          <table:table-cell office:value-type="float" office:value="0.6428571428571429" table:formula="of:=IFERROR([.H537]/[.F537]; 0)" table:style-name="ce17">
            <text:p>0.642857143</text:p>
          </table:table-cell>
          <table:table-cell office:value-type="float" office:value="2160.5714285714284" table:formula="of:=AVERAGE([.I537:.I543])" table:style-name="ce15">
            <text:p>2161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3-20T00:00:00" table:style-name="ce14">
            <text:p>20-03-2025</text:p>
          </table:table-cell>
          <table:table-cell office:value-type="string" office:string-value="March" table:formula="of:=TEXT([.A538]; &quot;mmmm&quot;)" table:style-name="ce14">
            <text:p>March</text:p>
          </table:table-cell>
          <table:table-cell office:value-type="string" office:string-value="2025-03" table:formula="of:=TEXT([.A538]; &quot;yyyy-mm&quot;)" table:style-name="ce14">
            <text:p>2025-03</text:p>
          </table:table-cell>
          <table:table-cell office:value-type="float" office:value="9" table:style-name="ce9">
            <text:p>9</text:p>
          </table:table-cell>
          <table:table-cell office:value-type="float" office:value="20" table:style-name="ce9">
            <text:p>20</text:p>
          </table:table-cell>
          <table:table-cell office:value-type="float" office:value="11" table:style-name="ce9">
            <text:p>11</text:p>
          </table:table-cell>
          <table:table-cell office:value-type="float" office:value="2124" table:style-name="ce9">
            <text:p>2124</text:p>
          </table:table-cell>
          <table:table-cell office:value-type="float" office:value="7" table:style-name="ce9">
            <text:p>7</text:p>
          </table:table-cell>
          <table:table-cell office:value-type="float" office:value="2144" table:formula="of:=SUM([.G538]+[.E538])" table:style-name="ce15">
            <text:p>2144</text:p>
          </table:table-cell>
          <table:table-cell office:value-type="float" office:value="4" table:formula="of:=[.F538]-[.H538]" table:style-name="ce15">
            <text:p>4</text:p>
          </table:table-cell>
          <table:table-cell office:value-type="percentage" office:value="9.7947761194029856E-3" table:formula="of:=([.I539]-[.I538])/[.I538]" table:style-name="ce16">
            <text:p>1%</text:p>
          </table:table-cell>
          <table:table-cell office:value-type="string" office:string-value="Valid" table:formula="of:=IF([.F538]&lt;=[.E538]; &quot;Valid&quot;; &quot;Invalid&quot;)" table:style-name="ce17">
            <text:p>Valid</text:p>
          </table:table-cell>
          <table:table-cell office:value-type="string" office:string-value="Valid" table:formula="of:=IF([.H538]&lt;=[.G538]; &quot;Valid&quot;; &quot;Invalid&quot;)" table:style-name="ce17">
            <text:p>Valid</text:p>
          </table:table-cell>
          <table:table-cell office:value-type="string" office:string-value="Increasing Pressure" table:formula="of:=IF([.J538]&gt;0; &quot;Increasing Pressure&quot;; &quot;Stable/Reducing&quot;)" table:style-name="ce18">
            <text:p>Increasing Pressure</text:p>
          </table:table-cell>
          <table:table-cell office:value-type="float" office:value="0.63636363636363635" table:formula="of:=IFERROR([.H538]/[.F538]; 0)" table:style-name="ce17">
            <text:p>0.636363636</text:p>
          </table:table-cell>
          <table:table-cell office:value-type="float" office:value="2170.1428571428573" table:formula="of:=AVERAGE([.I538:.I544])" table:style-name="ce15">
            <text:p>2170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3-23T00:00:00" table:style-name="ce14">
            <text:p>23-03-2025</text:p>
          </table:table-cell>
          <table:table-cell office:value-type="string" office:string-value="March" table:formula="of:=TEXT([.A539]; &quot;mmmm&quot;)" table:style-name="ce14">
            <text:p>March</text:p>
          </table:table-cell>
          <table:table-cell office:value-type="string" office:string-value="2025-03" table:formula="of:=TEXT([.A539]; &quot;yyyy-mm&quot;)" table:style-name="ce14">
            <text:p>2025-03</text:p>
          </table:table-cell>
          <table:table-cell office:value-type="float" office:value="15" table:style-name="ce9">
            <text:p>15</text:p>
          </table:table-cell>
          <table:table-cell office:value-type="float" office:value="29" table:style-name="ce9">
            <text:p>29</text:p>
          </table:table-cell>
          <table:table-cell office:value-type="float" office:value="9" table:style-name="ce9">
            <text:p>9</text:p>
          </table:table-cell>
          <table:table-cell office:value-type="float" office:value="2136" table:style-name="ce9">
            <text:p>2136</text:p>
          </table:table-cell>
          <table:table-cell office:value-type="float" office:value="2" table:style-name="ce9">
            <text:p>2</text:p>
          </table:table-cell>
          <table:table-cell office:value-type="float" office:value="2165" table:formula="of:=SUM([.G539]+[.E539])" table:style-name="ce15">
            <text:p>2165</text:p>
          </table:table-cell>
          <table:table-cell office:value-type="float" office:value="7" table:formula="of:=[.F539]-[.H539]" table:style-name="ce15">
            <text:p>7</text:p>
          </table:table-cell>
          <table:table-cell office:value-type="percentage" office:value="-6.0046189376443421E-3" table:formula="of:=([.I540]-[.I539])/[.I539]" table:style-name="ce16">
            <text:p>-1%</text:p>
          </table:table-cell>
          <table:table-cell office:value-type="string" office:string-value="Valid" table:formula="of:=IF([.F539]&lt;=[.E539]; &quot;Valid&quot;; &quot;Invalid&quot;)" table:style-name="ce17">
            <text:p>Valid</text:p>
          </table:table-cell>
          <table:table-cell office:value-type="string" office:string-value="Valid" table:formula="of:=IF([.H539]&lt;=[.G539]; &quot;Valid&quot;; &quot;Invalid&quot;)" table:style-name="ce17">
            <text:p>Valid</text:p>
          </table:table-cell>
          <table:table-cell office:value-type="string" office:string-value="Increasing Pressure" table:formula="of:=IF([.J539]&gt;0; &quot;Increasing Pressure&quot;; &quot;Stable/Reducing&quot;)" table:style-name="ce18">
            <text:p>Increasing Pressure</text:p>
          </table:table-cell>
          <table:table-cell office:value-type="float" office:value="0.22222222222222221" table:formula="of:=IFERROR([.H539]/[.F539]; 0)" table:style-name="ce17">
            <text:p>0.222222222</text:p>
          </table:table-cell>
          <table:table-cell office:value-type="float" office:value="2180.7142857142858" table:formula="of:=AVERAGE([.I539:.I545])" table:style-name="ce15">
            <text:p>2181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3-24T00:00:00" table:style-name="ce14">
            <text:p>24-03-2025</text:p>
          </table:table-cell>
          <table:table-cell office:value-type="string" office:string-value="March" table:formula="of:=TEXT([.A540]; &quot;mmmm&quot;)" table:style-name="ce14">
            <text:p>March</text:p>
          </table:table-cell>
          <table:table-cell office:value-type="string" office:string-value="2025-03" table:formula="of:=TEXT([.A540]; &quot;yyyy-mm&quot;)" table:style-name="ce14">
            <text:p>2025-03</text:p>
          </table:table-cell>
          <table:table-cell office:value-type="float" office:value="7" table:style-name="ce9">
            <text:p>7</text:p>
          </table:table-cell>
          <table:table-cell office:value-type="float" office:value="13" table:style-name="ce9">
            <text:p>13</text:p>
          </table:table-cell>
          <table:table-cell office:value-type="float" office:value="11" table:style-name="ce9">
            <text:p>11</text:p>
          </table:table-cell>
          <table:table-cell office:value-type="float" office:value="2139" table:style-name="ce9">
            <text:p>2139</text:p>
          </table:table-cell>
          <table:table-cell office:value-type="float" office:value="7" table:style-name="ce9">
            <text:p>7</text:p>
          </table:table-cell>
          <table:table-cell office:value-type="float" office:value="2152" table:formula="of:=SUM([.G540]+[.E540])" table:style-name="ce15">
            <text:p>2152</text:p>
          </table:table-cell>
          <table:table-cell office:value-type="float" office:value="4" table:formula="of:=[.F540]-[.H540]" table:style-name="ce15">
            <text:p>4</text:p>
          </table:table-cell>
          <table:table-cell office:value-type="percentage" office:value="5.5762081784386614E-3" table:formula="of:=([.I541]-[.I540])/[.I540]" table:style-name="ce16">
            <text:p>1%</text:p>
          </table:table-cell>
          <table:table-cell office:value-type="string" office:string-value="Valid" table:formula="of:=IF([.F540]&lt;=[.E540]; &quot;Valid&quot;; &quot;Invalid&quot;)" table:style-name="ce17">
            <text:p>Valid</text:p>
          </table:table-cell>
          <table:table-cell office:value-type="string" office:string-value="Valid" table:formula="of:=IF([.H540]&lt;=[.G540]; &quot;Valid&quot;; &quot;Invalid&quot;)" table:style-name="ce17">
            <text:p>Valid</text:p>
          </table:table-cell>
          <table:table-cell office:value-type="string" office:string-value="Increasing Pressure" table:formula="of:=IF([.J540]&gt;0; &quot;Increasing Pressure&quot;; &quot;Stable/Reducing&quot;)" table:style-name="ce18">
            <text:p>Increasing Pressure</text:p>
          </table:table-cell>
          <table:table-cell office:value-type="float" office:value="0.63636363636363635" table:formula="of:=IFERROR([.H540]/[.F540]; 0)" table:style-name="ce17">
            <text:p>0.636363636</text:p>
          </table:table-cell>
          <table:table-cell office:value-type="float" office:value="2189.5714285714284" table:formula="of:=AVERAGE([.I540:.I546])" table:style-name="ce15">
            <text:p>2190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3-25T00:00:00" table:style-name="ce14">
            <text:p>25-03-2025</text:p>
          </table:table-cell>
          <table:table-cell office:value-type="string" office:string-value="March" table:formula="of:=TEXT([.A541]; &quot;mmmm&quot;)" table:style-name="ce14">
            <text:p>March</text:p>
          </table:table-cell>
          <table:table-cell office:value-type="string" office:string-value="2025-03" table:formula="of:=TEXT([.A541]; &quot;yyyy-mm&quot;)" table:style-name="ce14">
            <text:p>2025-03</text:p>
          </table:table-cell>
          <table:table-cell office:value-type="float" office:value="12" table:style-name="ce9">
            <text:p>12</text:p>
          </table:table-cell>
          <table:table-cell office:value-type="float" office:value="19" table:style-name="ce9">
            <text:p>19</text:p>
          </table:table-cell>
          <table:table-cell office:value-type="float" office:value="7" table:style-name="ce9">
            <text:p>7</text:p>
          </table:table-cell>
          <table:table-cell office:value-type="float" office:value="2145" table:style-name="ce9">
            <text:p>2145</text:p>
          </table:table-cell>
          <table:table-cell office:value-type="float" office:value="6" table:style-name="ce9">
            <text:p>6</text:p>
          </table:table-cell>
          <table:table-cell office:value-type="float" office:value="2164" table:formula="of:=SUM([.G541]+[.E541])" table:style-name="ce15">
            <text:p>2164</text:p>
          </table:table-cell>
          <table:table-cell office:value-type="float" office:value="1" table:formula="of:=[.F541]-[.H541]" table:style-name="ce15">
            <text:p>1</text:p>
          </table:table-cell>
          <table:table-cell office:value-type="percentage" office:value="7.3937153419593345E-3" table:formula="of:=([.I542]-[.I541])/[.I541]" table:style-name="ce16">
            <text:p>1%</text:p>
          </table:table-cell>
          <table:table-cell office:value-type="string" office:string-value="Valid" table:formula="of:=IF([.F541]&lt;=[.E541]; &quot;Valid&quot;; &quot;Invalid&quot;)" table:style-name="ce17">
            <text:p>Valid</text:p>
          </table:table-cell>
          <table:table-cell office:value-type="string" office:string-value="Valid" table:formula="of:=IF([.H541]&lt;=[.G541]; &quot;Valid&quot;; &quot;Invalid&quot;)" table:style-name="ce17">
            <text:p>Valid</text:p>
          </table:table-cell>
          <table:table-cell office:value-type="string" office:string-value="Increasing Pressure" table:formula="of:=IF([.J541]&gt;0; &quot;Increasing Pressure&quot;; &quot;Stable/Reducing&quot;)" table:style-name="ce18">
            <text:p>Increasing Pressure</text:p>
          </table:table-cell>
          <table:table-cell office:value-type="float" office:value="0.8571428571428571" table:formula="of:=IFERROR([.H541]/[.F541]; 0)" table:style-name="ce17">
            <text:p>0.857142857</text:p>
          </table:table-cell>
          <table:table-cell office:value-type="float" office:value="2202" table:formula="of:=AVERAGE([.I541:.I547])" table:style-name="ce15">
            <text:p>2202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3-26T00:00:00" table:style-name="ce14">
            <text:p>26-03-2025</text:p>
          </table:table-cell>
          <table:table-cell office:value-type="string" office:string-value="March" table:formula="of:=TEXT([.A542]; &quot;mmmm&quot;)" table:style-name="ce14">
            <text:p>March</text:p>
          </table:table-cell>
          <table:table-cell office:value-type="string" office:string-value="2025-03" table:formula="of:=TEXT([.A542]; &quot;yyyy-mm&quot;)" table:style-name="ce14">
            <text:p>2025-03</text:p>
          </table:table-cell>
          <table:table-cell office:value-type="float" office:value="9" table:style-name="ce9">
            <text:p>9</text:p>
          </table:table-cell>
          <table:table-cell office:value-type="float" office:value="21" table:style-name="ce9">
            <text:p>21</text:p>
          </table:table-cell>
          <table:table-cell office:value-type="float" office:value="15" table:style-name="ce9">
            <text:p>15</text:p>
          </table:table-cell>
          <table:table-cell office:value-type="float" office:value="2159" table:style-name="ce9">
            <text:p>2159</text:p>
          </table:table-cell>
          <table:table-cell office:value-type="float" office:value="2" table:style-name="ce9">
            <text:p>2</text:p>
          </table:table-cell>
          <table:table-cell office:value-type="float" office:value="2180" table:formula="of:=SUM([.G542]+[.E542])" table:style-name="ce15">
            <text:p>2180</text:p>
          </table:table-cell>
          <table:table-cell office:value-type="float" office:value="13" table:formula="of:=[.F542]-[.H542]" table:style-name="ce15">
            <text:p>13</text:p>
          </table:table-cell>
          <table:table-cell office:value-type="percentage" office:value="-9.1743119266055051E-4" table:formula="of:=([.I543]-[.I542])/[.I542]" table:style-name="ce16">
            <text:p>0%</text:p>
          </table:table-cell>
          <table:table-cell office:value-type="string" office:string-value="Valid" table:formula="of:=IF([.F542]&lt;=[.E542]; &quot;Valid&quot;; &quot;Invalid&quot;)" table:style-name="ce17">
            <text:p>Valid</text:p>
          </table:table-cell>
          <table:table-cell office:value-type="string" office:string-value="Valid" table:formula="of:=IF([.H542]&lt;=[.G542]; &quot;Valid&quot;; &quot;Invalid&quot;)" table:style-name="ce17">
            <text:p>Valid</text:p>
          </table:table-cell>
          <table:table-cell office:value-type="string" office:string-value="Increasing Pressure" table:formula="of:=IF([.J542]&gt;0; &quot;Increasing Pressure&quot;; &quot;Stable/Reducing&quot;)" table:style-name="ce18">
            <text:p>Increasing Pressure</text:p>
          </table:table-cell>
          <table:table-cell office:value-type="float" office:value="0.13333333333333333" table:formula="of:=IFERROR([.H542]/[.F542]; 0)" table:style-name="ce17">
            <text:p>0.133333333</text:p>
          </table:table-cell>
          <table:table-cell office:value-type="float" office:value="2214.1428571428573" table:formula="of:=AVERAGE([.I542:.I548])" table:style-name="ce15">
            <text:p>2214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3-27T00:00:00" table:style-name="ce14">
            <text:p>27-03-2025</text:p>
          </table:table-cell>
          <table:table-cell office:value-type="string" office:string-value="March" table:formula="of:=TEXT([.A543]; &quot;mmmm&quot;)" table:style-name="ce14">
            <text:p>March</text:p>
          </table:table-cell>
          <table:table-cell office:value-type="string" office:string-value="2025-03" table:formula="of:=TEXT([.A543]; &quot;yyyy-mm&quot;)" table:style-name="ce14">
            <text:p>2025-03</text:p>
          </table:table-cell>
          <table:table-cell office:value-type="float" office:value="1" table:style-name="ce9">
            <text:p>1</text:p>
          </table:table-cell>
          <table:table-cell office:value-type="float" office:value="19" table:style-name="ce9">
            <text:p>19</text:p>
          </table:table-cell>
          <table:table-cell office:value-type="float" office:value="13" table:style-name="ce9">
            <text:p>13</text:p>
          </table:table-cell>
          <table:table-cell office:value-type="float" office:value="2159" table:style-name="ce9">
            <text:p>2159</text:p>
          </table:table-cell>
          <table:table-cell office:value-type="float" office:value="2" table:style-name="ce9">
            <text:p>2</text:p>
          </table:table-cell>
          <table:table-cell office:value-type="float" office:value="2178" table:formula="of:=SUM([.G543]+[.E543])" table:style-name="ce15">
            <text:p>2178</text:p>
          </table:table-cell>
          <table:table-cell office:value-type="float" office:value="11" table:formula="of:=[.F543]-[.H543]" table:style-name="ce15">
            <text:p>11</text:p>
          </table:table-cell>
          <table:table-cell office:value-type="percentage" office:value="1.3774104683195593E-2" table:formula="of:=([.I544]-[.I543])/[.I543]" table:style-name="ce16">
            <text:p>1%</text:p>
          </table:table-cell>
          <table:table-cell office:value-type="string" office:string-value="Valid" table:formula="of:=IF([.F543]&lt;=[.E543]; &quot;Valid&quot;; &quot;Invalid&quot;)" table:style-name="ce17">
            <text:p>Valid</text:p>
          </table:table-cell>
          <table:table-cell office:value-type="string" office:string-value="Valid" table:formula="of:=IF([.H543]&lt;=[.G543]; &quot;Valid&quot;; &quot;Invalid&quot;)" table:style-name="ce17">
            <text:p>Valid</text:p>
          </table:table-cell>
          <table:table-cell office:value-type="string" office:string-value="Increasing Pressure" table:formula="of:=IF([.J543]&gt;0; &quot;Increasing Pressure&quot;; &quot;Stable/Reducing&quot;)" table:style-name="ce18">
            <text:p>Increasing Pressure</text:p>
          </table:table-cell>
          <table:table-cell office:value-type="float" office:value="0.15384615384615385" table:formula="of:=IFERROR([.H543]/[.F543]; 0)" table:style-name="ce17">
            <text:p>0.153846154</text:p>
          </table:table-cell>
          <table:table-cell office:value-type="float" office:value="2223.8571428571427" table:formula="of:=AVERAGE([.I543:.I549])" table:style-name="ce15">
            <text:p>2224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3-30T00:00:00" table:style-name="ce14">
            <text:p>30-03-2025</text:p>
          </table:table-cell>
          <table:table-cell office:value-type="string" office:string-value="March" table:formula="of:=TEXT([.A544]; &quot;mmmm&quot;)" table:style-name="ce14">
            <text:p>March</text:p>
          </table:table-cell>
          <table:table-cell office:value-type="string" office:string-value="2025-03" table:formula="of:=TEXT([.A544]; &quot;yyyy-mm&quot;)" table:style-name="ce14">
            <text:p>2025-03</text:p>
          </table:table-cell>
          <table:table-cell office:value-type="float" office:value="9" table:style-name="ce9">
            <text:p>9</text:p>
          </table:table-cell>
          <table:table-cell office:value-type="float" office:value="20" table:style-name="ce9">
            <text:p>20</text:p>
          </table:table-cell>
          <table:table-cell office:value-type="float" office:value="5" table:style-name="ce9">
            <text:p>5</text:p>
          </table:table-cell>
          <table:table-cell office:value-type="float" office:value="2188" table:style-name="ce9">
            <text:p>2188</text:p>
          </table:table-cell>
          <table:table-cell office:value-type="float" office:value="2" table:style-name="ce9">
            <text:p>2</text:p>
          </table:table-cell>
          <table:table-cell office:value-type="float" office:value="2208" table:formula="of:=SUM([.G544]+[.E544])" table:style-name="ce15">
            <text:p>2208</text:p>
          </table:table-cell>
          <table:table-cell office:value-type="float" office:value="3" table:formula="of:=[.F544]-[.H544]" table:style-name="ce15">
            <text:p>3</text:p>
          </table:table-cell>
          <table:table-cell office:value-type="percentage" office:value="4.528985507246377E-3" table:formula="of:=([.I545]-[.I544])/[.I544]" table:style-name="ce16">
            <text:p>0%</text:p>
          </table:table-cell>
          <table:table-cell office:value-type="string" office:string-value="Valid" table:formula="of:=IF([.F544]&lt;=[.E544]; &quot;Valid&quot;; &quot;Invalid&quot;)" table:style-name="ce17">
            <text:p>Valid</text:p>
          </table:table-cell>
          <table:table-cell office:value-type="string" office:string-value="Valid" table:formula="of:=IF([.H544]&lt;=[.G544]; &quot;Valid&quot;; &quot;Invalid&quot;)" table:style-name="ce17">
            <text:p>Valid</text:p>
          </table:table-cell>
          <table:table-cell office:value-type="string" office:string-value="Increasing Pressure" table:formula="of:=IF([.J544]&gt;0; &quot;Increasing Pressure&quot;; &quot;Stable/Reducing&quot;)" table:style-name="ce18">
            <text:p>Increasing Pressure</text:p>
          </table:table-cell>
          <table:table-cell office:value-type="float" office:value="0.4" table:formula="of:=IFERROR([.H544]/[.F544]; 0)" table:style-name="ce17">
            <text:p>0.4</text:p>
          </table:table-cell>
          <table:table-cell office:value-type="float" office:value="2235.4285714285716" table:formula="of:=AVERAGE([.I544:.I550])" table:style-name="ce15">
            <text:p>2235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3-31T00:00:00" table:style-name="ce14">
            <text:p>31-03-2025</text:p>
          </table:table-cell>
          <table:table-cell office:value-type="string" office:string-value="March" table:formula="of:=TEXT([.A545]; &quot;mmmm&quot;)" table:style-name="ce14">
            <text:p>March</text:p>
          </table:table-cell>
          <table:table-cell office:value-type="string" office:string-value="2025-03" table:formula="of:=TEXT([.A545]; &quot;yyyy-mm&quot;)" table:style-name="ce14">
            <text:p>2025-03</text:p>
          </table:table-cell>
          <table:table-cell office:value-type="float" office:value="9" table:style-name="ce9">
            <text:p>9</text:p>
          </table:table-cell>
          <table:table-cell office:value-type="float" office:value="25" table:style-name="ce9">
            <text:p>25</text:p>
          </table:table-cell>
          <table:table-cell office:value-type="float" office:value="8" table:style-name="ce9">
            <text:p>8</text:p>
          </table:table-cell>
          <table:table-cell office:value-type="float" office:value="2193" table:style-name="ce9">
            <text:p>2193</text:p>
          </table:table-cell>
          <table:table-cell office:value-type="float" office:value="5" table:style-name="ce9">
            <text:p>5</text:p>
          </table:table-cell>
          <table:table-cell office:value-type="float" office:value="2218" table:formula="of:=SUM([.G545]+[.E545])" table:style-name="ce15">
            <text:p>2218</text:p>
          </table:table-cell>
          <table:table-cell office:value-type="float" office:value="3" table:formula="of:=[.F545]-[.H545]" table:style-name="ce15">
            <text:p>3</text:p>
          </table:table-cell>
          <table:table-cell office:value-type="percentage" office:value="4.0577096483318306E-3" table:formula="of:=([.I546]-[.I545])/[.I545]" table:style-name="ce16">
            <text:p>0%</text:p>
          </table:table-cell>
          <table:table-cell office:value-type="string" office:string-value="Valid" table:formula="of:=IF([.F545]&lt;=[.E545]; &quot;Valid&quot;; &quot;Invalid&quot;)" table:style-name="ce17">
            <text:p>Valid</text:p>
          </table:table-cell>
          <table:table-cell office:value-type="string" office:string-value="Valid" table:formula="of:=IF([.H545]&lt;=[.G545]; &quot;Valid&quot;; &quot;Invalid&quot;)" table:style-name="ce17">
            <text:p>Valid</text:p>
          </table:table-cell>
          <table:table-cell office:value-type="string" office:string-value="Increasing Pressure" table:formula="of:=IF([.J545]&gt;0; &quot;Increasing Pressure&quot;; &quot;Stable/Reducing&quot;)" table:style-name="ce18">
            <text:p>Increasing Pressure</text:p>
          </table:table-cell>
          <table:table-cell office:value-type="float" office:value="0.625" table:formula="of:=IFERROR([.H545]/[.F545]; 0)" table:style-name="ce17">
            <text:p>0.625</text:p>
          </table:table-cell>
          <table:table-cell office:value-type="float" office:value="2245.2857142857142" table:formula="of:=AVERAGE([.I545:.I551])" table:style-name="ce15">
            <text:p>2245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4-01T00:00:00" table:style-name="ce14">
            <text:p>01-04-2025</text:p>
          </table:table-cell>
          <table:table-cell office:value-type="string" office:string-value="April" table:formula="of:=TEXT([.A546]; &quot;mmmm&quot;)" table:style-name="ce14">
            <text:p>April</text:p>
          </table:table-cell>
          <table:table-cell office:value-type="string" office:string-value="2025-04" table:formula="of:=TEXT([.A546]; &quot;yyyy-mm&quot;)" table:style-name="ce14">
            <text:p>2025-04</text:p>
          </table:table-cell>
          <table:table-cell office:value-type="float" office:value="17" table:style-name="ce9">
            <text:p>17</text:p>
          </table:table-cell>
          <table:table-cell office:value-type="float" office:value="36" table:style-name="ce9">
            <text:p>36</text:p>
          </table:table-cell>
          <table:table-cell office:value-type="float" office:value="7" table:style-name="ce9">
            <text:p>7</text:p>
          </table:table-cell>
          <table:table-cell office:value-type="float" office:value="2191" table:style-name="ce9">
            <text:p>2191</text:p>
          </table:table-cell>
          <table:table-cell office:value-type="float" office:value="12" table:style-name="ce9">
            <text:p>12</text:p>
          </table:table-cell>
          <table:table-cell office:value-type="float" office:value="2227" table:formula="of:=SUM([.G546]+[.E546])" table:style-name="ce15">
            <text:p>2227</text:p>
          </table:table-cell>
          <table:table-cell office:value-type="float" office:value="-5" table:formula="of:=[.F546]-[.H546]" table:style-name="ce15">
            <text:p>-5</text:p>
          </table:table-cell>
          <table:table-cell office:value-type="percentage" office:value="5.3884149079479124E-3" table:formula="of:=([.I547]-[.I546])/[.I546]" table:style-name="ce16">
            <text:p>1%</text:p>
          </table:table-cell>
          <table:table-cell office:value-type="string" office:string-value="Valid" table:formula="of:=IF([.F546]&lt;=[.E546]; &quot;Valid&quot;; &quot;Invalid&quot;)" table:style-name="ce17">
            <text:p>Valid</text:p>
          </table:table-cell>
          <table:table-cell office:value-type="string" office:string-value="Valid" table:formula="of:=IF([.H546]&lt;=[.G546]; &quot;Valid&quot;; &quot;Invalid&quot;)" table:style-name="ce17">
            <text:p>Valid</text:p>
          </table:table-cell>
          <table:table-cell office:value-type="string" office:string-value="Stable/Reducing" table:formula="of:=IF([.J546]&gt;0; &quot;Increasing Pressure&quot;; &quot;Stable/Reducing&quot;)" table:style-name="ce18">
            <text:p>Stable/Reducing</text:p>
          </table:table-cell>
          <table:table-cell office:value-type="float" office:value="1.7142857142857142" table:formula="of:=IFERROR([.H546]/[.F546]; 0)" table:style-name="ce17">
            <text:p>1.714285714</text:p>
          </table:table-cell>
          <table:table-cell office:value-type="float" office:value="2252.7142857142858" table:formula="of:=AVERAGE([.I546:.I552])" table:style-name="ce15">
            <text:p>2253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4-02T00:00:00" table:style-name="ce14">
            <text:p>02-04-2025</text:p>
          </table:table-cell>
          <table:table-cell office:value-type="string" office:string-value="April" table:formula="of:=TEXT([.A547]; &quot;mmmm&quot;)" table:style-name="ce14">
            <text:p>April</text:p>
          </table:table-cell>
          <table:table-cell office:value-type="string" office:string-value="2025-04" table:formula="of:=TEXT([.A547]; &quot;yyyy-mm&quot;)" table:style-name="ce14">
            <text:p>2025-04</text:p>
          </table:table-cell>
          <table:table-cell office:value-type="float" office:value="5" table:style-name="ce9">
            <text:p>5</text:p>
          </table:table-cell>
          <table:table-cell office:value-type="float" office:value="31" table:style-name="ce9">
            <text:p>31</text:p>
          </table:table-cell>
          <table:table-cell office:value-type="float" office:value="16" table:style-name="ce9">
            <text:p>16</text:p>
          </table:table-cell>
          <table:table-cell office:value-type="float" office:value="2208" table:style-name="ce9">
            <text:p>2208</text:p>
          </table:table-cell>
          <table:table-cell office:value-type="float" office:value="3" table:style-name="ce9">
            <text:p>3</text:p>
          </table:table-cell>
          <table:table-cell office:value-type="float" office:value="2239" table:formula="of:=SUM([.G547]+[.E547])" table:style-name="ce15">
            <text:p>2239</text:p>
          </table:table-cell>
          <table:table-cell office:value-type="float" office:value="13" table:formula="of:=[.F547]-[.H547]" table:style-name="ce15">
            <text:p>13</text:p>
          </table:table-cell>
          <table:table-cell office:value-type="percentage" office:value="4.4662795891022775E-3" table:formula="of:=([.I548]-[.I547])/[.I547]" table:style-name="ce16">
            <text:p>0%</text:p>
          </table:table-cell>
          <table:table-cell office:value-type="string" office:string-value="Valid" table:formula="of:=IF([.F547]&lt;=[.E547]; &quot;Valid&quot;; &quot;Invalid&quot;)" table:style-name="ce17">
            <text:p>Valid</text:p>
          </table:table-cell>
          <table:table-cell office:value-type="string" office:string-value="Valid" table:formula="of:=IF([.H547]&lt;=[.G547]; &quot;Valid&quot;; &quot;Invalid&quot;)" table:style-name="ce17">
            <text:p>Valid</text:p>
          </table:table-cell>
          <table:table-cell office:value-type="string" office:string-value="Increasing Pressure" table:formula="of:=IF([.J547]&gt;0; &quot;Increasing Pressure&quot;; &quot;Stable/Reducing&quot;)" table:style-name="ce18">
            <text:p>Increasing Pressure</text:p>
          </table:table-cell>
          <table:table-cell office:value-type="float" office:value="0.1875" table:formula="of:=IFERROR([.H547]/[.F547]; 0)" table:style-name="ce17">
            <text:p>0.1875</text:p>
          </table:table-cell>
          <table:table-cell office:value-type="float" office:value="2261.7142857142858" table:formula="of:=AVERAGE([.I547:.I553])" table:style-name="ce15">
            <text:p>2262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4-03T00:00:00" table:style-name="ce14">
            <text:p>03-04-2025</text:p>
          </table:table-cell>
          <table:table-cell office:value-type="string" office:string-value="April" table:formula="of:=TEXT([.A548]; &quot;mmmm&quot;)" table:style-name="ce14">
            <text:p>April</text:p>
          </table:table-cell>
          <table:table-cell office:value-type="string" office:string-value="2025-04" table:formula="of:=TEXT([.A548]; &quot;yyyy-mm&quot;)" table:style-name="ce14">
            <text:p>2025-04</text:p>
          </table:table-cell>
          <table:table-cell office:value-type="float" office:value="12" table:style-name="ce9">
            <text:p>12</text:p>
          </table:table-cell>
          <table:table-cell office:value-type="float" office:value="26" table:style-name="ce9">
            <text:p>26</text:p>
          </table:table-cell>
          <table:table-cell office:value-type="float" office:value="18" table:style-name="ce9">
            <text:p>18</text:p>
          </table:table-cell>
          <table:table-cell office:value-type="float" office:value="2223" table:style-name="ce9">
            <text:p>2223</text:p>
          </table:table-cell>
          <table:table-cell office:value-type="float" office:value="8" table:style-name="ce9">
            <text:p>8</text:p>
          </table:table-cell>
          <table:table-cell office:value-type="float" office:value="2249" table:formula="of:=SUM([.G548]+[.E548])" table:style-name="ce15">
            <text:p>2249</text:p>
          </table:table-cell>
          <table:table-cell office:value-type="float" office:value="10" table:formula="of:=[.F548]-[.H548]" table:style-name="ce15">
            <text:p>10</text:p>
          </table:table-cell>
          <table:table-cell office:value-type="percentage" office:value="-4.4464206313917296E-4" table:formula="of:=([.I549]-[.I548])/[.I548]" table:style-name="ce16">
            <text:p>0%</text:p>
          </table:table-cell>
          <table:table-cell office:value-type="string" office:string-value="Valid" table:formula="of:=IF([.F548]&lt;=[.E548]; &quot;Valid&quot;; &quot;Invalid&quot;)" table:style-name="ce17">
            <text:p>Valid</text:p>
          </table:table-cell>
          <table:table-cell office:value-type="string" office:string-value="Valid" table:formula="of:=IF([.H548]&lt;=[.G548]; &quot;Valid&quot;; &quot;Invalid&quot;)" table:style-name="ce17">
            <text:p>Valid</text:p>
          </table:table-cell>
          <table:table-cell office:value-type="string" office:string-value="Increasing Pressure" table:formula="of:=IF([.J548]&gt;0; &quot;Increasing Pressure&quot;; &quot;Stable/Reducing&quot;)" table:style-name="ce18">
            <text:p>Increasing Pressure</text:p>
          </table:table-cell>
          <table:table-cell office:value-type="float" office:value="0.44444444444444442" table:formula="of:=IFERROR([.H548]/[.F548]; 0)" table:style-name="ce17">
            <text:p>0.444444444</text:p>
          </table:table-cell>
          <table:table-cell office:value-type="float" office:value="2268.8571428571427" table:formula="of:=AVERAGE([.I548:.I554])" table:style-name="ce15">
            <text:p>2269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4-06T00:00:00" table:style-name="ce14">
            <text:p>06-04-2025</text:p>
          </table:table-cell>
          <table:table-cell office:value-type="string" office:string-value="April" table:formula="of:=TEXT([.A549]; &quot;mmmm&quot;)" table:style-name="ce14">
            <text:p>April</text:p>
          </table:table-cell>
          <table:table-cell office:value-type="string" office:string-value="2025-04" table:formula="of:=TEXT([.A549]; &quot;yyyy-mm&quot;)" table:style-name="ce14">
            <text:p>2025-04</text:p>
          </table:table-cell>
          <table:table-cell office:value-type="float" office:value="7" table:style-name="ce9">
            <text:p>7</text:p>
          </table:table-cell>
          <table:table-cell office:value-type="float" office:value="14" table:style-name="ce9">
            <text:p>14</text:p>
          </table:table-cell>
          <table:table-cell office:value-type="float" office:value="7" table:style-name="ce9">
            <text:p>7</text:p>
          </table:table-cell>
          <table:table-cell office:value-type="float" office:value="2234" table:style-name="ce9">
            <text:p>2234</text:p>
          </table:table-cell>
          <table:table-cell office:value-type="float" office:value="11" table:style-name="ce9">
            <text:p>11</text:p>
          </table:table-cell>
          <table:table-cell office:value-type="float" office:value="2248" table:formula="of:=SUM([.G549]+[.E549])" table:style-name="ce15">
            <text:p>2248</text:p>
          </table:table-cell>
          <table:table-cell office:value-type="float" office:value="-4" table:formula="of:=[.F549]-[.H549]" table:style-name="ce15">
            <text:p>-4</text:p>
          </table:table-cell>
          <table:table-cell office:value-type="percentage" office:value="4.8932384341637009E-3" table:formula="of:=([.I550]-[.I549])/[.I549]" table:style-name="ce16">
            <text:p>0%</text:p>
          </table:table-cell>
          <table:table-cell office:value-type="string" office:string-value="Valid" table:formula="of:=IF([.F549]&lt;=[.E549]; &quot;Valid&quot;; &quot;Invalid&quot;)" table:style-name="ce17">
            <text:p>Valid</text:p>
          </table:table-cell>
          <table:table-cell office:value-type="string" office:string-value="Valid" table:formula="of:=IF([.H549]&lt;=[.G549]; &quot;Valid&quot;; &quot;Invalid&quot;)" table:style-name="ce17">
            <text:p>Valid</text:p>
          </table:table-cell>
          <table:table-cell office:value-type="string" office:string-value="Stable/Reducing" table:formula="of:=IF([.J549]&gt;0; &quot;Increasing Pressure&quot;; &quot;Stable/Reducing&quot;)" table:style-name="ce18">
            <text:p>Stable/Reducing</text:p>
          </table:table-cell>
          <table:table-cell office:value-type="float" office:value="1.5714285714285714" table:formula="of:=IFERROR([.H549]/[.F549]; 0)" table:style-name="ce17">
            <text:p>1.571428571</text:p>
          </table:table-cell>
          <table:table-cell office:value-type="float" office:value="2277.4285714285716" table:formula="of:=AVERAGE([.I549:.I555])" table:style-name="ce15">
            <text:p>2277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4-07T00:00:00" table:style-name="ce14">
            <text:p>07-04-2025</text:p>
          </table:table-cell>
          <table:table-cell office:value-type="string" office:string-value="April" table:formula="of:=TEXT([.A550]; &quot;mmmm&quot;)" table:style-name="ce14">
            <text:p>April</text:p>
          </table:table-cell>
          <table:table-cell office:value-type="string" office:string-value="2025-04" table:formula="of:=TEXT([.A550]; &quot;yyyy-mm&quot;)" table:style-name="ce14">
            <text:p>2025-04</text:p>
          </table:table-cell>
          <table:table-cell office:value-type="float" office:value="12" table:style-name="ce9">
            <text:p>12</text:p>
          </table:table-cell>
          <table:table-cell office:value-type="float" office:value="22" table:style-name="ce9">
            <text:p>22</text:p>
          </table:table-cell>
          <table:table-cell office:value-type="float" office:value="9" table:style-name="ce9">
            <text:p>9</text:p>
          </table:table-cell>
          <table:table-cell office:value-type="float" office:value="2237" table:style-name="ce9">
            <text:p>2237</text:p>
          </table:table-cell>
          <table:table-cell office:value-type="float" office:value="5" table:style-name="ce9">
            <text:p>5</text:p>
          </table:table-cell>
          <table:table-cell office:value-type="float" office:value="2259" table:formula="of:=SUM([.G550]+[.E550])" table:style-name="ce15">
            <text:p>2259</text:p>
          </table:table-cell>
          <table:table-cell office:value-type="float" office:value="4" table:formula="of:=[.F550]-[.H550]" table:style-name="ce15">
            <text:p>4</text:p>
          </table:table-cell>
          <table:table-cell office:value-type="percentage" office:value="7.9681274900398405E-3" table:formula="of:=([.I551]-[.I550])/[.I550]" table:style-name="ce16">
            <text:p>1%</text:p>
          </table:table-cell>
          <table:table-cell office:value-type="string" office:string-value="Valid" table:formula="of:=IF([.F550]&lt;=[.E550]; &quot;Valid&quot;; &quot;Invalid&quot;)" table:style-name="ce17">
            <text:p>Valid</text:p>
          </table:table-cell>
          <table:table-cell office:value-type="string" office:string-value="Valid" table:formula="of:=IF([.H550]&lt;=[.G550]; &quot;Valid&quot;; &quot;Invalid&quot;)" table:style-name="ce17">
            <text:p>Valid</text:p>
          </table:table-cell>
          <table:table-cell office:value-type="string" office:string-value="Increasing Pressure" table:formula="of:=IF([.J550]&gt;0; &quot;Increasing Pressure&quot;; &quot;Stable/Reducing&quot;)" table:style-name="ce18">
            <text:p>Increasing Pressure</text:p>
          </table:table-cell>
          <table:table-cell office:value-type="float" office:value="0.55555555555555558" table:formula="of:=IFERROR([.H550]/[.F550]; 0)" table:style-name="ce17">
            <text:p>0.555555556</text:p>
          </table:table-cell>
          <table:table-cell office:value-type="float" office:value="2286" table:formula="of:=AVERAGE([.I550:.I556])" table:style-name="ce15">
            <text:p>2286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4-08T00:00:00" table:style-name="ce14">
            <text:p>08-04-2025</text:p>
          </table:table-cell>
          <table:table-cell office:value-type="string" office:string-value="April" table:formula="of:=TEXT([.A551]; &quot;mmmm&quot;)" table:style-name="ce14">
            <text:p>April</text:p>
          </table:table-cell>
          <table:table-cell office:value-type="string" office:string-value="2025-04" table:formula="of:=TEXT([.A551]; &quot;yyyy-mm&quot;)" table:style-name="ce14">
            <text:p>2025-04</text:p>
          </table:table-cell>
          <table:table-cell office:value-type="float" office:value="12" table:style-name="ce9">
            <text:p>12</text:p>
          </table:table-cell>
          <table:table-cell office:value-type="float" office:value="34" table:style-name="ce9">
            <text:p>34</text:p>
          </table:table-cell>
          <table:table-cell office:value-type="float" office:value="12" table:style-name="ce9">
            <text:p>12</text:p>
          </table:table-cell>
          <table:table-cell office:value-type="float" office:value="2243" table:style-name="ce9">
            <text:p>2243</text:p>
          </table:table-cell>
          <table:table-cell office:value-type="float" office:value="9" table:style-name="ce9">
            <text:p>9</text:p>
          </table:table-cell>
          <table:table-cell office:value-type="float" office:value="2277" table:formula="of:=SUM([.G551]+[.E551])" table:style-name="ce15">
            <text:p>2277</text:p>
          </table:table-cell>
          <table:table-cell office:value-type="float" office:value="3" table:formula="of:=[.F551]-[.H551]" table:style-name="ce15">
            <text:p>3</text:p>
          </table:table-cell>
          <table:table-cell office:value-type="percentage" office:value="-3.0742204655248135E-3" table:formula="of:=([.I552]-[.I551])/[.I551]" table:style-name="ce16">
            <text:p>0%</text:p>
          </table:table-cell>
          <table:table-cell office:value-type="string" office:string-value="Valid" table:formula="of:=IF([.F551]&lt;=[.E551]; &quot;Valid&quot;; &quot;Invalid&quot;)" table:style-name="ce17">
            <text:p>Valid</text:p>
          </table:table-cell>
          <table:table-cell office:value-type="string" office:string-value="Valid" table:formula="of:=IF([.H551]&lt;=[.G551]; &quot;Valid&quot;; &quot;Invalid&quot;)" table:style-name="ce17">
            <text:p>Valid</text:p>
          </table:table-cell>
          <table:table-cell office:value-type="string" office:string-value="Increasing Pressure" table:formula="of:=IF([.J551]&gt;0; &quot;Increasing Pressure&quot;; &quot;Stable/Reducing&quot;)" table:style-name="ce18">
            <text:p>Increasing Pressure</text:p>
          </table:table-cell>
          <table:table-cell office:value-type="float" office:value="0.75" table:formula="of:=IFERROR([.H551]/[.F551]; 0)" table:style-name="ce17">
            <text:p>0.75</text:p>
          </table:table-cell>
          <table:table-cell office:value-type="float" office:value="2292.5714285714284" table:formula="of:=AVERAGE([.I551:.I557])" table:style-name="ce15">
            <text:p>2293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4-09T00:00:00" table:style-name="ce14">
            <text:p>09-04-2025</text:p>
          </table:table-cell>
          <table:table-cell office:value-type="string" office:string-value="April" table:formula="of:=TEXT([.A552]; &quot;mmmm&quot;)" table:style-name="ce14">
            <text:p>April</text:p>
          </table:table-cell>
          <table:table-cell office:value-type="string" office:string-value="2025-04" table:formula="of:=TEXT([.A552]; &quot;yyyy-mm&quot;)" table:style-name="ce14">
            <text:p>2025-04</text:p>
          </table:table-cell>
          <table:table-cell office:value-type="float" office:value="6" table:style-name="ce9">
            <text:p>6</text:p>
          </table:table-cell>
          <table:table-cell office:value-type="float" office:value="19" table:style-name="ce9">
            <text:p>19</text:p>
          </table:table-cell>
          <table:table-cell office:value-type="float" office:value="10" table:style-name="ce9">
            <text:p>10</text:p>
          </table:table-cell>
          <table:table-cell office:value-type="float" office:value="2251" table:style-name="ce9">
            <text:p>2251</text:p>
          </table:table-cell>
          <table:table-cell office:value-type="float" office:value="5" table:style-name="ce9">
            <text:p>5</text:p>
          </table:table-cell>
          <table:table-cell office:value-type="float" office:value="2270" table:formula="of:=SUM([.G552]+[.E552])" table:style-name="ce15">
            <text:p>2270</text:p>
          </table:table-cell>
          <table:table-cell office:value-type="float" office:value="5" table:formula="of:=[.F552]-[.H552]" table:style-name="ce15">
            <text:p>5</text:p>
          </table:table-cell>
          <table:table-cell office:value-type="percentage" office:value="8.8105726872246704E-3" table:formula="of:=([.I553]-[.I552])/[.I552]" table:style-name="ce16">
            <text:p>1%</text:p>
          </table:table-cell>
          <table:table-cell office:value-type="string" office:string-value="Valid" table:formula="of:=IF([.F552]&lt;=[.E552]; &quot;Valid&quot;; &quot;Invalid&quot;)" table:style-name="ce17">
            <text:p>Valid</text:p>
          </table:table-cell>
          <table:table-cell office:value-type="string" office:string-value="Valid" table:formula="of:=IF([.H552]&lt;=[.G552]; &quot;Valid&quot;; &quot;Invalid&quot;)" table:style-name="ce17">
            <text:p>Valid</text:p>
          </table:table-cell>
          <table:table-cell office:value-type="string" office:string-value="Increasing Pressure" table:formula="of:=IF([.J552]&gt;0; &quot;Increasing Pressure&quot;; &quot;Stable/Reducing&quot;)" table:style-name="ce18">
            <text:p>Increasing Pressure</text:p>
          </table:table-cell>
          <table:table-cell office:value-type="float" office:value="0.5" table:formula="of:=IFERROR([.H552]/[.F552]; 0)" table:style-name="ce17">
            <text:p>0.5</text:p>
          </table:table-cell>
          <table:table-cell office:value-type="float" office:value="2298.8571428571427" table:formula="of:=AVERAGE([.I552:.I558])" table:style-name="ce15">
            <text:p>2299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4-10T00:00:00" table:style-name="ce14">
            <text:p>10-04-2025</text:p>
          </table:table-cell>
          <table:table-cell office:value-type="string" office:string-value="April" table:formula="of:=TEXT([.A553]; &quot;mmmm&quot;)" table:style-name="ce14">
            <text:p>April</text:p>
          </table:table-cell>
          <table:table-cell office:value-type="string" office:string-value="2025-04" table:formula="of:=TEXT([.A553]; &quot;yyyy-mm&quot;)" table:style-name="ce14">
            <text:p>2025-04</text:p>
          </table:table-cell>
          <table:table-cell office:value-type="float" office:value="18" table:style-name="ce9">
            <text:p>18</text:p>
          </table:table-cell>
          <table:table-cell office:value-type="float" office:value="25" table:style-name="ce9">
            <text:p>25</text:p>
          </table:table-cell>
          <table:table-cell office:value-type="float" office:value="17" table:style-name="ce9">
            <text:p>17</text:p>
          </table:table-cell>
          <table:table-cell office:value-type="float" office:value="2265" table:style-name="ce9">
            <text:p>2265</text:p>
          </table:table-cell>
          <table:table-cell office:value-type="float" office:value="6" table:style-name="ce9">
            <text:p>6</text:p>
          </table:table-cell>
          <table:table-cell office:value-type="float" office:value="2290" table:formula="of:=SUM([.G553]+[.E553])" table:style-name="ce15">
            <text:p>2290</text:p>
          </table:table-cell>
          <table:table-cell office:value-type="float" office:value="11" table:formula="of:=[.F553]-[.H553]" table:style-name="ce15">
            <text:p>11</text:p>
          </table:table-cell>
          <table:table-cell office:value-type="percentage" office:value="-4.3668122270742359E-4" table:formula="of:=([.I554]-[.I553])/[.I553]" table:style-name="ce16">
            <text:p>0%</text:p>
          </table:table-cell>
          <table:table-cell office:value-type="string" office:string-value="Valid" table:formula="of:=IF([.F553]&lt;=[.E553]; &quot;Valid&quot;; &quot;Invalid&quot;)" table:style-name="ce17">
            <text:p>Valid</text:p>
          </table:table-cell>
          <table:table-cell office:value-type="string" office:string-value="Valid" table:formula="of:=IF([.H553]&lt;=[.G553]; &quot;Valid&quot;; &quot;Invalid&quot;)" table:style-name="ce17">
            <text:p>Valid</text:p>
          </table:table-cell>
          <table:table-cell office:value-type="string" office:string-value="Increasing Pressure" table:formula="of:=IF([.J553]&gt;0; &quot;Increasing Pressure&quot;; &quot;Stable/Reducing&quot;)" table:style-name="ce18">
            <text:p>Increasing Pressure</text:p>
          </table:table-cell>
          <table:table-cell office:value-type="float" office:value="0.35294117647058826" table:formula="of:=IFERROR([.H553]/[.F553]; 0)" table:style-name="ce17">
            <text:p>0.352941176</text:p>
          </table:table-cell>
          <table:table-cell office:value-type="float" office:value="2305.1428571428573" table:formula="of:=AVERAGE([.I553:.I559])" table:style-name="ce15">
            <text:p>2305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4-11T00:00:00" table:style-name="ce14">
            <text:p>11-04-2025</text:p>
          </table:table-cell>
          <table:table-cell office:value-type="string" office:string-value="April" table:formula="of:=TEXT([.A554]; &quot;mmmm&quot;)" table:style-name="ce14">
            <text:p>April</text:p>
          </table:table-cell>
          <table:table-cell office:value-type="string" office:string-value="2025-04" table:formula="of:=TEXT([.A554]; &quot;yyyy-mm&quot;)" table:style-name="ce14">
            <text:p>2025-04</text:p>
          </table:table-cell>
          <table:table-cell office:value-type="float" office:value="8" table:style-name="ce9">
            <text:p>8</text:p>
          </table:table-cell>
          <table:table-cell office:value-type="float" office:value="22" table:style-name="ce9">
            <text:p>22</text:p>
          </table:table-cell>
          <table:table-cell office:value-type="float" office:value="8" table:style-name="ce9">
            <text:p>8</text:p>
          </table:table-cell>
          <table:table-cell office:value-type="float" office:value="2267" table:style-name="ce9">
            <text:p>2267</text:p>
          </table:table-cell>
          <table:table-cell office:value-type="float" office:value="9" table:style-name="ce9">
            <text:p>9</text:p>
          </table:table-cell>
          <table:table-cell office:value-type="float" office:value="2289" table:formula="of:=SUM([.G554]+[.E554])" table:style-name="ce15">
            <text:p>2289</text:p>
          </table:table-cell>
          <table:table-cell office:value-type="float" office:value="-1" table:formula="of:=[.F554]-[.H554]" table:style-name="ce15">
            <text:p>-1</text:p>
          </table:table-cell>
          <table:table-cell office:value-type="percentage" office:value="8.7374399301004806E-3" table:formula="of:=([.I555]-[.I554])/[.I554]" table:style-name="ce16">
            <text:p>1%</text:p>
          </table:table-cell>
          <table:table-cell office:value-type="string" office:string-value="Valid" table:formula="of:=IF([.F554]&lt;=[.E554]; &quot;Valid&quot;; &quot;Invalid&quot;)" table:style-name="ce17">
            <text:p>Valid</text:p>
          </table:table-cell>
          <table:table-cell office:value-type="string" office:string-value="Valid" table:formula="of:=IF([.H554]&lt;=[.G554]; &quot;Valid&quot;; &quot;Invalid&quot;)" table:style-name="ce17">
            <text:p>Valid</text:p>
          </table:table-cell>
          <table:table-cell office:value-type="string" office:string-value="Stable/Reducing" table:formula="of:=IF([.J554]&gt;0; &quot;Increasing Pressure&quot;; &quot;Stable/Reducing&quot;)" table:style-name="ce18">
            <text:p>Stable/Reducing</text:p>
          </table:table-cell>
          <table:table-cell office:value-type="float" office:value="1.125" table:formula="of:=IFERROR([.H554]/[.F554]; 0)" table:style-name="ce17">
            <text:p>1.125</text:p>
          </table:table-cell>
          <table:table-cell office:value-type="float" office:value="2309.4285714285716" table:formula="of:=AVERAGE([.I554:.I560])" table:style-name="ce15">
            <text:p>2309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4-13T00:00:00" table:style-name="ce14">
            <text:p>13-04-2025</text:p>
          </table:table-cell>
          <table:table-cell office:value-type="string" office:string-value="April" table:formula="of:=TEXT([.A555]; &quot;mmmm&quot;)" table:style-name="ce14">
            <text:p>April</text:p>
          </table:table-cell>
          <table:table-cell office:value-type="string" office:string-value="2025-04" table:formula="of:=TEXT([.A555]; &quot;yyyy-mm&quot;)" table:style-name="ce14">
            <text:p>2025-04</text:p>
          </table:table-cell>
          <table:table-cell office:value-type="float" office:value="5" table:style-name="ce9">
            <text:p>5</text:p>
          </table:table-cell>
          <table:table-cell office:value-type="float" office:value="26" table:style-name="ce9">
            <text:p>26</text:p>
          </table:table-cell>
          <table:table-cell office:value-type="float" office:value="10" table:style-name="ce9">
            <text:p>10</text:p>
          </table:table-cell>
          <table:table-cell office:value-type="float" office:value="2283" table:style-name="ce9">
            <text:p>2283</text:p>
          </table:table-cell>
          <table:table-cell office:value-type="float" office:value="3" table:style-name="ce9">
            <text:p>3</text:p>
          </table:table-cell>
          <table:table-cell office:value-type="float" office:value="2309" table:formula="of:=SUM([.G555]+[.E555])" table:style-name="ce15">
            <text:p>2309</text:p>
          </table:table-cell>
          <table:table-cell office:value-type="float" office:value="7" table:formula="of:=[.F555]-[.H555]" table:style-name="ce15">
            <text:p>7</text:p>
          </table:table-cell>
          <table:table-cell office:value-type="percentage" office:value="-4.3308791684711995E-4" table:formula="of:=([.I556]-[.I555])/[.I555]" table:style-name="ce16">
            <text:p>0%</text:p>
          </table:table-cell>
          <table:table-cell office:value-type="string" office:string-value="Valid" table:formula="of:=IF([.F555]&lt;=[.E555]; &quot;Valid&quot;; &quot;Invalid&quot;)" table:style-name="ce17">
            <text:p>Valid</text:p>
          </table:table-cell>
          <table:table-cell office:value-type="string" office:string-value="Valid" table:formula="of:=IF([.H555]&lt;=[.G555]; &quot;Valid&quot;; &quot;Invalid&quot;)" table:style-name="ce17">
            <text:p>Valid</text:p>
          </table:table-cell>
          <table:table-cell office:value-type="string" office:string-value="Increasing Pressure" table:formula="of:=IF([.J555]&gt;0; &quot;Increasing Pressure&quot;; &quot;Stable/Reducing&quot;)" table:style-name="ce18">
            <text:p>Increasing Pressure</text:p>
          </table:table-cell>
          <table:table-cell office:value-type="float" office:value="0.3" table:formula="of:=IFERROR([.H555]/[.F555]; 0)" table:style-name="ce17">
            <text:p>0.3</text:p>
          </table:table-cell>
          <table:table-cell office:value-type="float" office:value="2315.7142857142858" table:formula="of:=AVERAGE([.I555:.I561])" table:style-name="ce15">
            <text:p>2316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4-14T00:00:00" table:style-name="ce14">
            <text:p>14-04-2025</text:p>
          </table:table-cell>
          <table:table-cell office:value-type="string" office:string-value="April" table:formula="of:=TEXT([.A556]; &quot;mmmm&quot;)" table:style-name="ce14">
            <text:p>April</text:p>
          </table:table-cell>
          <table:table-cell office:value-type="string" office:string-value="2025-04" table:formula="of:=TEXT([.A556]; &quot;yyyy-mm&quot;)" table:style-name="ce14">
            <text:p>2025-04</text:p>
          </table:table-cell>
          <table:table-cell office:value-type="float" office:value="5" table:style-name="ce9">
            <text:p>5</text:p>
          </table:table-cell>
          <table:table-cell office:value-type="float" office:value="26" table:style-name="ce9">
            <text:p>26</text:p>
          </table:table-cell>
          <table:table-cell office:value-type="float" office:value="9" table:style-name="ce9">
            <text:p>9</text:p>
          </table:table-cell>
          <table:table-cell office:value-type="float" office:value="2282" table:style-name="ce9">
            <text:p>2282</text:p>
          </table:table-cell>
          <table:table-cell office:value-type="float" office:value="13" table:style-name="ce9">
            <text:p>13</text:p>
          </table:table-cell>
          <table:table-cell office:value-type="float" office:value="2308" table:formula="of:=SUM([.G556]+[.E556])" table:style-name="ce15">
            <text:p>2308</text:p>
          </table:table-cell>
          <table:table-cell office:value-type="float" office:value="-4" table:formula="of:=[.F556]-[.H556]" table:style-name="ce15">
            <text:p>-4</text:p>
          </table:table-cell>
          <table:table-cell office:value-type="percentage" office:value="-1.2998266897746968E-3" table:formula="of:=([.I557]-[.I556])/[.I556]" table:style-name="ce16">
            <text:p>0%</text:p>
          </table:table-cell>
          <table:table-cell office:value-type="string" office:string-value="Valid" table:formula="of:=IF([.F556]&lt;=[.E556]; &quot;Valid&quot;; &quot;Invalid&quot;)" table:style-name="ce17">
            <text:p>Valid</text:p>
          </table:table-cell>
          <table:table-cell office:value-type="string" office:string-value="Valid" table:formula="of:=IF([.H556]&lt;=[.G556]; &quot;Valid&quot;; &quot;Invalid&quot;)" table:style-name="ce17">
            <text:p>Valid</text:p>
          </table:table-cell>
          <table:table-cell office:value-type="string" office:string-value="Stable/Reducing" table:formula="of:=IF([.J556]&gt;0; &quot;Increasing Pressure&quot;; &quot;Stable/Reducing&quot;)" table:style-name="ce18">
            <text:p>Stable/Reducing</text:p>
          </table:table-cell>
          <table:table-cell office:value-type="float" office:value="1.4444444444444444" table:formula="of:=IFERROR([.H556]/[.F556]; 0)" table:style-name="ce17">
            <text:p>1.444444444</text:p>
          </table:table-cell>
          <table:table-cell office:value-type="float" office:value="2317.8571428571427" table:formula="of:=AVERAGE([.I556:.I562])" table:style-name="ce15">
            <text:p>2318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4-15T00:00:00" table:style-name="ce14">
            <text:p>15-04-2025</text:p>
          </table:table-cell>
          <table:table-cell office:value-type="string" office:string-value="April" table:formula="of:=TEXT([.A557]; &quot;mmmm&quot;)" table:style-name="ce14">
            <text:p>April</text:p>
          </table:table-cell>
          <table:table-cell office:value-type="string" office:string-value="2025-04" table:formula="of:=TEXT([.A557]; &quot;yyyy-mm&quot;)" table:style-name="ce14">
            <text:p>2025-04</text:p>
          </table:table-cell>
          <table:table-cell office:value-type="float" office:value="4" table:style-name="ce9">
            <text:p>4</text:p>
          </table:table-cell>
          <table:table-cell office:value-type="float" office:value="19" table:style-name="ce9">
            <text:p>19</text:p>
          </table:table-cell>
          <table:table-cell office:value-type="float" office:value="12" table:style-name="ce9">
            <text:p>12</text:p>
          </table:table-cell>
          <table:table-cell office:value-type="float" office:value="2286" table:style-name="ce9">
            <text:p>2286</text:p>
          </table:table-cell>
          <table:table-cell office:value-type="float" office:value="7" table:style-name="ce9">
            <text:p>7</text:p>
          </table:table-cell>
          <table:table-cell office:value-type="float" office:value="2305" table:formula="of:=SUM([.G557]+[.E557])" table:style-name="ce15">
            <text:p>2305</text:p>
          </table:table-cell>
          <table:table-cell office:value-type="float" office:value="5" table:formula="of:=[.F557]-[.H557]" table:style-name="ce15">
            <text:p>5</text:p>
          </table:table-cell>
          <table:table-cell office:value-type="percentage" office:value="6.9414316702819953E-3" table:formula="of:=([.I558]-[.I557])/[.I557]" table:style-name="ce16">
            <text:p>1%</text:p>
          </table:table-cell>
          <table:table-cell office:value-type="string" office:string-value="Valid" table:formula="of:=IF([.F557]&lt;=[.E557]; &quot;Valid&quot;; &quot;Invalid&quot;)" table:style-name="ce17">
            <text:p>Valid</text:p>
          </table:table-cell>
          <table:table-cell office:value-type="string" office:string-value="Valid" table:formula="of:=IF([.H557]&lt;=[.G557]; &quot;Valid&quot;; &quot;Invalid&quot;)" table:style-name="ce17">
            <text:p>Valid</text:p>
          </table:table-cell>
          <table:table-cell office:value-type="string" office:string-value="Increasing Pressure" table:formula="of:=IF([.J557]&gt;0; &quot;Increasing Pressure&quot;; &quot;Stable/Reducing&quot;)" table:style-name="ce18">
            <text:p>Increasing Pressure</text:p>
          </table:table-cell>
          <table:table-cell office:value-type="float" office:value="0.58333333333333337" table:formula="of:=IFERROR([.H557]/[.F557]; 0)" table:style-name="ce17">
            <text:p>0.583333333</text:p>
          </table:table-cell>
          <table:table-cell office:value-type="float" office:value="2320" table:formula="of:=AVERAGE([.I557:.I563])" table:style-name="ce15">
            <text:p>2320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4-16T00:00:00" table:style-name="ce14">
            <text:p>16-04-2025</text:p>
          </table:table-cell>
          <table:table-cell office:value-type="string" office:string-value="April" table:formula="of:=TEXT([.A558]; &quot;mmmm&quot;)" table:style-name="ce14">
            <text:p>April</text:p>
          </table:table-cell>
          <table:table-cell office:value-type="string" office:string-value="2025-04" table:formula="of:=TEXT([.A558]; &quot;yyyy-mm&quot;)" table:style-name="ce14">
            <text:p>2025-04</text:p>
          </table:table-cell>
          <table:table-cell office:value-type="float" office:value="11" table:style-name="ce9">
            <text:p>11</text:p>
          </table:table-cell>
          <table:table-cell office:value-type="float" office:value="30" table:style-name="ce9">
            <text:p>30</text:p>
          </table:table-cell>
          <table:table-cell office:value-type="float" office:value="5" table:style-name="ce9">
            <text:p>5</text:p>
          </table:table-cell>
          <table:table-cell office:value-type="float" office:value="2291" table:style-name="ce9">
            <text:p>2291</text:p>
          </table:table-cell>
          <table:table-cell office:value-type="float" office:value="8" table:style-name="ce9">
            <text:p>8</text:p>
          </table:table-cell>
          <table:table-cell office:value-type="float" office:value="2321" table:formula="of:=SUM([.G558]+[.E558])" table:style-name="ce15">
            <text:p>2321</text:p>
          </table:table-cell>
          <table:table-cell office:value-type="float" office:value="-3" table:formula="of:=[.F558]-[.H558]" table:style-name="ce15">
            <text:p>-3</text:p>
          </table:table-cell>
          <table:table-cell office:value-type="percentage" office:value="-3.0159414045669969E-3" table:formula="of:=([.I559]-[.I558])/[.I558]" table:style-name="ce16">
            <text:p>0%</text:p>
          </table:table-cell>
          <table:table-cell office:value-type="string" office:string-value="Valid" table:formula="of:=IF([.F558]&lt;=[.E558]; &quot;Valid&quot;; &quot;Invalid&quot;)" table:style-name="ce17">
            <text:p>Valid</text:p>
          </table:table-cell>
          <table:table-cell office:value-type="string" office:string-value="Valid" table:formula="of:=IF([.H558]&lt;=[.G558]; &quot;Valid&quot;; &quot;Invalid&quot;)" table:style-name="ce17">
            <text:p>Valid</text:p>
          </table:table-cell>
          <table:table-cell office:value-type="string" office:string-value="Stable/Reducing" table:formula="of:=IF([.J558]&gt;0; &quot;Increasing Pressure&quot;; &quot;Stable/Reducing&quot;)" table:style-name="ce18">
            <text:p>Stable/Reducing</text:p>
          </table:table-cell>
          <table:table-cell office:value-type="float" office:value="1.6" table:formula="of:=IFERROR([.H558]/[.F558]; 0)" table:style-name="ce17">
            <text:p>1.6</text:p>
          </table:table-cell>
          <table:table-cell office:value-type="float" office:value="2319.7142857142858" table:formula="of:=AVERAGE([.I558:.I564])" table:style-name="ce15">
            <text:p>2320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4-17T00:00:00" table:style-name="ce14">
            <text:p>17-04-2025</text:p>
          </table:table-cell>
          <table:table-cell office:value-type="string" office:string-value="April" table:formula="of:=TEXT([.A559]; &quot;mmmm&quot;)" table:style-name="ce14">
            <text:p>April</text:p>
          </table:table-cell>
          <table:table-cell office:value-type="string" office:string-value="2025-04" table:formula="of:=TEXT([.A559]; &quot;yyyy-mm&quot;)" table:style-name="ce14">
            <text:p>2025-04</text:p>
          </table:table-cell>
          <table:table-cell office:value-type="float" office:value="7" table:style-name="ce9">
            <text:p>7</text:p>
          </table:table-cell>
          <table:table-cell office:value-type="float" office:value="26" table:style-name="ce9">
            <text:p>26</text:p>
          </table:table-cell>
          <table:table-cell office:value-type="float" office:value="10" table:style-name="ce9">
            <text:p>10</text:p>
          </table:table-cell>
          <table:table-cell office:value-type="float" office:value="2288" table:style-name="ce9">
            <text:p>2288</text:p>
          </table:table-cell>
          <table:table-cell office:value-type="float" office:value="14" table:style-name="ce9">
            <text:p>14</text:p>
          </table:table-cell>
          <table:table-cell office:value-type="float" office:value="2314" table:formula="of:=SUM([.G559]+[.E559])" table:style-name="ce15">
            <text:p>2314</text:p>
          </table:table-cell>
          <table:table-cell office:value-type="float" office:value="-4" table:formula="of:=[.F559]-[.H559]" table:style-name="ce15">
            <text:p>-4</text:p>
          </table:table-cell>
          <table:table-cell office:value-type="percentage" office:value="2.5929127052722557E-3" table:formula="of:=([.I560]-[.I559])/[.I559]" table:style-name="ce16">
            <text:p>0%</text:p>
          </table:table-cell>
          <table:table-cell office:value-type="string" office:string-value="Valid" table:formula="of:=IF([.F559]&lt;=[.E559]; &quot;Valid&quot;; &quot;Invalid&quot;)" table:style-name="ce17">
            <text:p>Valid</text:p>
          </table:table-cell>
          <table:table-cell office:value-type="string" office:string-value="Valid" table:formula="of:=IF([.H559]&lt;=[.G559]; &quot;Valid&quot;; &quot;Invalid&quot;)" table:style-name="ce17">
            <text:p>Valid</text:p>
          </table:table-cell>
          <table:table-cell office:value-type="string" office:string-value="Stable/Reducing" table:formula="of:=IF([.J559]&gt;0; &quot;Increasing Pressure&quot;; &quot;Stable/Reducing&quot;)" table:style-name="ce18">
            <text:p>Stable/Reducing</text:p>
          </table:table-cell>
          <table:table-cell office:value-type="float" office:value="1.4" table:formula="of:=IFERROR([.H559]/[.F559]; 0)" table:style-name="ce17">
            <text:p>1.4</text:p>
          </table:table-cell>
          <table:table-cell office:value-type="float" office:value="2322.5714285714284" table:formula="of:=AVERAGE([.I559:.I565])" table:style-name="ce15">
            <text:p>2323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4-20T00:00:00" table:style-name="ce14">
            <text:p>20-04-2025</text:p>
          </table:table-cell>
          <table:table-cell office:value-type="string" office:string-value="April" table:formula="of:=TEXT([.A560]; &quot;mmmm&quot;)" table:style-name="ce14">
            <text:p>April</text:p>
          </table:table-cell>
          <table:table-cell office:value-type="string" office:string-value="2025-04" table:formula="of:=TEXT([.A560]; &quot;yyyy-mm&quot;)" table:style-name="ce14">
            <text:p>2025-04</text:p>
          </table:table-cell>
          <table:table-cell office:value-type="float" office:value="4" table:style-name="ce9">
            <text:p>4</text:p>
          </table:table-cell>
          <table:table-cell office:value-type="float" office:value="15" table:style-name="ce9">
            <text:p>15</text:p>
          </table:table-cell>
          <table:table-cell office:value-type="float" office:value="6" table:style-name="ce9">
            <text:p>6</text:p>
          </table:table-cell>
          <table:table-cell office:value-type="float" office:value="2305" table:style-name="ce9">
            <text:p>2305</text:p>
          </table:table-cell>
          <table:table-cell office:value-type="float" office:value="4" table:style-name="ce9">
            <text:p>4</text:p>
          </table:table-cell>
          <table:table-cell office:value-type="float" office:value="2320" table:formula="of:=SUM([.G560]+[.E560])" table:style-name="ce15">
            <text:p>2320</text:p>
          </table:table-cell>
          <table:table-cell office:value-type="float" office:value="2" table:formula="of:=[.F560]-[.H560]" table:style-name="ce15">
            <text:p>2</text:p>
          </table:table-cell>
          <table:table-cell office:value-type="percentage" office:value="5.6034482758620689E-3" table:formula="of:=([.I561]-[.I560])/[.I560]" table:style-name="ce16">
            <text:p>1%</text:p>
          </table:table-cell>
          <table:table-cell office:value-type="string" office:string-value="Valid" table:formula="of:=IF([.F560]&lt;=[.E560]; &quot;Valid&quot;; &quot;Invalid&quot;)" table:style-name="ce17">
            <text:p>Valid</text:p>
          </table:table-cell>
          <table:table-cell office:value-type="string" office:string-value="Valid" table:formula="of:=IF([.H560]&lt;=[.G560]; &quot;Valid&quot;; &quot;Invalid&quot;)" table:style-name="ce17">
            <text:p>Valid</text:p>
          </table:table-cell>
          <table:table-cell office:value-type="string" office:string-value="Increasing Pressure" table:formula="of:=IF([.J560]&gt;0; &quot;Increasing Pressure&quot;; &quot;Stable/Reducing&quot;)" table:style-name="ce18">
            <text:p>Increasing Pressure</text:p>
          </table:table-cell>
          <table:table-cell office:value-type="float" office:value="0.66666666666666663" table:formula="of:=IFERROR([.H560]/[.F560]; 0)" table:style-name="ce17">
            <text:p>0.666666667</text:p>
          </table:table-cell>
          <table:table-cell office:value-type="float" office:value="2325.2857142857142" table:formula="of:=AVERAGE([.I560:.I566])" table:style-name="ce15">
            <text:p>2325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4-21T00:00:00" table:style-name="ce14">
            <text:p>21-04-2025</text:p>
          </table:table-cell>
          <table:table-cell office:value-type="string" office:string-value="April" table:formula="of:=TEXT([.A561]; &quot;mmmm&quot;)" table:style-name="ce14">
            <text:p>April</text:p>
          </table:table-cell>
          <table:table-cell office:value-type="string" office:string-value="2025-04" table:formula="of:=TEXT([.A561]; &quot;yyyy-mm&quot;)" table:style-name="ce14">
            <text:p>2025-04</text:p>
          </table:table-cell>
          <table:table-cell office:value-type="float" office:value="10" table:style-name="ce9">
            <text:p>10</text:p>
          </table:table-cell>
          <table:table-cell office:value-type="float" office:value="25" table:style-name="ce9">
            <text:p>25</text:p>
          </table:table-cell>
          <table:table-cell office:value-type="float" office:value="5" table:style-name="ce9">
            <text:p>5</text:p>
          </table:table-cell>
          <table:table-cell office:value-type="float" office:value="2308" table:style-name="ce9">
            <text:p>2308</text:p>
          </table:table-cell>
          <table:table-cell office:value-type="float" office:value="6" table:style-name="ce9">
            <text:p>6</text:p>
          </table:table-cell>
          <table:table-cell office:value-type="float" office:value="2333" table:formula="of:=SUM([.G561]+[.E561])" table:style-name="ce15">
            <text:p>2333</text:p>
          </table:table-cell>
          <table:table-cell office:value-type="float" office:value="-1" table:formula="of:=[.F561]-[.H561]" table:style-name="ce15">
            <text:p>-1</text:p>
          </table:table-cell>
          <table:table-cell office:value-type="percentage" office:value="-3.8576939562794685E-3" table:formula="of:=([.I562]-[.I561])/[.I561]" table:style-name="ce16">
            <text:p>0%</text:p>
          </table:table-cell>
          <table:table-cell office:value-type="string" office:string-value="Valid" table:formula="of:=IF([.F561]&lt;=[.E561]; &quot;Valid&quot;; &quot;Invalid&quot;)" table:style-name="ce17">
            <text:p>Valid</text:p>
          </table:table-cell>
          <table:table-cell office:value-type="string" office:string-value="Valid" table:formula="of:=IF([.H561]&lt;=[.G561]; &quot;Valid&quot;; &quot;Invalid&quot;)" table:style-name="ce17">
            <text:p>Valid</text:p>
          </table:table-cell>
          <table:table-cell office:value-type="string" office:string-value="Stable/Reducing" table:formula="of:=IF([.J561]&gt;0; &quot;Increasing Pressure&quot;; &quot;Stable/Reducing&quot;)" table:style-name="ce18">
            <text:p>Stable/Reducing</text:p>
          </table:table-cell>
          <table:table-cell office:value-type="float" office:value="1.2" table:formula="of:=IFERROR([.H561]/[.F561]; 0)" table:style-name="ce17">
            <text:p>1.2</text:p>
          </table:table-cell>
          <table:table-cell office:value-type="float" office:value="2326.5714285714284" table:formula="of:=AVERAGE([.I561:.I567])" table:style-name="ce15">
            <text:p>2327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4-22T00:00:00" table:style-name="ce14">
            <text:p>22-04-2025</text:p>
          </table:table-cell>
          <table:table-cell office:value-type="string" office:string-value="April" table:formula="of:=TEXT([.A562]; &quot;mmmm&quot;)" table:style-name="ce14">
            <text:p>April</text:p>
          </table:table-cell>
          <table:table-cell office:value-type="string" office:string-value="2025-04" table:formula="of:=TEXT([.A562]; &quot;yyyy-mm&quot;)" table:style-name="ce14">
            <text:p>2025-04</text:p>
          </table:table-cell>
          <table:table-cell office:value-type="float" office:value="7" table:style-name="ce9">
            <text:p>7</text:p>
          </table:table-cell>
          <table:table-cell office:value-type="float" office:value="19" table:style-name="ce9">
            <text:p>19</text:p>
          </table:table-cell>
          <table:table-cell office:value-type="float" office:value="14" table:style-name="ce9">
            <text:p>14</text:p>
          </table:table-cell>
          <table:table-cell office:value-type="float" office:value="2305" table:style-name="ce9">
            <text:p>2305</text:p>
          </table:table-cell>
          <table:table-cell office:value-type="float" office:value="17" table:style-name="ce9">
            <text:p>17</text:p>
          </table:table-cell>
          <table:table-cell office:value-type="float" office:value="2324" table:formula="of:=SUM([.G562]+[.E562])" table:style-name="ce15">
            <text:p>2324</text:p>
          </table:table-cell>
          <table:table-cell office:value-type="float" office:value="-3" table:formula="of:=[.F562]-[.H562]" table:style-name="ce15">
            <text:p>-3</text:p>
          </table:table-cell>
          <table:table-cell office:value-type="percentage" office:value="-4.3029259896729778E-4" table:formula="of:=([.I563]-[.I562])/[.I562]" table:style-name="ce16">
            <text:p>0%</text:p>
          </table:table-cell>
          <table:table-cell office:value-type="string" office:string-value="Valid" table:formula="of:=IF([.F562]&lt;=[.E562]; &quot;Valid&quot;; &quot;Invalid&quot;)" table:style-name="ce17">
            <text:p>Valid</text:p>
          </table:table-cell>
          <table:table-cell office:value-type="string" office:string-value="Valid" table:formula="of:=IF([.H562]&lt;=[.G562]; &quot;Valid&quot;; &quot;Invalid&quot;)" table:style-name="ce17">
            <text:p>Valid</text:p>
          </table:table-cell>
          <table:table-cell office:value-type="string" office:string-value="Stable/Reducing" table:formula="of:=IF([.J562]&gt;0; &quot;Increasing Pressure&quot;; &quot;Stable/Reducing&quot;)" table:style-name="ce18">
            <text:p>Stable/Reducing</text:p>
          </table:table-cell>
          <table:table-cell office:value-type="float" office:value="1.2142857142857142" table:formula="of:=IFERROR([.H562]/[.F562]; 0)" table:style-name="ce17">
            <text:p>1.214285714</text:p>
          </table:table-cell>
          <table:table-cell office:value-type="float" office:value="2328" table:formula="of:=AVERAGE([.I562:.I568])" table:style-name="ce15">
            <text:p>2328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4-23T00:00:00" table:style-name="ce14">
            <text:p>23-04-2025</text:p>
          </table:table-cell>
          <table:table-cell office:value-type="string" office:string-value="April" table:formula="of:=TEXT([.A563]; &quot;mmmm&quot;)" table:style-name="ce14">
            <text:p>April</text:p>
          </table:table-cell>
          <table:table-cell office:value-type="string" office:string-value="2025-04" table:formula="of:=TEXT([.A563]; &quot;yyyy-mm&quot;)" table:style-name="ce14">
            <text:p>2025-04</text:p>
          </table:table-cell>
          <table:table-cell office:value-type="float" office:value="3" table:style-name="ce9">
            <text:p>3</text:p>
          </table:table-cell>
          <table:table-cell office:value-type="float" office:value="23" table:style-name="ce9">
            <text:p>23</text:p>
          </table:table-cell>
          <table:table-cell office:value-type="float" office:value="4" table:style-name="ce9">
            <text:p>4</text:p>
          </table:table-cell>
          <table:table-cell office:value-type="float" office:value="2300" table:style-name="ce9">
            <text:p>2300</text:p>
          </table:table-cell>
          <table:table-cell office:value-type="float" office:value="11" table:style-name="ce9">
            <text:p>11</text:p>
          </table:table-cell>
          <table:table-cell office:value-type="float" office:value="2323" table:formula="of:=SUM([.G563]+[.E563])" table:style-name="ce15">
            <text:p>2323</text:p>
          </table:table-cell>
          <table:table-cell office:value-type="float" office:value="-7" table:formula="of:=[.F563]-[.H563]" table:style-name="ce15">
            <text:p>-7</text:p>
          </table:table-cell>
          <table:table-cell office:value-type="percentage" office:value="-8.6095566078346966E-3" table:formula="of:=([.I564]-[.I563])/[.I563]" table:style-name="ce16">
            <text:p>-1%</text:p>
          </table:table-cell>
          <table:table-cell office:value-type="string" office:string-value="Valid" table:formula="of:=IF([.F563]&lt;=[.E563]; &quot;Valid&quot;; &quot;Invalid&quot;)" table:style-name="ce17">
            <text:p>Valid</text:p>
          </table:table-cell>
          <table:table-cell office:value-type="string" office:string-value="Valid" table:formula="of:=IF([.H563]&lt;=[.G563]; &quot;Valid&quot;; &quot;Invalid&quot;)" table:style-name="ce17">
            <text:p>Valid</text:p>
          </table:table-cell>
          <table:table-cell office:value-type="string" office:string-value="Stable/Reducing" table:formula="of:=IF([.J563]&gt;0; &quot;Increasing Pressure&quot;; &quot;Stable/Reducing&quot;)" table:style-name="ce18">
            <text:p>Stable/Reducing</text:p>
          </table:table-cell>
          <table:table-cell office:value-type="float" office:value="2.75" table:formula="of:=IFERROR([.H563]/[.F563]; 0)" table:style-name="ce17">
            <text:p>2.75</text:p>
          </table:table-cell>
          <table:table-cell office:value-type="float" office:value="2330" table:formula="of:=AVERAGE([.I563:.I569])" table:style-name="ce15">
            <text:p>2330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4-24T00:00:00" table:style-name="ce14">
            <text:p>24-04-2025</text:p>
          </table:table-cell>
          <table:table-cell office:value-type="string" office:string-value="April" table:formula="of:=TEXT([.A564]; &quot;mmmm&quot;)" table:style-name="ce14">
            <text:p>April</text:p>
          </table:table-cell>
          <table:table-cell office:value-type="string" office:string-value="2025-04" table:formula="of:=TEXT([.A564]; &quot;yyyy-mm&quot;)" table:style-name="ce14">
            <text:p>2025-04</text:p>
          </table:table-cell>
          <table:table-cell office:value-type="float" office:value="3" table:style-name="ce9">
            <text:p>3</text:p>
          </table:table-cell>
          <table:table-cell office:value-type="float" office:value="9" table:style-name="ce9">
            <text:p>9</text:p>
          </table:table-cell>
          <table:table-cell office:value-type="float" office:value="7" table:style-name="ce9">
            <text:p>7</text:p>
          </table:table-cell>
          <table:table-cell office:value-type="float" office:value="2294" table:style-name="ce9">
            <text:p>2294</text:p>
          </table:table-cell>
          <table:table-cell office:value-type="float" office:value="13" table:style-name="ce9">
            <text:p>13</text:p>
          </table:table-cell>
          <table:table-cell office:value-type="float" office:value="2303" table:formula="of:=SUM([.G564]+[.E564])" table:style-name="ce15">
            <text:p>2303</text:p>
          </table:table-cell>
          <table:table-cell office:value-type="float" office:value="-6" table:formula="of:=[.F564]-[.H564]" table:style-name="ce15">
            <text:p>-6</text:p>
          </table:table-cell>
          <table:table-cell office:value-type="percentage" office:value="1.6500217108119844E-2" table:formula="of:=([.I565]-[.I564])/[.I564]" table:style-name="ce16">
            <text:p>2%</text:p>
          </table:table-cell>
          <table:table-cell office:value-type="string" office:string-value="Valid" table:formula="of:=IF([.F564]&lt;=[.E564]; &quot;Valid&quot;; &quot;Invalid&quot;)" table:style-name="ce17">
            <text:p>Valid</text:p>
          </table:table-cell>
          <table:table-cell office:value-type="string" office:string-value="Valid" table:formula="of:=IF([.H564]&lt;=[.G564]; &quot;Valid&quot;; &quot;Invalid&quot;)" table:style-name="ce17">
            <text:p>Valid</text:p>
          </table:table-cell>
          <table:table-cell office:value-type="string" office:string-value="Stable/Reducing" table:formula="of:=IF([.J564]&gt;0; &quot;Increasing Pressure&quot;; &quot;Stable/Reducing&quot;)" table:style-name="ce18">
            <text:p>Stable/Reducing</text:p>
          </table:table-cell>
          <table:table-cell office:value-type="float" office:value="1.8571428571428572" table:formula="of:=IFERROR([.H564]/[.F564]; 0)" table:style-name="ce17">
            <text:p>1.857142857</text:p>
          </table:table-cell>
          <table:table-cell office:value-type="float" office:value="2336.1428571428573" table:formula="of:=AVERAGE([.I564:.I570])" table:style-name="ce15">
            <text:p>2336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4-27T00:00:00" table:style-name="ce14">
            <text:p>27-04-2025</text:p>
          </table:table-cell>
          <table:table-cell office:value-type="string" office:string-value="April" table:formula="of:=TEXT([.A565]; &quot;mmmm&quot;)" table:style-name="ce14">
            <text:p>April</text:p>
          </table:table-cell>
          <table:table-cell office:value-type="string" office:string-value="2025-04" table:formula="of:=TEXT([.A565]; &quot;yyyy-mm&quot;)" table:style-name="ce14">
            <text:p>2025-04</text:p>
          </table:table-cell>
          <table:table-cell office:value-type="float" office:value="9" table:style-name="ce9">
            <text:p>9</text:p>
          </table:table-cell>
          <table:table-cell office:value-type="float" office:value="40" table:style-name="ce9">
            <text:p>40</text:p>
          </table:table-cell>
          <table:table-cell office:value-type="float" office:value="12" table:style-name="ce9">
            <text:p>12</text:p>
          </table:table-cell>
          <table:table-cell office:value-type="float" office:value="2301" table:style-name="ce9">
            <text:p>2301</text:p>
          </table:table-cell>
          <table:table-cell office:value-type="float" office:value="4" table:style-name="ce9">
            <text:p>4</text:p>
          </table:table-cell>
          <table:table-cell office:value-type="float" office:value="2341" table:formula="of:=SUM([.G565]+[.E565])" table:style-name="ce15">
            <text:p>2341</text:p>
          </table:table-cell>
          <table:table-cell office:value-type="float" office:value="8" table:formula="of:=[.F565]-[.H565]" table:style-name="ce15">
            <text:p>8</text:p>
          </table:table-cell>
          <table:table-cell office:value-type="percentage" office:value="-3.4173430158052115E-3" table:formula="of:=([.I566]-[.I565])/[.I565]" table:style-name="ce16">
            <text:p>0%</text:p>
          </table:table-cell>
          <table:table-cell office:value-type="string" office:string-value="Valid" table:formula="of:=IF([.F565]&lt;=[.E565]; &quot;Valid&quot;; &quot;Invalid&quot;)" table:style-name="ce17">
            <text:p>Valid</text:p>
          </table:table-cell>
          <table:table-cell office:value-type="string" office:string-value="Valid" table:formula="of:=IF([.H565]&lt;=[.G565]; &quot;Valid&quot;; &quot;Invalid&quot;)" table:style-name="ce17">
            <text:p>Valid</text:p>
          </table:table-cell>
          <table:table-cell office:value-type="string" office:string-value="Increasing Pressure" table:formula="of:=IF([.J565]&gt;0; &quot;Increasing Pressure&quot;; &quot;Stable/Reducing&quot;)" table:style-name="ce18">
            <text:p>Increasing Pressure</text:p>
          </table:table-cell>
          <table:table-cell office:value-type="float" office:value="0.33333333333333331" table:formula="of:=IFERROR([.H565]/[.F565]; 0)" table:style-name="ce17">
            <text:p>0.333333333</text:p>
          </table:table-cell>
          <table:table-cell office:value-type="float" office:value="2346.4285714285716" table:formula="of:=AVERAGE([.I565:.I571])" table:style-name="ce15">
            <text:p>2346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4-28T00:00:00" table:style-name="ce14">
            <text:p>28-04-2025</text:p>
          </table:table-cell>
          <table:table-cell office:value-type="string" office:string-value="April" table:formula="of:=TEXT([.A566]; &quot;mmmm&quot;)" table:style-name="ce14">
            <text:p>April</text:p>
          </table:table-cell>
          <table:table-cell office:value-type="string" office:string-value="2025-04" table:formula="of:=TEXT([.A566]; &quot;yyyy-mm&quot;)" table:style-name="ce14">
            <text:p>2025-04</text:p>
          </table:table-cell>
          <table:table-cell office:value-type="float" office:value="6" table:style-name="ce9">
            <text:p>6</text:p>
          </table:table-cell>
          <table:table-cell office:value-type="float" office:value="26" table:style-name="ce9">
            <text:p>26</text:p>
          </table:table-cell>
          <table:table-cell office:value-type="float" office:value="12" table:style-name="ce9">
            <text:p>12</text:p>
          </table:table-cell>
          <table:table-cell office:value-type="float" office:value="2307" table:style-name="ce9">
            <text:p>2307</text:p>
          </table:table-cell>
          <table:table-cell office:value-type="float" office:value="8" table:style-name="ce9">
            <text:p>8</text:p>
          </table:table-cell>
          <table:table-cell office:value-type="float" office:value="2333" table:formula="of:=SUM([.G566]+[.E566])" table:style-name="ce15">
            <text:p>2333</text:p>
          </table:table-cell>
          <table:table-cell office:value-type="float" office:value="4" table:formula="of:=[.F566]-[.H566]" table:style-name="ce15">
            <text:p>4</text:p>
          </table:table-cell>
          <table:table-cell office:value-type="percentage" office:value="-1.7145306472353193E-3" table:formula="of:=([.I567]-[.I566])/[.I566]" table:style-name="ce16">
            <text:p>0%</text:p>
          </table:table-cell>
          <table:table-cell office:value-type="string" office:string-value="Valid" table:formula="of:=IF([.F566]&lt;=[.E566]; &quot;Valid&quot;; &quot;Invalid&quot;)" table:style-name="ce17">
            <text:p>Valid</text:p>
          </table:table-cell>
          <table:table-cell office:value-type="string" office:string-value="Valid" table:formula="of:=IF([.H566]&lt;=[.G566]; &quot;Valid&quot;; &quot;Invalid&quot;)" table:style-name="ce17">
            <text:p>Valid</text:p>
          </table:table-cell>
          <table:table-cell office:value-type="string" office:string-value="Increasing Pressure" table:formula="of:=IF([.J566]&gt;0; &quot;Increasing Pressure&quot;; &quot;Stable/Reducing&quot;)" table:style-name="ce18">
            <text:p>Increasing Pressure</text:p>
          </table:table-cell>
          <table:table-cell office:value-type="float" office:value="0.66666666666666663" table:formula="of:=IFERROR([.H566]/[.F566]; 0)" table:style-name="ce17">
            <text:p>0.666666667</text:p>
          </table:table-cell>
          <table:table-cell office:value-type="float" office:value="2350.8571428571427" table:formula="of:=AVERAGE([.I566:.I572])" table:style-name="ce15">
            <text:p>2351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4-29T00:00:00" table:style-name="ce14">
            <text:p>29-04-2025</text:p>
          </table:table-cell>
          <table:table-cell office:value-type="string" office:string-value="April" table:formula="of:=TEXT([.A567]; &quot;mmmm&quot;)" table:style-name="ce14">
            <text:p>April</text:p>
          </table:table-cell>
          <table:table-cell office:value-type="string" office:string-value="2025-04" table:formula="of:=TEXT([.A567]; &quot;yyyy-mm&quot;)" table:style-name="ce14">
            <text:p>2025-04</text:p>
          </table:table-cell>
          <table:table-cell office:value-type="float" office:value="11" table:style-name="ce9">
            <text:p>11</text:p>
          </table:table-cell>
          <table:table-cell office:value-type="float" office:value="25" table:style-name="ce9">
            <text:p>25</text:p>
          </table:table-cell>
          <table:table-cell office:value-type="float" office:value="11" table:style-name="ce9">
            <text:p>11</text:p>
          </table:table-cell>
          <table:table-cell office:value-type="float" office:value="2304" table:style-name="ce9">
            <text:p>2304</text:p>
          </table:table-cell>
          <table:table-cell office:value-type="float" office:value="15" table:style-name="ce9">
            <text:p>15</text:p>
          </table:table-cell>
          <table:table-cell office:value-type="float" office:value="2329" table:formula="of:=SUM([.G567]+[.E567])" table:style-name="ce15">
            <text:p>2329</text:p>
          </table:table-cell>
          <table:table-cell office:value-type="float" office:value="-4" table:formula="of:=[.F567]-[.H567]" table:style-name="ce15">
            <text:p>-4</text:p>
          </table:table-cell>
          <table:table-cell office:value-type="percentage" office:value="6.0111635895234005E-3" table:formula="of:=([.I568]-[.I567])/[.I567]" table:style-name="ce16">
            <text:p>1%</text:p>
          </table:table-cell>
          <table:table-cell office:value-type="string" office:string-value="Valid" table:formula="of:=IF([.F567]&lt;=[.E567]; &quot;Valid&quot;; &quot;Invalid&quot;)" table:style-name="ce17">
            <text:p>Valid</text:p>
          </table:table-cell>
          <table:table-cell office:value-type="string" office:string-value="Valid" table:formula="of:=IF([.H567]&lt;=[.G567]; &quot;Valid&quot;; &quot;Invalid&quot;)" table:style-name="ce17">
            <text:p>Valid</text:p>
          </table:table-cell>
          <table:table-cell office:value-type="string" office:string-value="Stable/Reducing" table:formula="of:=IF([.J567]&gt;0; &quot;Increasing Pressure&quot;; &quot;Stable/Reducing&quot;)" table:style-name="ce18">
            <text:p>Stable/Reducing</text:p>
          </table:table-cell>
          <table:table-cell office:value-type="float" office:value="1.3636363636363635" table:formula="of:=IFERROR([.H567]/[.F567]; 0)" table:style-name="ce17">
            <text:p>1.363636364</text:p>
          </table:table-cell>
          <table:table-cell office:value-type="float" office:value="2355.4285714285716" table:formula="of:=AVERAGE([.I567:.I573])" table:style-name="ce15">
            <text:p>2355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4-30T00:00:00" table:style-name="ce14">
            <text:p>30-04-2025</text:p>
          </table:table-cell>
          <table:table-cell office:value-type="string" office:string-value="April" table:formula="of:=TEXT([.A568]; &quot;mmmm&quot;)" table:style-name="ce14">
            <text:p>April</text:p>
          </table:table-cell>
          <table:table-cell office:value-type="string" office:string-value="2025-04" table:formula="of:=TEXT([.A568]; &quot;yyyy-mm&quot;)" table:style-name="ce14">
            <text:p>2025-04</text:p>
          </table:table-cell>
          <table:table-cell office:value-type="float" office:value="7" table:style-name="ce9">
            <text:p>7</text:p>
          </table:table-cell>
          <table:table-cell office:value-type="float" office:value="34" table:style-name="ce9">
            <text:p>34</text:p>
          </table:table-cell>
          <table:table-cell office:value-type="float" office:value="9" table:style-name="ce9">
            <text:p>9</text:p>
          </table:table-cell>
          <table:table-cell office:value-type="float" office:value="2309" table:style-name="ce9">
            <text:p>2309</text:p>
          </table:table-cell>
          <table:table-cell office:value-type="float" office:value="12" table:style-name="ce9">
            <text:p>12</text:p>
          </table:table-cell>
          <table:table-cell office:value-type="float" office:value="2343" table:formula="of:=SUM([.G568]+[.E568])" table:style-name="ce15">
            <text:p>2343</text:p>
          </table:table-cell>
          <table:table-cell office:value-type="float" office:value="-3" table:formula="of:=[.F568]-[.H568]" table:style-name="ce15">
            <text:p>-3</text:p>
          </table:table-cell>
          <table:table-cell office:value-type="percentage" office:value="-2.134016218523261E-3" table:formula="of:=([.I569]-[.I568])/[.I568]" table:style-name="ce16">
            <text:p>0%</text:p>
          </table:table-cell>
          <table:table-cell office:value-type="string" office:string-value="Valid" table:formula="of:=IF([.F568]&lt;=[.E568]; &quot;Valid&quot;; &quot;Invalid&quot;)" table:style-name="ce17">
            <text:p>Valid</text:p>
          </table:table-cell>
          <table:table-cell office:value-type="string" office:string-value="Valid" table:formula="of:=IF([.H568]&lt;=[.G568]; &quot;Valid&quot;; &quot;Invalid&quot;)" table:style-name="ce17">
            <text:p>Valid</text:p>
          </table:table-cell>
          <table:table-cell office:value-type="string" office:string-value="Stable/Reducing" table:formula="of:=IF([.J568]&gt;0; &quot;Increasing Pressure&quot;; &quot;Stable/Reducing&quot;)" table:style-name="ce18">
            <text:p>Stable/Reducing</text:p>
          </table:table-cell>
          <table:table-cell office:value-type="float" office:value="1.3333333333333333" table:formula="of:=IFERROR([.H568]/[.F568]; 0)" table:style-name="ce17">
            <text:p>1.333333333</text:p>
          </table:table-cell>
          <table:table-cell office:value-type="float" office:value="2363.4285714285716" table:formula="of:=AVERAGE([.I568:.I574])" table:style-name="ce15">
            <text:p>2363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5-01T00:00:00" table:style-name="ce14">
            <text:p>01-05-2025</text:p>
          </table:table-cell>
          <table:table-cell office:value-type="string" office:string-value="May" table:formula="of:=TEXT([.A569]; &quot;mmmm&quot;)" table:style-name="ce14">
            <text:p>May</text:p>
          </table:table-cell>
          <table:table-cell office:value-type="string" office:string-value="2025-05" table:formula="of:=TEXT([.A569]; &quot;yyyy-mm&quot;)" table:style-name="ce14">
            <text:p>2025-05</text:p>
          </table:table-cell>
          <table:table-cell office:value-type="float" office:value="13" table:style-name="ce9">
            <text:p>13</text:p>
          </table:table-cell>
          <table:table-cell office:value-type="float" office:value="32" table:style-name="ce9">
            <text:p>32</text:p>
          </table:table-cell>
          <table:table-cell office:value-type="float" office:value="14" table:style-name="ce9">
            <text:p>14</text:p>
          </table:table-cell>
          <table:table-cell office:value-type="float" office:value="2306" table:style-name="ce9">
            <text:p>2306</text:p>
          </table:table-cell>
          <table:table-cell office:value-type="float" office:value="16" table:style-name="ce9">
            <text:p>16</text:p>
          </table:table-cell>
          <table:table-cell office:value-type="float" office:value="2338" table:formula="of:=SUM([.G569]+[.E569])" table:style-name="ce15">
            <text:p>2338</text:p>
          </table:table-cell>
          <table:table-cell office:value-type="float" office:value="-2" table:formula="of:=[.F569]-[.H569]" table:style-name="ce15">
            <text:p>-2</text:p>
          </table:table-cell>
          <table:table-cell office:value-type="percentage" office:value="1.1976047904191617E-2" table:formula="of:=([.I570]-[.I569])/[.I569]" table:style-name="ce16">
            <text:p>1%</text:p>
          </table:table-cell>
          <table:table-cell office:value-type="string" office:string-value="Valid" table:formula="of:=IF([.F569]&lt;=[.E569]; &quot;Valid&quot;; &quot;Invalid&quot;)" table:style-name="ce17">
            <text:p>Valid</text:p>
          </table:table-cell>
          <table:table-cell office:value-type="string" office:string-value="Valid" table:formula="of:=IF([.H569]&lt;=[.G569]; &quot;Valid&quot;; &quot;Invalid&quot;)" table:style-name="ce17">
            <text:p>Valid</text:p>
          </table:table-cell>
          <table:table-cell office:value-type="string" office:string-value="Stable/Reducing" table:formula="of:=IF([.J569]&gt;0; &quot;Increasing Pressure&quot;; &quot;Stable/Reducing&quot;)" table:style-name="ce18">
            <text:p>Stable/Reducing</text:p>
          </table:table-cell>
          <table:table-cell office:value-type="float" office:value="1.1428571428571428" table:formula="of:=IFERROR([.H569]/[.F569]; 0)" table:style-name="ce17">
            <text:p>1.142857143</text:p>
          </table:table-cell>
          <table:table-cell office:value-type="float" office:value="2372.2857142857142" table:formula="of:=AVERAGE([.I569:.I575])" table:style-name="ce15">
            <text:p>2372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5-04T00:00:00" table:style-name="ce14">
            <text:p>04-05-2025</text:p>
          </table:table-cell>
          <table:table-cell office:value-type="string" office:string-value="May" table:formula="of:=TEXT([.A570]; &quot;mmmm&quot;)" table:style-name="ce14">
            <text:p>May</text:p>
          </table:table-cell>
          <table:table-cell office:value-type="string" office:string-value="2025-05" table:formula="of:=TEXT([.A570]; &quot;yyyy-mm&quot;)" table:style-name="ce14">
            <text:p>2025-05</text:p>
          </table:table-cell>
          <table:table-cell office:value-type="float" office:value="9" table:style-name="ce9">
            <text:p>9</text:p>
          </table:table-cell>
          <table:table-cell office:value-type="float" office:value="31" table:style-name="ce9">
            <text:p>31</text:p>
          </table:table-cell>
          <table:table-cell office:value-type="float" office:value="10" table:style-name="ce9">
            <text:p>10</text:p>
          </table:table-cell>
          <table:table-cell office:value-type="float" office:value="2335" table:style-name="ce9">
            <text:p>2335</text:p>
          </table:table-cell>
          <table:table-cell office:value-type="float" office:value="5" table:style-name="ce9">
            <text:p>5</text:p>
          </table:table-cell>
          <table:table-cell office:value-type="float" office:value="2366" table:formula="of:=SUM([.G570]+[.E570])" table:style-name="ce15">
            <text:p>2366</text:p>
          </table:table-cell>
          <table:table-cell office:value-type="float" office:value="5" table:formula="of:=[.F570]-[.H570]" table:style-name="ce15">
            <text:p>5</text:p>
          </table:table-cell>
          <table:table-cell office:value-type="percentage" office:value="3.8038884192730348E-3" table:formula="of:=([.I571]-[.I570])/[.I570]" table:style-name="ce16">
            <text:p>0%</text:p>
          </table:table-cell>
          <table:table-cell office:value-type="string" office:string-value="Valid" table:formula="of:=IF([.F570]&lt;=[.E570]; &quot;Valid&quot;; &quot;Invalid&quot;)" table:style-name="ce17">
            <text:p>Valid</text:p>
          </table:table-cell>
          <table:table-cell office:value-type="string" office:string-value="Valid" table:formula="of:=IF([.H570]&lt;=[.G570]; &quot;Valid&quot;; &quot;Invalid&quot;)" table:style-name="ce17">
            <text:p>Valid</text:p>
          </table:table-cell>
          <table:table-cell office:value-type="string" office:string-value="Increasing Pressure" table:formula="of:=IF([.J570]&gt;0; &quot;Increasing Pressure&quot;; &quot;Stable/Reducing&quot;)" table:style-name="ce18">
            <text:p>Increasing Pressure</text:p>
          </table:table-cell>
          <table:table-cell office:value-type="float" office:value="0.5" table:formula="of:=IFERROR([.H570]/[.F570]; 0)" table:style-name="ce17">
            <text:p>0.5</text:p>
          </table:table-cell>
          <table:table-cell office:value-type="float" office:value="2384.7142857142858" table:formula="of:=AVERAGE([.I570:.I576])" table:style-name="ce15">
            <text:p>2385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5-05T00:00:00" table:style-name="ce14">
            <text:p>05-05-2025</text:p>
          </table:table-cell>
          <table:table-cell office:value-type="string" office:string-value="May" table:formula="of:=TEXT([.A571]; &quot;mmmm&quot;)" table:style-name="ce14">
            <text:p>May</text:p>
          </table:table-cell>
          <table:table-cell office:value-type="string" office:string-value="2025-05" table:formula="of:=TEXT([.A571]; &quot;yyyy-mm&quot;)" table:style-name="ce14">
            <text:p>2025-05</text:p>
          </table:table-cell>
          <table:table-cell office:value-type="float" office:value="15" table:style-name="ce9">
            <text:p>15</text:p>
          </table:table-cell>
          <table:table-cell office:value-type="float" office:value="44" table:style-name="ce9">
            <text:p>44</text:p>
          </table:table-cell>
          <table:table-cell office:value-type="float" office:value="20" table:style-name="ce9">
            <text:p>20</text:p>
          </table:table-cell>
          <table:table-cell office:value-type="float" office:value="2331" table:style-name="ce9">
            <text:p>2331</text:p>
          </table:table-cell>
          <table:table-cell office:value-type="float" office:value="17" table:style-name="ce9">
            <text:p>17</text:p>
          </table:table-cell>
          <table:table-cell office:value-type="float" office:value="2375" table:formula="of:=SUM([.G571]+[.E571])" table:style-name="ce15">
            <text:p>2375</text:p>
          </table:table-cell>
          <table:table-cell office:value-type="float" office:value="3" table:formula="of:=[.F571]-[.H571]" table:style-name="ce15">
            <text:p>3</text:p>
          </table:table-cell>
          <table:table-cell office:value-type="percentage" office:value="-1.2631578947368421E-3" table:formula="of:=([.I572]-[.I571])/[.I571]" table:style-name="ce16">
            <text:p>0%</text:p>
          </table:table-cell>
          <table:table-cell office:value-type="string" office:string-value="Valid" table:formula="of:=IF([.F571]&lt;=[.E571]; &quot;Valid&quot;; &quot;Invalid&quot;)" table:style-name="ce17">
            <text:p>Valid</text:p>
          </table:table-cell>
          <table:table-cell office:value-type="string" office:string-value="Valid" table:formula="of:=IF([.H571]&lt;=[.G571]; &quot;Valid&quot;; &quot;Invalid&quot;)" table:style-name="ce17">
            <text:p>Valid</text:p>
          </table:table-cell>
          <table:table-cell office:value-type="string" office:string-value="Increasing Pressure" table:formula="of:=IF([.J571]&gt;0; &quot;Increasing Pressure&quot;; &quot;Stable/Reducing&quot;)" table:style-name="ce18">
            <text:p>Increasing Pressure</text:p>
          </table:table-cell>
          <table:table-cell office:value-type="float" office:value="0.85" table:formula="of:=IFERROR([.H571]/[.F571]; 0)" table:style-name="ce17">
            <text:p>0.85</text:p>
          </table:table-cell>
          <table:table-cell office:value-type="float" office:value="2392.8571428571427" table:formula="of:=AVERAGE([.I571:.I577])" table:style-name="ce15">
            <text:p>2393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5-06T00:00:00" table:style-name="ce14">
            <text:p>06-05-2025</text:p>
          </table:table-cell>
          <table:table-cell office:value-type="string" office:string-value="May" table:formula="of:=TEXT([.A572]; &quot;mmmm&quot;)" table:style-name="ce14">
            <text:p>May</text:p>
          </table:table-cell>
          <table:table-cell office:value-type="string" office:string-value="2025-05" table:formula="of:=TEXT([.A572]; &quot;yyyy-mm&quot;)" table:style-name="ce14">
            <text:p>2025-05</text:p>
          </table:table-cell>
          <table:table-cell office:value-type="float" office:value="10" table:style-name="ce9">
            <text:p>10</text:p>
          </table:table-cell>
          <table:table-cell office:value-type="float" office:value="33" table:style-name="ce9">
            <text:p>33</text:p>
          </table:table-cell>
          <table:table-cell office:value-type="float" office:value="16" table:style-name="ce9">
            <text:p>16</text:p>
          </table:table-cell>
          <table:table-cell office:value-type="float" office:value="2339" table:style-name="ce9">
            <text:p>2339</text:p>
          </table:table-cell>
          <table:table-cell office:value-type="float" office:value="16" table:style-name="ce9">
            <text:p>16</text:p>
          </table:table-cell>
          <table:table-cell office:value-type="float" office:value="2372" table:formula="of:=SUM([.G572]+[.E572])" table:style-name="ce15">
            <text:p>2372</text:p>
          </table:table-cell>
          <table:table-cell office:value-type="float" office:value="0" table:formula="of:=[.F572]-[.H572]" table:style-name="ce15">
            <text:p>0</text:p>
          </table:table-cell>
          <table:table-cell office:value-type="percentage" office:value="-2.951096121416526E-3" table:formula="of:=([.I573]-[.I572])/[.I572]" table:style-name="ce16">
            <text:p>0%</text:p>
          </table:table-cell>
          <table:table-cell office:value-type="string" office:string-value="Valid" table:formula="of:=IF([.F572]&lt;=[.E572]; &quot;Valid&quot;; &quot;Invalid&quot;)" table:style-name="ce17">
            <text:p>Valid</text:p>
          </table:table-cell>
          <table:table-cell office:value-type="string" office:string-value="Valid" table:formula="of:=IF([.H572]&lt;=[.G572]; &quot;Valid&quot;; &quot;Invalid&quot;)" table:style-name="ce17">
            <text:p>Valid</text:p>
          </table:table-cell>
          <table:table-cell office:value-type="string" office:string-value="Stable/Reducing" table:formula="of:=IF([.J572]&gt;0; &quot;Increasing Pressure&quot;; &quot;Stable/Reducing&quot;)" table:style-name="ce18">
            <text:p>Stable/Reducing</text:p>
          </table:table-cell>
          <table:table-cell office:value-type="float" office:value="1" table:formula="of:=IFERROR([.H572]/[.F572]; 0)" table:style-name="ce17">
            <text:p>1</text:p>
          </table:table-cell>
          <table:table-cell office:value-type="float" office:value="2399.8571428571427" table:formula="of:=AVERAGE([.I572:.I578])" table:style-name="ce15">
            <text:p>2400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5-07T00:00:00" table:style-name="ce14">
            <text:p>07-05-2025</text:p>
          </table:table-cell>
          <table:table-cell office:value-type="string" office:string-value="May" table:formula="of:=TEXT([.A573]; &quot;mmmm&quot;)" table:style-name="ce14">
            <text:p>May</text:p>
          </table:table-cell>
          <table:table-cell office:value-type="string" office:string-value="2025-05" table:formula="of:=TEXT([.A573]; &quot;yyyy-mm&quot;)" table:style-name="ce14">
            <text:p>2025-05</text:p>
          </table:table-cell>
          <table:table-cell office:value-type="float" office:value="10" table:style-name="ce9">
            <text:p>10</text:p>
          </table:table-cell>
          <table:table-cell office:value-type="float" office:value="30" table:style-name="ce9">
            <text:p>30</text:p>
          </table:table-cell>
          <table:table-cell office:value-type="float" office:value="15" table:style-name="ce9">
            <text:p>15</text:p>
          </table:table-cell>
          <table:table-cell office:value-type="float" office:value="2335" table:style-name="ce9">
            <text:p>2335</text:p>
          </table:table-cell>
          <table:table-cell office:value-type="float" office:value="10" table:style-name="ce9">
            <text:p>10</text:p>
          </table:table-cell>
          <table:table-cell office:value-type="float" office:value="2365" table:formula="of:=SUM([.G573]+[.E573])" table:style-name="ce15">
            <text:p>2365</text:p>
          </table:table-cell>
          <table:table-cell office:value-type="float" office:value="5" table:formula="of:=[.F573]-[.H573]" table:style-name="ce15">
            <text:p>5</text:p>
          </table:table-cell>
          <table:table-cell office:value-type="percentage" office:value="8.4566596194503175E-3" table:formula="of:=([.I574]-[.I573])/[.I573]" table:style-name="ce16">
            <text:p>1%</text:p>
          </table:table-cell>
          <table:table-cell office:value-type="string" office:string-value="Valid" table:formula="of:=IF([.F573]&lt;=[.E573]; &quot;Valid&quot;; &quot;Invalid&quot;)" table:style-name="ce17">
            <text:p>Valid</text:p>
          </table:table-cell>
          <table:table-cell office:value-type="string" office:string-value="Valid" table:formula="of:=IF([.H573]&lt;=[.G573]; &quot;Valid&quot;; &quot;Invalid&quot;)" table:style-name="ce17">
            <text:p>Valid</text:p>
          </table:table-cell>
          <table:table-cell office:value-type="string" office:string-value="Increasing Pressure" table:formula="of:=IF([.J573]&gt;0; &quot;Increasing Pressure&quot;; &quot;Stable/Reducing&quot;)" table:style-name="ce18">
            <text:p>Increasing Pressure</text:p>
          </table:table-cell>
          <table:table-cell office:value-type="float" office:value="0.66666666666666663" table:formula="of:=IFERROR([.H573]/[.F573]; 0)" table:style-name="ce17">
            <text:p>0.666666667</text:p>
          </table:table-cell>
          <table:table-cell office:value-type="float" office:value="2409.7142857142858" table:formula="of:=AVERAGE([.I573:.I579])" table:style-name="ce15">
            <text:p>2410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5-08T00:00:00" table:style-name="ce14">
            <text:p>08-05-2025</text:p>
          </table:table-cell>
          <table:table-cell office:value-type="string" office:string-value="May" table:formula="of:=TEXT([.A574]; &quot;mmmm&quot;)" table:style-name="ce14">
            <text:p>May</text:p>
          </table:table-cell>
          <table:table-cell office:value-type="string" office:string-value="2025-05" table:formula="of:=TEXT([.A574]; &quot;yyyy-mm&quot;)" table:style-name="ce14">
            <text:p>2025-05</text:p>
          </table:table-cell>
          <table:table-cell office:value-type="float" office:value="15" table:style-name="ce9">
            <text:p>15</text:p>
          </table:table-cell>
          <table:table-cell office:value-type="float" office:value="24" table:style-name="ce9">
            <text:p>24</text:p>
          </table:table-cell>
          <table:table-cell office:value-type="float" office:value="16" table:style-name="ce9">
            <text:p>16</text:p>
          </table:table-cell>
          <table:table-cell office:value-type="float" office:value="2361" table:style-name="ce9">
            <text:p>2361</text:p>
          </table:table-cell>
          <table:table-cell office:value-type="float" office:value="11" table:style-name="ce9">
            <text:p>11</text:p>
          </table:table-cell>
          <table:table-cell office:value-type="float" office:value="2385" table:formula="of:=SUM([.G574]+[.E574])" table:style-name="ce15">
            <text:p>2385</text:p>
          </table:table-cell>
          <table:table-cell office:value-type="float" office:value="5" table:formula="of:=[.F574]-[.H574]" table:style-name="ce15">
            <text:p>5</text:p>
          </table:table-cell>
          <table:table-cell office:value-type="percentage" office:value="8.385744234800839E-3" table:formula="of:=([.I575]-[.I574])/[.I574]" table:style-name="ce16">
            <text:p>1%</text:p>
          </table:table-cell>
          <table:table-cell office:value-type="string" office:string-value="Valid" table:formula="of:=IF([.F574]&lt;=[.E574]; &quot;Valid&quot;; &quot;Invalid&quot;)" table:style-name="ce17">
            <text:p>Valid</text:p>
          </table:table-cell>
          <table:table-cell office:value-type="string" office:string-value="Valid" table:formula="of:=IF([.H574]&lt;=[.G574]; &quot;Valid&quot;; &quot;Invalid&quot;)" table:style-name="ce17">
            <text:p>Valid</text:p>
          </table:table-cell>
          <table:table-cell office:value-type="string" office:string-value="Increasing Pressure" table:formula="of:=IF([.J574]&gt;0; &quot;Increasing Pressure&quot;; &quot;Stable/Reducing&quot;)" table:style-name="ce18">
            <text:p>Increasing Pressure</text:p>
          </table:table-cell>
          <table:table-cell office:value-type="float" office:value="0.6875" table:formula="of:=IFERROR([.H574]/[.F574]; 0)" table:style-name="ce17">
            <text:p>0.6875</text:p>
          </table:table-cell>
          <table:table-cell office:value-type="float" office:value="2424" table:formula="of:=AVERAGE([.I574:.I580])" table:style-name="ce15">
            <text:p>2424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5-11T00:00:00" table:style-name="ce14">
            <text:p>11-05-2025</text:p>
          </table:table-cell>
          <table:table-cell office:value-type="string" office:string-value="May" table:formula="of:=TEXT([.A575]; &quot;mmmm&quot;)" table:style-name="ce14">
            <text:p>May</text:p>
          </table:table-cell>
          <table:table-cell office:value-type="string" office:string-value="2025-05" table:formula="of:=TEXT([.A575]; &quot;yyyy-mm&quot;)" table:style-name="ce14">
            <text:p>2025-05</text:p>
          </table:table-cell>
          <table:table-cell office:value-type="float" office:value="15" table:style-name="ce9">
            <text:p>15</text:p>
          </table:table-cell>
          <table:table-cell office:value-type="float" office:value="20" table:style-name="ce9">
            <text:p>20</text:p>
          </table:table-cell>
          <table:table-cell office:value-type="float" office:value="12" table:style-name="ce9">
            <text:p>12</text:p>
          </table:table-cell>
          <table:table-cell office:value-type="float" office:value="2385" table:style-name="ce9">
            <text:p>2385</text:p>
          </table:table-cell>
          <table:table-cell office:value-type="float" office:value="3" table:style-name="ce9">
            <text:p>3</text:p>
          </table:table-cell>
          <table:table-cell office:value-type="float" office:value="2405" table:formula="of:=SUM([.G575]+[.E575])" table:style-name="ce15">
            <text:p>2405</text:p>
          </table:table-cell>
          <table:table-cell office:value-type="float" office:value="9" table:formula="of:=[.F575]-[.H575]" table:style-name="ce15">
            <text:p>9</text:p>
          </table:table-cell>
          <table:table-cell office:value-type="percentage" office:value="8.3160083160083165E-3" table:formula="of:=([.I576]-[.I575])/[.I575]" table:style-name="ce16">
            <text:p>1%</text:p>
          </table:table-cell>
          <table:table-cell office:value-type="string" office:string-value="Valid" table:formula="of:=IF([.F575]&lt;=[.E575]; &quot;Valid&quot;; &quot;Invalid&quot;)" table:style-name="ce17">
            <text:p>Valid</text:p>
          </table:table-cell>
          <table:table-cell office:value-type="string" office:string-value="Valid" table:formula="of:=IF([.H575]&lt;=[.G575]; &quot;Valid&quot;; &quot;Invalid&quot;)" table:style-name="ce17">
            <text:p>Valid</text:p>
          </table:table-cell>
          <table:table-cell office:value-type="string" office:string-value="Increasing Pressure" table:formula="of:=IF([.J575]&gt;0; &quot;Increasing Pressure&quot;; &quot;Stable/Reducing&quot;)" table:style-name="ce18">
            <text:p>Increasing Pressure</text:p>
          </table:table-cell>
          <table:table-cell office:value-type="float" office:value="0.25" table:formula="of:=IFERROR([.H575]/[.F575]; 0)" table:style-name="ce17">
            <text:p>0.25</text:p>
          </table:table-cell>
          <table:table-cell office:value-type="float" office:value="2438.1428571428573" table:formula="of:=AVERAGE([.I575:.I581])" table:style-name="ce15">
            <text:p>2438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5-12T00:00:00" table:style-name="ce14">
            <text:p>12-05-2025</text:p>
          </table:table-cell>
          <table:table-cell office:value-type="string" office:string-value="May" table:formula="of:=TEXT([.A576]; &quot;mmmm&quot;)" table:style-name="ce14">
            <text:p>May</text:p>
          </table:table-cell>
          <table:table-cell office:value-type="string" office:string-value="2025-05" table:formula="of:=TEXT([.A576]; &quot;yyyy-mm&quot;)" table:style-name="ce14">
            <text:p>2025-05</text:p>
          </table:table-cell>
          <table:table-cell office:value-type="float" office:value="7" table:style-name="ce9">
            <text:p>7</text:p>
          </table:table-cell>
          <table:table-cell office:value-type="float" office:value="33" table:style-name="ce9">
            <text:p>33</text:p>
          </table:table-cell>
          <table:table-cell office:value-type="float" office:value="14" table:style-name="ce9">
            <text:p>14</text:p>
          </table:table-cell>
          <table:table-cell office:value-type="float" office:value="2392" table:style-name="ce9">
            <text:p>2392</text:p>
          </table:table-cell>
          <table:table-cell office:value-type="float" office:value="7" table:style-name="ce9">
            <text:p>7</text:p>
          </table:table-cell>
          <table:table-cell office:value-type="float" office:value="2425" table:formula="of:=SUM([.G576]+[.E576])" table:style-name="ce15">
            <text:p>2425</text:p>
          </table:table-cell>
          <table:table-cell office:value-type="float" office:value="7" table:formula="of:=[.F576]-[.H576]" table:style-name="ce15">
            <text:p>7</text:p>
          </table:table-cell>
          <table:table-cell office:value-type="percentage" office:value="-8.2474226804123715E-4" table:formula="of:=([.I577]-[.I576])/[.I576]" table:style-name="ce16">
            <text:p>0%</text:p>
          </table:table-cell>
          <table:table-cell office:value-type="string" office:string-value="Valid" table:formula="of:=IF([.F576]&lt;=[.E576]; &quot;Valid&quot;; &quot;Invalid&quot;)" table:style-name="ce17">
            <text:p>Valid</text:p>
          </table:table-cell>
          <table:table-cell office:value-type="string" office:string-value="Valid" table:formula="of:=IF([.H576]&lt;=[.G576]; &quot;Valid&quot;; &quot;Invalid&quot;)" table:style-name="ce17">
            <text:p>Valid</text:p>
          </table:table-cell>
          <table:table-cell office:value-type="string" office:string-value="Increasing Pressure" table:formula="of:=IF([.J576]&gt;0; &quot;Increasing Pressure&quot;; &quot;Stable/Reducing&quot;)" table:style-name="ce18">
            <text:p>Increasing Pressure</text:p>
          </table:table-cell>
          <table:table-cell office:value-type="float" office:value="0.5" table:formula="of:=IFERROR([.H576]/[.F576]; 0)" table:style-name="ce17">
            <text:p>0.5</text:p>
          </table:table-cell>
          <table:table-cell office:value-type="float" office:value="2455.8571428571427" table:formula="of:=AVERAGE([.I576:.I582])" table:style-name="ce15">
            <text:p>2456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5-13T00:00:00" table:style-name="ce14">
            <text:p>13-05-2025</text:p>
          </table:table-cell>
          <table:table-cell office:value-type="string" office:string-value="May" table:formula="of:=TEXT([.A577]; &quot;mmmm&quot;)" table:style-name="ce14">
            <text:p>May</text:p>
          </table:table-cell>
          <table:table-cell office:value-type="string" office:string-value="2025-05" table:formula="of:=TEXT([.A577]; &quot;yyyy-mm&quot;)" table:style-name="ce14">
            <text:p>2025-05</text:p>
          </table:table-cell>
          <table:table-cell office:value-type="float" office:value="18" table:style-name="ce9">
            <text:p>18</text:p>
          </table:table-cell>
          <table:table-cell office:value-type="float" office:value="29" table:style-name="ce9">
            <text:p>29</text:p>
          </table:table-cell>
          <table:table-cell office:value-type="float" office:value="12" table:style-name="ce9">
            <text:p>12</text:p>
          </table:table-cell>
          <table:table-cell office:value-type="float" office:value="2394" table:style-name="ce9">
            <text:p>2394</text:p>
          </table:table-cell>
          <table:table-cell office:value-type="float" office:value="11" table:style-name="ce9">
            <text:p>11</text:p>
          </table:table-cell>
          <table:table-cell office:value-type="float" office:value="2423" table:formula="of:=SUM([.G577]+[.E577])" table:style-name="ce15">
            <text:p>2423</text:p>
          </table:table-cell>
          <table:table-cell office:value-type="float" office:value="1" table:formula="of:=[.F577]-[.H577]" table:style-name="ce15">
            <text:p>1</text:p>
          </table:table-cell>
          <table:table-cell office:value-type="percentage" office:value="4.127115146512588E-4" table:formula="of:=([.I578]-[.I577])/[.I577]" table:style-name="ce16">
            <text:p>0%</text:p>
          </table:table-cell>
          <table:table-cell office:value-type="string" office:string-value="Valid" table:formula="of:=IF([.F577]&lt;=[.E577]; &quot;Valid&quot;; &quot;Invalid&quot;)" table:style-name="ce17">
            <text:p>Valid</text:p>
          </table:table-cell>
          <table:table-cell office:value-type="string" office:string-value="Valid" table:formula="of:=IF([.H577]&lt;=[.G577]; &quot;Valid&quot;; &quot;Invalid&quot;)" table:style-name="ce17">
            <text:p>Valid</text:p>
          </table:table-cell>
          <table:table-cell office:value-type="string" office:string-value="Increasing Pressure" table:formula="of:=IF([.J577]&gt;0; &quot;Increasing Pressure&quot;; &quot;Stable/Reducing&quot;)" table:style-name="ce18">
            <text:p>Increasing Pressure</text:p>
          </table:table-cell>
          <table:table-cell office:value-type="float" office:value="0.91666666666666663" table:formula="of:=IFERROR([.H577]/[.F577]; 0)" table:style-name="ce17">
            <text:p>0.916666667</text:p>
          </table:table-cell>
          <table:table-cell office:value-type="float" office:value="2467.8571428571427" table:formula="of:=AVERAGE([.I577:.I583])" table:style-name="ce15">
            <text:p>2468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5-14T00:00:00" table:style-name="ce14">
            <text:p>14-05-2025</text:p>
          </table:table-cell>
          <table:table-cell office:value-type="string" office:string-value="May" table:formula="of:=TEXT([.A578]; &quot;mmmm&quot;)" table:style-name="ce14">
            <text:p>May</text:p>
          </table:table-cell>
          <table:table-cell office:value-type="string" office:string-value="2025-05" table:formula="of:=TEXT([.A578]; &quot;yyyy-mm&quot;)" table:style-name="ce14">
            <text:p>2025-05</text:p>
          </table:table-cell>
          <table:table-cell office:value-type="float" office:value="7" table:style-name="ce9">
            <text:p>7</text:p>
          </table:table-cell>
          <table:table-cell office:value-type="float" office:value="30" table:style-name="ce9">
            <text:p>30</text:p>
          </table:table-cell>
          <table:table-cell office:value-type="float" office:value="14" table:style-name="ce9">
            <text:p>14</text:p>
          </table:table-cell>
          <table:table-cell office:value-type="float" office:value="2394" table:style-name="ce9">
            <text:p>2394</text:p>
          </table:table-cell>
          <table:table-cell office:value-type="float" office:value="11" table:style-name="ce9">
            <text:p>11</text:p>
          </table:table-cell>
          <table:table-cell office:value-type="float" office:value="2424" table:formula="of:=SUM([.G578]+[.E578])" table:style-name="ce15">
            <text:p>2424</text:p>
          </table:table-cell>
          <table:table-cell office:value-type="float" office:value="3" table:formula="of:=[.F578]-[.H578]" table:style-name="ce15">
            <text:p>3</text:p>
          </table:table-cell>
          <table:table-cell office:value-type="percentage" office:value="7.0132013201320131E-3" table:formula="of:=([.I579]-[.I578])/[.I578]" table:style-name="ce16">
            <text:p>1%</text:p>
          </table:table-cell>
          <table:table-cell office:value-type="string" office:string-value="Valid" table:formula="of:=IF([.F578]&lt;=[.E578]; &quot;Valid&quot;; &quot;Invalid&quot;)" table:style-name="ce17">
            <text:p>Valid</text:p>
          </table:table-cell>
          <table:table-cell office:value-type="string" office:string-value="Valid" table:formula="of:=IF([.H578]&lt;=[.G578]; &quot;Valid&quot;; &quot;Invalid&quot;)" table:style-name="ce17">
            <text:p>Valid</text:p>
          </table:table-cell>
          <table:table-cell office:value-type="string" office:string-value="Increasing Pressure" table:formula="of:=IF([.J578]&gt;0; &quot;Increasing Pressure&quot;; &quot;Stable/Reducing&quot;)" table:style-name="ce18">
            <text:p>Increasing Pressure</text:p>
          </table:table-cell>
          <table:table-cell office:value-type="float" office:value="0.7857142857142857" table:formula="of:=IFERROR([.H578]/[.F578]; 0)" table:style-name="ce17">
            <text:p>0.785714286</text:p>
          </table:table-cell>
          <table:table-cell office:value-type="float" office:value="2482.8571428571427" table:formula="of:=AVERAGE([.I578:.I584])" table:style-name="ce15">
            <text:p>2483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5-15T00:00:00" table:style-name="ce14">
            <text:p>15-05-2025</text:p>
          </table:table-cell>
          <table:table-cell office:value-type="string" office:string-value="May" table:formula="of:=TEXT([.A579]; &quot;mmmm&quot;)" table:style-name="ce14">
            <text:p>May</text:p>
          </table:table-cell>
          <table:table-cell office:value-type="string" office:string-value="2025-05" table:formula="of:=TEXT([.A579]; &quot;yyyy-mm&quot;)" table:style-name="ce14">
            <text:p>2025-05</text:p>
          </table:table-cell>
          <table:table-cell office:value-type="float" office:value="15" table:style-name="ce9">
            <text:p>15</text:p>
          </table:table-cell>
          <table:table-cell office:value-type="float" office:value="31" table:style-name="ce9">
            <text:p>31</text:p>
          </table:table-cell>
          <table:table-cell office:value-type="float" office:value="14" table:style-name="ce9">
            <text:p>14</text:p>
          </table:table-cell>
          <table:table-cell office:value-type="float" office:value="2410" table:style-name="ce9">
            <text:p>2410</text:p>
          </table:table-cell>
          <table:table-cell office:value-type="float" office:value="14" table:style-name="ce9">
            <text:p>14</text:p>
          </table:table-cell>
          <table:table-cell office:value-type="float" office:value="2441" table:formula="of:=SUM([.G579]+[.E579])" table:style-name="ce15">
            <text:p>2441</text:p>
          </table:table-cell>
          <table:table-cell office:value-type="float" office:value="0" table:formula="of:=[.F579]-[.H579]" table:style-name="ce15">
            <text:p>0</text:p>
          </table:table-cell>
          <table:table-cell office:value-type="percentage" office:value="9.8320360507988536E-3" table:formula="of:=([.I580]-[.I579])/[.I579]" table:style-name="ce16">
            <text:p>1%</text:p>
          </table:table-cell>
          <table:table-cell office:value-type="string" office:string-value="Valid" table:formula="of:=IF([.F579]&lt;=[.E579]; &quot;Valid&quot;; &quot;Invalid&quot;)" table:style-name="ce17">
            <text:p>Valid</text:p>
          </table:table-cell>
          <table:table-cell office:value-type="string" office:string-value="Valid" table:formula="of:=IF([.H579]&lt;=[.G579]; &quot;Valid&quot;; &quot;Invalid&quot;)" table:style-name="ce17">
            <text:p>Valid</text:p>
          </table:table-cell>
          <table:table-cell office:value-type="string" office:string-value="Stable/Reducing" table:formula="of:=IF([.J579]&gt;0; &quot;Increasing Pressure&quot;; &quot;Stable/Reducing&quot;)" table:style-name="ce18">
            <text:p>Stable/Reducing</text:p>
          </table:table-cell>
          <table:table-cell office:value-type="float" office:value="1" table:formula="of:=IFERROR([.H579]/[.F579]; 0)" table:style-name="ce17">
            <text:p>1</text:p>
          </table:table-cell>
          <table:table-cell office:value-type="float" office:value="2499.1428571428573" table:formula="of:=AVERAGE([.I579:.I585])" table:style-name="ce15">
            <text:p>2499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5-18T00:00:00" table:style-name="ce14">
            <text:p>18-05-2025</text:p>
          </table:table-cell>
          <table:table-cell office:value-type="string" office:string-value="May" table:formula="of:=TEXT([.A580]; &quot;mmmm&quot;)" table:style-name="ce14">
            <text:p>May</text:p>
          </table:table-cell>
          <table:table-cell office:value-type="string" office:string-value="2025-05" table:formula="of:=TEXT([.A580]; &quot;yyyy-mm&quot;)" table:style-name="ce14">
            <text:p>2025-05</text:p>
          </table:table-cell>
          <table:table-cell office:value-type="float" office:value="13" table:style-name="ce9">
            <text:p>13</text:p>
          </table:table-cell>
          <table:table-cell office:value-type="float" office:value="28" table:style-name="ce9">
            <text:p>28</text:p>
          </table:table-cell>
          <table:table-cell office:value-type="float" office:value="14" table:style-name="ce9">
            <text:p>14</text:p>
          </table:table-cell>
          <table:table-cell office:value-type="float" office:value="2437" table:style-name="ce9">
            <text:p>2437</text:p>
          </table:table-cell>
          <table:table-cell office:value-type="float" office:value="9" table:style-name="ce9">
            <text:p>9</text:p>
          </table:table-cell>
          <table:table-cell office:value-type="float" office:value="2465" table:formula="of:=SUM([.G580]+[.E580])" table:style-name="ce15">
            <text:p>2465</text:p>
          </table:table-cell>
          <table:table-cell office:value-type="float" office:value="5" table:formula="of:=[.F580]-[.H580]" table:style-name="ce15">
            <text:p>5</text:p>
          </table:table-cell>
          <table:table-cell office:value-type="percentage" office:value="7.7079107505070993E-3" table:formula="of:=([.I581]-[.I580])/[.I580]" table:style-name="ce16">
            <text:p>1%</text:p>
          </table:table-cell>
          <table:table-cell office:value-type="string" office:string-value="Valid" table:formula="of:=IF([.F580]&lt;=[.E580]; &quot;Valid&quot;; &quot;Invalid&quot;)" table:style-name="ce17">
            <text:p>Valid</text:p>
          </table:table-cell>
          <table:table-cell office:value-type="string" office:string-value="Valid" table:formula="of:=IF([.H580]&lt;=[.G580]; &quot;Valid&quot;; &quot;Invalid&quot;)" table:style-name="ce17">
            <text:p>Valid</text:p>
          </table:table-cell>
          <table:table-cell office:value-type="string" office:string-value="Increasing Pressure" table:formula="of:=IF([.J580]&gt;0; &quot;Increasing Pressure&quot;; &quot;Stable/Reducing&quot;)" table:style-name="ce18">
            <text:p>Increasing Pressure</text:p>
          </table:table-cell>
          <table:table-cell office:value-type="float" office:value="0.6428571428571429" table:formula="of:=IFERROR([.H580]/[.F580]; 0)" table:style-name="ce17">
            <text:p>0.642857143</text:p>
          </table:table-cell>
          <table:table-cell office:value-type="float" office:value="2513.8571428571427" table:formula="of:=AVERAGE([.I580:.I586])" table:style-name="ce15">
            <text:p>2514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5-19T00:00:00" table:style-name="ce14">
            <text:p>19-05-2025</text:p>
          </table:table-cell>
          <table:table-cell office:value-type="string" office:string-value="May" table:formula="of:=TEXT([.A581]; &quot;mmmm&quot;)" table:style-name="ce14">
            <text:p>May</text:p>
          </table:table-cell>
          <table:table-cell office:value-type="string" office:string-value="2025-05" table:formula="of:=TEXT([.A581]; &quot;yyyy-mm&quot;)" table:style-name="ce14">
            <text:p>2025-05</text:p>
          </table:table-cell>
          <table:table-cell office:value-type="float" office:value="7" table:style-name="ce9">
            <text:p>7</text:p>
          </table:table-cell>
          <table:table-cell office:value-type="float" office:value="27" table:style-name="ce9">
            <text:p>27</text:p>
          </table:table-cell>
          <table:table-cell office:value-type="float" office:value="17" table:style-name="ce9">
            <text:p>17</text:p>
          </table:table-cell>
          <table:table-cell office:value-type="float" office:value="2457" table:style-name="ce9">
            <text:p>2457</text:p>
          </table:table-cell>
          <table:table-cell office:value-type="float" office:value="6" table:style-name="ce9">
            <text:p>6</text:p>
          </table:table-cell>
          <table:table-cell office:value-type="float" office:value="2484" table:formula="of:=SUM([.G581]+[.E581])" table:style-name="ce15">
            <text:p>2484</text:p>
          </table:table-cell>
          <table:table-cell office:value-type="float" office:value="11" table:formula="of:=[.F581]-[.H581]" table:style-name="ce15">
            <text:p>11</text:p>
          </table:table-cell>
          <table:table-cell office:value-type="percentage" office:value="1.8115942028985508E-2" table:formula="of:=([.I582]-[.I581])/[.I581]" table:style-name="ce16">
            <text:p>2%</text:p>
          </table:table-cell>
          <table:table-cell office:value-type="string" office:string-value="Valid" table:formula="of:=IF([.F581]&lt;=[.E581]; &quot;Valid&quot;; &quot;Invalid&quot;)" table:style-name="ce17">
            <text:p>Valid</text:p>
          </table:table-cell>
          <table:table-cell office:value-type="string" office:string-value="Valid" table:formula="of:=IF([.H581]&lt;=[.G581]; &quot;Valid&quot;; &quot;Invalid&quot;)" table:style-name="ce17">
            <text:p>Valid</text:p>
          </table:table-cell>
          <table:table-cell office:value-type="string" office:string-value="Increasing Pressure" table:formula="of:=IF([.J581]&gt;0; &quot;Increasing Pressure&quot;; &quot;Stable/Reducing&quot;)" table:style-name="ce18">
            <text:p>Increasing Pressure</text:p>
          </table:table-cell>
          <table:table-cell office:value-type="float" office:value="0.35294117647058826" table:formula="of:=IFERROR([.H581]/[.F581]; 0)" table:style-name="ce17">
            <text:p>0.352941176</text:p>
          </table:table-cell>
          <table:table-cell office:value-type="float" office:value="2526.2857142857142" table:formula="of:=AVERAGE([.I581:.I587])" table:style-name="ce15">
            <text:p>2526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5-21T00:00:00" table:style-name="ce14">
            <text:p>21-05-2025</text:p>
          </table:table-cell>
          <table:table-cell office:value-type="string" office:string-value="May" table:formula="of:=TEXT([.A582]; &quot;mmmm&quot;)" table:style-name="ce14">
            <text:p>May</text:p>
          </table:table-cell>
          <table:table-cell office:value-type="string" office:string-value="2025-05" table:formula="of:=TEXT([.A582]; &quot;yyyy-mm&quot;)" table:style-name="ce14">
            <text:p>2025-05</text:p>
          </table:table-cell>
          <table:table-cell office:value-type="float" office:value="14" table:style-name="ce9">
            <text:p>14</text:p>
          </table:table-cell>
          <table:table-cell office:value-type="float" office:value="62" table:style-name="ce9">
            <text:p>62</text:p>
          </table:table-cell>
          <table:table-cell office:value-type="float" office:value="13" table:style-name="ce9">
            <text:p>13</text:p>
          </table:table-cell>
          <table:table-cell office:value-type="float" office:value="2467" table:style-name="ce9">
            <text:p>2467</text:p>
          </table:table-cell>
          <table:table-cell office:value-type="float" office:value="18" table:style-name="ce9">
            <text:p>18</text:p>
          </table:table-cell>
          <table:table-cell office:value-type="float" office:value="2529" table:formula="of:=SUM([.G582]+[.E582])" table:style-name="ce15">
            <text:p>2529</text:p>
          </table:table-cell>
          <table:table-cell office:value-type="float" office:value="-5" table:formula="of:=[.F582]-[.H582]" table:style-name="ce15">
            <text:p>-5</text:p>
          </table:table-cell>
          <table:table-cell office:value-type="percentage" office:value="-7.9082641360221431E-3" table:formula="of:=([.I583]-[.I582])/[.I582]" table:style-name="ce16">
            <text:p>-1%</text:p>
          </table:table-cell>
          <table:table-cell office:value-type="string" office:string-value="Valid" table:formula="of:=IF([.F582]&lt;=[.E582]; &quot;Valid&quot;; &quot;Invalid&quot;)" table:style-name="ce17">
            <text:p>Valid</text:p>
          </table:table-cell>
          <table:table-cell office:value-type="string" office:string-value="Valid" table:formula="of:=IF([.H582]&lt;=[.G582]; &quot;Valid&quot;; &quot;Invalid&quot;)" table:style-name="ce17">
            <text:p>Valid</text:p>
          </table:table-cell>
          <table:table-cell office:value-type="string" office:string-value="Stable/Reducing" table:formula="of:=IF([.J582]&gt;0; &quot;Increasing Pressure&quot;; &quot;Stable/Reducing&quot;)" table:style-name="ce18">
            <text:p>Stable/Reducing</text:p>
          </table:table-cell>
          <table:table-cell office:value-type="float" office:value="1.3846153846153846" table:formula="of:=IFERROR([.H582]/[.F582]; 0)" table:style-name="ce17">
            <text:p>1.384615385</text:p>
          </table:table-cell>
          <table:table-cell office:value-type="float" office:value="2533.8571428571427" table:formula="of:=AVERAGE([.I582:.I588])" table:style-name="ce15">
            <text:p>2534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5-22T00:00:00" table:style-name="ce14">
            <text:p>22-05-2025</text:p>
          </table:table-cell>
          <table:table-cell office:value-type="string" office:string-value="May" table:formula="of:=TEXT([.A583]; &quot;mmmm&quot;)" table:style-name="ce14">
            <text:p>May</text:p>
          </table:table-cell>
          <table:table-cell office:value-type="string" office:string-value="2025-05" table:formula="of:=TEXT([.A583]; &quot;yyyy-mm&quot;)" table:style-name="ce14">
            <text:p>2025-05</text:p>
          </table:table-cell>
          <table:table-cell office:value-type="float" office:value="18" table:style-name="ce9">
            <text:p>18</text:p>
          </table:table-cell>
          <table:table-cell office:value-type="float" office:value="36" table:style-name="ce9">
            <text:p>36</text:p>
          </table:table-cell>
          <table:table-cell office:value-type="float" office:value="17" table:style-name="ce9">
            <text:p>17</text:p>
          </table:table-cell>
          <table:table-cell office:value-type="float" office:value="2473" table:style-name="ce9">
            <text:p>2473</text:p>
          </table:table-cell>
          <table:table-cell office:value-type="float" office:value="15" table:style-name="ce9">
            <text:p>15</text:p>
          </table:table-cell>
          <table:table-cell office:value-type="float" office:value="2509" table:formula="of:=SUM([.G583]+[.E583])" table:style-name="ce15">
            <text:p>2509</text:p>
          </table:table-cell>
          <table:table-cell office:value-type="float" office:value="2" table:formula="of:=[.F583]-[.H583]" table:style-name="ce15">
            <text:p>2</text:p>
          </table:table-cell>
          <table:table-cell office:value-type="percentage" office:value="7.5727381426863296E-3" table:formula="of:=([.I584]-[.I583])/[.I583]" table:style-name="ce16">
            <text:p>1%</text:p>
          </table:table-cell>
          <table:table-cell office:value-type="string" office:string-value="Valid" table:formula="of:=IF([.F583]&lt;=[.E583]; &quot;Valid&quot;; &quot;Invalid&quot;)" table:style-name="ce17">
            <text:p>Valid</text:p>
          </table:table-cell>
          <table:table-cell office:value-type="string" office:string-value="Valid" table:formula="of:=IF([.H583]&lt;=[.G583]; &quot;Valid&quot;; &quot;Invalid&quot;)" table:style-name="ce17">
            <text:p>Valid</text:p>
          </table:table-cell>
          <table:table-cell office:value-type="string" office:string-value="Increasing Pressure" table:formula="of:=IF([.J583]&gt;0; &quot;Increasing Pressure&quot;; &quot;Stable/Reducing&quot;)" table:style-name="ce18">
            <text:p>Increasing Pressure</text:p>
          </table:table-cell>
          <table:table-cell office:value-type="float" office:value="0.88235294117647056" table:formula="of:=IFERROR([.H583]/[.F583]; 0)" table:style-name="ce17">
            <text:p>0.882352941</text:p>
          </table:table-cell>
          <table:table-cell office:value-type="float" office:value="2535.7142857142858" table:formula="of:=AVERAGE([.I583:.I589])" table:style-name="ce15">
            <text:p>2536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5-27T00:00:00" table:style-name="ce14">
            <text:p>27-05-2025</text:p>
          </table:table-cell>
          <table:table-cell office:value-type="string" office:string-value="May" table:formula="of:=TEXT([.A584]; &quot;mmmm&quot;)" table:style-name="ce14">
            <text:p>May</text:p>
          </table:table-cell>
          <table:table-cell office:value-type="string" office:string-value="2025-05" table:formula="of:=TEXT([.A584]; &quot;yyyy-mm&quot;)" table:style-name="ce14">
            <text:p>2025-05</text:p>
          </table:table-cell>
          <table:table-cell office:value-type="float" office:value="6" table:style-name="ce9">
            <text:p>6</text:p>
          </table:table-cell>
          <table:table-cell office:value-type="float" office:value="24" table:style-name="ce9">
            <text:p>24</text:p>
          </table:table-cell>
          <table:table-cell office:value-type="float" office:value="7" table:style-name="ce9">
            <text:p>7</text:p>
          </table:table-cell>
          <table:table-cell office:value-type="float" office:value="2504" table:style-name="ce9">
            <text:p>2504</text:p>
          </table:table-cell>
          <table:table-cell office:value-type="float" office:value="11" table:style-name="ce9">
            <text:p>11</text:p>
          </table:table-cell>
          <table:table-cell office:value-type="float" office:value="2528" table:formula="of:=SUM([.G584]+[.E584])" table:style-name="ce15">
            <text:p>2528</text:p>
          </table:table-cell>
          <table:table-cell office:value-type="float" office:value="-4" table:formula="of:=[.F584]-[.H584]" table:style-name="ce15">
            <text:p>-4</text:p>
          </table:table-cell>
          <table:table-cell office:value-type="percentage" office:value="3.9556962025316458E-3" table:formula="of:=([.I585]-[.I584])/[.I584]" table:style-name="ce16">
            <text:p>0%</text:p>
          </table:table-cell>
          <table:table-cell office:value-type="string" office:string-value="Valid" table:formula="of:=IF([.F584]&lt;=[.E584]; &quot;Valid&quot;; &quot;Invalid&quot;)" table:style-name="ce17">
            <text:p>Valid</text:p>
          </table:table-cell>
          <table:table-cell office:value-type="string" office:string-value="Valid" table:formula="of:=IF([.H584]&lt;=[.G584]; &quot;Valid&quot;; &quot;Invalid&quot;)" table:style-name="ce17">
            <text:p>Valid</text:p>
          </table:table-cell>
          <table:table-cell office:value-type="string" office:string-value="Stable/Reducing" table:formula="of:=IF([.J584]&gt;0; &quot;Increasing Pressure&quot;; &quot;Stable/Reducing&quot;)" table:style-name="ce18">
            <text:p>Stable/Reducing</text:p>
          </table:table-cell>
          <table:table-cell office:value-type="float" office:value="1.5714285714285714" table:formula="of:=IFERROR([.H584]/[.F584]; 0)" table:style-name="ce17">
            <text:p>1.571428571</text:p>
          </table:table-cell>
          <table:table-cell office:value-type="float" office:value="2539" table:formula="of:=AVERAGE([.I584:.I590])" table:style-name="ce15">
            <text:p>2539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5-28T00:00:00" table:style-name="ce14">
            <text:p>28-05-2025</text:p>
          </table:table-cell>
          <table:table-cell office:value-type="string" office:string-value="May" table:formula="of:=TEXT([.A585]; &quot;mmmm&quot;)" table:style-name="ce14">
            <text:p>May</text:p>
          </table:table-cell>
          <table:table-cell office:value-type="string" office:string-value="2025-05" table:formula="of:=TEXT([.A585]; &quot;yyyy-mm&quot;)" table:style-name="ce14">
            <text:p>2025-05</text:p>
          </table:table-cell>
          <table:table-cell office:value-type="float" office:value="12" table:style-name="ce9">
            <text:p>12</text:p>
          </table:table-cell>
          <table:table-cell office:value-type="float" office:value="39" table:style-name="ce9">
            <text:p>39</text:p>
          </table:table-cell>
          <table:table-cell office:value-type="float" office:value="12" table:style-name="ce9">
            <text:p>12</text:p>
          </table:table-cell>
          <table:table-cell office:value-type="float" office:value="2499" table:style-name="ce9">
            <text:p>2499</text:p>
          </table:table-cell>
          <table:table-cell office:value-type="float" office:value="14" table:style-name="ce9">
            <text:p>14</text:p>
          </table:table-cell>
          <table:table-cell office:value-type="float" office:value="2538" table:formula="of:=SUM([.G585]+[.E585])" table:style-name="ce15">
            <text:p>2538</text:p>
          </table:table-cell>
          <table:table-cell office:value-type="float" office:value="-2" table:formula="of:=[.F585]-[.H585]" table:style-name="ce15">
            <text:p>-2</text:p>
          </table:table-cell>
          <table:table-cell office:value-type="percentage" office:value="2.3640661938534278E-3" table:formula="of:=([.I586]-[.I585])/[.I585]" table:style-name="ce16">
            <text:p>0%</text:p>
          </table:table-cell>
          <table:table-cell office:value-type="string" office:string-value="Valid" table:formula="of:=IF([.F585]&lt;=[.E585]; &quot;Valid&quot;; &quot;Invalid&quot;)" table:style-name="ce17">
            <text:p>Valid</text:p>
          </table:table-cell>
          <table:table-cell office:value-type="string" office:string-value="Valid" table:formula="of:=IF([.H585]&lt;=[.G585]; &quot;Valid&quot;; &quot;Invalid&quot;)" table:style-name="ce17">
            <text:p>Valid</text:p>
          </table:table-cell>
          <table:table-cell office:value-type="string" office:string-value="Stable/Reducing" table:formula="of:=IF([.J585]&gt;0; &quot;Increasing Pressure&quot;; &quot;Stable/Reducing&quot;)" table:style-name="ce18">
            <text:p>Stable/Reducing</text:p>
          </table:table-cell>
          <table:table-cell office:value-type="float" office:value="1.1666666666666667" table:formula="of:=IFERROR([.H585]/[.F585]; 0)" table:style-name="ce17">
            <text:p>1.166666667</text:p>
          </table:table-cell>
          <table:table-cell office:value-type="float" office:value="2539.1428571428573" table:formula="of:=AVERAGE([.I585:.I591])" table:style-name="ce15">
            <text:p>2539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5-29T00:00:00" table:style-name="ce14">
            <text:p>29-05-2025</text:p>
          </table:table-cell>
          <table:table-cell office:value-type="string" office:string-value="May" table:formula="of:=TEXT([.A586]; &quot;mmmm&quot;)" table:style-name="ce14">
            <text:p>May</text:p>
          </table:table-cell>
          <table:table-cell office:value-type="string" office:string-value="2025-05" table:formula="of:=TEXT([.A586]; &quot;yyyy-mm&quot;)" table:style-name="ce14">
            <text:p>2025-05</text:p>
          </table:table-cell>
          <table:table-cell office:value-type="float" office:value="13" table:style-name="ce9">
            <text:p>13</text:p>
          </table:table-cell>
          <table:table-cell office:value-type="float" office:value="38" table:style-name="ce9">
            <text:p>38</text:p>
          </table:table-cell>
          <table:table-cell office:value-type="float" office:value="15" table:style-name="ce9">
            <text:p>15</text:p>
          </table:table-cell>
          <table:table-cell office:value-type="float" office:value="2506" table:style-name="ce9">
            <text:p>2506</text:p>
          </table:table-cell>
          <table:table-cell office:value-type="float" office:value="11" table:style-name="ce9">
            <text:p>11</text:p>
          </table:table-cell>
          <table:table-cell office:value-type="float" office:value="2544" table:formula="of:=SUM([.G586]+[.E586])" table:style-name="ce15">
            <text:p>2544</text:p>
          </table:table-cell>
          <table:table-cell office:value-type="float" office:value="4" table:formula="of:=[.F586]-[.H586]" table:style-name="ce15">
            <text:p>4</text:p>
          </table:table-cell>
          <table:table-cell office:value-type="percentage" office:value="3.1446540880503146E-3" table:formula="of:=([.I587]-[.I586])/[.I586]" table:style-name="ce16">
            <text:p>0%</text:p>
          </table:table-cell>
          <table:table-cell office:value-type="string" office:string-value="Valid" table:formula="of:=IF([.F586]&lt;=[.E586]; &quot;Valid&quot;; &quot;Invalid&quot;)" table:style-name="ce17">
            <text:p>Valid</text:p>
          </table:table-cell>
          <table:table-cell office:value-type="string" office:string-value="Valid" table:formula="of:=IF([.H586]&lt;=[.G586]; &quot;Valid&quot;; &quot;Invalid&quot;)" table:style-name="ce17">
            <text:p>Valid</text:p>
          </table:table-cell>
          <table:table-cell office:value-type="string" office:string-value="Increasing Pressure" table:formula="of:=IF([.J586]&gt;0; &quot;Increasing Pressure&quot;; &quot;Stable/Reducing&quot;)" table:style-name="ce18">
            <text:p>Increasing Pressure</text:p>
          </table:table-cell>
          <table:table-cell office:value-type="float" office:value="0.73333333333333328" table:formula="of:=IFERROR([.H586]/[.F586]; 0)" table:style-name="ce17">
            <text:p>0.733333333</text:p>
          </table:table-cell>
          <table:table-cell office:value-type="float" office:value="2537" table:formula="of:=AVERAGE([.I586:.I592])" table:style-name="ce15">
            <text:p>2537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6-01T00:00:00" table:style-name="ce14">
            <text:p>01-06-2025</text:p>
          </table:table-cell>
          <table:table-cell office:value-type="string" office:string-value="June" table:formula="of:=TEXT([.A587]; &quot;mmmm&quot;)" table:style-name="ce14">
            <text:p>June</text:p>
          </table:table-cell>
          <table:table-cell office:value-type="string" office:string-value="2025-06" table:formula="of:=TEXT([.A587]; &quot;yyyy-mm&quot;)" table:style-name="ce14">
            <text:p>2025-06</text:p>
          </table:table-cell>
          <table:table-cell office:value-type="float" office:value="8" table:style-name="ce9">
            <text:p>8</text:p>
          </table:table-cell>
          <table:table-cell office:value-type="float" office:value="24" table:style-name="ce9">
            <text:p>24</text:p>
          </table:table-cell>
          <table:table-cell office:value-type="float" office:value="16" table:style-name="ce9">
            <text:p>16</text:p>
          </table:table-cell>
          <table:table-cell office:value-type="float" office:value="2528" table:style-name="ce9">
            <text:p>2528</text:p>
          </table:table-cell>
          <table:table-cell office:value-type="float" office:value="12" table:style-name="ce9">
            <text:p>12</text:p>
          </table:table-cell>
          <table:table-cell office:value-type="float" office:value="2552" table:formula="of:=SUM([.G587]+[.E587])" table:style-name="ce15">
            <text:p>2552</text:p>
          </table:table-cell>
          <table:table-cell office:value-type="float" office:value="4" table:formula="of:=[.F587]-[.H587]" table:style-name="ce15">
            <text:p>4</text:p>
          </table:table-cell>
          <table:table-cell office:value-type="percentage" office:value="-5.8777429467084643E-3" table:formula="of:=([.I588]-[.I587])/[.I587]" table:style-name="ce16">
            <text:p>-1%</text:p>
          </table:table-cell>
          <table:table-cell office:value-type="string" office:string-value="Valid" table:formula="of:=IF([.F587]&lt;=[.E587]; &quot;Valid&quot;; &quot;Invalid&quot;)" table:style-name="ce17">
            <text:p>Valid</text:p>
          </table:table-cell>
          <table:table-cell office:value-type="string" office:string-value="Valid" table:formula="of:=IF([.H587]&lt;=[.G587]; &quot;Valid&quot;; &quot;Invalid&quot;)" table:style-name="ce17">
            <text:p>Valid</text:p>
          </table:table-cell>
          <table:table-cell office:value-type="string" office:string-value="Increasing Pressure" table:formula="of:=IF([.J587]&gt;0; &quot;Increasing Pressure&quot;; &quot;Stable/Reducing&quot;)" table:style-name="ce18">
            <text:p>Increasing Pressure</text:p>
          </table:table-cell>
          <table:table-cell office:value-type="float" office:value="0.75" table:formula="of:=IFERROR([.H587]/[.F587]; 0)" table:style-name="ce17">
            <text:p>0.75</text:p>
          </table:table-cell>
          <table:table-cell office:value-type="float" office:value="2536" table:formula="of:=AVERAGE([.I587:.I593])" table:style-name="ce15">
            <text:p>2536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6-02T00:00:00" table:style-name="ce14">
            <text:p>02-06-2025</text:p>
          </table:table-cell>
          <table:table-cell office:value-type="string" office:string-value="June" table:formula="of:=TEXT([.A588]; &quot;mmmm&quot;)" table:style-name="ce14">
            <text:p>June</text:p>
          </table:table-cell>
          <table:table-cell office:value-type="string" office:string-value="2025-06" table:formula="of:=TEXT([.A588]; &quot;yyyy-mm&quot;)" table:style-name="ce14">
            <text:p>2025-06</text:p>
          </table:table-cell>
          <table:table-cell office:value-type="float" office:value="10" table:style-name="ce9">
            <text:p>10</text:p>
          </table:table-cell>
          <table:table-cell office:value-type="float" office:value="19" table:style-name="ce9">
            <text:p>19</text:p>
          </table:table-cell>
          <table:table-cell office:value-type="float" office:value="5" table:style-name="ce9">
            <text:p>5</text:p>
          </table:table-cell>
          <table:table-cell office:value-type="float" office:value="2518" table:style-name="ce9">
            <text:p>2518</text:p>
          </table:table-cell>
          <table:table-cell office:value-type="float" office:value="16" table:style-name="ce9">
            <text:p>16</text:p>
          </table:table-cell>
          <table:table-cell office:value-type="float" office:value="2537" table:formula="of:=SUM([.G588]+[.E588])" table:style-name="ce15">
            <text:p>2537</text:p>
          </table:table-cell>
          <table:table-cell office:value-type="float" office:value="-11" table:formula="of:=[.F588]-[.H588]" table:style-name="ce15">
            <text:p>-11</text:p>
          </table:table-cell>
          <table:table-cell office:value-type="percentage" office:value="1.970831690973591E-3" table:formula="of:=([.I589]-[.I588])/[.I588]" table:style-name="ce16">
            <text:p>0%</text:p>
          </table:table-cell>
          <table:table-cell office:value-type="string" office:string-value="Valid" table:formula="of:=IF([.F588]&lt;=[.E588]; &quot;Valid&quot;; &quot;Invalid&quot;)" table:style-name="ce17">
            <text:p>Valid</text:p>
          </table:table-cell>
          <table:table-cell office:value-type="string" office:string-value="Valid" table:formula="of:=IF([.H588]&lt;=[.G588]; &quot;Valid&quot;; &quot;Invalid&quot;)" table:style-name="ce17">
            <text:p>Valid</text:p>
          </table:table-cell>
          <table:table-cell office:value-type="string" office:string-value="Stable/Reducing" table:formula="of:=IF([.J588]&gt;0; &quot;Increasing Pressure&quot;; &quot;Stable/Reducing&quot;)" table:style-name="ce18">
            <text:p>Stable/Reducing</text:p>
          </table:table-cell>
          <table:table-cell office:value-type="float" office:value="3.2" table:formula="of:=IFERROR([.H588]/[.F588]; 0)" table:style-name="ce17">
            <text:p>3.2</text:p>
          </table:table-cell>
          <table:table-cell office:value-type="float" office:value="2534.1428571428573" table:formula="of:=AVERAGE([.I588:.I594])" table:style-name="ce15">
            <text:p>2534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6-03T00:00:00" table:style-name="ce14">
            <text:p>03-06-2025</text:p>
          </table:table-cell>
          <table:table-cell office:value-type="string" office:string-value="June" table:formula="of:=TEXT([.A589]; &quot;mmmm&quot;)" table:style-name="ce14">
            <text:p>June</text:p>
          </table:table-cell>
          <table:table-cell office:value-type="string" office:string-value="2025-06" table:formula="of:=TEXT([.A589]; &quot;yyyy-mm&quot;)" table:style-name="ce14">
            <text:p>2025-06</text:p>
          </table:table-cell>
          <table:table-cell office:value-type="float" office:value="5" table:style-name="ce9">
            <text:p>5</text:p>
          </table:table-cell>
          <table:table-cell office:value-type="float" office:value="23" table:style-name="ce9">
            <text:p>23</text:p>
          </table:table-cell>
          <table:table-cell office:value-type="float" office:value="11" table:style-name="ce9">
            <text:p>11</text:p>
          </table:table-cell>
          <table:table-cell office:value-type="float" office:value="2519" table:style-name="ce9">
            <text:p>2519</text:p>
          </table:table-cell>
          <table:table-cell office:value-type="float" office:value="15" table:style-name="ce9">
            <text:p>15</text:p>
          </table:table-cell>
          <table:table-cell office:value-type="float" office:value="2542" table:formula="of:=SUM([.G589]+[.E589])" table:style-name="ce15">
            <text:p>2542</text:p>
          </table:table-cell>
          <table:table-cell office:value-type="float" office:value="-4" table:formula="of:=[.F589]-[.H589]" table:style-name="ce15">
            <text:p>-4</text:p>
          </table:table-cell>
          <table:table-cell office:value-type="percentage" office:value="-3.9339103068450039E-3" table:formula="of:=([.I590]-[.I589])/[.I589]" table:style-name="ce16">
            <text:p>0%</text:p>
          </table:table-cell>
          <table:table-cell office:value-type="string" office:string-value="Valid" table:formula="of:=IF([.F589]&lt;=[.E589]; &quot;Valid&quot;; &quot;Invalid&quot;)" table:style-name="ce17">
            <text:p>Valid</text:p>
          </table:table-cell>
          <table:table-cell office:value-type="string" office:string-value="Valid" table:formula="of:=IF([.H589]&lt;=[.G589]; &quot;Valid&quot;; &quot;Invalid&quot;)" table:style-name="ce17">
            <text:p>Valid</text:p>
          </table:table-cell>
          <table:table-cell office:value-type="string" office:string-value="Stable/Reducing" table:formula="of:=IF([.J589]&gt;0; &quot;Increasing Pressure&quot;; &quot;Stable/Reducing&quot;)" table:style-name="ce18">
            <text:p>Stable/Reducing</text:p>
          </table:table-cell>
          <table:table-cell office:value-type="float" office:value="1.3636363636363635" table:formula="of:=IFERROR([.H589]/[.F589]; 0)" table:style-name="ce17">
            <text:p>1.363636364</text:p>
          </table:table-cell>
          <table:table-cell office:value-type="float" office:value="2535.5714285714284" table:formula="of:=AVERAGE([.I589:.I595])" table:style-name="ce15">
            <text:p>2536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6-04T00:00:00" table:style-name="ce14">
            <text:p>04-06-2025</text:p>
          </table:table-cell>
          <table:table-cell office:value-type="string" office:string-value="June" table:formula="of:=TEXT([.A590]; &quot;mmmm&quot;)" table:style-name="ce14">
            <text:p>June</text:p>
          </table:table-cell>
          <table:table-cell office:value-type="string" office:string-value="2025-06" table:formula="of:=TEXT([.A590]; &quot;yyyy-mm&quot;)" table:style-name="ce14">
            <text:p>2025-06</text:p>
          </table:table-cell>
          <table:table-cell office:value-type="float" office:value="4" table:style-name="ce9">
            <text:p>4</text:p>
          </table:table-cell>
          <table:table-cell office:value-type="float" office:value="16" table:style-name="ce9">
            <text:p>16</text:p>
          </table:table-cell>
          <table:table-cell office:value-type="float" office:value="9" table:style-name="ce9">
            <text:p>9</text:p>
          </table:table-cell>
          <table:table-cell office:value-type="float" office:value="2516" table:style-name="ce9">
            <text:p>2516</text:p>
          </table:table-cell>
          <table:table-cell office:value-type="float" office:value="16" table:style-name="ce9">
            <text:p>16</text:p>
          </table:table-cell>
          <table:table-cell office:value-type="float" office:value="2532" table:formula="of:=SUM([.G590]+[.E590])" table:style-name="ce15">
            <text:p>2532</text:p>
          </table:table-cell>
          <table:table-cell office:value-type="float" office:value="-7" table:formula="of:=[.F590]-[.H590]" table:style-name="ce15">
            <text:p>-7</text:p>
          </table:table-cell>
          <table:table-cell office:value-type="percentage" office:value="-1.1848341232227489E-3" table:formula="of:=([.I591]-[.I590])/[.I590]" table:style-name="ce16">
            <text:p>0%</text:p>
          </table:table-cell>
          <table:table-cell office:value-type="string" office:string-value="Valid" table:formula="of:=IF([.F590]&lt;=[.E590]; &quot;Valid&quot;; &quot;Invalid&quot;)" table:style-name="ce17">
            <text:p>Valid</text:p>
          </table:table-cell>
          <table:table-cell office:value-type="string" office:string-value="Valid" table:formula="of:=IF([.H590]&lt;=[.G590]; &quot;Valid&quot;; &quot;Invalid&quot;)" table:style-name="ce17">
            <text:p>Valid</text:p>
          </table:table-cell>
          <table:table-cell office:value-type="string" office:string-value="Stable/Reducing" table:formula="of:=IF([.J590]&gt;0; &quot;Increasing Pressure&quot;; &quot;Stable/Reducing&quot;)" table:style-name="ce18">
            <text:p>Stable/Reducing</text:p>
          </table:table-cell>
          <table:table-cell office:value-type="float" office:value="1.7777777777777777" table:formula="of:=IFERROR([.H590]/[.F590]; 0)" table:style-name="ce17">
            <text:p>1.777777778</text:p>
          </table:table-cell>
          <table:table-cell office:value-type="float" office:value="2532.4285714285716" table:formula="of:=AVERAGE([.I590:.I596])" table:style-name="ce15">
            <text:p>2532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6-05T00:00:00" table:style-name="ce14">
            <text:p>05-06-2025</text:p>
          </table:table-cell>
          <table:table-cell office:value-type="string" office:string-value="June" table:formula="of:=TEXT([.A591]; &quot;mmmm&quot;)" table:style-name="ce14">
            <text:p>June</text:p>
          </table:table-cell>
          <table:table-cell office:value-type="string" office:string-value="2025-06" table:formula="of:=TEXT([.A591]; &quot;yyyy-mm&quot;)" table:style-name="ce14">
            <text:p>2025-06</text:p>
          </table:table-cell>
          <table:table-cell office:value-type="float" office:value="8" table:style-name="ce9">
            <text:p>8</text:p>
          </table:table-cell>
          <table:table-cell office:value-type="float" office:value="26" table:style-name="ce9">
            <text:p>26</text:p>
          </table:table-cell>
          <table:table-cell office:value-type="float" office:value="5" table:style-name="ce9">
            <text:p>5</text:p>
          </table:table-cell>
          <table:table-cell office:value-type="float" office:value="2503" table:style-name="ce9">
            <text:p>2503</text:p>
          </table:table-cell>
          <table:table-cell office:value-type="float" office:value="21" table:style-name="ce9">
            <text:p>21</text:p>
          </table:table-cell>
          <table:table-cell office:value-type="float" office:value="2529" table:formula="of:=SUM([.G591]+[.E591])" table:style-name="ce15">
            <text:p>2529</text:p>
          </table:table-cell>
          <table:table-cell office:value-type="float" office:value="-16" table:formula="of:=[.F591]-[.H591]" table:style-name="ce15">
            <text:p>-16</text:p>
          </table:table-cell>
          <table:table-cell office:value-type="percentage" office:value="-2.3724792408066431E-3" table:formula="of:=([.I592]-[.I591])/[.I591]" table:style-name="ce16">
            <text:p>0%</text:p>
          </table:table-cell>
          <table:table-cell office:value-type="string" office:string-value="Valid" table:formula="of:=IF([.F591]&lt;=[.E591]; &quot;Valid&quot;; &quot;Invalid&quot;)" table:style-name="ce17">
            <text:p>Valid</text:p>
          </table:table-cell>
          <table:table-cell office:value-type="string" office:string-value="Valid" table:formula="of:=IF([.H591]&lt;=[.G591]; &quot;Valid&quot;; &quot;Invalid&quot;)" table:style-name="ce17">
            <text:p>Valid</text:p>
          </table:table-cell>
          <table:table-cell office:value-type="string" office:string-value="Stable/Reducing" table:formula="of:=IF([.J591]&gt;0; &quot;Increasing Pressure&quot;; &quot;Stable/Reducing&quot;)" table:style-name="ce18">
            <text:p>Stable/Reducing</text:p>
          </table:table-cell>
          <table:table-cell office:value-type="float" office:value="4.2" table:formula="of:=IFERROR([.H591]/[.F591]; 0)" table:style-name="ce17">
            <text:p>4.2</text:p>
          </table:table-cell>
          <table:table-cell office:value-type="float" office:value="2530.8571428571427" table:formula="of:=AVERAGE([.I591:.I597])" table:style-name="ce15">
            <text:p>2531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6-08T00:00:00" table:style-name="ce14">
            <text:p>08-06-2025</text:p>
          </table:table-cell>
          <table:table-cell office:value-type="string" office:string-value="June" table:formula="of:=TEXT([.A592]; &quot;mmmm&quot;)" table:style-name="ce14">
            <text:p>June</text:p>
          </table:table-cell>
          <table:table-cell office:value-type="string" office:string-value="2025-06" table:formula="of:=TEXT([.A592]; &quot;yyyy-mm&quot;)" table:style-name="ce14">
            <text:p>2025-06</text:p>
          </table:table-cell>
          <table:table-cell office:value-type="float" office:value="10" table:style-name="ce9">
            <text:p>10</text:p>
          </table:table-cell>
          <table:table-cell office:value-type="float" office:value="16" table:style-name="ce9">
            <text:p>16</text:p>
          </table:table-cell>
          <table:table-cell office:value-type="float" office:value="15" table:style-name="ce9">
            <text:p>15</text:p>
          </table:table-cell>
          <table:table-cell office:value-type="float" office:value="2507" table:style-name="ce9">
            <text:p>2507</text:p>
          </table:table-cell>
          <table:table-cell office:value-type="float" office:value="13" table:style-name="ce9">
            <text:p>13</text:p>
          </table:table-cell>
          <table:table-cell office:value-type="float" office:value="2523" table:formula="of:=SUM([.G592]+[.E592])" table:style-name="ce15">
            <text:p>2523</text:p>
          </table:table-cell>
          <table:table-cell office:value-type="float" office:value="2" table:formula="of:=[.F592]-[.H592]" table:style-name="ce15">
            <text:p>2</text:p>
          </table:table-cell>
          <table:table-cell office:value-type="percentage" office:value="5.5489496630994851E-3" table:formula="of:=([.I593]-[.I592])/[.I592]" table:style-name="ce16">
            <text:p>1%</text:p>
          </table:table-cell>
          <table:table-cell office:value-type="string" office:string-value="Valid" table:formula="of:=IF([.F592]&lt;=[.E592]; &quot;Valid&quot;; &quot;Invalid&quot;)" table:style-name="ce17">
            <text:p>Valid</text:p>
          </table:table-cell>
          <table:table-cell office:value-type="string" office:string-value="Valid" table:formula="of:=IF([.H592]&lt;=[.G592]; &quot;Valid&quot;; &quot;Invalid&quot;)" table:style-name="ce17">
            <text:p>Valid</text:p>
          </table:table-cell>
          <table:table-cell office:value-type="string" office:string-value="Increasing Pressure" table:formula="of:=IF([.J592]&gt;0; &quot;Increasing Pressure&quot;; &quot;Stable/Reducing&quot;)" table:style-name="ce18">
            <text:p>Increasing Pressure</text:p>
          </table:table-cell>
          <table:table-cell office:value-type="float" office:value="0.8666666666666667" table:formula="of:=IFERROR([.H592]/[.F592]; 0)" table:style-name="ce17">
            <text:p>0.866666667</text:p>
          </table:table-cell>
          <table:table-cell office:value-type="float" office:value="2528.1428571428573" table:formula="of:=AVERAGE([.I592:.I598])" table:style-name="ce15">
            <text:p>2528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6-09T00:00:00" table:style-name="ce14">
            <text:p>09-06-2025</text:p>
          </table:table-cell>
          <table:table-cell office:value-type="string" office:string-value="June" table:formula="of:=TEXT([.A593]; &quot;mmmm&quot;)" table:style-name="ce14">
            <text:p>June</text:p>
          </table:table-cell>
          <table:table-cell office:value-type="string" office:string-value="2025-06" table:formula="of:=TEXT([.A593]; &quot;yyyy-mm&quot;)" table:style-name="ce14">
            <text:p>2025-06</text:p>
          </table:table-cell>
          <table:table-cell office:value-type="float" office:value="8" table:style-name="ce9">
            <text:p>8</text:p>
          </table:table-cell>
          <table:table-cell office:value-type="float" office:value="21" table:style-name="ce9">
            <text:p>21</text:p>
          </table:table-cell>
          <table:table-cell office:value-type="float" office:value="14" table:style-name="ce9">
            <text:p>14</text:p>
          </table:table-cell>
          <table:table-cell office:value-type="float" office:value="2516" table:style-name="ce9">
            <text:p>2516</text:p>
          </table:table-cell>
          <table:table-cell office:value-type="float" office:value="9" table:style-name="ce9">
            <text:p>9</text:p>
          </table:table-cell>
          <table:table-cell office:value-type="float" office:value="2537" table:formula="of:=SUM([.G593]+[.E593])" table:style-name="ce15">
            <text:p>2537</text:p>
          </table:table-cell>
          <table:table-cell office:value-type="float" office:value="5" table:formula="of:=[.F593]-[.H593]" table:style-name="ce15">
            <text:p>5</text:p>
          </table:table-cell>
          <table:table-cell office:value-type="percentage" office:value="7.8833267638943631E-4" table:formula="of:=([.I594]-[.I593])/[.I593]" table:style-name="ce16">
            <text:p>0%</text:p>
          </table:table-cell>
          <table:table-cell office:value-type="string" office:string-value="Valid" table:formula="of:=IF([.F593]&lt;=[.E593]; &quot;Valid&quot;; &quot;Invalid&quot;)" table:style-name="ce17">
            <text:p>Valid</text:p>
          </table:table-cell>
          <table:table-cell office:value-type="string" office:string-value="Valid" table:formula="of:=IF([.H593]&lt;=[.G593]; &quot;Valid&quot;; &quot;Invalid&quot;)" table:style-name="ce17">
            <text:p>Valid</text:p>
          </table:table-cell>
          <table:table-cell office:value-type="string" office:string-value="Increasing Pressure" table:formula="of:=IF([.J593]&gt;0; &quot;Increasing Pressure&quot;; &quot;Stable/Reducing&quot;)" table:style-name="ce18">
            <text:p>Increasing Pressure</text:p>
          </table:table-cell>
          <table:table-cell office:value-type="float" office:value="0.6428571428571429" table:formula="of:=IFERROR([.H593]/[.F593]; 0)" table:style-name="ce17">
            <text:p>0.642857143</text:p>
          </table:table-cell>
          <table:table-cell office:value-type="float" office:value="2526.1428571428573" table:formula="of:=AVERAGE([.I593:.I599])" table:style-name="ce15">
            <text:p>2526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6-10T00:00:00" table:style-name="ce14">
            <text:p>10-06-2025</text:p>
          </table:table-cell>
          <table:table-cell office:value-type="string" office:string-value="June" table:formula="of:=TEXT([.A594]; &quot;mmmm&quot;)" table:style-name="ce14">
            <text:p>June</text:p>
          </table:table-cell>
          <table:table-cell office:value-type="string" office:string-value="2025-06" table:formula="of:=TEXT([.A594]; &quot;yyyy-mm&quot;)" table:style-name="ce14">
            <text:p>2025-06</text:p>
          </table:table-cell>
          <table:table-cell office:value-type="float" office:value="17" table:style-name="ce9">
            <text:p>17</text:p>
          </table:table-cell>
          <table:table-cell office:value-type="float" office:value="28" table:style-name="ce9">
            <text:p>28</text:p>
          </table:table-cell>
          <table:table-cell office:value-type="float" office:value="7" table:style-name="ce9">
            <text:p>7</text:p>
          </table:table-cell>
          <table:table-cell office:value-type="float" office:value="2511" table:style-name="ce9">
            <text:p>2511</text:p>
          </table:table-cell>
          <table:table-cell office:value-type="float" office:value="12" table:style-name="ce9">
            <text:p>12</text:p>
          </table:table-cell>
          <table:table-cell office:value-type="float" office:value="2539" table:formula="of:=SUM([.G594]+[.E594])" table:style-name="ce15">
            <text:p>2539</text:p>
          </table:table-cell>
          <table:table-cell office:value-type="float" office:value="-5" table:formula="of:=[.F594]-[.H594]" table:style-name="ce15">
            <text:p>-5</text:p>
          </table:table-cell>
          <table:table-cell office:value-type="percentage" office:value="3.1508467900748325E-3" table:formula="of:=([.I595]-[.I594])/[.I594]" table:style-name="ce16">
            <text:p>0%</text:p>
          </table:table-cell>
          <table:table-cell office:value-type="string" office:string-value="Valid" table:formula="of:=IF([.F594]&lt;=[.E594]; &quot;Valid&quot;; &quot;Invalid&quot;)" table:style-name="ce17">
            <text:p>Valid</text:p>
          </table:table-cell>
          <table:table-cell office:value-type="string" office:string-value="Valid" table:formula="of:=IF([.H594]&lt;=[.G594]; &quot;Valid&quot;; &quot;Invalid&quot;)" table:style-name="ce17">
            <text:p>Valid</text:p>
          </table:table-cell>
          <table:table-cell office:value-type="string" office:string-value="Stable/Reducing" table:formula="of:=IF([.J594]&gt;0; &quot;Increasing Pressure&quot;; &quot;Stable/Reducing&quot;)" table:style-name="ce18">
            <text:p>Stable/Reducing</text:p>
          </table:table-cell>
          <table:table-cell office:value-type="float" office:value="1.7142857142857142" table:formula="of:=IFERROR([.H594]/[.F594]; 0)" table:style-name="ce17">
            <text:p>1.714285714</text:p>
          </table:table-cell>
          <table:table-cell office:value-type="float" office:value="2518.2857142857142" table:formula="of:=AVERAGE([.I594:.I600])" table:style-name="ce15">
            <text:p>2518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6-17T00:00:00" table:style-name="ce14">
            <text:p>17-06-2025</text:p>
          </table:table-cell>
          <table:table-cell office:value-type="string" office:string-value="June" table:formula="of:=TEXT([.A595]; &quot;mmmm&quot;)" table:style-name="ce14">
            <text:p>June</text:p>
          </table:table-cell>
          <table:table-cell office:value-type="string" office:string-value="2025-06" table:formula="of:=TEXT([.A595]; &quot;yyyy-mm&quot;)" table:style-name="ce14">
            <text:p>2025-06</text:p>
          </table:table-cell>
          <table:table-cell office:value-type="float" office:value="7" table:style-name="ce9">
            <text:p>7</text:p>
          </table:table-cell>
          <table:table-cell office:value-type="float" office:value="24" table:style-name="ce9">
            <text:p>24</text:p>
          </table:table-cell>
          <table:table-cell office:value-type="float" office:value="10" table:style-name="ce9">
            <text:p>10</text:p>
          </table:table-cell>
          <table:table-cell office:value-type="float" office:value="2523" table:style-name="ce9">
            <text:p>2523</text:p>
          </table:table-cell>
          <table:table-cell office:value-type="float" office:value="14" table:style-name="ce9">
            <text:p>14</text:p>
          </table:table-cell>
          <table:table-cell office:value-type="float" office:value="2547" table:formula="of:=SUM([.G595]+[.E595])" table:style-name="ce15">
            <text:p>2547</text:p>
          </table:table-cell>
          <table:table-cell office:value-type="float" office:value="-4" table:formula="of:=[.F595]-[.H595]" table:style-name="ce15">
            <text:p>-4</text:p>
          </table:table-cell>
          <table:table-cell office:value-type="percentage" office:value="-1.0600706713780919E-2" table:formula="of:=([.I596]-[.I595])/[.I595]" table:style-name="ce16">
            <text:p>-1%</text:p>
          </table:table-cell>
          <table:table-cell office:value-type="string" office:string-value="Valid" table:formula="of:=IF([.F595]&lt;=[.E595]; &quot;Valid&quot;; &quot;Invalid&quot;)" table:style-name="ce17">
            <text:p>Valid</text:p>
          </table:table-cell>
          <table:table-cell office:value-type="string" office:string-value="Valid" table:formula="of:=IF([.H595]&lt;=[.G595]; &quot;Valid&quot;; &quot;Invalid&quot;)" table:style-name="ce17">
            <text:p>Valid</text:p>
          </table:table-cell>
          <table:table-cell office:value-type="string" office:string-value="Stable/Reducing" table:formula="of:=IF([.J595]&gt;0; &quot;Increasing Pressure&quot;; &quot;Stable/Reducing&quot;)" table:style-name="ce18">
            <text:p>Stable/Reducing</text:p>
          </table:table-cell>
          <table:table-cell office:value-type="float" office:value="1.4" table:formula="of:=IFERROR([.H595]/[.F595]; 0)" table:style-name="ce17">
            <text:p>1.4</text:p>
          </table:table-cell>
          <table:table-cell office:value-type="float" office:value="2506.4285714285716" table:formula="of:=AVERAGE([.I595:.I601])" table:style-name="ce15">
            <text:p>2506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6-19T00:00:00" table:style-name="ce14">
            <text:p>19-06-2025</text:p>
          </table:table-cell>
          <table:table-cell office:value-type="string" office:string-value="June" table:formula="of:=TEXT([.A596]; &quot;mmmm&quot;)" table:style-name="ce14">
            <text:p>June</text:p>
          </table:table-cell>
          <table:table-cell office:value-type="string" office:string-value="2025-06" table:formula="of:=TEXT([.A596]; &quot;yyyy-mm&quot;)" table:style-name="ce14">
            <text:p>2025-06</text:p>
          </table:table-cell>
          <table:table-cell office:value-type="float" office:value="8" table:style-name="ce9">
            <text:p>8</text:p>
          </table:table-cell>
          <table:table-cell office:value-type="float" office:value="19" table:style-name="ce9">
            <text:p>19</text:p>
          </table:table-cell>
          <table:table-cell office:value-type="float" office:value="7" table:style-name="ce9">
            <text:p>7</text:p>
          </table:table-cell>
          <table:table-cell office:value-type="float" office:value="2501" table:style-name="ce9">
            <text:p>2501</text:p>
          </table:table-cell>
          <table:table-cell office:value-type="float" office:value="18" table:style-name="ce9">
            <text:p>18</text:p>
          </table:table-cell>
          <table:table-cell office:value-type="float" office:value="2520" table:formula="of:=SUM([.G596]+[.E596])" table:style-name="ce15">
            <text:p>2520</text:p>
          </table:table-cell>
          <table:table-cell office:value-type="float" office:value="-11" table:formula="of:=[.F596]-[.H596]" table:style-name="ce15">
            <text:p>-11</text:p>
          </table:table-cell>
          <table:table-cell office:value-type="percentage" office:value="3.9682539682539683E-4" table:formula="of:=([.I597]-[.I596])/[.I596]" table:style-name="ce16">
            <text:p>0%</text:p>
          </table:table-cell>
          <table:table-cell office:value-type="string" office:string-value="Valid" table:formula="of:=IF([.F596]&lt;=[.E596]; &quot;Valid&quot;; &quot;Invalid&quot;)" table:style-name="ce17">
            <text:p>Valid</text:p>
          </table:table-cell>
          <table:table-cell office:value-type="string" office:string-value="Valid" table:formula="of:=IF([.H596]&lt;=[.G596]; &quot;Valid&quot;; &quot;Invalid&quot;)" table:style-name="ce17">
            <text:p>Valid</text:p>
          </table:table-cell>
          <table:table-cell office:value-type="string" office:string-value="Stable/Reducing" table:formula="of:=IF([.J596]&gt;0; &quot;Increasing Pressure&quot;; &quot;Stable/Reducing&quot;)" table:style-name="ce18">
            <text:p>Stable/Reducing</text:p>
          </table:table-cell>
          <table:table-cell office:value-type="float" office:value="2.5714285714285716" table:formula="of:=IFERROR([.H596]/[.F596]; 0)" table:style-name="ce17">
            <text:p>2.571428571</text:p>
          </table:table-cell>
          <table:table-cell office:value-type="float" office:value="2489.7142857142858" table:formula="of:=AVERAGE([.I596:.I602])" table:style-name="ce15">
            <text:p>2490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6-22T00:00:00" table:style-name="ce14">
            <text:p>22-06-2025</text:p>
          </table:table-cell>
          <table:table-cell office:value-type="string" office:string-value="June" table:formula="of:=TEXT([.A597]; &quot;mmmm&quot;)" table:style-name="ce14">
            <text:p>June</text:p>
          </table:table-cell>
          <table:table-cell office:value-type="string" office:string-value="2025-06" table:formula="of:=TEXT([.A597]; &quot;yyyy-mm&quot;)" table:style-name="ce14">
            <text:p>2025-06</text:p>
          </table:table-cell>
          <table:table-cell office:value-type="float" office:value="7" table:style-name="ce9">
            <text:p>7</text:p>
          </table:table-cell>
          <table:table-cell office:value-type="float" office:value="13" table:style-name="ce9">
            <text:p>13</text:p>
          </table:table-cell>
          <table:table-cell office:value-type="float" office:value="5" table:style-name="ce9">
            <text:p>5</text:p>
          </table:table-cell>
          <table:table-cell office:value-type="float" office:value="2508" table:style-name="ce9">
            <text:p>2508</text:p>
          </table:table-cell>
          <table:table-cell office:value-type="float" office:value="7" table:style-name="ce9">
            <text:p>7</text:p>
          </table:table-cell>
          <table:table-cell office:value-type="float" office:value="2521" table:formula="of:=SUM([.G597]+[.E597])" table:style-name="ce15">
            <text:p>2521</text:p>
          </table:table-cell>
          <table:table-cell office:value-type="float" office:value="-2" table:formula="of:=[.F597]-[.H597]" table:style-name="ce15">
            <text:p>-2</text:p>
          </table:table-cell>
          <table:table-cell office:value-type="percentage" office:value="-4.3633478778262597E-3" table:formula="of:=([.I598]-[.I597])/[.I597]" table:style-name="ce16">
            <text:p>0%</text:p>
          </table:table-cell>
          <table:table-cell office:value-type="string" office:string-value="Valid" table:formula="of:=IF([.F597]&lt;=[.E597]; &quot;Valid&quot;; &quot;Invalid&quot;)" table:style-name="ce17">
            <text:p>Valid</text:p>
          </table:table-cell>
          <table:table-cell office:value-type="string" office:string-value="Valid" table:formula="of:=IF([.H597]&lt;=[.G597]; &quot;Valid&quot;; &quot;Invalid&quot;)" table:style-name="ce17">
            <text:p>Valid</text:p>
          </table:table-cell>
          <table:table-cell office:value-type="string" office:string-value="Stable/Reducing" table:formula="of:=IF([.J597]&gt;0; &quot;Increasing Pressure&quot;; &quot;Stable/Reducing&quot;)" table:style-name="ce18">
            <text:p>Stable/Reducing</text:p>
          </table:table-cell>
          <table:table-cell office:value-type="float" office:value="1.4" table:formula="of:=IFERROR([.H597]/[.F597]; 0)" table:style-name="ce17">
            <text:p>1.4</text:p>
          </table:table-cell>
          <table:table-cell office:value-type="float" office:value="2476.7142857142858" table:formula="of:=AVERAGE([.I597:.I603])" table:style-name="ce15">
            <text:p>2477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6-23T00:00:00" table:style-name="ce14">
            <text:p>23-06-2025</text:p>
          </table:table-cell>
          <table:table-cell office:value-type="string" office:string-value="June" table:formula="of:=TEXT([.A598]; &quot;mmmm&quot;)" table:style-name="ce14">
            <text:p>June</text:p>
          </table:table-cell>
          <table:table-cell office:value-type="string" office:string-value="2025-06" table:formula="of:=TEXT([.A598]; &quot;yyyy-mm&quot;)" table:style-name="ce14">
            <text:p>2025-06</text:p>
          </table:table-cell>
          <table:table-cell office:value-type="float" office:value="3" table:style-name="ce9">
            <text:p>3</text:p>
          </table:table-cell>
          <table:table-cell office:value-type="float" office:value="15" table:style-name="ce9">
            <text:p>15</text:p>
          </table:table-cell>
          <table:table-cell office:value-type="float" office:value="5" table:style-name="ce9">
            <text:p>5</text:p>
          </table:table-cell>
          <table:table-cell office:value-type="float" office:value="2495" table:style-name="ce9">
            <text:p>2495</text:p>
          </table:table-cell>
          <table:table-cell office:value-type="float" office:value="17" table:style-name="ce9">
            <text:p>17</text:p>
          </table:table-cell>
          <table:table-cell office:value-type="float" office:value="2510" table:formula="of:=SUM([.G598]+[.E598])" table:style-name="ce15">
            <text:p>2510</text:p>
          </table:table-cell>
          <table:table-cell office:value-type="float" office:value="-12" table:formula="of:=[.F598]-[.H598]" table:style-name="ce15">
            <text:p>-12</text:p>
          </table:table-cell>
          <table:table-cell office:value-type="percentage" office:value="-3.9840637450199205E-4" table:formula="of:=([.I599]-[.I598])/[.I598]" table:style-name="ce16">
            <text:p>0%</text:p>
          </table:table-cell>
          <table:table-cell office:value-type="string" office:string-value="Valid" table:formula="of:=IF([.F598]&lt;=[.E598]; &quot;Valid&quot;; &quot;Invalid&quot;)" table:style-name="ce17">
            <text:p>Valid</text:p>
          </table:table-cell>
          <table:table-cell office:value-type="string" office:string-value="Valid" table:formula="of:=IF([.H598]&lt;=[.G598]; &quot;Valid&quot;; &quot;Invalid&quot;)" table:style-name="ce17">
            <text:p>Valid</text:p>
          </table:table-cell>
          <table:table-cell office:value-type="string" office:string-value="Stable/Reducing" table:formula="of:=IF([.J598]&gt;0; &quot;Increasing Pressure&quot;; &quot;Stable/Reducing&quot;)" table:style-name="ce18">
            <text:p>Stable/Reducing</text:p>
          </table:table-cell>
          <table:table-cell office:value-type="float" office:value="3.4" table:formula="of:=IFERROR([.H598]/[.F598]; 0)" table:style-name="ce17">
            <text:p>3.4</text:p>
          </table:table-cell>
          <table:table-cell office:value-type="float" office:value="2460.1428571428573" table:formula="of:=AVERAGE([.I598:.I604])" table:style-name="ce15">
            <text:p>2460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6-24T00:00:00" table:style-name="ce14">
            <text:p>24-06-2025</text:p>
          </table:table-cell>
          <table:table-cell office:value-type="string" office:string-value="June" table:formula="of:=TEXT([.A599]; &quot;mmmm&quot;)" table:style-name="ce14">
            <text:p>June</text:p>
          </table:table-cell>
          <table:table-cell office:value-type="string" office:string-value="2025-06" table:formula="of:=TEXT([.A599]; &quot;yyyy-mm&quot;)" table:style-name="ce14">
            <text:p>2025-06</text:p>
          </table:table-cell>
          <table:table-cell office:value-type="float" office:value="5" table:style-name="ce9">
            <text:p>5</text:p>
          </table:table-cell>
          <table:table-cell office:value-type="float" office:value="20" table:style-name="ce9">
            <text:p>20</text:p>
          </table:table-cell>
          <table:table-cell office:value-type="float" office:value="5" table:style-name="ce9">
            <text:p>5</text:p>
          </table:table-cell>
          <table:table-cell office:value-type="float" office:value="2489" table:style-name="ce9">
            <text:p>2489</text:p>
          </table:table-cell>
          <table:table-cell office:value-type="float" office:value="16" table:style-name="ce9">
            <text:p>16</text:p>
          </table:table-cell>
          <table:table-cell office:value-type="float" office:value="2509" table:formula="of:=SUM([.G599]+[.E599])" table:style-name="ce15">
            <text:p>2509</text:p>
          </table:table-cell>
          <table:table-cell office:value-type="float" office:value="-11" table:formula="of:=[.F599]-[.H599]" table:style-name="ce15">
            <text:p>-11</text:p>
          </table:table-cell>
          <table:table-cell office:value-type="percentage" office:value="-1.0761259465922678E-2" table:formula="of:=([.I600]-[.I599])/[.I599]" table:style-name="ce16">
            <text:p>-1%</text:p>
          </table:table-cell>
          <table:table-cell office:value-type="string" office:string-value="Valid" table:formula="of:=IF([.F599]&lt;=[.E599]; &quot;Valid&quot;; &quot;Invalid&quot;)" table:style-name="ce17">
            <text:p>Valid</text:p>
          </table:table-cell>
          <table:table-cell office:value-type="string" office:string-value="Valid" table:formula="of:=IF([.H599]&lt;=[.G599]; &quot;Valid&quot;; &quot;Invalid&quot;)" table:style-name="ce17">
            <text:p>Valid</text:p>
          </table:table-cell>
          <table:table-cell office:value-type="string" office:string-value="Stable/Reducing" table:formula="of:=IF([.J599]&gt;0; &quot;Increasing Pressure&quot;; &quot;Stable/Reducing&quot;)" table:style-name="ce18">
            <text:p>Stable/Reducing</text:p>
          </table:table-cell>
          <table:table-cell office:value-type="float" office:value="3.2" table:formula="of:=IFERROR([.H599]/[.F599]; 0)" table:style-name="ce17">
            <text:p>3.2</text:p>
          </table:table-cell>
          <table:table-cell office:value-type="float" office:value="2443.4285714285716" table:formula="of:=AVERAGE([.I599:.I605])" table:style-name="ce15">
            <text:p>2443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6-25T00:00:00" table:style-name="ce14">
            <text:p>25-06-2025</text:p>
          </table:table-cell>
          <table:table-cell office:value-type="string" office:string-value="June" table:formula="of:=TEXT([.A600]; &quot;mmmm&quot;)" table:style-name="ce14">
            <text:p>June</text:p>
          </table:table-cell>
          <table:table-cell office:value-type="string" office:string-value="2025-06" table:formula="of:=TEXT([.A600]; &quot;yyyy-mm&quot;)" table:style-name="ce14">
            <text:p>2025-06</text:p>
          </table:table-cell>
          <table:table-cell office:value-type="float" office:value="6" table:style-name="ce9">
            <text:p>6</text:p>
          </table:table-cell>
          <table:table-cell office:value-type="float" office:value="12" table:style-name="ce9">
            <text:p>12</text:p>
          </table:table-cell>
          <table:table-cell office:value-type="float" office:value="2" table:style-name="ce9">
            <text:p>2</text:p>
          </table:table-cell>
          <table:table-cell office:value-type="float" office:value="2470" table:style-name="ce9">
            <text:p>2470</text:p>
          </table:table-cell>
          <table:table-cell office:value-type="float" office:value="24" table:style-name="ce9">
            <text:p>24</text:p>
          </table:table-cell>
          <table:table-cell office:value-type="float" office:value="2482" table:formula="of:=SUM([.G600]+[.E600])" table:style-name="ce15">
            <text:p>2482</text:p>
          </table:table-cell>
          <table:table-cell office:value-type="float" office:value="-22" table:formula="of:=[.F600]-[.H600]" table:style-name="ce15">
            <text:p>-22</text:p>
          </table:table-cell>
          <table:table-cell office:value-type="percentage" office:value="-1.0475423045930701E-2" table:formula="of:=([.I601]-[.I600])/[.I600]" table:style-name="ce16">
            <text:p>-1%</text:p>
          </table:table-cell>
          <table:table-cell office:value-type="string" office:string-value="Valid" table:formula="of:=IF([.F600]&lt;=[.E600]; &quot;Valid&quot;; &quot;Invalid&quot;)" table:style-name="ce17">
            <text:p>Valid</text:p>
          </table:table-cell>
          <table:table-cell office:value-type="string" office:string-value="Valid" table:formula="of:=IF([.H600]&lt;=[.G600]; &quot;Valid&quot;; &quot;Invalid&quot;)" table:style-name="ce17">
            <text:p>Valid</text:p>
          </table:table-cell>
          <table:table-cell office:value-type="string" office:string-value="Stable/Reducing" table:formula="of:=IF([.J600]&gt;0; &quot;Increasing Pressure&quot;; &quot;Stable/Reducing&quot;)" table:style-name="ce18">
            <text:p>Stable/Reducing</text:p>
          </table:table-cell>
          <table:table-cell office:value-type="float" office:value="12" table:formula="of:=IFERROR([.H600]/[.F600]; 0)" table:style-name="ce17">
            <text:p>12</text:p>
          </table:table-cell>
          <table:table-cell office:value-type="float" office:value="2420.5714285714284" table:formula="of:=AVERAGE([.I600:.I606])" table:style-name="ce15">
            <text:p>2421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6-26T00:00:00" table:style-name="ce14">
            <text:p>26-06-2025</text:p>
          </table:table-cell>
          <table:table-cell office:value-type="string" office:string-value="June" table:formula="of:=TEXT([.A601]; &quot;mmmm&quot;)" table:style-name="ce14">
            <text:p>June</text:p>
          </table:table-cell>
          <table:table-cell office:value-type="string" office:string-value="2025-06" table:formula="of:=TEXT([.A601]; &quot;yyyy-mm&quot;)" table:style-name="ce14">
            <text:p>2025-06</text:p>
          </table:table-cell>
          <table:table-cell office:value-type="float" office:value="3" table:style-name="ce9">
            <text:p>3</text:p>
          </table:table-cell>
          <table:table-cell office:value-type="float" office:value="9" table:style-name="ce9">
            <text:p>9</text:p>
          </table:table-cell>
          <table:table-cell office:value-type="float" office:value="7" table:style-name="ce9">
            <text:p>7</text:p>
          </table:table-cell>
          <table:table-cell office:value-type="float" office:value="2447" table:style-name="ce9">
            <text:p>2447</text:p>
          </table:table-cell>
          <table:table-cell office:value-type="float" office:value="35" table:style-name="ce9">
            <text:p>35</text:p>
          </table:table-cell>
          <table:table-cell office:value-type="float" office:value="2456" table:formula="of:=SUM([.G601]+[.E601])" table:style-name="ce15">
            <text:p>2456</text:p>
          </table:table-cell>
          <table:table-cell office:value-type="float" office:value="-28" table:formula="of:=[.F601]-[.H601]" table:style-name="ce15">
            <text:p>-28</text:p>
          </table:table-cell>
          <table:table-cell office:value-type="percentage" office:value="-1.0586319218241042E-2" table:formula="of:=([.I602]-[.I601])/[.I601]" table:style-name="ce16">
            <text:p>-1%</text:p>
          </table:table-cell>
          <table:table-cell office:value-type="string" office:string-value="Valid" table:formula="of:=IF([.F601]&lt;=[.E601]; &quot;Valid&quot;; &quot;Invalid&quot;)" table:style-name="ce17">
            <text:p>Valid</text:p>
          </table:table-cell>
          <table:table-cell office:value-type="string" office:string-value="Valid" table:formula="of:=IF([.H601]&lt;=[.G601]; &quot;Valid&quot;; &quot;Invalid&quot;)" table:style-name="ce17">
            <text:p>Valid</text:p>
          </table:table-cell>
          <table:table-cell office:value-type="string" office:string-value="Stable/Reducing" table:formula="of:=IF([.J601]&gt;0; &quot;Increasing Pressure&quot;; &quot;Stable/Reducing&quot;)" table:style-name="ce18">
            <text:p>Stable/Reducing</text:p>
          </table:table-cell>
          <table:table-cell office:value-type="float" office:value="5" table:formula="of:=IFERROR([.H601]/[.F601]; 0)" table:style-name="ce17">
            <text:p>5</text:p>
          </table:table-cell>
          <table:table-cell office:value-type="float" office:value="2399.5714285714284" table:formula="of:=AVERAGE([.I601:.I607])" table:style-name="ce15">
            <text:p>2400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6-29T00:00:00" table:style-name="ce14">
            <text:p>29-06-2025</text:p>
          </table:table-cell>
          <table:table-cell office:value-type="string" office:string-value="June" table:formula="of:=TEXT([.A602]; &quot;mmmm&quot;)" table:style-name="ce14">
            <text:p>June</text:p>
          </table:table-cell>
          <table:table-cell office:value-type="string" office:string-value="2025-06" table:formula="of:=TEXT([.A602]; &quot;yyyy-mm&quot;)" table:style-name="ce14">
            <text:p>2025-06</text:p>
          </table:table-cell>
          <table:table-cell office:value-type="float" office:value="5" table:style-name="ce9">
            <text:p>5</text:p>
          </table:table-cell>
          <table:table-cell office:value-type="float" office:value="17" table:style-name="ce9">
            <text:p>17</text:p>
          </table:table-cell>
          <table:table-cell office:value-type="float" office:value="7" table:style-name="ce9">
            <text:p>7</text:p>
          </table:table-cell>
          <table:table-cell office:value-type="float" office:value="2413" table:style-name="ce9">
            <text:p>2413</text:p>
          </table:table-cell>
          <table:table-cell office:value-type="float" office:value="20" table:style-name="ce9">
            <text:p>20</text:p>
          </table:table-cell>
          <table:table-cell office:value-type="float" office:value="2430" table:formula="of:=SUM([.G602]+[.E602])" table:style-name="ce15">
            <text:p>2430</text:p>
          </table:table-cell>
          <table:table-cell office:value-type="float" office:value="-13" table:formula="of:=[.F602]-[.H602]" table:style-name="ce15">
            <text:p>-13</text:p>
          </table:table-cell>
          <table:table-cell office:value-type="percentage" office:value="-4.1152263374485596E-4" table:formula="of:=([.I603]-[.I602])/[.I602]" table:style-name="ce16">
            <text:p>0%</text:p>
          </table:table-cell>
          <table:table-cell office:value-type="string" office:string-value="Valid" table:formula="of:=IF([.F602]&lt;=[.E602]; &quot;Valid&quot;; &quot;Invalid&quot;)" table:style-name="ce17">
            <text:p>Valid</text:p>
          </table:table-cell>
          <table:table-cell office:value-type="string" office:string-value="Valid" table:formula="of:=IF([.H602]&lt;=[.G602]; &quot;Valid&quot;; &quot;Invalid&quot;)" table:style-name="ce17">
            <text:p>Valid</text:p>
          </table:table-cell>
          <table:table-cell office:value-type="string" office:string-value="Stable/Reducing" table:formula="of:=IF([.J602]&gt;0; &quot;Increasing Pressure&quot;; &quot;Stable/Reducing&quot;)" table:style-name="ce18">
            <text:p>Stable/Reducing</text:p>
          </table:table-cell>
          <table:table-cell office:value-type="float" office:value="2.8571428571428572" table:formula="of:=IFERROR([.H602]/[.F602]; 0)" table:style-name="ce17">
            <text:p>2.857142857</text:p>
          </table:table-cell>
          <table:table-cell office:value-type="float" office:value="2380.4285714285716" table:formula="of:=AVERAGE([.I602:.I608])" table:style-name="ce15">
            <text:p>2380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6-30T00:00:00" table:style-name="ce14">
            <text:p>30-06-2025</text:p>
          </table:table-cell>
          <table:table-cell office:value-type="string" office:string-value="June" table:formula="of:=TEXT([.A603]; &quot;mmmm&quot;)" table:style-name="ce14">
            <text:p>June</text:p>
          </table:table-cell>
          <table:table-cell office:value-type="string" office:string-value="2025-06" table:formula="of:=TEXT([.A603]; &quot;yyyy-mm&quot;)" table:style-name="ce14">
            <text:p>2025-06</text:p>
          </table:table-cell>
          <table:table-cell office:value-type="float" office:value="9" table:style-name="ce9">
            <text:p>9</text:p>
          </table:table-cell>
          <table:table-cell office:value-type="float" office:value="22" table:style-name="ce9">
            <text:p>22</text:p>
          </table:table-cell>
          <table:table-cell office:value-type="float" office:value="8" table:style-name="ce9">
            <text:p>8</text:p>
          </table:table-cell>
          <table:table-cell office:value-type="float" office:value="2407" table:style-name="ce9">
            <text:p>2407</text:p>
          </table:table-cell>
          <table:table-cell office:value-type="float" office:value="16" table:style-name="ce9">
            <text:p>16</text:p>
          </table:table-cell>
          <table:table-cell office:value-type="float" office:value="2429" table:formula="of:=SUM([.G603]+[.E603])" table:style-name="ce15">
            <text:p>2429</text:p>
          </table:table-cell>
          <table:table-cell office:value-type="float" office:value="-8" table:formula="of:=[.F603]-[.H603]" table:style-name="ce15">
            <text:p>-8</text:p>
          </table:table-cell>
          <table:table-cell office:value-type="percentage" office:value="-9.8806093042404283E-3" table:formula="of:=([.I604]-[.I603])/[.I603]" table:style-name="ce16">
            <text:p>-1%</text:p>
          </table:table-cell>
          <table:table-cell office:value-type="string" office:string-value="Valid" table:formula="of:=IF([.F603]&lt;=[.E603]; &quot;Valid&quot;; &quot;Invalid&quot;)" table:style-name="ce17">
            <text:p>Valid</text:p>
          </table:table-cell>
          <table:table-cell office:value-type="string" office:string-value="Valid" table:formula="of:=IF([.H603]&lt;=[.G603]; &quot;Valid&quot;; &quot;Invalid&quot;)" table:style-name="ce17">
            <text:p>Valid</text:p>
          </table:table-cell>
          <table:table-cell office:value-type="string" office:string-value="Stable/Reducing" table:formula="of:=IF([.J603]&gt;0; &quot;Increasing Pressure&quot;; &quot;Stable/Reducing&quot;)" table:style-name="ce18">
            <text:p>Stable/Reducing</text:p>
          </table:table-cell>
          <table:table-cell office:value-type="float" office:value="2" table:formula="of:=IFERROR([.H603]/[.F603]; 0)" table:style-name="ce17">
            <text:p>2</text:p>
          </table:table-cell>
          <table:table-cell office:value-type="float" office:value="2361.7142857142858" table:formula="of:=AVERAGE([.I603:.I609])" table:style-name="ce15">
            <text:p>2362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7-01T00:00:00" table:style-name="ce14">
            <text:p>01-07-2025</text:p>
          </table:table-cell>
          <table:table-cell office:value-type="string" office:string-value="July" table:formula="of:=TEXT([.A604]; &quot;mmmm&quot;)" table:style-name="ce14">
            <text:p>July</text:p>
          </table:table-cell>
          <table:table-cell office:value-type="string" office:string-value="2025-07" table:formula="of:=TEXT([.A604]; &quot;yyyy-mm&quot;)" table:style-name="ce14">
            <text:p>2025-07</text:p>
          </table:table-cell>
          <table:table-cell office:value-type="float" office:value="7" table:style-name="ce9">
            <text:p>7</text:p>
          </table:table-cell>
          <table:table-cell office:value-type="float" office:value="14" table:style-name="ce9">
            <text:p>14</text:p>
          </table:table-cell>
          <table:table-cell office:value-type="float" office:value="6" table:style-name="ce9">
            <text:p>6</text:p>
          </table:table-cell>
          <table:table-cell office:value-type="float" office:value="2391" table:style-name="ce9">
            <text:p>2391</text:p>
          </table:table-cell>
          <table:table-cell office:value-type="float" office:value="22" table:style-name="ce9">
            <text:p>22</text:p>
          </table:table-cell>
          <table:table-cell office:value-type="float" office:value="2405" table:formula="of:=SUM([.G604]+[.E604])" table:style-name="ce15">
            <text:p>2405</text:p>
          </table:table-cell>
          <table:table-cell office:value-type="float" office:value="-16" table:formula="of:=[.F604]-[.H604]" table:style-name="ce15">
            <text:p>-16</text:p>
          </table:table-cell>
          <table:table-cell office:value-type="percentage" office:value="-4.9896049896049899E-3" table:formula="of:=([.I605]-[.I604])/[.I604]" table:style-name="ce16">
            <text:p>0%</text:p>
          </table:table-cell>
          <table:table-cell office:value-type="string" office:string-value="Valid" table:formula="of:=IF([.F604]&lt;=[.E604]; &quot;Valid&quot;; &quot;Invalid&quot;)" table:style-name="ce17">
            <text:p>Valid</text:p>
          </table:table-cell>
          <table:table-cell office:value-type="string" office:string-value="Valid" table:formula="of:=IF([.H604]&lt;=[.G604]; &quot;Valid&quot;; &quot;Invalid&quot;)" table:style-name="ce17">
            <text:p>Valid</text:p>
          </table:table-cell>
          <table:table-cell office:value-type="string" office:string-value="Stable/Reducing" table:formula="of:=IF([.J604]&gt;0; &quot;Increasing Pressure&quot;; &quot;Stable/Reducing&quot;)" table:style-name="ce18">
            <text:p>Stable/Reducing</text:p>
          </table:table-cell>
          <table:table-cell office:value-type="float" office:value="3.6666666666666665" table:formula="of:=IFERROR([.H604]/[.F604]; 0)" table:style-name="ce17">
            <text:p>3.666666667</text:p>
          </table:table-cell>
          <table:table-cell office:value-type="float" office:value="2338.1428571428573" table:formula="of:=AVERAGE([.I604:.I610])" table:style-name="ce15">
            <text:p>2338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7-02T00:00:00" table:style-name="ce14">
            <text:p>02-07-2025</text:p>
          </table:table-cell>
          <table:table-cell office:value-type="string" office:string-value="July" table:formula="of:=TEXT([.A605]; &quot;mmmm&quot;)" table:style-name="ce14">
            <text:p>July</text:p>
          </table:table-cell>
          <table:table-cell office:value-type="string" office:string-value="2025-07" table:formula="of:=TEXT([.A605]; &quot;yyyy-mm&quot;)" table:style-name="ce14">
            <text:p>2025-07</text:p>
          </table:table-cell>
          <table:table-cell office:value-type="float" office:value="8" table:style-name="ce9">
            <text:p>8</text:p>
          </table:table-cell>
          <table:table-cell office:value-type="float" office:value="20" table:style-name="ce9">
            <text:p>20</text:p>
          </table:table-cell>
          <table:table-cell office:value-type="float" office:value="9" table:style-name="ce9">
            <text:p>9</text:p>
          </table:table-cell>
          <table:table-cell office:value-type="float" office:value="2373" table:style-name="ce9">
            <text:p>2373</text:p>
          </table:table-cell>
          <table:table-cell office:value-type="float" office:value="38" table:style-name="ce9">
            <text:p>38</text:p>
          </table:table-cell>
          <table:table-cell office:value-type="float" office:value="2393" table:formula="of:=SUM([.G605]+[.E605])" table:style-name="ce15">
            <text:p>2393</text:p>
          </table:table-cell>
          <table:table-cell office:value-type="float" office:value="-29" table:formula="of:=[.F605]-[.H605]" table:style-name="ce15">
            <text:p>-29</text:p>
          </table:table-cell>
          <table:table-cell office:value-type="percentage" office:value="-1.8386961972419558E-2" table:formula="of:=([.I606]-[.I605])/[.I605]" table:style-name="ce16">
            <text:p>-2%</text:p>
          </table:table-cell>
          <table:table-cell office:value-type="string" office:string-value="Valid" table:formula="of:=IF([.F605]&lt;=[.E605]; &quot;Valid&quot;; &quot;Invalid&quot;)" table:style-name="ce17">
            <text:p>Valid</text:p>
          </table:table-cell>
          <table:table-cell office:value-type="string" office:string-value="Valid" table:formula="of:=IF([.H605]&lt;=[.G605]; &quot;Valid&quot;; &quot;Invalid&quot;)" table:style-name="ce17">
            <text:p>Valid</text:p>
          </table:table-cell>
          <table:table-cell office:value-type="string" office:string-value="Stable/Reducing" table:formula="of:=IF([.J605]&gt;0; &quot;Increasing Pressure&quot;; &quot;Stable/Reducing&quot;)" table:style-name="ce18">
            <text:p>Stable/Reducing</text:p>
          </table:table-cell>
          <table:table-cell office:value-type="float" office:value="4.2222222222222223" table:formula="of:=IFERROR([.H605]/[.F605]; 0)" table:style-name="ce17">
            <text:p>4.222222222</text:p>
          </table:table-cell>
          <table:table-cell office:value-type="float" office:value="2311.2857142857142" table:formula="of:=AVERAGE([.I605:.I611])" table:style-name="ce15">
            <text:p>2311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7-06T00:00:00" table:style-name="ce14">
            <text:p>06-07-2025</text:p>
          </table:table-cell>
          <table:table-cell office:value-type="string" office:string-value="July" table:formula="of:=TEXT([.A606]; &quot;mmmm&quot;)" table:style-name="ce14">
            <text:p>July</text:p>
          </table:table-cell>
          <table:table-cell office:value-type="string" office:string-value="2025-07" table:formula="of:=TEXT([.A606]; &quot;yyyy-mm&quot;)" table:style-name="ce14">
            <text:p>2025-07</text:p>
          </table:table-cell>
          <table:table-cell office:value-type="float" office:value="4" table:style-name="ce9">
            <text:p>4</text:p>
          </table:table-cell>
          <table:table-cell office:value-type="float" office:value="17" table:style-name="ce9">
            <text:p>17</text:p>
          </table:table-cell>
          <table:table-cell office:value-type="float" office:value="2" table:style-name="ce9">
            <text:p>2</text:p>
          </table:table-cell>
          <table:table-cell office:value-type="float" office:value="2332" table:style-name="ce9">
            <text:p>2332</text:p>
          </table:table-cell>
          <table:table-cell office:value-type="float" office:value="8" table:style-name="ce9">
            <text:p>8</text:p>
          </table:table-cell>
          <table:table-cell office:value-type="float" office:value="2349" table:formula="of:=SUM([.G606]+[.E606])" table:style-name="ce15">
            <text:p>2349</text:p>
          </table:table-cell>
          <table:table-cell office:value-type="float" office:value="-6" table:formula="of:=[.F606]-[.H606]" table:style-name="ce15">
            <text:p>-6</text:p>
          </table:table-cell>
          <table:table-cell office:value-type="percentage" office:value="-5.9599829714772241E-3" table:formula="of:=([.I607]-[.I606])/[.I606]" table:style-name="ce16">
            <text:p>-1%</text:p>
          </table:table-cell>
          <table:table-cell office:value-type="string" office:string-value="Valid" table:formula="of:=IF([.F606]&lt;=[.E606]; &quot;Valid&quot;; &quot;Invalid&quot;)" table:style-name="ce17">
            <text:p>Valid</text:p>
          </table:table-cell>
          <table:table-cell office:value-type="string" office:string-value="Valid" table:formula="of:=IF([.H606]&lt;=[.G606]; &quot;Valid&quot;; &quot;Invalid&quot;)" table:style-name="ce17">
            <text:p>Valid</text:p>
          </table:table-cell>
          <table:table-cell office:value-type="string" office:string-value="Stable/Reducing" table:formula="of:=IF([.J606]&gt;0; &quot;Increasing Pressure&quot;; &quot;Stable/Reducing&quot;)" table:style-name="ce18">
            <text:p>Stable/Reducing</text:p>
          </table:table-cell>
          <table:table-cell office:value-type="float" office:value="4" table:formula="of:=IFERROR([.H606]/[.F606]; 0)" table:style-name="ce17">
            <text:p>4</text:p>
          </table:table-cell>
          <table:table-cell office:value-type="float" office:value="2282.2857142857142" table:formula="of:=AVERAGE([.I606:.I612])" table:style-name="ce15">
            <text:p>2282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7-07T00:00:00" table:style-name="ce14">
            <text:p>07-07-2025</text:p>
          </table:table-cell>
          <table:table-cell office:value-type="string" office:string-value="July" table:formula="of:=TEXT([.A607]; &quot;mmmm&quot;)" table:style-name="ce14">
            <text:p>July</text:p>
          </table:table-cell>
          <table:table-cell office:value-type="string" office:string-value="2025-07" table:formula="of:=TEXT([.A607]; &quot;yyyy-mm&quot;)" table:style-name="ce14">
            <text:p>2025-07</text:p>
          </table:table-cell>
          <table:table-cell office:value-type="float" office:value="3" table:style-name="ce9">
            <text:p>3</text:p>
          </table:table-cell>
          <table:table-cell office:value-type="float" office:value="18" table:style-name="ce9">
            <text:p>18</text:p>
          </table:table-cell>
          <table:table-cell office:value-type="float" office:value="8" table:style-name="ce9">
            <text:p>8</text:p>
          </table:table-cell>
          <table:table-cell office:value-type="float" office:value="2317" table:style-name="ce9">
            <text:p>2317</text:p>
          </table:table-cell>
          <table:table-cell office:value-type="float" office:value="20" table:style-name="ce9">
            <text:p>20</text:p>
          </table:table-cell>
          <table:table-cell office:value-type="float" office:value="2335" table:formula="of:=SUM([.G607]+[.E607])" table:style-name="ce15">
            <text:p>2335</text:p>
          </table:table-cell>
          <table:table-cell office:value-type="float" office:value="-12" table:formula="of:=[.F607]-[.H607]" table:style-name="ce15">
            <text:p>-12</text:p>
          </table:table-cell>
          <table:table-cell office:value-type="percentage" office:value="-5.5674518201284801E-3" table:formula="of:=([.I608]-[.I607])/[.I607]" table:style-name="ce16">
            <text:p>-1%</text:p>
          </table:table-cell>
          <table:table-cell office:value-type="string" office:string-value="Valid" table:formula="of:=IF([.F607]&lt;=[.E607]; &quot;Valid&quot;; &quot;Invalid&quot;)" table:style-name="ce17">
            <text:p>Valid</text:p>
          </table:table-cell>
          <table:table-cell office:value-type="string" office:string-value="Valid" table:formula="of:=IF([.H607]&lt;=[.G607]; &quot;Valid&quot;; &quot;Invalid&quot;)" table:style-name="ce17">
            <text:p>Valid</text:p>
          </table:table-cell>
          <table:table-cell office:value-type="string" office:string-value="Stable/Reducing" table:formula="of:=IF([.J607]&gt;0; &quot;Increasing Pressure&quot;; &quot;Stable/Reducing&quot;)" table:style-name="ce18">
            <text:p>Stable/Reducing</text:p>
          </table:table-cell>
          <table:table-cell office:value-type="float" office:value="2.5" table:formula="of:=IFERROR([.H607]/[.F607]; 0)" table:style-name="ce17">
            <text:p>2.5</text:p>
          </table:table-cell>
          <table:table-cell office:value-type="float" office:value="2258" table:formula="of:=AVERAGE([.I607:.I613])" table:style-name="ce15">
            <text:p>2258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7-08T00:00:00" table:style-name="ce14">
            <text:p>08-07-2025</text:p>
          </table:table-cell>
          <table:table-cell office:value-type="string" office:string-value="July" table:formula="of:=TEXT([.A608]; &quot;mmmm&quot;)" table:style-name="ce14">
            <text:p>July</text:p>
          </table:table-cell>
          <table:table-cell office:value-type="string" office:string-value="2025-07" table:formula="of:=TEXT([.A608]; &quot;yyyy-mm&quot;)" table:style-name="ce14">
            <text:p>2025-07</text:p>
          </table:table-cell>
          <table:table-cell office:value-type="float" office:value="5" table:style-name="ce9">
            <text:p>5</text:p>
          </table:table-cell>
          <table:table-cell office:value-type="float" office:value="16" table:style-name="ce9">
            <text:p>16</text:p>
          </table:table-cell>
          <table:table-cell office:value-type="float" office:value="8" table:style-name="ce9">
            <text:p>8</text:p>
          </table:table-cell>
          <table:table-cell office:value-type="float" office:value="2306" table:style-name="ce9">
            <text:p>2306</text:p>
          </table:table-cell>
          <table:table-cell office:value-type="float" office:value="20" table:style-name="ce9">
            <text:p>20</text:p>
          </table:table-cell>
          <table:table-cell office:value-type="float" office:value="2322" table:formula="of:=SUM([.G608]+[.E608])" table:style-name="ce15">
            <text:p>2322</text:p>
          </table:table-cell>
          <table:table-cell office:value-type="float" office:value="-12" table:formula="of:=[.F608]-[.H608]" table:style-name="ce15">
            <text:p>-12</text:p>
          </table:table-cell>
          <table:table-cell office:value-type="percentage" office:value="-9.905254091300603E-3" table:formula="of:=([.I609]-[.I608])/[.I608]" table:style-name="ce16">
            <text:p>-1%</text:p>
          </table:table-cell>
          <table:table-cell office:value-type="string" office:string-value="Valid" table:formula="of:=IF([.F608]&lt;=[.E608]; &quot;Valid&quot;; &quot;Invalid&quot;)" table:style-name="ce17">
            <text:p>Valid</text:p>
          </table:table-cell>
          <table:table-cell office:value-type="string" office:string-value="Valid" table:formula="of:=IF([.H608]&lt;=[.G608]; &quot;Valid&quot;; &quot;Invalid&quot;)" table:style-name="ce17">
            <text:p>Valid</text:p>
          </table:table-cell>
          <table:table-cell office:value-type="string" office:string-value="Stable/Reducing" table:formula="of:=IF([.J608]&gt;0; &quot;Increasing Pressure&quot;; &quot;Stable/Reducing&quot;)" table:style-name="ce18">
            <text:p>Stable/Reducing</text:p>
          </table:table-cell>
          <table:table-cell office:value-type="float" office:value="2.5" table:formula="of:=IFERROR([.H608]/[.F608]; 0)" table:style-name="ce17">
            <text:p>2.5</text:p>
          </table:table-cell>
          <table:table-cell office:value-type="float" office:value="2234.8571428571427" table:formula="of:=AVERAGE([.I608:.I614])" table:style-name="ce15">
            <text:p>2235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7-09T00:00:00" table:style-name="ce14">
            <text:p>09-07-2025</text:p>
          </table:table-cell>
          <table:table-cell office:value-type="string" office:string-value="July" table:formula="of:=TEXT([.A609]; &quot;mmmm&quot;)" table:style-name="ce14">
            <text:p>July</text:p>
          </table:table-cell>
          <table:table-cell office:value-type="string" office:string-value="2025-07" table:formula="of:=TEXT([.A609]; &quot;yyyy-mm&quot;)" table:style-name="ce14">
            <text:p>2025-07</text:p>
          </table:table-cell>
          <table:table-cell office:value-type="float" office:value="2" table:style-name="ce9">
            <text:p>2</text:p>
          </table:table-cell>
          <table:table-cell office:value-type="float" office:value="18" table:style-name="ce9">
            <text:p>18</text:p>
          </table:table-cell>
          <table:table-cell office:value-type="float" office:value="0" table:style-name="ce9">
            <text:p>0</text:p>
          </table:table-cell>
          <table:table-cell office:value-type="float" office:value="2281" table:style-name="ce9">
            <text:p>2281</text:p>
          </table:table-cell>
          <table:table-cell office:value-type="float" office:value="32" table:style-name="ce9">
            <text:p>32</text:p>
          </table:table-cell>
          <table:table-cell office:value-type="float" office:value="2299" table:formula="of:=SUM([.G609]+[.E609])" table:style-name="ce15">
            <text:p>2299</text:p>
          </table:table-cell>
          <table:table-cell office:value-type="float" office:value="-32" table:formula="of:=[.F609]-[.H609]" table:style-name="ce15">
            <text:p>-32</text:p>
          </table:table-cell>
          <table:table-cell office:value-type="percentage" office:value="-1.5224010439321443E-2" table:formula="of:=([.I610]-[.I609])/[.I609]" table:style-name="ce16">
            <text:p>-2%</text:p>
          </table:table-cell>
          <table:table-cell office:value-type="string" office:string-value="Valid" table:formula="of:=IF([.F609]&lt;=[.E609]; &quot;Valid&quot;; &quot;Invalid&quot;)" table:style-name="ce17">
            <text:p>Valid</text:p>
          </table:table-cell>
          <table:table-cell office:value-type="string" office:string-value="Valid" table:formula="of:=IF([.H609]&lt;=[.G609]; &quot;Valid&quot;; &quot;Invalid&quot;)" table:style-name="ce17">
            <text:p>Valid</text:p>
          </table:table-cell>
          <table:table-cell office:value-type="string" office:string-value="Stable/Reducing" table:formula="of:=IF([.J609]&gt;0; &quot;Increasing Pressure&quot;; &quot;Stable/Reducing&quot;)" table:style-name="ce18">
            <text:p>Stable/Reducing</text:p>
          </table:table-cell>
          <table:table-cell office:value-type="float" office:value="0" table:formula="of:=IFERROR([.H609]/[.F609]; 0)" table:style-name="ce17">
            <text:p>0</text:p>
          </table:table-cell>
          <table:table-cell office:value-type="float" office:value="2213" table:formula="of:=AVERAGE([.I609:.I615])" table:style-name="ce15">
            <text:p>2213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7-10T00:00:00" table:style-name="ce14">
            <text:p>10-07-2025</text:p>
          </table:table-cell>
          <table:table-cell office:value-type="string" office:string-value="July" table:formula="of:=TEXT([.A610]; &quot;mmmm&quot;)" table:style-name="ce14">
            <text:p>July</text:p>
          </table:table-cell>
          <table:table-cell office:value-type="string" office:string-value="2025-07" table:formula="of:=TEXT([.A610]; &quot;yyyy-mm&quot;)" table:style-name="ce14">
            <text:p>2025-07</text:p>
          </table:table-cell>
          <table:table-cell office:value-type="float" office:value="2" table:style-name="ce9">
            <text:p>2</text:p>
          </table:table-cell>
          <table:table-cell office:value-type="float" office:value="12" table:style-name="ce9">
            <text:p>12</text:p>
          </table:table-cell>
          <table:table-cell office:value-type="float" office:value="3" table:style-name="ce9">
            <text:p>3</text:p>
          </table:table-cell>
          <table:table-cell office:value-type="float" office:value="2252" table:style-name="ce9">
            <text:p>2252</text:p>
          </table:table-cell>
          <table:table-cell office:value-type="float" office:value="39" table:style-name="ce9">
            <text:p>39</text:p>
          </table:table-cell>
          <table:table-cell office:value-type="float" office:value="2264" table:formula="of:=SUM([.G610]+[.E610])" table:style-name="ce15">
            <text:p>2264</text:p>
          </table:table-cell>
          <table:table-cell office:value-type="float" office:value="-36" table:formula="of:=[.F610]-[.H610]" table:style-name="ce15">
            <text:p>-36</text:p>
          </table:table-cell>
          <table:table-cell office:value-type="percentage" office:value="-2.0759717314487631E-2" table:formula="of:=([.I611]-[.I610])/[.I610]" table:style-name="ce16">
            <text:p>-2%</text:p>
          </table:table-cell>
          <table:table-cell office:value-type="string" office:string-value="Valid" table:formula="of:=IF([.F610]&lt;=[.E610]; &quot;Valid&quot;; &quot;Invalid&quot;)" table:style-name="ce17">
            <text:p>Valid</text:p>
          </table:table-cell>
          <table:table-cell office:value-type="string" office:string-value="Valid" table:formula="of:=IF([.H610]&lt;=[.G610]; &quot;Valid&quot;; &quot;Invalid&quot;)" table:style-name="ce17">
            <text:p>Valid</text:p>
          </table:table-cell>
          <table:table-cell office:value-type="string" office:string-value="Stable/Reducing" table:formula="of:=IF([.J610]&gt;0; &quot;Increasing Pressure&quot;; &quot;Stable/Reducing&quot;)" table:style-name="ce18">
            <text:p>Stable/Reducing</text:p>
          </table:table-cell>
          <table:table-cell office:value-type="float" office:value="13" table:formula="of:=IFERROR([.H610]/[.F610]; 0)" table:style-name="ce17">
            <text:p>13</text:p>
          </table:table-cell>
          <table:table-cell office:value-type="float" office:value="2190.1428571428573" table:formula="of:=AVERAGE([.I610:.I616])" table:style-name="ce15">
            <text:p>2190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7-13T00:00:00" table:style-name="ce14">
            <text:p>13-07-2025</text:p>
          </table:table-cell>
          <table:table-cell office:value-type="string" office:string-value="July" table:formula="of:=TEXT([.A611]; &quot;mmmm&quot;)" table:style-name="ce14">
            <text:p>July</text:p>
          </table:table-cell>
          <table:table-cell office:value-type="string" office:string-value="2025-07" table:formula="of:=TEXT([.A611]; &quot;yyyy-mm&quot;)" table:style-name="ce14">
            <text:p>2025-07</text:p>
          </table:table-cell>
          <table:table-cell office:value-type="float" office:value="1" table:style-name="ce9">
            <text:p>1</text:p>
          </table:table-cell>
          <table:table-cell office:value-type="float" office:value="13" table:style-name="ce9">
            <text:p>13</text:p>
          </table:table-cell>
          <table:table-cell office:value-type="float" office:value="4" table:style-name="ce9">
            <text:p>4</text:p>
          </table:table-cell>
          <table:table-cell office:value-type="float" office:value="2204" table:style-name="ce9">
            <text:p>2204</text:p>
          </table:table-cell>
          <table:table-cell office:value-type="float" office:value="10" table:style-name="ce9">
            <text:p>10</text:p>
          </table:table-cell>
          <table:table-cell office:value-type="float" office:value="2217" table:formula="of:=SUM([.G611]+[.E611])" table:style-name="ce15">
            <text:p>2217</text:p>
          </table:table-cell>
          <table:table-cell office:value-type="float" office:value="-6" table:formula="of:=[.F611]-[.H611]" table:style-name="ce15">
            <text:p>-6</text:p>
          </table:table-cell>
          <table:table-cell office:value-type="percentage" office:value="-1.2178619756427604E-2" table:formula="of:=([.I612]-[.I611])/[.I611]" table:style-name="ce16">
            <text:p>-1%</text:p>
          </table:table-cell>
          <table:table-cell office:value-type="string" office:string-value="Valid" table:formula="of:=IF([.F611]&lt;=[.E611]; &quot;Valid&quot;; &quot;Invalid&quot;)" table:style-name="ce17">
            <text:p>Valid</text:p>
          </table:table-cell>
          <table:table-cell office:value-type="string" office:string-value="Valid" table:formula="of:=IF([.H611]&lt;=[.G611]; &quot;Valid&quot;; &quot;Invalid&quot;)" table:style-name="ce17">
            <text:p>Valid</text:p>
          </table:table-cell>
          <table:table-cell office:value-type="string" office:string-value="Stable/Reducing" table:formula="of:=IF([.J611]&gt;0; &quot;Increasing Pressure&quot;; &quot;Stable/Reducing&quot;)" table:style-name="ce18">
            <text:p>Stable/Reducing</text:p>
          </table:table-cell>
          <table:table-cell office:value-type="float" office:value="2.5" table:formula="of:=IFERROR([.H611]/[.F611]; 0)" table:style-name="ce17">
            <text:p>2.5</text:p>
          </table:table-cell>
          <table:table-cell office:value-type="float" office:value="2171" table:formula="of:=AVERAGE([.I611:.I617])" table:style-name="ce15">
            <text:p>2171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7-14T00:00:00" table:style-name="ce14">
            <text:p>14-07-2025</text:p>
          </table:table-cell>
          <table:table-cell office:value-type="string" office:string-value="July" table:formula="of:=TEXT([.A612]; &quot;mmmm&quot;)" table:style-name="ce14">
            <text:p>July</text:p>
          </table:table-cell>
          <table:table-cell office:value-type="string" office:string-value="2025-07" table:formula="of:=TEXT([.A612]; &quot;yyyy-mm&quot;)" table:style-name="ce14">
            <text:p>2025-07</text:p>
          </table:table-cell>
          <table:table-cell office:value-type="float" office:value="2" table:style-name="ce9">
            <text:p>2</text:p>
          </table:table-cell>
          <table:table-cell office:value-type="float" office:value="9" table:style-name="ce9">
            <text:p>9</text:p>
          </table:table-cell>
          <table:table-cell office:value-type="float" office:value="1" table:style-name="ce9">
            <text:p>1</text:p>
          </table:table-cell>
          <table:table-cell office:value-type="float" office:value="2181" table:style-name="ce9">
            <text:p>2181</text:p>
          </table:table-cell>
          <table:table-cell office:value-type="float" office:value="26" table:style-name="ce9">
            <text:p>26</text:p>
          </table:table-cell>
          <table:table-cell office:value-type="float" office:value="2190" table:formula="of:=SUM([.G612]+[.E612])" table:style-name="ce15">
            <text:p>2190</text:p>
          </table:table-cell>
          <table:table-cell office:value-type="float" office:value="-25" table:formula="of:=[.F612]-[.H612]" table:style-name="ce15">
            <text:p>-25</text:p>
          </table:table-cell>
          <table:table-cell office:value-type="percentage" office:value="-5.0228310502283104E-3" table:formula="of:=([.I613]-[.I612])/[.I612]" table:style-name="ce16">
            <text:p>-1%</text:p>
          </table:table-cell>
          <table:table-cell office:value-type="string" office:string-value="Valid" table:formula="of:=IF([.F612]&lt;=[.E612]; &quot;Valid&quot;; &quot;Invalid&quot;)" table:style-name="ce17">
            <text:p>Valid</text:p>
          </table:table-cell>
          <table:table-cell office:value-type="string" office:string-value="Valid" table:formula="of:=IF([.H612]&lt;=[.G612]; &quot;Valid&quot;; &quot;Invalid&quot;)" table:style-name="ce17">
            <text:p>Valid</text:p>
          </table:table-cell>
          <table:table-cell office:value-type="string" office:string-value="Stable/Reducing" table:formula="of:=IF([.J612]&gt;0; &quot;Increasing Pressure&quot;; &quot;Stable/Reducing&quot;)" table:style-name="ce18">
            <text:p>Stable/Reducing</text:p>
          </table:table-cell>
          <table:table-cell office:value-type="float" office:value="26" table:formula="of:=IFERROR([.H612]/[.F612]; 0)" table:style-name="ce17">
            <text:p>26</text:p>
          </table:table-cell>
          <table:table-cell office:value-type="float" office:value="2158.8571428571427" table:formula="of:=AVERAGE([.I612:.I618])" table:style-name="ce15">
            <text:p>2159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7-15T00:00:00" table:style-name="ce14">
            <text:p>15-07-2025</text:p>
          </table:table-cell>
          <table:table-cell office:value-type="string" office:string-value="July" table:formula="of:=TEXT([.A613]; &quot;mmmm&quot;)" table:style-name="ce14">
            <text:p>July</text:p>
          </table:table-cell>
          <table:table-cell office:value-type="string" office:string-value="2025-07" table:formula="of:=TEXT([.A613]; &quot;yyyy-mm&quot;)" table:style-name="ce14">
            <text:p>2025-07</text:p>
          </table:table-cell>
          <table:table-cell office:value-type="float" office:value="0" table:style-name="ce9">
            <text:p>0</text:p>
          </table:table-cell>
          <table:table-cell office:value-type="float" office:value="8" table:style-name="ce9">
            <text:p>8</text:p>
          </table:table-cell>
          <table:table-cell office:value-type="float" office:value="5" table:style-name="ce9">
            <text:p>5</text:p>
          </table:table-cell>
          <table:table-cell office:value-type="float" office:value="2171" table:style-name="ce9">
            <text:p>2171</text:p>
          </table:table-cell>
          <table:table-cell office:value-type="float" office:value="17" table:style-name="ce9">
            <text:p>17</text:p>
          </table:table-cell>
          <table:table-cell office:value-type="float" office:value="2179" table:formula="of:=SUM([.G613]+[.E613])" table:style-name="ce15">
            <text:p>2179</text:p>
          </table:table-cell>
          <table:table-cell office:value-type="float" office:value="-12" table:formula="of:=[.F613]-[.H613]" table:style-name="ce15">
            <text:p>-12</text:p>
          </table:table-cell>
          <table:table-cell office:value-type="percentage" office:value="-2.7535566773749425E-3" table:formula="of:=([.I614]-[.I613])/[.I613]" table:style-name="ce16">
            <text:p>0%</text:p>
          </table:table-cell>
          <table:table-cell office:value-type="string" office:string-value="Valid" table:formula="of:=IF([.F613]&lt;=[.E613]; &quot;Valid&quot;; &quot;Invalid&quot;)" table:style-name="ce17">
            <text:p>Valid</text:p>
          </table:table-cell>
          <table:table-cell office:value-type="string" office:string-value="Valid" table:formula="of:=IF([.H613]&lt;=[.G613]; &quot;Valid&quot;; &quot;Invalid&quot;)" table:style-name="ce17">
            <text:p>Valid</text:p>
          </table:table-cell>
          <table:table-cell office:value-type="string" office:string-value="Stable/Reducing" table:formula="of:=IF([.J613]&gt;0; &quot;Increasing Pressure&quot;; &quot;Stable/Reducing&quot;)" table:style-name="ce18">
            <text:p>Stable/Reducing</text:p>
          </table:table-cell>
          <table:table-cell office:value-type="float" office:value="3.4" table:formula="of:=IFERROR([.H613]/[.F613]; 0)" table:style-name="ce17">
            <text:p>3.4</text:p>
          </table:table-cell>
          <table:table-cell office:value-type="float" office:value="2148" table:formula="of:=AVERAGE([.I613:.I619])" table:style-name="ce15">
            <text:p>2148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7-16T00:00:00" table:style-name="ce14">
            <text:p>16-07-2025</text:p>
          </table:table-cell>
          <table:table-cell office:value-type="string" office:string-value="July" table:formula="of:=TEXT([.A614]; &quot;mmmm&quot;)" table:style-name="ce14">
            <text:p>July</text:p>
          </table:table-cell>
          <table:table-cell office:value-type="string" office:string-value="2025-07" table:formula="of:=TEXT([.A614]; &quot;yyyy-mm&quot;)" table:style-name="ce14">
            <text:p>2025-07</text:p>
          </table:table-cell>
          <table:table-cell office:value-type="float" office:value="1" table:style-name="ce9">
            <text:p>1</text:p>
          </table:table-cell>
          <table:table-cell office:value-type="float" office:value="9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float" office:value="2164" table:style-name="ce9">
            <text:p>2164</text:p>
          </table:table-cell>
          <table:table-cell office:value-type="float" office:value="11" table:style-name="ce9">
            <text:p>11</text:p>
          </table:table-cell>
          <table:table-cell office:value-type="float" office:value="2173" table:formula="of:=SUM([.G614]+[.E614])" table:style-name="ce15">
            <text:p>2173</text:p>
          </table:table-cell>
          <table:table-cell office:value-type="float" office:value="-11" table:formula="of:=[.F614]-[.H614]" table:style-name="ce15">
            <text:p>-11</text:p>
          </table:table-cell>
          <table:table-cell office:value-type="percentage" office:value="-1.8407731247123793E-3" table:formula="of:=([.I615]-[.I614])/[.I614]" table:style-name="ce16">
            <text:p>0%</text:p>
          </table:table-cell>
          <table:table-cell office:value-type="string" office:string-value="Valid" table:formula="of:=IF([.F614]&lt;=[.E614]; &quot;Valid&quot;; &quot;Invalid&quot;)" table:style-name="ce17">
            <text:p>Valid</text:p>
          </table:table-cell>
          <table:table-cell office:value-type="string" office:string-value="Valid" table:formula="of:=IF([.H614]&lt;=[.G614]; &quot;Valid&quot;; &quot;Invalid&quot;)" table:style-name="ce17">
            <text:p>Valid</text:p>
          </table:table-cell>
          <table:table-cell office:value-type="string" office:string-value="Stable/Reducing" table:formula="of:=IF([.J614]&gt;0; &quot;Increasing Pressure&quot;; &quot;Stable/Reducing&quot;)" table:style-name="ce18">
            <text:p>Stable/Reducing</text:p>
          </table:table-cell>
          <table:table-cell office:value-type="float" office:value="0" table:formula="of:=IFERROR([.H614]/[.F614]; 0)" table:style-name="ce17">
            <text:p>0</text:p>
          </table:table-cell>
          <table:table-cell office:value-type="float" office:value="2136.7142857142858" table:formula="of:=AVERAGE([.I614:.I620])" table:style-name="ce15">
            <text:p>2137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7-17T00:00:00" table:style-name="ce14">
            <text:p>17-07-2025</text:p>
          </table:table-cell>
          <table:table-cell office:value-type="string" office:string-value="July" table:formula="of:=TEXT([.A615]; &quot;mmmm&quot;)" table:style-name="ce14">
            <text:p>July</text:p>
          </table:table-cell>
          <table:table-cell office:value-type="string" office:string-value="2025-07" table:formula="of:=TEXT([.A615]; &quot;yyyy-mm&quot;)" table:style-name="ce14">
            <text:p>2025-07</text:p>
          </table:table-cell>
          <table:table-cell office:value-type="float" office:value="3" table:style-name="ce9">
            <text:p>3</text:p>
          </table:table-cell>
          <table:table-cell office:value-type="float" office:value="16" table:style-name="ce9">
            <text:p>16</text:p>
          </table:table-cell>
          <table:table-cell office:value-type="float" office:value="2" table:style-name="ce9">
            <text:p>2</text:p>
          </table:table-cell>
          <table:table-cell office:value-type="float" office:value="2153" table:style-name="ce9">
            <text:p>2153</text:p>
          </table:table-cell>
          <table:table-cell office:value-type="float" office:value="17" table:style-name="ce9">
            <text:p>17</text:p>
          </table:table-cell>
          <table:table-cell office:value-type="float" office:value="2169" table:formula="of:=SUM([.G615]+[.E615])" table:style-name="ce15">
            <text:p>2169</text:p>
          </table:table-cell>
          <table:table-cell office:value-type="float" office:value="-15" table:formula="of:=[.F615]-[.H615]" table:style-name="ce15">
            <text:p>-15</text:p>
          </table:table-cell>
          <table:table-cell office:value-type="percentage" office:value="-1.3831258644536652E-2" table:formula="of:=([.I616]-[.I615])/[.I615]" table:style-name="ce16">
            <text:p>-1%</text:p>
          </table:table-cell>
          <table:table-cell office:value-type="string" office:string-value="Valid" table:formula="of:=IF([.F615]&lt;=[.E615]; &quot;Valid&quot;; &quot;Invalid&quot;)" table:style-name="ce17">
            <text:p>Valid</text:p>
          </table:table-cell>
          <table:table-cell office:value-type="string" office:string-value="Valid" table:formula="of:=IF([.H615]&lt;=[.G615]; &quot;Valid&quot;; &quot;Invalid&quot;)" table:style-name="ce17">
            <text:p>Valid</text:p>
          </table:table-cell>
          <table:table-cell office:value-type="string" office:string-value="Stable/Reducing" table:formula="of:=IF([.J615]&gt;0; &quot;Increasing Pressure&quot;; &quot;Stable/Reducing&quot;)" table:style-name="ce18">
            <text:p>Stable/Reducing</text:p>
          </table:table-cell>
          <table:table-cell office:value-type="float" office:value="8.5" table:formula="of:=IFERROR([.H615]/[.F615]; 0)" table:style-name="ce17">
            <text:p>8.5</text:p>
          </table:table-cell>
          <table:table-cell office:value-type="float" office:value="2124.7142857142858" table:formula="of:=AVERAGE([.I615:.I621])" table:style-name="ce15">
            <text:p>2125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7-21T00:00:00" table:style-name="ce14">
            <text:p>21-07-2025</text:p>
          </table:table-cell>
          <table:table-cell office:value-type="string" office:string-value="July" table:formula="of:=TEXT([.A616]; &quot;mmmm&quot;)" table:style-name="ce14">
            <text:p>July</text:p>
          </table:table-cell>
          <table:table-cell office:value-type="string" office:string-value="2025-07" table:formula="of:=TEXT([.A616]; &quot;yyyy-mm&quot;)" table:style-name="ce14">
            <text:p>2025-07</text:p>
          </table:table-cell>
          <table:table-cell office:value-type="float" office:value="4" table:style-name="ce9">
            <text:p>4</text:p>
          </table:table-cell>
          <table:table-cell office:value-type="float" office:value="18" table:style-name="ce9">
            <text:p>18</text:p>
          </table:table-cell>
          <table:table-cell office:value-type="float" office:value="7" table:style-name="ce9">
            <text:p>7</text:p>
          </table:table-cell>
          <table:table-cell office:value-type="float" office:value="2121" table:style-name="ce9">
            <text:p>2121</text:p>
          </table:table-cell>
          <table:table-cell office:value-type="float" office:value="16" table:style-name="ce9">
            <text:p>16</text:p>
          </table:table-cell>
          <table:table-cell office:value-type="float" office:value="2139" table:formula="of:=SUM([.G616]+[.E616])" table:style-name="ce15">
            <text:p>2139</text:p>
          </table:table-cell>
          <table:table-cell office:value-type="float" office:value="-9" table:formula="of:=[.F616]-[.H616]" table:style-name="ce15">
            <text:p>-9</text:p>
          </table:table-cell>
          <table:table-cell office:value-type="percentage" office:value="-4.2075736325385693E-3" table:formula="of:=([.I617]-[.I616])/[.I616]" table:style-name="ce16">
            <text:p>0%</text:p>
          </table:table-cell>
          <table:table-cell office:value-type="string" office:string-value="Valid" table:formula="of:=IF([.F616]&lt;=[.E616]; &quot;Valid&quot;; &quot;Invalid&quot;)" table:style-name="ce17">
            <text:p>Valid</text:p>
          </table:table-cell>
          <table:table-cell office:value-type="string" office:string-value="Valid" table:formula="of:=IF([.H616]&lt;=[.G616]; &quot;Valid&quot;; &quot;Invalid&quot;)" table:style-name="ce17">
            <text:p>Valid</text:p>
          </table:table-cell>
          <table:table-cell office:value-type="string" office:string-value="Stable/Reducing" table:formula="of:=IF([.J616]&gt;0; &quot;Increasing Pressure&quot;; &quot;Stable/Reducing&quot;)" table:style-name="ce18">
            <text:p>Stable/Reducing</text:p>
          </table:table-cell>
          <table:table-cell office:value-type="float" office:value="2.2857142857142856" table:formula="of:=IFERROR([.H616]/[.F616]; 0)" table:style-name="ce17">
            <text:p>2.285714286</text:p>
          </table:table-cell>
          <table:table-cell office:value-type="float" office:value="2112" table:formula="of:=AVERAGE([.I616:.I622])" table:style-name="ce15">
            <text:p>2112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7-22T00:00:00" table:style-name="ce14">
            <text:p>22-07-2025</text:p>
          </table:table-cell>
          <table:table-cell office:value-type="string" office:string-value="July" table:formula="of:=TEXT([.A617]; &quot;mmmm&quot;)" table:style-name="ce14">
            <text:p>July</text:p>
          </table:table-cell>
          <table:table-cell office:value-type="string" office:string-value="2025-07" table:formula="of:=TEXT([.A617]; &quot;yyyy-mm&quot;)" table:style-name="ce14">
            <text:p>2025-07</text:p>
          </table:table-cell>
          <table:table-cell office:value-type="float" office:value="5" table:style-name="ce9">
            <text:p>5</text:p>
          </table:table-cell>
          <table:table-cell office:value-type="float" office:value="13" table:style-name="ce9">
            <text:p>13</text:p>
          </table:table-cell>
          <table:table-cell office:value-type="float" office:value="3" table:style-name="ce9">
            <text:p>3</text:p>
          </table:table-cell>
          <table:table-cell office:value-type="float" office:value="2117" table:style-name="ce9">
            <text:p>2117</text:p>
          </table:table-cell>
          <table:table-cell office:value-type="float" office:value="16" table:style-name="ce9">
            <text:p>16</text:p>
          </table:table-cell>
          <table:table-cell office:value-type="float" office:value="2130" table:formula="of:=SUM([.G617]+[.E617])" table:style-name="ce15">
            <text:p>2130</text:p>
          </table:table-cell>
          <table:table-cell office:value-type="float" office:value="-13" table:formula="of:=[.F617]-[.H617]" table:style-name="ce15">
            <text:p>-13</text:p>
          </table:table-cell>
          <table:table-cell office:value-type="percentage" office:value="9.3896713615023472E-4" table:formula="of:=([.I618]-[.I617])/[.I617]" table:style-name="ce16">
            <text:p>0%</text:p>
          </table:table-cell>
          <table:table-cell office:value-type="string" office:string-value="Valid" table:formula="of:=IF([.F617]&lt;=[.E617]; &quot;Valid&quot;; &quot;Invalid&quot;)" table:style-name="ce17">
            <text:p>Valid</text:p>
          </table:table-cell>
          <table:table-cell office:value-type="string" office:string-value="Valid" table:formula="of:=IF([.H617]&lt;=[.G617]; &quot;Valid&quot;; &quot;Invalid&quot;)" table:style-name="ce17">
            <text:p>Valid</text:p>
          </table:table-cell>
          <table:table-cell office:value-type="string" office:string-value="Stable/Reducing" table:formula="of:=IF([.J617]&gt;0; &quot;Increasing Pressure&quot;; &quot;Stable/Reducing&quot;)" table:style-name="ce18">
            <text:p>Stable/Reducing</text:p>
          </table:table-cell>
          <table:table-cell office:value-type="float" office:value="5.333333333333333" table:formula="of:=IFERROR([.H617]/[.F617]; 0)" table:style-name="ce17">
            <text:p>5.333333333</text:p>
          </table:table-cell>
          <table:table-cell office:value-type="float" office:value="2103.2857142857142" table:formula="of:=AVERAGE([.I617:.I623])" table:style-name="ce15">
            <text:p>2103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7-23T00:00:00" table:style-name="ce14">
            <text:p>23-07-2025</text:p>
          </table:table-cell>
          <table:table-cell office:value-type="string" office:string-value="July" table:formula="of:=TEXT([.A618]; &quot;mmmm&quot;)" table:style-name="ce14">
            <text:p>July</text:p>
          </table:table-cell>
          <table:table-cell office:value-type="string" office:string-value="2025-07" table:formula="of:=TEXT([.A618]; &quot;yyyy-mm&quot;)" table:style-name="ce14">
            <text:p>2025-07</text:p>
          </table:table-cell>
          <table:table-cell office:value-type="float" office:value="6" table:style-name="ce9">
            <text:p>6</text:p>
          </table:table-cell>
          <table:table-cell office:value-type="float" office:value="21" table:style-name="ce9">
            <text:p>21</text:p>
          </table:table-cell>
          <table:table-cell office:value-type="float" office:value="5" table:style-name="ce9">
            <text:p>5</text:p>
          </table:table-cell>
          <table:table-cell office:value-type="float" office:value="2111" table:style-name="ce9">
            <text:p>2111</text:p>
          </table:table-cell>
          <table:table-cell office:value-type="float" office:value="14" table:style-name="ce9">
            <text:p>14</text:p>
          </table:table-cell>
          <table:table-cell office:value-type="float" office:value="2132" table:formula="of:=SUM([.G618]+[.E618])" table:style-name="ce15">
            <text:p>2132</text:p>
          </table:table-cell>
          <table:table-cell office:value-type="float" office:value="-9" table:formula="of:=[.F618]-[.H618]" table:style-name="ce15">
            <text:p>-9</text:p>
          </table:table-cell>
          <table:table-cell office:value-type="percentage" office:value="-8.4427767354596627E-3" table:formula="of:=([.I619]-[.I618])/[.I618]" table:style-name="ce16">
            <text:p>-1%</text:p>
          </table:table-cell>
          <table:table-cell office:value-type="string" office:string-value="Valid" table:formula="of:=IF([.F618]&lt;=[.E618]; &quot;Valid&quot;; &quot;Invalid&quot;)" table:style-name="ce17">
            <text:p>Valid</text:p>
          </table:table-cell>
          <table:table-cell office:value-type="string" office:string-value="Valid" table:formula="of:=IF([.H618]&lt;=[.G618]; &quot;Valid&quot;; &quot;Invalid&quot;)" table:style-name="ce17">
            <text:p>Valid</text:p>
          </table:table-cell>
          <table:table-cell office:value-type="string" office:string-value="Stable/Reducing" table:formula="of:=IF([.J618]&gt;0; &quot;Increasing Pressure&quot;; &quot;Stable/Reducing&quot;)" table:style-name="ce18">
            <text:p>Stable/Reducing</text:p>
          </table:table-cell>
          <table:table-cell office:value-type="float" office:value="2.8" table:formula="of:=IFERROR([.H618]/[.F618]; 0)" table:style-name="ce17">
            <text:p>2.8</text:p>
          </table:table-cell>
          <table:table-cell office:value-type="float" office:value="2094.2857142857142" table:formula="of:=AVERAGE([.I618:.I624])" table:style-name="ce15">
            <text:p>2094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7-24T00:00:00" table:style-name="ce14">
            <text:p>24-07-2025</text:p>
          </table:table-cell>
          <table:table-cell office:value-type="string" office:string-value="July" table:formula="of:=TEXT([.A619]; &quot;mmmm&quot;)" table:style-name="ce14">
            <text:p>July</text:p>
          </table:table-cell>
          <table:table-cell office:value-type="string" office:string-value="2025-07" table:formula="of:=TEXT([.A619]; &quot;yyyy-mm&quot;)" table:style-name="ce14">
            <text:p>2025-07</text:p>
          </table:table-cell>
          <table:table-cell office:value-type="float" office:value="6" table:style-name="ce9">
            <text:p>6</text:p>
          </table:table-cell>
          <table:table-cell office:value-type="float" office:value="18" table:style-name="ce9">
            <text:p>18</text:p>
          </table:table-cell>
          <table:table-cell office:value-type="float" office:value="7" table:style-name="ce9">
            <text:p>7</text:p>
          </table:table-cell>
          <table:table-cell office:value-type="float" office:value="2096" table:style-name="ce9">
            <text:p>2096</text:p>
          </table:table-cell>
          <table:table-cell office:value-type="float" office:value="29" table:style-name="ce9">
            <text:p>29</text:p>
          </table:table-cell>
          <table:table-cell office:value-type="float" office:value="2114" table:formula="of:=SUM([.G619]+[.E619])" table:style-name="ce15">
            <text:p>2114</text:p>
          </table:table-cell>
          <table:table-cell office:value-type="float" office:value="-22" table:formula="of:=[.F619]-[.H619]" table:style-name="ce15">
            <text:p>-22</text:p>
          </table:table-cell>
          <table:table-cell office:value-type="percentage" office:value="-6.6225165562913907E-3" table:formula="of:=([.I620]-[.I619])/[.I619]" table:style-name="ce16">
            <text:p>-1%</text:p>
          </table:table-cell>
          <table:table-cell office:value-type="string" office:string-value="Valid" table:formula="of:=IF([.F619]&lt;=[.E619]; &quot;Valid&quot;; &quot;Invalid&quot;)" table:style-name="ce17">
            <text:p>Valid</text:p>
          </table:table-cell>
          <table:table-cell office:value-type="string" office:string-value="Valid" table:formula="of:=IF([.H619]&lt;=[.G619]; &quot;Valid&quot;; &quot;Invalid&quot;)" table:style-name="ce17">
            <text:p>Valid</text:p>
          </table:table-cell>
          <table:table-cell office:value-type="string" office:string-value="Stable/Reducing" table:formula="of:=IF([.J619]&gt;0; &quot;Increasing Pressure&quot;; &quot;Stable/Reducing&quot;)" table:style-name="ce18">
            <text:p>Stable/Reducing</text:p>
          </table:table-cell>
          <table:table-cell office:value-type="float" office:value="4.1428571428571432" table:formula="of:=IFERROR([.H619]/[.F619]; 0)" table:style-name="ce17">
            <text:p>4.142857143</text:p>
          </table:table-cell>
          <table:table-cell office:value-type="float" office:value="2086.1428571428573" table:formula="of:=AVERAGE([.I619:.I625])" table:style-name="ce15">
            <text:p>2086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7-27T00:00:00" table:style-name="ce14">
            <text:p>27-07-2025</text:p>
          </table:table-cell>
          <table:table-cell office:value-type="string" office:string-value="July" table:formula="of:=TEXT([.A620]; &quot;mmmm&quot;)" table:style-name="ce14">
            <text:p>July</text:p>
          </table:table-cell>
          <table:table-cell office:value-type="string" office:string-value="2025-07" table:formula="of:=TEXT([.A620]; &quot;yyyy-mm&quot;)" table:style-name="ce14">
            <text:p>2025-07</text:p>
          </table:table-cell>
          <table:table-cell office:value-type="float" office:value="1" table:style-name="ce9">
            <text:p>1</text:p>
          </table:table-cell>
          <table:table-cell office:value-type="float" office:value="12" table:style-name="ce9">
            <text:p>12</text:p>
          </table:table-cell>
          <table:table-cell office:value-type="float" office:value="2" table:style-name="ce9">
            <text:p>2</text:p>
          </table:table-cell>
          <table:table-cell office:value-type="float" office:value="2088" table:style-name="ce9">
            <text:p>2088</text:p>
          </table:table-cell>
          <table:table-cell office:value-type="float" office:value="4" table:style-name="ce9">
            <text:p>4</text:p>
          </table:table-cell>
          <table:table-cell office:value-type="float" office:value="2100" table:formula="of:=SUM([.G620]+[.E620])" table:style-name="ce15">
            <text:p>2100</text:p>
          </table:table-cell>
          <table:table-cell office:value-type="float" office:value="-2" table:formula="of:=[.F620]-[.H620]" table:style-name="ce15">
            <text:p>-2</text:p>
          </table:table-cell>
          <table:table-cell office:value-type="percentage" office:value="-5.2380952380952379E-3" table:formula="of:=([.I621]-[.I620])/[.I620]" table:style-name="ce16">
            <text:p>-1%</text:p>
          </table:table-cell>
          <table:table-cell office:value-type="string" office:string-value="Valid" table:formula="of:=IF([.F620]&lt;=[.E620]; &quot;Valid&quot;; &quot;Invalid&quot;)" table:style-name="ce17">
            <text:p>Valid</text:p>
          </table:table-cell>
          <table:table-cell office:value-type="string" office:string-value="Valid" table:formula="of:=IF([.H620]&lt;=[.G620]; &quot;Valid&quot;; &quot;Invalid&quot;)" table:style-name="ce17">
            <text:p>Valid</text:p>
          </table:table-cell>
          <table:table-cell office:value-type="string" office:string-value="Stable/Reducing" table:formula="of:=IF([.J620]&gt;0; &quot;Increasing Pressure&quot;; &quot;Stable/Reducing&quot;)" table:style-name="ce18">
            <text:p>Stable/Reducing</text:p>
          </table:table-cell>
          <table:table-cell office:value-type="float" office:value="2" table:formula="of:=IFERROR([.H620]/[.F620]; 0)" table:style-name="ce17">
            <text:p>2</text:p>
          </table:table-cell>
          <table:table-cell office:value-type="float" office:value="2078.7142857142858" table:formula="of:=AVERAGE([.I620:.I626])" table:style-name="ce15">
            <text:p>2079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7-28T00:00:00" table:style-name="ce14">
            <text:p>28-07-2025</text:p>
          </table:table-cell>
          <table:table-cell office:value-type="string" office:string-value="July" table:formula="of:=TEXT([.A621]; &quot;mmmm&quot;)" table:style-name="ce14">
            <text:p>July</text:p>
          </table:table-cell>
          <table:table-cell office:value-type="string" office:string-value="2025-07" table:formula="of:=TEXT([.A621]; &quot;yyyy-mm&quot;)" table:style-name="ce14">
            <text:p>2025-07</text:p>
          </table:table-cell>
          <table:table-cell office:value-type="float" office:value="2" table:style-name="ce9">
            <text:p>2</text:p>
          </table:table-cell>
          <table:table-cell office:value-type="float" office:value="9" table:style-name="ce9">
            <text:p>9</text:p>
          </table:table-cell>
          <table:table-cell office:value-type="float" office:value="3" table:style-name="ce9">
            <text:p>3</text:p>
          </table:table-cell>
          <table:table-cell office:value-type="float" office:value="2080" table:style-name="ce9">
            <text:p>2080</text:p>
          </table:table-cell>
          <table:table-cell office:value-type="float" office:value="14" table:style-name="ce9">
            <text:p>14</text:p>
          </table:table-cell>
          <table:table-cell office:value-type="float" office:value="2089" table:formula="of:=SUM([.G621]+[.E621])" table:style-name="ce15">
            <text:p>2089</text:p>
          </table:table-cell>
          <table:table-cell office:value-type="float" office:value="-11" table:formula="of:=[.F621]-[.H621]" table:style-name="ce15">
            <text:p>-11</text:p>
          </table:table-cell>
          <table:table-cell office:value-type="percentage" office:value="-4.3082814743896601E-3" table:formula="of:=([.I622]-[.I621])/[.I621]" table:style-name="ce16">
            <text:p>0%</text:p>
          </table:table-cell>
          <table:table-cell office:value-type="string" office:string-value="Valid" table:formula="of:=IF([.F621]&lt;=[.E621]; &quot;Valid&quot;; &quot;Invalid&quot;)" table:style-name="ce17">
            <text:p>Valid</text:p>
          </table:table-cell>
          <table:table-cell office:value-type="string" office:string-value="Valid" table:formula="of:=IF([.H621]&lt;=[.G621]; &quot;Valid&quot;; &quot;Invalid&quot;)" table:style-name="ce17">
            <text:p>Valid</text:p>
          </table:table-cell>
          <table:table-cell office:value-type="string" office:string-value="Stable/Reducing" table:formula="of:=IF([.J621]&gt;0; &quot;Increasing Pressure&quot;; &quot;Stable/Reducing&quot;)" table:style-name="ce18">
            <text:p>Stable/Reducing</text:p>
          </table:table-cell>
          <table:table-cell office:value-type="float" office:value="4.666666666666667" table:formula="of:=IFERROR([.H621]/[.F621]; 0)" table:style-name="ce17">
            <text:p>4.666666667</text:p>
          </table:table-cell>
          <table:table-cell office:value-type="float" office:value="2073.4285714285716" table:formula="of:=AVERAGE([.I621:.I627])" table:style-name="ce15">
            <text:p>2073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7-29T00:00:00" table:style-name="ce14">
            <text:p>29-07-2025</text:p>
          </table:table-cell>
          <table:table-cell office:value-type="string" office:string-value="July" table:formula="of:=TEXT([.A622]; &quot;mmmm&quot;)" table:style-name="ce14">
            <text:p>July</text:p>
          </table:table-cell>
          <table:table-cell office:value-type="string" office:string-value="2025-07" table:formula="of:=TEXT([.A622]; &quot;yyyy-mm&quot;)" table:style-name="ce14">
            <text:p>2025-07</text:p>
          </table:table-cell>
          <table:table-cell office:value-type="float" office:value="2" table:style-name="ce9">
            <text:p>2</text:p>
          </table:table-cell>
          <table:table-cell office:value-type="float" office:value="8" table:style-name="ce9">
            <text:p>8</text:p>
          </table:table-cell>
          <table:table-cell office:value-type="float" office:value="3" table:style-name="ce9">
            <text:p>3</text:p>
          </table:table-cell>
          <table:table-cell office:value-type="float" office:value="2072" table:style-name="ce9">
            <text:p>2072</text:p>
          </table:table-cell>
          <table:table-cell office:value-type="float" office:value="12" table:style-name="ce9">
            <text:p>12</text:p>
          </table:table-cell>
          <table:table-cell office:value-type="float" office:value="2080" table:formula="of:=SUM([.G622]+[.E622])" table:style-name="ce15">
            <text:p>2080</text:p>
          </table:table-cell>
          <table:table-cell office:value-type="float" office:value="-9" table:formula="of:=[.F622]-[.H622]" table:style-name="ce15">
            <text:p>-9</text:p>
          </table:table-cell>
          <table:table-cell office:value-type="percentage" office:value="-9.6153846153846159E-4" table:formula="of:=([.I623]-[.I622])/[.I622]" table:style-name="ce16">
            <text:p>0%</text:p>
          </table:table-cell>
          <table:table-cell office:value-type="string" office:string-value="Valid" table:formula="of:=IF([.F622]&lt;=[.E622]; &quot;Valid&quot;; &quot;Invalid&quot;)" table:style-name="ce17">
            <text:p>Valid</text:p>
          </table:table-cell>
          <table:table-cell office:value-type="string" office:string-value="Valid" table:formula="of:=IF([.H622]&lt;=[.G622]; &quot;Valid&quot;; &quot;Invalid&quot;)" table:style-name="ce17">
            <text:p>Valid</text:p>
          </table:table-cell>
          <table:table-cell office:value-type="string" office:string-value="Stable/Reducing" table:formula="of:=IF([.J622]&gt;0; &quot;Increasing Pressure&quot;; &quot;Stable/Reducing&quot;)" table:style-name="ce18">
            <text:p>Stable/Reducing</text:p>
          </table:table-cell>
          <table:table-cell office:value-type="float" office:value="4" table:formula="of:=IFERROR([.H622]/[.F622]; 0)" table:style-name="ce17">
            <text:p>4</text:p>
          </table:table-cell>
          <table:table-cell office:value-type="float" office:value="2068.2857142857142" table:formula="of:=AVERAGE([.I622:.I628])" table:style-name="ce15">
            <text:p>2068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7-30T00:00:00" table:style-name="ce14">
            <text:p>30-07-2025</text:p>
          </table:table-cell>
          <table:table-cell office:value-type="string" office:string-value="July" table:formula="of:=TEXT([.A623]; &quot;mmmm&quot;)" table:style-name="ce14">
            <text:p>July</text:p>
          </table:table-cell>
          <table:table-cell office:value-type="string" office:string-value="2025-07" table:formula="of:=TEXT([.A623]; &quot;yyyy-mm&quot;)" table:style-name="ce14">
            <text:p>2025-07</text:p>
          </table:table-cell>
          <table:table-cell office:value-type="float" office:value="4" table:style-name="ce9">
            <text:p>4</text:p>
          </table:table-cell>
          <table:table-cell office:value-type="float" office:value="15" table:style-name="ce9">
            <text:p>15</text:p>
          </table:table-cell>
          <table:table-cell office:value-type="float" office:value="4" table:style-name="ce9">
            <text:p>4</text:p>
          </table:table-cell>
          <table:table-cell office:value-type="float" office:value="2063" table:style-name="ce9">
            <text:p>2063</text:p>
          </table:table-cell>
          <table:table-cell office:value-type="float" office:value="16" table:style-name="ce9">
            <text:p>16</text:p>
          </table:table-cell>
          <table:table-cell office:value-type="float" office:value="2078" table:formula="of:=SUM([.G623]+[.E623])" table:style-name="ce15">
            <text:p>2078</text:p>
          </table:table-cell>
          <table:table-cell office:value-type="float" office:value="-12" table:formula="of:=[.F623]-[.H623]" table:style-name="ce15">
            <text:p>-12</text:p>
          </table:table-cell>
          <table:table-cell office:value-type="percentage" office:value="-5.2935514918190565E-3" table:formula="of:=([.I624]-[.I623])/[.I623]" table:style-name="ce16">
            <text:p>-1%</text:p>
          </table:table-cell>
          <table:table-cell office:value-type="string" office:string-value="Valid" table:formula="of:=IF([.F623]&lt;=[.E623]; &quot;Valid&quot;; &quot;Invalid&quot;)" table:style-name="ce17">
            <text:p>Valid</text:p>
          </table:table-cell>
          <table:table-cell office:value-type="string" office:string-value="Valid" table:formula="of:=IF([.H623]&lt;=[.G623]; &quot;Valid&quot;; &quot;Invalid&quot;)" table:style-name="ce17">
            <text:p>Valid</text:p>
          </table:table-cell>
          <table:table-cell office:value-type="string" office:string-value="Stable/Reducing" table:formula="of:=IF([.J623]&gt;0; &quot;Increasing Pressure&quot;; &quot;Stable/Reducing&quot;)" table:style-name="ce18">
            <text:p>Stable/Reducing</text:p>
          </table:table-cell>
          <table:table-cell office:value-type="float" office:value="4" table:formula="of:=IFERROR([.H623]/[.F623]; 0)" table:style-name="ce17">
            <text:p>4</text:p>
          </table:table-cell>
          <table:table-cell office:value-type="float" office:value="2063.8571428571427" table:formula="of:=AVERAGE([.I623:.I629])" table:style-name="ce15">
            <text:p>2064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7-31T00:00:00" table:style-name="ce14">
            <text:p>31-07-2025</text:p>
          </table:table-cell>
          <table:table-cell office:value-type="string" office:string-value="July" table:formula="of:=TEXT([.A624]; &quot;mmmm&quot;)" table:style-name="ce14">
            <text:p>July</text:p>
          </table:table-cell>
          <table:table-cell office:value-type="string" office:string-value="2025-07" table:formula="of:=TEXT([.A624]; &quot;yyyy-mm&quot;)" table:style-name="ce14">
            <text:p>2025-07</text:p>
          </table:table-cell>
          <table:table-cell office:value-type="float" office:value="2" table:style-name="ce9">
            <text:p>2</text:p>
          </table:table-cell>
          <table:table-cell office:value-type="float" office:value="9" table:style-name="ce9">
            <text:p>9</text:p>
          </table:table-cell>
          <table:table-cell office:value-type="float" office:value="6" table:style-name="ce9">
            <text:p>6</text:p>
          </table:table-cell>
          <table:table-cell office:value-type="float" office:value="2058" table:style-name="ce9">
            <text:p>2058</text:p>
          </table:table-cell>
          <table:table-cell office:value-type="float" office:value="15" table:style-name="ce9">
            <text:p>15</text:p>
          </table:table-cell>
          <table:table-cell office:value-type="float" office:value="2067" table:formula="of:=SUM([.G624]+[.E624])" table:style-name="ce15">
            <text:p>2067</text:p>
          </table:table-cell>
          <table:table-cell office:value-type="float" office:value="-9" table:formula="of:=[.F624]-[.H624]" table:style-name="ce15">
            <text:p>-9</text:p>
          </table:table-cell>
          <table:table-cell office:value-type="percentage" office:value="3.8703434929850023E-3" table:formula="of:=([.I625]-[.I624])/[.I624]" table:style-name="ce16">
            <text:p>0%</text:p>
          </table:table-cell>
          <table:table-cell office:value-type="string" office:string-value="Valid" table:formula="of:=IF([.F624]&lt;=[.E624]; &quot;Valid&quot;; &quot;Invalid&quot;)" table:style-name="ce17">
            <text:p>Valid</text:p>
          </table:table-cell>
          <table:table-cell office:value-type="string" office:string-value="Valid" table:formula="of:=IF([.H624]&lt;=[.G624]; &quot;Valid&quot;; &quot;Invalid&quot;)" table:style-name="ce17">
            <text:p>Valid</text:p>
          </table:table-cell>
          <table:table-cell office:value-type="string" office:string-value="Stable/Reducing" table:formula="of:=IF([.J624]&gt;0; &quot;Increasing Pressure&quot;; &quot;Stable/Reducing&quot;)" table:style-name="ce18">
            <text:p>Stable/Reducing</text:p>
          </table:table-cell>
          <table:table-cell office:value-type="float" office:value="2.5" table:formula="of:=IFERROR([.H624]/[.F624]; 0)" table:style-name="ce17">
            <text:p>2.5</text:p>
          </table:table-cell>
          <table:table-cell office:value-type="float" office:value="2056.1428571428573" table:formula="of:=AVERAGE([.I624:.I630])" table:style-name="ce15">
            <text:p>2056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8-03T00:00:00" table:style-name="ce14">
            <text:p>03-08-2025</text:p>
          </table:table-cell>
          <table:table-cell office:value-type="string" office:string-value="August" table:formula="of:=TEXT([.A625]; &quot;mmmm&quot;)" table:style-name="ce14">
            <text:p>August</text:p>
          </table:table-cell>
          <table:table-cell office:value-type="string" office:string-value="2025-08" table:formula="of:=TEXT([.A625]; &quot;yyyy-mm&quot;)" table:style-name="ce14">
            <text:p>2025-08</text:p>
          </table:table-cell>
          <table:table-cell office:value-type="float" office:value="5" table:style-name="ce9">
            <text:p>5</text:p>
          </table:table-cell>
          <table:table-cell office:value-type="float" office:value="26" table:style-name="ce9">
            <text:p>26</text:p>
          </table:table-cell>
          <table:table-cell office:value-type="float" office:value="3" table:style-name="ce9">
            <text:p>3</text:p>
          </table:table-cell>
          <table:table-cell office:value-type="float" office:value="2049" table:style-name="ce9">
            <text:p>2049</text:p>
          </table:table-cell>
          <table:table-cell office:value-type="float" office:value="5" table:style-name="ce9">
            <text:p>5</text:p>
          </table:table-cell>
          <table:table-cell office:value-type="float" office:value="2075" table:formula="of:=SUM([.G625]+[.E625])" table:style-name="ce15">
            <text:p>2075</text:p>
          </table:table-cell>
          <table:table-cell office:value-type="float" office:value="-2" table:formula="of:=[.F625]-[.H625]" table:style-name="ce15">
            <text:p>-2</text:p>
          </table:table-cell>
          <table:table-cell office:value-type="percentage" office:value="-6.265060240963855E-3" table:formula="of:=([.I626]-[.I625])/[.I625]" table:style-name="ce16">
            <text:p>-1%</text:p>
          </table:table-cell>
          <table:table-cell office:value-type="string" office:string-value="Valid" table:formula="of:=IF([.F625]&lt;=[.E625]; &quot;Valid&quot;; &quot;Invalid&quot;)" table:style-name="ce17">
            <text:p>Valid</text:p>
          </table:table-cell>
          <table:table-cell office:value-type="string" office:string-value="Valid" table:formula="of:=IF([.H625]&lt;=[.G625]; &quot;Valid&quot;; &quot;Invalid&quot;)" table:style-name="ce17">
            <text:p>Valid</text:p>
          </table:table-cell>
          <table:table-cell office:value-type="string" office:string-value="Stable/Reducing" table:formula="of:=IF([.J625]&gt;0; &quot;Increasing Pressure&quot;; &quot;Stable/Reducing&quot;)" table:style-name="ce18">
            <text:p>Stable/Reducing</text:p>
          </table:table-cell>
          <table:table-cell office:value-type="float" office:value="1.6666666666666667" table:formula="of:=IFERROR([.H625]/[.F625]; 0)" table:style-name="ce17">
            <text:p>1.666666667</text:p>
          </table:table-cell>
          <table:table-cell office:value-type="float" office:value="2049.7142857142858" table:formula="of:=AVERAGE([.I625:.I631])" table:style-name="ce15">
            <text:p>2050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8-04T00:00:00" table:style-name="ce14">
            <text:p>04-08-2025</text:p>
          </table:table-cell>
          <table:table-cell office:value-type="string" office:string-value="August" table:formula="of:=TEXT([.A626]; &quot;mmmm&quot;)" table:style-name="ce14">
            <text:p>August</text:p>
          </table:table-cell>
          <table:table-cell office:value-type="string" office:string-value="2025-08" table:formula="of:=TEXT([.A626]; &quot;yyyy-mm&quot;)" table:style-name="ce14">
            <text:p>2025-08</text:p>
          </table:table-cell>
          <table:table-cell office:value-type="float" office:value="5" table:style-name="ce9">
            <text:p>5</text:p>
          </table:table-cell>
          <table:table-cell office:value-type="float" office:value="22" table:style-name="ce9">
            <text:p>22</text:p>
          </table:table-cell>
          <table:table-cell office:value-type="float" office:value="11" table:style-name="ce9">
            <text:p>11</text:p>
          </table:table-cell>
          <table:table-cell office:value-type="float" office:value="2040" table:style-name="ce9">
            <text:p>2040</text:p>
          </table:table-cell>
          <table:table-cell office:value-type="float" office:value="14" table:style-name="ce9">
            <text:p>14</text:p>
          </table:table-cell>
          <table:table-cell office:value-type="float" office:value="2062" table:formula="of:=SUM([.G626]+[.E626])" table:style-name="ce15">
            <text:p>2062</text:p>
          </table:table-cell>
          <table:table-cell office:value-type="float" office:value="-3" table:formula="of:=[.F626]-[.H626]" table:style-name="ce15">
            <text:p>-3</text:p>
          </table:table-cell>
          <table:table-cell office:value-type="percentage" office:value="4.8496605237633366E-4" table:formula="of:=([.I627]-[.I626])/[.I626]" table:style-name="ce16">
            <text:p>0%</text:p>
          </table:table-cell>
          <table:table-cell office:value-type="string" office:string-value="Valid" table:formula="of:=IF([.F626]&lt;=[.E626]; &quot;Valid&quot;; &quot;Invalid&quot;)" table:style-name="ce17">
            <text:p>Valid</text:p>
          </table:table-cell>
          <table:table-cell office:value-type="string" office:string-value="Valid" table:formula="of:=IF([.H626]&lt;=[.G626]; &quot;Valid&quot;; &quot;Invalid&quot;)" table:style-name="ce17">
            <text:p>Valid</text:p>
          </table:table-cell>
          <table:table-cell office:value-type="string" office:string-value="Stable/Reducing" table:formula="of:=IF([.J626]&gt;0; &quot;Increasing Pressure&quot;; &quot;Stable/Reducing&quot;)" table:style-name="ce18">
            <text:p>Stable/Reducing</text:p>
          </table:table-cell>
          <table:table-cell office:value-type="float" office:value="1.2727272727272727" table:formula="of:=IFERROR([.H626]/[.F626]; 0)" table:style-name="ce17">
            <text:p>1.272727273</text:p>
          </table:table-cell>
          <table:table-cell office:value-type="float" office:value="2044.2857142857142" table:formula="of:=AVERAGE([.I626:.I632])" table:style-name="ce15">
            <text:p>2044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8-05T00:00:00" table:style-name="ce14">
            <text:p>05-08-2025</text:p>
          </table:table-cell>
          <table:table-cell office:value-type="string" office:string-value="August" table:formula="of:=TEXT([.A627]; &quot;mmmm&quot;)" table:style-name="ce14">
            <text:p>August</text:p>
          </table:table-cell>
          <table:table-cell office:value-type="string" office:string-value="2025-08" table:formula="of:=TEXT([.A627]; &quot;yyyy-mm&quot;)" table:style-name="ce14">
            <text:p>2025-08</text:p>
          </table:table-cell>
          <table:table-cell office:value-type="float" office:value="2" table:style-name="ce9">
            <text:p>2</text:p>
          </table:table-cell>
          <table:table-cell office:value-type="float" office:value="21" table:style-name="ce9">
            <text:p>21</text:p>
          </table:table-cell>
          <table:table-cell office:value-type="float" office:value="10" table:style-name="ce9">
            <text:p>10</text:p>
          </table:table-cell>
          <table:table-cell office:value-type="float" office:value="2042" table:style-name="ce9">
            <text:p>2042</text:p>
          </table:table-cell>
          <table:table-cell office:value-type="float" office:value="14" table:style-name="ce9">
            <text:p>14</text:p>
          </table:table-cell>
          <table:table-cell office:value-type="float" office:value="2063" table:formula="of:=SUM([.G627]+[.E627])" table:style-name="ce15">
            <text:p>2063</text:p>
          </table:table-cell>
          <table:table-cell office:value-type="float" office:value="-4" table:formula="of:=[.F627]-[.H627]" table:style-name="ce15">
            <text:p>-4</text:p>
          </table:table-cell>
          <table:table-cell office:value-type="percentage" office:value="-4.8473097430925833E-3" table:formula="of:=([.I628]-[.I627])/[.I627]" table:style-name="ce16">
            <text:p>0%</text:p>
          </table:table-cell>
          <table:table-cell office:value-type="string" office:string-value="Valid" table:formula="of:=IF([.F627]&lt;=[.E627]; &quot;Valid&quot;; &quot;Invalid&quot;)" table:style-name="ce17">
            <text:p>Valid</text:p>
          </table:table-cell>
          <table:table-cell office:value-type="string" office:string-value="Valid" table:formula="of:=IF([.H627]&lt;=[.G627]; &quot;Valid&quot;; &quot;Invalid&quot;)" table:style-name="ce17">
            <text:p>Valid</text:p>
          </table:table-cell>
          <table:table-cell office:value-type="string" office:string-value="Stable/Reducing" table:formula="of:=IF([.J627]&gt;0; &quot;Increasing Pressure&quot;; &quot;Stable/Reducing&quot;)" table:style-name="ce18">
            <text:p>Stable/Reducing</text:p>
          </table:table-cell>
          <table:table-cell office:value-type="float" office:value="1.4" table:formula="of:=IFERROR([.H627]/[.F627]; 0)" table:style-name="ce17">
            <text:p>1.4</text:p>
          </table:table-cell>
          <table:table-cell office:value-type="float" office:value="2038.1428571428571" table:formula="of:=AVERAGE([.I627:.I633])" table:style-name="ce15">
            <text:p>2038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8-06T00:00:00" table:style-name="ce14">
            <text:p>06-08-2025</text:p>
          </table:table-cell>
          <table:table-cell office:value-type="string" office:string-value="August" table:formula="of:=TEXT([.A628]; &quot;mmmm&quot;)" table:style-name="ce14">
            <text:p>August</text:p>
          </table:table-cell>
          <table:table-cell office:value-type="string" office:string-value="2025-08" table:formula="of:=TEXT([.A628]; &quot;yyyy-mm&quot;)" table:style-name="ce14">
            <text:p>2025-08</text:p>
          </table:table-cell>
          <table:table-cell office:value-type="float" office:value="4" table:style-name="ce9">
            <text:p>4</text:p>
          </table:table-cell>
          <table:table-cell office:value-type="float" office:value="17" table:style-name="ce9">
            <text:p>17</text:p>
          </table:table-cell>
          <table:table-cell office:value-type="float" office:value="3" table:style-name="ce9">
            <text:p>3</text:p>
          </table:table-cell>
          <table:table-cell office:value-type="float" office:value="2036" table:style-name="ce9">
            <text:p>2036</text:p>
          </table:table-cell>
          <table:table-cell office:value-type="float" office:value="13" table:style-name="ce9">
            <text:p>13</text:p>
          </table:table-cell>
          <table:table-cell office:value-type="float" office:value="2053" table:formula="of:=SUM([.G628]+[.E628])" table:style-name="ce15">
            <text:p>2053</text:p>
          </table:table-cell>
          <table:table-cell office:value-type="float" office:value="-10" table:formula="of:=[.F628]-[.H628]" table:style-name="ce15">
            <text:p>-10</text:p>
          </table:table-cell>
          <table:table-cell office:value-type="percentage" office:value="-1.948368241597662E-3" table:formula="of:=([.I629]-[.I628])/[.I628]" table:style-name="ce16">
            <text:p>0%</text:p>
          </table:table-cell>
          <table:table-cell office:value-type="string" office:string-value="Valid" table:formula="of:=IF([.F628]&lt;=[.E628]; &quot;Valid&quot;; &quot;Invalid&quot;)" table:style-name="ce17">
            <text:p>Valid</text:p>
          </table:table-cell>
          <table:table-cell office:value-type="string" office:string-value="Valid" table:formula="of:=IF([.H628]&lt;=[.G628]; &quot;Valid&quot;; &quot;Invalid&quot;)" table:style-name="ce17">
            <text:p>Valid</text:p>
          </table:table-cell>
          <table:table-cell office:value-type="string" office:string-value="Stable/Reducing" table:formula="of:=IF([.J628]&gt;0; &quot;Increasing Pressure&quot;; &quot;Stable/Reducing&quot;)" table:style-name="ce18">
            <text:p>Stable/Reducing</text:p>
          </table:table-cell>
          <table:table-cell office:value-type="float" office:value="4.333333333333333" table:formula="of:=IFERROR([.H628]/[.F628]; 0)" table:style-name="ce17">
            <text:p>4.333333333</text:p>
          </table:table-cell>
          <table:table-cell office:value-type="float" office:value="2032.1428571428571" table:formula="of:=AVERAGE([.I628:.I634])" table:style-name="ce15">
            <text:p>2032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8-07T00:00:00" table:style-name="ce14">
            <text:p>07-08-2025</text:p>
          </table:table-cell>
          <table:table-cell office:value-type="string" office:string-value="August" table:formula="of:=TEXT([.A629]; &quot;mmmm&quot;)" table:style-name="ce14">
            <text:p>August</text:p>
          </table:table-cell>
          <table:table-cell office:value-type="string" office:string-value="2025-08" table:formula="of:=TEXT([.A629]; &quot;yyyy-mm&quot;)" table:style-name="ce14">
            <text:p>2025-08</text:p>
          </table:table-cell>
          <table:table-cell office:value-type="float" office:value="4" table:style-name="ce9">
            <text:p>4</text:p>
          </table:table-cell>
          <table:table-cell office:value-type="float" office:value="18" table:style-name="ce9">
            <text:p>18</text:p>
          </table:table-cell>
          <table:table-cell office:value-type="float" office:value="6" table:style-name="ce9">
            <text:p>6</text:p>
          </table:table-cell>
          <table:table-cell office:value-type="float" office:value="2031" table:style-name="ce9">
            <text:p>2031</text:p>
          </table:table-cell>
          <table:table-cell office:value-type="float" office:value="17" table:style-name="ce9">
            <text:p>17</text:p>
          </table:table-cell>
          <table:table-cell office:value-type="float" office:value="2049" table:formula="of:=SUM([.G629]+[.E629])" table:style-name="ce15">
            <text:p>2049</text:p>
          </table:table-cell>
          <table:table-cell office:value-type="float" office:value="-11" table:formula="of:=[.F629]-[.H629]" table:style-name="ce15">
            <text:p>-11</text:p>
          </table:table-cell>
          <table:table-cell office:value-type="percentage" office:value="-1.2201073694485115E-2" table:formula="of:=([.I630]-[.I629])/[.I629]" table:style-name="ce16">
            <text:p>-1%</text:p>
          </table:table-cell>
          <table:table-cell office:value-type="string" office:string-value="Valid" table:formula="of:=IF([.F629]&lt;=[.E629]; &quot;Valid&quot;; &quot;Invalid&quot;)" table:style-name="ce17">
            <text:p>Valid</text:p>
          </table:table-cell>
          <table:table-cell office:value-type="string" office:string-value="Valid" table:formula="of:=IF([.H629]&lt;=[.G629]; &quot;Valid&quot;; &quot;Invalid&quot;)" table:style-name="ce17">
            <text:p>Valid</text:p>
          </table:table-cell>
          <table:table-cell office:value-type="string" office:string-value="Stable/Reducing" table:formula="of:=IF([.J629]&gt;0; &quot;Increasing Pressure&quot;; &quot;Stable/Reducing&quot;)" table:style-name="ce18">
            <text:p>Stable/Reducing</text:p>
          </table:table-cell>
          <table:table-cell office:value-type="float" office:value="2.8333333333333335" table:formula="of:=IFERROR([.H629]/[.F629]; 0)" table:style-name="ce17">
            <text:p>2.833333333</text:p>
          </table:table-cell>
          <table:table-cell office:value-type="float" office:value="2025.2857142857142" table:formula="of:=AVERAGE([.I629:.I635])" table:style-name="ce15">
            <text:p>2025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8-10T00:00:00" table:style-name="ce14">
            <text:p>10-08-2025</text:p>
          </table:table-cell>
          <table:table-cell office:value-type="string" office:string-value="August" table:formula="of:=TEXT([.A630]; &quot;mmmm&quot;)" table:style-name="ce14">
            <text:p>August</text:p>
          </table:table-cell>
          <table:table-cell office:value-type="string" office:string-value="2025-08" table:formula="of:=TEXT([.A630]; &quot;yyyy-mm&quot;)" table:style-name="ce14">
            <text:p>2025-08</text:p>
          </table:table-cell>
          <table:table-cell office:value-type="float" office:value="0" table:style-name="ce9">
            <text:p>0</text:p>
          </table:table-cell>
          <table:table-cell office:value-type="float" office:value="18" table:style-name="ce9">
            <text:p>18</text:p>
          </table:table-cell>
          <table:table-cell office:value-type="float" office:value="8" table:style-name="ce9">
            <text:p>8</text:p>
          </table:table-cell>
          <table:table-cell office:value-type="float" office:value="2006" table:style-name="ce9">
            <text:p>2006</text:p>
          </table:table-cell>
          <table:table-cell office:value-type="float" office:value="12" table:style-name="ce9">
            <text:p>12</text:p>
          </table:table-cell>
          <table:table-cell office:value-type="float" office:value="2024" table:formula="of:=SUM([.G630]+[.E630])" table:style-name="ce15">
            <text:p>2024</text:p>
          </table:table-cell>
          <table:table-cell office:value-type="float" office:value="-4" table:formula="of:=[.F630]-[.H630]" table:style-name="ce15">
            <text:p>-4</text:p>
          </table:table-cell>
          <table:table-cell office:value-type="percentage" office:value="-9.8814229249011851E-4" table:formula="of:=([.I631]-[.I630])/[.I630]" table:style-name="ce16">
            <text:p>0%</text:p>
          </table:table-cell>
          <table:table-cell office:value-type="string" office:string-value="Valid" table:formula="of:=IF([.F630]&lt;=[.E630]; &quot;Valid&quot;; &quot;Invalid&quot;)" table:style-name="ce17">
            <text:p>Valid</text:p>
          </table:table-cell>
          <table:table-cell office:value-type="string" office:string-value="Valid" table:formula="of:=IF([.H630]&lt;=[.G630]; &quot;Valid&quot;; &quot;Invalid&quot;)" table:style-name="ce17">
            <text:p>Valid</text:p>
          </table:table-cell>
          <table:table-cell office:value-type="string" office:string-value="Stable/Reducing" table:formula="of:=IF([.J630]&gt;0; &quot;Increasing Pressure&quot;; &quot;Stable/Reducing&quot;)" table:style-name="ce18">
            <text:p>Stable/Reducing</text:p>
          </table:table-cell>
          <table:table-cell office:value-type="float" office:value="1.5" table:formula="of:=IFERROR([.H630]/[.F630]; 0)" table:style-name="ce17">
            <text:p>1.5</text:p>
          </table:table-cell>
          <table:table-cell office:value-type="float" office:value="2019" table:formula="of:=AVERAGE([.I630:.I636])" table:style-name="ce15">
            <text:p>2019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8-11T00:00:00" table:style-name="ce14">
            <text:p>11-08-2025</text:p>
          </table:table-cell>
          <table:table-cell office:value-type="string" office:string-value="August" table:formula="of:=TEXT([.A631]; &quot;mmmm&quot;)" table:style-name="ce14">
            <text:p>August</text:p>
          </table:table-cell>
          <table:table-cell office:value-type="string" office:string-value="2025-08" table:formula="of:=TEXT([.A631]; &quot;yyyy-mm&quot;)" table:style-name="ce14">
            <text:p>2025-08</text:p>
          </table:table-cell>
          <table:table-cell office:value-type="float" office:value="6" table:style-name="ce9">
            <text:p>6</text:p>
          </table:table-cell>
          <table:table-cell office:value-type="float" office:value="23" table:style-name="ce9">
            <text:p>23</text:p>
          </table:table-cell>
          <table:table-cell office:value-type="float" office:value="4" table:style-name="ce9">
            <text:p>4</text:p>
          </table:table-cell>
          <table:table-cell office:value-type="float" office:value="1999" table:style-name="ce9">
            <text:p>1999</text:p>
          </table:table-cell>
          <table:table-cell office:value-type="float" office:value="16" table:style-name="ce9">
            <text:p>16</text:p>
          </table:table-cell>
          <table:table-cell office:value-type="float" office:value="2022" table:formula="of:=SUM([.G631]+[.E631])" table:style-name="ce15">
            <text:p>2022</text:p>
          </table:table-cell>
          <table:table-cell office:value-type="float" office:value="-12" table:formula="of:=[.F631]-[.H631]" table:style-name="ce15">
            <text:p>-12</text:p>
          </table:table-cell>
          <table:table-cell office:value-type="percentage" office:value="7.4183976261127599E-3" table:formula="of:=([.I632]-[.I631])/[.I631]" table:style-name="ce16">
            <text:p>1%</text:p>
          </table:table-cell>
          <table:table-cell office:value-type="string" office:string-value="Valid" table:formula="of:=IF([.F631]&lt;=[.E631]; &quot;Valid&quot;; &quot;Invalid&quot;)" table:style-name="ce17">
            <text:p>Valid</text:p>
          </table:table-cell>
          <table:table-cell office:value-type="string" office:string-value="Valid" table:formula="of:=IF([.H631]&lt;=[.G631]; &quot;Valid&quot;; &quot;Invalid&quot;)" table:style-name="ce17">
            <text:p>Valid</text:p>
          </table:table-cell>
          <table:table-cell office:value-type="string" office:string-value="Stable/Reducing" table:formula="of:=IF([.J631]&gt;0; &quot;Increasing Pressure&quot;; &quot;Stable/Reducing&quot;)" table:style-name="ce18">
            <text:p>Stable/Reducing</text:p>
          </table:table-cell>
          <table:table-cell office:value-type="float" office:value="4" table:formula="of:=IFERROR([.H631]/[.F631]; 0)" table:style-name="ce17">
            <text:p>4</text:p>
          </table:table-cell>
          <table:table-cell office:value-type="float" office:value="2017.7142857142858" table:formula="of:=AVERAGE([.I631:.I637])" table:style-name="ce15">
            <text:p>2018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8-12T00:00:00" table:style-name="ce14">
            <text:p>12-08-2025</text:p>
          </table:table-cell>
          <table:table-cell office:value-type="string" office:string-value="August" table:formula="of:=TEXT([.A632]; &quot;mmmm&quot;)" table:style-name="ce14">
            <text:p>August</text:p>
          </table:table-cell>
          <table:table-cell office:value-type="string" office:string-value="2025-08" table:formula="of:=TEXT([.A632]; &quot;yyyy-mm&quot;)" table:style-name="ce14">
            <text:p>2025-08</text:p>
          </table:table-cell>
          <table:table-cell office:value-type="float" office:value="8" table:style-name="ce9">
            <text:p>8</text:p>
          </table:table-cell>
          <table:table-cell office:value-type="float" office:value="38" table:style-name="ce9">
            <text:p>38</text:p>
          </table:table-cell>
          <table:table-cell office:value-type="float" office:value="9" table:style-name="ce9">
            <text:p>9</text:p>
          </table:table-cell>
          <table:table-cell office:value-type="float" office:value="1999" table:style-name="ce9">
            <text:p>1999</text:p>
          </table:table-cell>
          <table:table-cell office:value-type="float" office:value="9" table:style-name="ce9">
            <text:p>9</text:p>
          </table:table-cell>
          <table:table-cell office:value-type="float" office:value="2037" table:formula="of:=SUM([.G632]+[.E632])" table:style-name="ce15">
            <text:p>2037</text:p>
          </table:table-cell>
          <table:table-cell office:value-type="float" office:value="0" table:formula="of:=[.F632]-[.H632]" table:style-name="ce15">
            <text:p>0</text:p>
          </table:table-cell>
          <table:table-cell office:value-type="percentage" office:value="-8.836524300441826E-3" table:formula="of:=([.I633]-[.I632])/[.I632]" table:style-name="ce16">
            <text:p>-1%</text:p>
          </table:table-cell>
          <table:table-cell office:value-type="string" office:string-value="Valid" table:formula="of:=IF([.F632]&lt;=[.E632]; &quot;Valid&quot;; &quot;Invalid&quot;)" table:style-name="ce17">
            <text:p>Valid</text:p>
          </table:table-cell>
          <table:table-cell office:value-type="string" office:string-value="Valid" table:formula="of:=IF([.H632]&lt;=[.G632]; &quot;Valid&quot;; &quot;Invalid&quot;)" table:style-name="ce17">
            <text:p>Valid</text:p>
          </table:table-cell>
          <table:table-cell office:value-type="string" office:string-value="Stable/Reducing" table:formula="of:=IF([.J632]&gt;0; &quot;Increasing Pressure&quot;; &quot;Stable/Reducing&quot;)" table:style-name="ce18">
            <text:p>Stable/Reducing</text:p>
          </table:table-cell>
          <table:table-cell office:value-type="float" office:value="1" table:formula="of:=IFERROR([.H632]/[.F632]; 0)" table:style-name="ce17">
            <text:p>1</text:p>
          </table:table-cell>
          <table:table-cell office:value-type="float" office:value="2017.5714285714287" table:formula="of:=AVERAGE([.I632:.I638])" table:style-name="ce15">
            <text:p>2018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8-13T00:00:00" table:style-name="ce14">
            <text:p>13-08-2025</text:p>
          </table:table-cell>
          <table:table-cell office:value-type="string" office:string-value="August" table:formula="of:=TEXT([.A633]; &quot;mmmm&quot;)" table:style-name="ce14">
            <text:p>August</text:p>
          </table:table-cell>
          <table:table-cell office:value-type="string" office:string-value="2025-08" table:formula="of:=TEXT([.A633]; &quot;yyyy-mm&quot;)" table:style-name="ce14">
            <text:p>2025-08</text:p>
          </table:table-cell>
          <table:table-cell office:value-type="float" office:value="6" table:style-name="ce9">
            <text:p>6</text:p>
          </table:table-cell>
          <table:table-cell office:value-type="float" office:value="22" table:style-name="ce9">
            <text:p>22</text:p>
          </table:table-cell>
          <table:table-cell office:value-type="float" office:value="12" table:style-name="ce9">
            <text:p>12</text:p>
          </table:table-cell>
          <table:table-cell office:value-type="float" office:value="1997" table:style-name="ce9">
            <text:p>1997</text:p>
          </table:table-cell>
          <table:table-cell office:value-type="float" office:value="17" table:style-name="ce9">
            <text:p>17</text:p>
          </table:table-cell>
          <table:table-cell office:value-type="float" office:value="2019" table:formula="of:=SUM([.G633]+[.E633])" table:style-name="ce15">
            <text:p>2019</text:p>
          </table:table-cell>
          <table:table-cell office:value-type="float" office:value="-5" table:formula="of:=[.F633]-[.H633]" table:style-name="ce15">
            <text:p>-5</text:p>
          </table:table-cell>
          <table:table-cell office:value-type="percentage" office:value="9.9058940069341253E-4" table:formula="of:=([.I634]-[.I633])/[.I633]" table:style-name="ce16">
            <text:p>0%</text:p>
          </table:table-cell>
          <table:table-cell office:value-type="string" office:string-value="Valid" table:formula="of:=IF([.F633]&lt;=[.E633]; &quot;Valid&quot;; &quot;Invalid&quot;)" table:style-name="ce17">
            <text:p>Valid</text:p>
          </table:table-cell>
          <table:table-cell office:value-type="string" office:string-value="Valid" table:formula="of:=IF([.H633]&lt;=[.G633]; &quot;Valid&quot;; &quot;Invalid&quot;)" table:style-name="ce17">
            <text:p>Valid</text:p>
          </table:table-cell>
          <table:table-cell office:value-type="string" office:string-value="Stable/Reducing" table:formula="of:=IF([.J633]&gt;0; &quot;Increasing Pressure&quot;; &quot;Stable/Reducing&quot;)" table:style-name="ce18">
            <text:p>Stable/Reducing</text:p>
          </table:table-cell>
          <table:table-cell office:value-type="float" office:value="1.4166666666666667" table:formula="of:=IFERROR([.H633]/[.F633]; 0)" table:style-name="ce17">
            <text:p>1.416666667</text:p>
          </table:table-cell>
          <table:table-cell office:value-type="float" office:value="2015.2857142857142" table:formula="of:=AVERAGE([.I633:.I639])" table:style-name="ce15">
            <text:p>2015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8-14T00:00:00" table:style-name="ce14">
            <text:p>14-08-2025</text:p>
          </table:table-cell>
          <table:table-cell office:value-type="string" office:string-value="August" table:formula="of:=TEXT([.A634]; &quot;mmmm&quot;)" table:style-name="ce14">
            <text:p>August</text:p>
          </table:table-cell>
          <table:table-cell office:value-type="string" office:string-value="2025-08" table:formula="of:=TEXT([.A634]; &quot;yyyy-mm&quot;)" table:style-name="ce14">
            <text:p>2025-08</text:p>
          </table:table-cell>
          <table:table-cell office:value-type="float" office:value="3" table:style-name="ce9">
            <text:p>3</text:p>
          </table:table-cell>
          <table:table-cell office:value-type="float" office:value="27" table:style-name="ce9">
            <text:p>27</text:p>
          </table:table-cell>
          <table:table-cell office:value-type="float" office:value="4" table:style-name="ce9">
            <text:p>4</text:p>
          </table:table-cell>
          <table:table-cell office:value-type="float" office:value="1994" table:style-name="ce9">
            <text:p>1994</text:p>
          </table:table-cell>
          <table:table-cell office:value-type="float" office:value="11" table:style-name="ce9">
            <text:p>11</text:p>
          </table:table-cell>
          <table:table-cell office:value-type="float" office:value="2021" table:formula="of:=SUM([.G634]+[.E634])" table:style-name="ce15">
            <text:p>2021</text:p>
          </table:table-cell>
          <table:table-cell office:value-type="float" office:value="-7" table:formula="of:=[.F634]-[.H634]" table:style-name="ce15">
            <text:p>-7</text:p>
          </table:table-cell>
          <table:table-cell office:value-type="percentage" office:value="-7.9168728352300849E-3" table:formula="of:=([.I635]-[.I634])/[.I634]" table:style-name="ce16">
            <text:p>-1%</text:p>
          </table:table-cell>
          <table:table-cell office:value-type="string" office:string-value="Valid" table:formula="of:=IF([.F634]&lt;=[.E634]; &quot;Valid&quot;; &quot;Invalid&quot;)" table:style-name="ce17">
            <text:p>Valid</text:p>
          </table:table-cell>
          <table:table-cell office:value-type="string" office:string-value="Valid" table:formula="of:=IF([.H634]&lt;=[.G634]; &quot;Valid&quot;; &quot;Invalid&quot;)" table:style-name="ce17">
            <text:p>Valid</text:p>
          </table:table-cell>
          <table:table-cell office:value-type="string" office:string-value="Stable/Reducing" table:formula="of:=IF([.J634]&gt;0; &quot;Increasing Pressure&quot;; &quot;Stable/Reducing&quot;)" table:style-name="ce18">
            <text:p>Stable/Reducing</text:p>
          </table:table-cell>
          <table:table-cell office:value-type="float" office:value="2.75" table:formula="of:=IFERROR([.H634]/[.F634]; 0)" table:style-name="ce17">
            <text:p>2.75</text:p>
          </table:table-cell>
          <table:table-cell office:value-type="float" office:value="2012.8571428571429" table:formula="of:=AVERAGE([.I634:.I640])" table:style-name="ce15">
            <text:p>2013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8-17T00:00:00" table:style-name="ce14">
            <text:p>17-08-2025</text:p>
          </table:table-cell>
          <table:table-cell office:value-type="string" office:string-value="August" table:formula="of:=TEXT([.A635]; &quot;mmmm&quot;)" table:style-name="ce14">
            <text:p>August</text:p>
          </table:table-cell>
          <table:table-cell office:value-type="string" office:string-value="2025-08" table:formula="of:=TEXT([.A635]; &quot;yyyy-mm&quot;)" table:style-name="ce14">
            <text:p>2025-08</text:p>
          </table:table-cell>
          <table:table-cell office:value-type="float" office:value="4" table:style-name="ce9">
            <text:p>4</text:p>
          </table:table-cell>
          <table:table-cell office:value-type="float" office:value="14" table:style-name="ce9">
            <text:p>14</text:p>
          </table:table-cell>
          <table:table-cell office:value-type="float" office:value="2" table:style-name="ce9">
            <text:p>2</text:p>
          </table:table-cell>
          <table:table-cell office:value-type="float" office:value="1991" table:style-name="ce9">
            <text:p>1991</text:p>
          </table:table-cell>
          <table:table-cell office:value-type="float" office:value="3" table:style-name="ce9">
            <text:p>3</text:p>
          </table:table-cell>
          <table:table-cell office:value-type="float" office:value="2005" table:formula="of:=SUM([.G635]+[.E635])" table:style-name="ce15">
            <text:p>2005</text:p>
          </table:table-cell>
          <table:table-cell office:value-type="float" office:value="-1" table:formula="of:=[.F635]-[.H635]" table:style-name="ce15">
            <text:p>-1</text:p>
          </table:table-cell>
          <table:table-cell office:value-type="percentage" office:value="0" table:formula="of:=([.I636]-[.I635])/[.I635]" table:style-name="ce16">
            <text:p>0%</text:p>
          </table:table-cell>
          <table:table-cell office:value-type="string" office:string-value="Valid" table:formula="of:=IF([.F635]&lt;=[.E635]; &quot;Valid&quot;; &quot;Invalid&quot;)" table:style-name="ce17">
            <text:p>Valid</text:p>
          </table:table-cell>
          <table:table-cell office:value-type="string" office:string-value="Valid" table:formula="of:=IF([.H635]&lt;=[.G635]; &quot;Valid&quot;; &quot;Invalid&quot;)" table:style-name="ce17">
            <text:p>Valid</text:p>
          </table:table-cell>
          <table:table-cell office:value-type="string" office:string-value="Stable/Reducing" table:formula="of:=IF([.J635]&gt;0; &quot;Increasing Pressure&quot;; &quot;Stable/Reducing&quot;)" table:style-name="ce18">
            <text:p>Stable/Reducing</text:p>
          </table:table-cell>
          <table:table-cell office:value-type="float" office:value="1.5" table:formula="of:=IFERROR([.H635]/[.F635]; 0)" table:style-name="ce17">
            <text:p>1.5</text:p>
          </table:table-cell>
          <table:table-cell office:value-type="float" office:value="2011.2857142857142" table:formula="of:=AVERAGE([.I635:.I641])" table:style-name="ce15">
            <text:p>2011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8-18T00:00:00" table:style-name="ce14">
            <text:p>18-08-2025</text:p>
          </table:table-cell>
          <table:table-cell office:value-type="string" office:string-value="August" table:formula="of:=TEXT([.A636]; &quot;mmmm&quot;)" table:style-name="ce14">
            <text:p>August</text:p>
          </table:table-cell>
          <table:table-cell office:value-type="string" office:string-value="2025-08" table:formula="of:=TEXT([.A636]; &quot;yyyy-mm&quot;)" table:style-name="ce14">
            <text:p>2025-08</text:p>
          </table:table-cell>
          <table:table-cell office:value-type="float" office:value="4" table:style-name="ce9">
            <text:p>4</text:p>
          </table:table-cell>
          <table:table-cell office:value-type="float" office:value="20" table:style-name="ce9">
            <text:p>20</text:p>
          </table:table-cell>
          <table:table-cell office:value-type="float" office:value="6" table:style-name="ce9">
            <text:p>6</text:p>
          </table:table-cell>
          <table:table-cell office:value-type="float" office:value="1985" table:style-name="ce9">
            <text:p>1985</text:p>
          </table:table-cell>
          <table:table-cell office:value-type="float" office:value="14" table:style-name="ce9">
            <text:p>14</text:p>
          </table:table-cell>
          <table:table-cell office:value-type="float" office:value="2005" table:formula="of:=SUM([.G636]+[.E636])" table:style-name="ce15">
            <text:p>2005</text:p>
          </table:table-cell>
          <table:table-cell office:value-type="float" office:value="-8" table:formula="of:=[.F636]-[.H636]" table:style-name="ce15">
            <text:p>-8</text:p>
          </table:table-cell>
          <table:table-cell office:value-type="percentage" office:value="4.9875311720698253E-3" table:formula="of:=([.I637]-[.I636])/[.I636]" table:style-name="ce16">
            <text:p>0%</text:p>
          </table:table-cell>
          <table:table-cell office:value-type="string" office:string-value="Valid" table:formula="of:=IF([.F636]&lt;=[.E636]; &quot;Valid&quot;; &quot;Invalid&quot;)" table:style-name="ce17">
            <text:p>Valid</text:p>
          </table:table-cell>
          <table:table-cell office:value-type="string" office:string-value="Valid" table:formula="of:=IF([.H636]&lt;=[.G636]; &quot;Valid&quot;; &quot;Invalid&quot;)" table:style-name="ce17">
            <text:p>Valid</text:p>
          </table:table-cell>
          <table:table-cell office:value-type="string" office:string-value="Stable/Reducing" table:formula="of:=IF([.J636]&gt;0; &quot;Increasing Pressure&quot;; &quot;Stable/Reducing&quot;)" table:style-name="ce18">
            <text:p>Stable/Reducing</text:p>
          </table:table-cell>
          <table:table-cell office:value-type="float" office:value="2.3333333333333335" table:formula="of:=IFERROR([.H636]/[.F636]; 0)" table:style-name="ce17">
            <text:p>2.333333333</text:p>
          </table:table-cell>
          <table:table-cell office:value-type="float" office:value="2012" table:formula="of:=AVERAGE([.I636:.I642])" table:style-name="ce15">
            <text:p>2012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8-19T00:00:00" table:style-name="ce14">
            <text:p>19-08-2025</text:p>
          </table:table-cell>
          <table:table-cell office:value-type="string" office:string-value="August" table:formula="of:=TEXT([.A637]; &quot;mmmm&quot;)" table:style-name="ce14">
            <text:p>August</text:p>
          </table:table-cell>
          <table:table-cell office:value-type="string" office:string-value="2025-08" table:formula="of:=TEXT([.A637]; &quot;yyyy-mm&quot;)" table:style-name="ce14">
            <text:p>2025-08</text:p>
          </table:table-cell>
          <table:table-cell office:value-type="float" office:value="5" table:style-name="ce9">
            <text:p>5</text:p>
          </table:table-cell>
          <table:table-cell office:value-type="float" office:value="35" table:style-name="ce9">
            <text:p>35</text:p>
          </table:table-cell>
          <table:table-cell office:value-type="float" office:value="3" table:style-name="ce9">
            <text:p>3</text:p>
          </table:table-cell>
          <table:table-cell office:value-type="float" office:value="1980" table:style-name="ce9">
            <text:p>1980</text:p>
          </table:table-cell>
          <table:table-cell office:value-type="float" office:value="11" table:style-name="ce9">
            <text:p>11</text:p>
          </table:table-cell>
          <table:table-cell office:value-type="float" office:value="2015" table:formula="of:=SUM([.G637]+[.E637])" table:style-name="ce15">
            <text:p>2015</text:p>
          </table:table-cell>
          <table:table-cell office:value-type="float" office:value="-8" table:formula="of:=[.F637]-[.H637]" table:style-name="ce15">
            <text:p>-8</text:p>
          </table:table-cell>
          <table:table-cell office:value-type="percentage" office:value="2.9776674937965261E-3" table:formula="of:=([.I638]-[.I637])/[.I637]" table:style-name="ce16">
            <text:p>0%</text:p>
          </table:table-cell>
          <table:table-cell office:value-type="string" office:string-value="Valid" table:formula="of:=IF([.F637]&lt;=[.E637]; &quot;Valid&quot;; &quot;Invalid&quot;)" table:style-name="ce17">
            <text:p>Valid</text:p>
          </table:table-cell>
          <table:table-cell office:value-type="string" office:string-value="Valid" table:formula="of:=IF([.H637]&lt;=[.G637]; &quot;Valid&quot;; &quot;Invalid&quot;)" table:style-name="ce17">
            <text:p>Valid</text:p>
          </table:table-cell>
          <table:table-cell office:value-type="string" office:string-value="Stable/Reducing" table:formula="of:=IF([.J637]&gt;0; &quot;Increasing Pressure&quot;; &quot;Stable/Reducing&quot;)" table:style-name="ce18">
            <text:p>Stable/Reducing</text:p>
          </table:table-cell>
          <table:table-cell office:value-type="float" office:value="3.6666666666666665" table:formula="of:=IFERROR([.H637]/[.F637]; 0)" table:style-name="ce17">
            <text:p>3.666666667</text:p>
          </table:table-cell>
          <table:table-cell office:value-type="float" office:value="2012.2857142857142" table:formula="of:=AVERAGE([.I637:.I643])" table:style-name="ce15">
            <text:p>2012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8-20T00:00:00" table:style-name="ce14">
            <text:p>20-08-2025</text:p>
          </table:table-cell>
          <table:table-cell office:value-type="string" office:string-value="August" table:formula="of:=TEXT([.A638]; &quot;mmmm&quot;)" table:style-name="ce14">
            <text:p>August</text:p>
          </table:table-cell>
          <table:table-cell office:value-type="string" office:string-value="2025-08" table:formula="of:=TEXT([.A638]; &quot;yyyy-mm&quot;)" table:style-name="ce14">
            <text:p>2025-08</text:p>
          </table:table-cell>
          <table:table-cell office:value-type="float" office:value="10" table:style-name="ce9">
            <text:p>10</text:p>
          </table:table-cell>
          <table:table-cell office:value-type="float" office:value="38" table:style-name="ce9">
            <text:p>38</text:p>
          </table:table-cell>
          <table:table-cell office:value-type="float" office:value="10" table:style-name="ce9">
            <text:p>10</text:p>
          </table:table-cell>
          <table:table-cell office:value-type="float" office:value="1983" table:style-name="ce9">
            <text:p>1983</text:p>
          </table:table-cell>
          <table:table-cell office:value-type="float" office:value="10" table:style-name="ce9">
            <text:p>10</text:p>
          </table:table-cell>
          <table:table-cell office:value-type="float" office:value="2021" table:formula="of:=SUM([.G638]+[.E638])" table:style-name="ce15">
            <text:p>2021</text:p>
          </table:table-cell>
          <table:table-cell office:value-type="float" office:value="0" table:formula="of:=[.F638]-[.H638]" table:style-name="ce15">
            <text:p>0</text:p>
          </table:table-cell>
          <table:table-cell office:value-type="percentage" office:value="0" table:formula="of:=([.I639]-[.I638])/[.I638]" table:style-name="ce16">
            <text:p>0%</text:p>
          </table:table-cell>
          <table:table-cell office:value-type="string" office:string-value="Valid" table:formula="of:=IF([.F638]&lt;=[.E638]; &quot;Valid&quot;; &quot;Invalid&quot;)" table:style-name="ce17">
            <text:p>Valid</text:p>
          </table:table-cell>
          <table:table-cell office:value-type="string" office:string-value="Valid" table:formula="of:=IF([.H638]&lt;=[.G638]; &quot;Valid&quot;; &quot;Invalid&quot;)" table:style-name="ce17">
            <text:p>Valid</text:p>
          </table:table-cell>
          <table:table-cell office:value-type="string" office:string-value="Stable/Reducing" table:formula="of:=IF([.J638]&gt;0; &quot;Increasing Pressure&quot;; &quot;Stable/Reducing&quot;)" table:style-name="ce18">
            <text:p>Stable/Reducing</text:p>
          </table:table-cell>
          <table:table-cell office:value-type="float" office:value="1" table:formula="of:=IFERROR([.H638]/[.F638]; 0)" table:style-name="ce17">
            <text:p>1</text:p>
          </table:table-cell>
          <table:table-cell office:value-type="float" office:value="2012.5714285714287" table:formula="of:=AVERAGE([.I638:.I644])" table:style-name="ce15">
            <text:p>2013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8-21T00:00:00" table:style-name="ce14">
            <text:p>21-08-2025</text:p>
          </table:table-cell>
          <table:table-cell office:value-type="string" office:string-value="August" table:formula="of:=TEXT([.A639]; &quot;mmmm&quot;)" table:style-name="ce14">
            <text:p>August</text:p>
          </table:table-cell>
          <table:table-cell office:value-type="string" office:string-value="2025-08" table:formula="of:=TEXT([.A639]; &quot;yyyy-mm&quot;)" table:style-name="ce14">
            <text:p>2025-08</text:p>
          </table:table-cell>
          <table:table-cell office:value-type="float" office:value="6" table:style-name="ce9">
            <text:p>6</text:p>
          </table:table-cell>
          <table:table-cell office:value-type="float" office:value="49" table:style-name="ce9">
            <text:p>49</text:p>
          </table:table-cell>
          <table:table-cell office:value-type="float" office:value="8" table:style-name="ce9">
            <text:p>8</text:p>
          </table:table-cell>
          <table:table-cell office:value-type="float" office:value="1972" table:style-name="ce9">
            <text:p>1972</text:p>
          </table:table-cell>
          <table:table-cell office:value-type="float" office:value="21" table:style-name="ce9">
            <text:p>21</text:p>
          </table:table-cell>
          <table:table-cell office:value-type="float" office:value="2021" table:formula="of:=SUM([.G639]+[.E639])" table:style-name="ce15">
            <text:p>2021</text:p>
          </table:table-cell>
          <table:table-cell office:value-type="float" office:value="-13" table:formula="of:=[.F639]-[.H639]" table:style-name="ce15">
            <text:p>-13</text:p>
          </table:table-cell>
          <table:table-cell office:value-type="percentage" office:value="-9.4012864918357249E-3" table:formula="of:=([.I640]-[.I639])/[.I639]" table:style-name="ce16">
            <text:p>-1%</text:p>
          </table:table-cell>
          <table:table-cell office:value-type="string" office:string-value="Valid" table:formula="of:=IF([.F639]&lt;=[.E639]; &quot;Valid&quot;; &quot;Invalid&quot;)" table:style-name="ce17">
            <text:p>Valid</text:p>
          </table:table-cell>
          <table:table-cell office:value-type="string" office:string-value="Valid" table:formula="of:=IF([.H639]&lt;=[.G639]; &quot;Valid&quot;; &quot;Invalid&quot;)" table:style-name="ce17">
            <text:p>Valid</text:p>
          </table:table-cell>
          <table:table-cell office:value-type="string" office:string-value="Stable/Reducing" table:formula="of:=IF([.J639]&gt;0; &quot;Increasing Pressure&quot;; &quot;Stable/Reducing&quot;)" table:style-name="ce18">
            <text:p>Stable/Reducing</text:p>
          </table:table-cell>
          <table:table-cell office:value-type="float" office:value="2.625" table:formula="of:=IFERROR([.H639]/[.F639]; 0)" table:style-name="ce17">
            <text:p>2.625</text:p>
          </table:table-cell>
          <table:table-cell office:value-type="float" office:value="2015.1428571428571" table:formula="of:=AVERAGE([.I639:.I645])" table:style-name="ce15">
            <text:p>2015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8-24T00:00:00" table:style-name="ce14">
            <text:p>24-08-2025</text:p>
          </table:table-cell>
          <table:table-cell office:value-type="string" office:string-value="August" table:formula="of:=TEXT([.A640]; &quot;mmmm&quot;)" table:style-name="ce14">
            <text:p>August</text:p>
          </table:table-cell>
          <table:table-cell office:value-type="string" office:string-value="2025-08" table:formula="of:=TEXT([.A640]; &quot;yyyy-mm&quot;)" table:style-name="ce14">
            <text:p>2025-08</text:p>
          </table:table-cell>
          <table:table-cell office:value-type="float" office:value="4" table:style-name="ce9">
            <text:p>4</text:p>
          </table:table-cell>
          <table:table-cell office:value-type="float" office:value="21" table:style-name="ce9">
            <text:p>21</text:p>
          </table:table-cell>
          <table:table-cell office:value-type="float" office:value="5" table:style-name="ce9">
            <text:p>5</text:p>
          </table:table-cell>
          <table:table-cell office:value-type="float" office:value="1981" table:style-name="ce9">
            <text:p>1981</text:p>
          </table:table-cell>
          <table:table-cell office:value-type="float" office:value="5" table:style-name="ce9">
            <text:p>5</text:p>
          </table:table-cell>
          <table:table-cell office:value-type="float" office:value="2002" table:formula="of:=SUM([.G640]+[.E640])" table:style-name="ce15">
            <text:p>2002</text:p>
          </table:table-cell>
          <table:table-cell office:value-type="float" office:value="0" table:formula="of:=[.F640]-[.H640]" table:style-name="ce15">
            <text:p>0</text:p>
          </table:table-cell>
          <table:table-cell office:value-type="percentage" office:value="3.996003996003996E-3" table:formula="of:=([.I641]-[.I640])/[.I640]" table:style-name="ce16">
            <text:p>0%</text:p>
          </table:table-cell>
          <table:table-cell office:value-type="string" office:string-value="Valid" table:formula="of:=IF([.F640]&lt;=[.E640]; &quot;Valid&quot;; &quot;Invalid&quot;)" table:style-name="ce17">
            <text:p>Valid</text:p>
          </table:table-cell>
          <table:table-cell office:value-type="string" office:string-value="Valid" table:formula="of:=IF([.H640]&lt;=[.G640]; &quot;Valid&quot;; &quot;Invalid&quot;)" table:style-name="ce17">
            <text:p>Valid</text:p>
          </table:table-cell>
          <table:table-cell office:value-type="string" office:string-value="Stable/Reducing" table:formula="of:=IF([.J640]&gt;0; &quot;Increasing Pressure&quot;; &quot;Stable/Reducing&quot;)" table:style-name="ce18">
            <text:p>Stable/Reducing</text:p>
          </table:table-cell>
          <table:table-cell office:value-type="float" office:value="1" table:formula="of:=IFERROR([.H640]/[.F640]; 0)" table:style-name="ce17">
            <text:p>1</text:p>
          </table:table-cell>
          <table:table-cell office:value-type="float" office:value="2020" table:formula="of:=AVERAGE([.I640:.I646])" table:style-name="ce15">
            <text:p>2020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8-25T00:00:00" table:style-name="ce14">
            <text:p>25-08-2025</text:p>
          </table:table-cell>
          <table:table-cell office:value-type="string" office:string-value="August" table:formula="of:=TEXT([.A641]; &quot;mmmm&quot;)" table:style-name="ce14">
            <text:p>August</text:p>
          </table:table-cell>
          <table:table-cell office:value-type="string" office:string-value="2025-08" table:formula="of:=TEXT([.A641]; &quot;yyyy-mm&quot;)" table:style-name="ce14">
            <text:p>2025-08</text:p>
          </table:table-cell>
          <table:table-cell office:value-type="float" office:value="8" table:style-name="ce9">
            <text:p>8</text:p>
          </table:table-cell>
          <table:table-cell office:value-type="float" office:value="30" table:style-name="ce9">
            <text:p>30</text:p>
          </table:table-cell>
          <table:table-cell office:value-type="float" office:value="8" table:style-name="ce9">
            <text:p>8</text:p>
          </table:table-cell>
          <table:table-cell office:value-type="float" office:value="1980" table:style-name="ce9">
            <text:p>1980</text:p>
          </table:table-cell>
          <table:table-cell office:value-type="float" office:value="11" table:style-name="ce9">
            <text:p>11</text:p>
          </table:table-cell>
          <table:table-cell office:value-type="float" office:value="2010" table:formula="of:=SUM([.G641]+[.E641])" table:style-name="ce15">
            <text:p>2010</text:p>
          </table:table-cell>
          <table:table-cell office:value-type="float" office:value="-3" table:formula="of:=[.F641]-[.H641]" table:style-name="ce15">
            <text:p>-3</text:p>
          </table:table-cell>
          <table:table-cell office:value-type="percentage" office:value="0" table:formula="of:=([.I642]-[.I641])/[.I641]" table:style-name="ce16">
            <text:p>0%</text:p>
          </table:table-cell>
          <table:table-cell office:value-type="string" office:string-value="Valid" table:formula="of:=IF([.F641]&lt;=[.E641]; &quot;Valid&quot;; &quot;Invalid&quot;)" table:style-name="ce17">
            <text:p>Valid</text:p>
          </table:table-cell>
          <table:table-cell office:value-type="string" office:string-value="Valid" table:formula="of:=IF([.H641]&lt;=[.G641]; &quot;Valid&quot;; &quot;Invalid&quot;)" table:style-name="ce17">
            <text:p>Valid</text:p>
          </table:table-cell>
          <table:table-cell office:value-type="string" office:string-value="Stable/Reducing" table:formula="of:=IF([.J641]&gt;0; &quot;Increasing Pressure&quot;; &quot;Stable/Reducing&quot;)" table:style-name="ce18">
            <text:p>Stable/Reducing</text:p>
          </table:table-cell>
          <table:table-cell office:value-type="float" office:value="1.375" table:formula="of:=IFERROR([.H641]/[.F641]; 0)" table:style-name="ce17">
            <text:p>1.375</text:p>
          </table:table-cell>
          <table:table-cell office:value-type="float" office:value="2026.5714285714287" table:formula="of:=AVERAGE([.I641:.I647])" table:style-name="ce15">
            <text:p>2027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8-26T00:00:00" table:style-name="ce14">
            <text:p>26-08-2025</text:p>
          </table:table-cell>
          <table:table-cell office:value-type="string" office:string-value="August" table:formula="of:=TEXT([.A642]; &quot;mmmm&quot;)" table:style-name="ce14">
            <text:p>August</text:p>
          </table:table-cell>
          <table:table-cell office:value-type="string" office:string-value="2025-08" table:formula="of:=TEXT([.A642]; &quot;yyyy-mm&quot;)" table:style-name="ce14">
            <text:p>2025-08</text:p>
          </table:table-cell>
          <table:table-cell office:value-type="float" office:value="10" table:style-name="ce9">
            <text:p>10</text:p>
          </table:table-cell>
          <table:table-cell office:value-type="float" office:value="21" table:style-name="ce9">
            <text:p>21</text:p>
          </table:table-cell>
          <table:table-cell office:value-type="float" office:value="20" table:style-name="ce9">
            <text:p>20</text:p>
          </table:table-cell>
          <table:table-cell office:value-type="float" office:value="1989" table:style-name="ce9">
            <text:p>1989</text:p>
          </table:table-cell>
          <table:table-cell office:value-type="float" office:value="15" table:style-name="ce9">
            <text:p>15</text:p>
          </table:table-cell>
          <table:table-cell office:value-type="float" office:value="2010" table:formula="of:=SUM([.G642]+[.E642])" table:style-name="ce15">
            <text:p>2010</text:p>
          </table:table-cell>
          <table:table-cell office:value-type="float" office:value="5" table:formula="of:=[.F642]-[.H642]" table:style-name="ce15">
            <text:p>5</text:p>
          </table:table-cell>
          <table:table-cell office:value-type="percentage" office:value="-1.4925373134328358E-3" table:formula="of:=([.I643]-[.I642])/[.I642]" table:style-name="ce16">
            <text:p>0%</text:p>
          </table:table-cell>
          <table:table-cell office:value-type="string" office:string-value="Valid" table:formula="of:=IF([.F642]&lt;=[.E642]; &quot;Valid&quot;; &quot;Invalid&quot;)" table:style-name="ce17">
            <text:p>Valid</text:p>
          </table:table-cell>
          <table:table-cell office:value-type="string" office:string-value="Valid" table:formula="of:=IF([.H642]&lt;=[.G642]; &quot;Valid&quot;; &quot;Invalid&quot;)" table:style-name="ce17">
            <text:p>Valid</text:p>
          </table:table-cell>
          <table:table-cell office:value-type="string" office:string-value="Increasing Pressure" table:formula="of:=IF([.J642]&gt;0; &quot;Increasing Pressure&quot;; &quot;Stable/Reducing&quot;)" table:style-name="ce18">
            <text:p>Increasing Pressure</text:p>
          </table:table-cell>
          <table:table-cell office:value-type="float" office:value="0.75" table:formula="of:=IFERROR([.H642]/[.F642]; 0)" table:style-name="ce17">
            <text:p>0.75</text:p>
          </table:table-cell>
          <table:table-cell office:value-type="float" office:value="2033" table:formula="of:=AVERAGE([.I642:.I648])" table:style-name="ce15">
            <text:p>2033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8-27T00:00:00" table:style-name="ce14">
            <text:p>27-08-2025</text:p>
          </table:table-cell>
          <table:table-cell office:value-type="string" office:string-value="August" table:formula="of:=TEXT([.A643]; &quot;mmmm&quot;)" table:style-name="ce14">
            <text:p>August</text:p>
          </table:table-cell>
          <table:table-cell office:value-type="string" office:string-value="2025-08" table:formula="of:=TEXT([.A643]; &quot;yyyy-mm&quot;)" table:style-name="ce14">
            <text:p>2025-08</text:p>
          </table:table-cell>
          <table:table-cell office:value-type="float" office:value="5" table:style-name="ce9">
            <text:p>5</text:p>
          </table:table-cell>
          <table:table-cell office:value-type="float" office:value="19" table:style-name="ce9">
            <text:p>19</text:p>
          </table:table-cell>
          <table:table-cell office:value-type="float" office:value="9" table:style-name="ce9">
            <text:p>9</text:p>
          </table:table-cell>
          <table:table-cell office:value-type="float" office:value="1988" table:style-name="ce9">
            <text:p>1988</text:p>
          </table:table-cell>
          <table:table-cell office:value-type="float" office:value="19" table:style-name="ce9">
            <text:p>19</text:p>
          </table:table-cell>
          <table:table-cell office:value-type="float" office:value="2007" table:formula="of:=SUM([.G643]+[.E643])" table:style-name="ce15">
            <text:p>2007</text:p>
          </table:table-cell>
          <table:table-cell office:value-type="float" office:value="-10" table:formula="of:=[.F643]-[.H643]" table:style-name="ce15">
            <text:p>-10</text:p>
          </table:table-cell>
          <table:table-cell office:value-type="percentage" office:value="4.9825610363726956E-3" table:formula="of:=([.I644]-[.I643])/[.I643]" table:style-name="ce16">
            <text:p>0%</text:p>
          </table:table-cell>
          <table:table-cell office:value-type="string" office:string-value="Valid" table:formula="of:=IF([.F643]&lt;=[.E643]; &quot;Valid&quot;; &quot;Invalid&quot;)" table:style-name="ce17">
            <text:p>Valid</text:p>
          </table:table-cell>
          <table:table-cell office:value-type="string" office:string-value="Valid" table:formula="of:=IF([.H643]&lt;=[.G643]; &quot;Valid&quot;; &quot;Invalid&quot;)" table:style-name="ce17">
            <text:p>Valid</text:p>
          </table:table-cell>
          <table:table-cell office:value-type="string" office:string-value="Stable/Reducing" table:formula="of:=IF([.J643]&gt;0; &quot;Increasing Pressure&quot;; &quot;Stable/Reducing&quot;)" table:style-name="ce18">
            <text:p>Stable/Reducing</text:p>
          </table:table-cell>
          <table:table-cell office:value-type="float" office:value="2.1111111111111112" table:formula="of:=IFERROR([.H643]/[.F643]; 0)" table:style-name="ce17">
            <text:p>2.111111111</text:p>
          </table:table-cell>
          <table:table-cell office:value-type="float" office:value="2038" table:formula="of:=AVERAGE([.I643:.I649])" table:style-name="ce15">
            <text:p>2038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8-28T00:00:00" table:style-name="ce14">
            <text:p>28-08-2025</text:p>
          </table:table-cell>
          <table:table-cell office:value-type="string" office:string-value="August" table:formula="of:=TEXT([.A644]; &quot;mmmm&quot;)" table:style-name="ce14">
            <text:p>August</text:p>
          </table:table-cell>
          <table:table-cell office:value-type="string" office:string-value="2025-08" table:formula="of:=TEXT([.A644]; &quot;yyyy-mm&quot;)" table:style-name="ce14">
            <text:p>2025-08</text:p>
          </table:table-cell>
          <table:table-cell office:value-type="float" office:value="8" table:style-name="ce9">
            <text:p>8</text:p>
          </table:table-cell>
          <table:table-cell office:value-type="float" office:value="33" table:style-name="ce9">
            <text:p>33</text:p>
          </table:table-cell>
          <table:table-cell office:value-type="float" office:value="6" table:style-name="ce9">
            <text:p>6</text:p>
          </table:table-cell>
          <table:table-cell office:value-type="float" office:value="1984" table:style-name="ce9">
            <text:p>1984</text:p>
          </table:table-cell>
          <table:table-cell office:value-type="float" office:value="17" table:style-name="ce9">
            <text:p>17</text:p>
          </table:table-cell>
          <table:table-cell office:value-type="float" office:value="2017" table:formula="of:=SUM([.G644]+[.E644])" table:style-name="ce15">
            <text:p>2017</text:p>
          </table:table-cell>
          <table:table-cell office:value-type="float" office:value="-11" table:formula="of:=[.F644]-[.H644]" table:style-name="ce15">
            <text:p>-11</text:p>
          </table:table-cell>
          <table:table-cell office:value-type="percentage" office:value="1.0907288051561725E-2" table:formula="of:=([.I645]-[.I644])/[.I644]" table:style-name="ce16">
            <text:p>1%</text:p>
          </table:table-cell>
          <table:table-cell office:value-type="string" office:string-value="Valid" table:formula="of:=IF([.F644]&lt;=[.E644]; &quot;Valid&quot;; &quot;Invalid&quot;)" table:style-name="ce17">
            <text:p>Valid</text:p>
          </table:table-cell>
          <table:table-cell office:value-type="string" office:string-value="Valid" table:formula="of:=IF([.H644]&lt;=[.G644]; &quot;Valid&quot;; &quot;Invalid&quot;)" table:style-name="ce17">
            <text:p>Valid</text:p>
          </table:table-cell>
          <table:table-cell office:value-type="string" office:string-value="Stable/Reducing" table:formula="of:=IF([.J644]&gt;0; &quot;Increasing Pressure&quot;; &quot;Stable/Reducing&quot;)" table:style-name="ce18">
            <text:p>Stable/Reducing</text:p>
          </table:table-cell>
          <table:table-cell office:value-type="float" office:value="2.8333333333333335" table:formula="of:=IFERROR([.H644]/[.F644]; 0)" table:style-name="ce17">
            <text:p>2.833333333</text:p>
          </table:table-cell>
          <table:table-cell office:value-type="float" office:value="2044.1428571428571" table:formula="of:=AVERAGE([.I644:.I650])" table:style-name="ce15">
            <text:p>2044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9-01T00:00:00" table:style-name="ce14">
            <text:p>01-09-2025</text:p>
          </table:table-cell>
          <table:table-cell office:value-type="string" office:string-value="September" table:formula="of:=TEXT([.A645]; &quot;mmmm&quot;)" table:style-name="ce14">
            <text:p>September</text:p>
          </table:table-cell>
          <table:table-cell office:value-type="string" office:string-value="2025-09" table:formula="of:=TEXT([.A645]; &quot;yyyy-mm&quot;)" table:style-name="ce14">
            <text:p>2025-09</text:p>
          </table:table-cell>
          <table:table-cell office:value-type="float" office:value="10" table:style-name="ce9">
            <text:p>10</text:p>
          </table:table-cell>
          <table:table-cell office:value-type="float" office:value="29" table:style-name="ce9">
            <text:p>29</text:p>
          </table:table-cell>
          <table:table-cell office:value-type="float" office:value="17" table:style-name="ce9">
            <text:p>17</text:p>
          </table:table-cell>
          <table:table-cell office:value-type="float" office:value="2010" table:style-name="ce9">
            <text:p>2010</text:p>
          </table:table-cell>
          <table:table-cell office:value-type="float" office:value="5" table:style-name="ce9">
            <text:p>5</text:p>
          </table:table-cell>
          <table:table-cell office:value-type="float" office:value="2039" table:formula="of:=SUM([.G645]+[.E645])" table:style-name="ce15">
            <text:p>2039</text:p>
          </table:table-cell>
          <table:table-cell office:value-type="float" office:value="12" table:formula="of:=[.F645]-[.H645]" table:style-name="ce15">
            <text:p>12</text:p>
          </table:table-cell>
          <table:table-cell office:value-type="percentage" office:value="7.8469838155958808E-3" table:formula="of:=([.I646]-[.I645])/[.I645]" table:style-name="ce16">
            <text:p>1%</text:p>
          </table:table-cell>
          <table:table-cell office:value-type="string" office:string-value="Valid" table:formula="of:=IF([.F645]&lt;=[.E645]; &quot;Valid&quot;; &quot;Invalid&quot;)" table:style-name="ce17">
            <text:p>Valid</text:p>
          </table:table-cell>
          <table:table-cell office:value-type="string" office:string-value="Valid" table:formula="of:=IF([.H645]&lt;=[.G645]; &quot;Valid&quot;; &quot;Invalid&quot;)" table:style-name="ce17">
            <text:p>Valid</text:p>
          </table:table-cell>
          <table:table-cell office:value-type="string" office:string-value="Increasing Pressure" table:formula="of:=IF([.J645]&gt;0; &quot;Increasing Pressure&quot;; &quot;Stable/Reducing&quot;)" table:style-name="ce18">
            <text:p>Increasing Pressure</text:p>
          </table:table-cell>
          <table:table-cell office:value-type="float" office:value="0.29411764705882354" table:formula="of:=IFERROR([.H645]/[.F645]; 0)" table:style-name="ce17">
            <text:p>0.294117647</text:p>
          </table:table-cell>
          <table:table-cell office:value-type="float" office:value="2051" table:formula="of:=AVERAGE([.I645:.I651])" table:style-name="ce15">
            <text:p>2051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9-02T00:00:00" table:style-name="ce14">
            <text:p>02-09-2025</text:p>
          </table:table-cell>
          <table:table-cell office:value-type="string" office:string-value="September" table:formula="of:=TEXT([.A646]; &quot;mmmm&quot;)" table:style-name="ce14">
            <text:p>September</text:p>
          </table:table-cell>
          <table:table-cell office:value-type="string" office:string-value="2025-09" table:formula="of:=TEXT([.A646]; &quot;yyyy-mm&quot;)" table:style-name="ce14">
            <text:p>2025-09</text:p>
          </table:table-cell>
          <table:table-cell office:value-type="float" office:value="6" table:style-name="ce9">
            <text:p>6</text:p>
          </table:table-cell>
          <table:table-cell office:value-type="float" office:value="35" table:style-name="ce9">
            <text:p>35</text:p>
          </table:table-cell>
          <table:table-cell office:value-type="float" office:value="9" table:style-name="ce9">
            <text:p>9</text:p>
          </table:table-cell>
          <table:table-cell office:value-type="float" office:value="2020" table:style-name="ce9">
            <text:p>2020</text:p>
          </table:table-cell>
          <table:table-cell office:value-type="float" office:value="9" table:style-name="ce9">
            <text:p>9</text:p>
          </table:table-cell>
          <table:table-cell office:value-type="float" office:value="2055" table:formula="of:=SUM([.G646]+[.E646])" table:style-name="ce15">
            <text:p>2055</text:p>
          </table:table-cell>
          <table:table-cell office:value-type="float" office:value="0" table:formula="of:=[.F646]-[.H646]" table:style-name="ce15">
            <text:p>0</text:p>
          </table:table-cell>
          <table:table-cell office:value-type="percentage" office:value="-3.4063260340632603E-3" table:formula="of:=([.I647]-[.I646])/[.I646]" table:style-name="ce16">
            <text:p>0%</text:p>
          </table:table-cell>
          <table:table-cell office:value-type="string" office:string-value="Valid" table:formula="of:=IF([.F646]&lt;=[.E646]; &quot;Valid&quot;; &quot;Invalid&quot;)" table:style-name="ce17">
            <text:p>Valid</text:p>
          </table:table-cell>
          <table:table-cell office:value-type="string" office:string-value="Valid" table:formula="of:=IF([.H646]&lt;=[.G646]; &quot;Valid&quot;; &quot;Invalid&quot;)" table:style-name="ce17">
            <text:p>Valid</text:p>
          </table:table-cell>
          <table:table-cell office:value-type="string" office:string-value="Stable/Reducing" table:formula="of:=IF([.J646]&gt;0; &quot;Increasing Pressure&quot;; &quot;Stable/Reducing&quot;)" table:style-name="ce18">
            <text:p>Stable/Reducing</text:p>
          </table:table-cell>
          <table:table-cell office:value-type="float" office:value="1" table:formula="of:=IFERROR([.H646]/[.F646]; 0)" table:style-name="ce17">
            <text:p>1</text:p>
          </table:table-cell>
          <table:table-cell office:value-type="float" office:value="2055.7142857142858" table:formula="of:=AVERAGE([.I646:.I652])" table:style-name="ce15">
            <text:p>2056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9-03T00:00:00" table:style-name="ce14">
            <text:p>03-09-2025</text:p>
          </table:table-cell>
          <table:table-cell office:value-type="string" office:string-value="September" table:formula="of:=TEXT([.A647]; &quot;mmmm&quot;)" table:style-name="ce14">
            <text:p>September</text:p>
          </table:table-cell>
          <table:table-cell office:value-type="string" office:string-value="2025-09" table:formula="of:=TEXT([.A647]; &quot;yyyy-mm&quot;)" table:style-name="ce14">
            <text:p>2025-09</text:p>
          </table:table-cell>
          <table:table-cell office:value-type="float" office:value="4" table:style-name="ce9">
            <text:p>4</text:p>
          </table:table-cell>
          <table:table-cell office:value-type="float" office:value="29" table:style-name="ce9">
            <text:p>29</text:p>
          </table:table-cell>
          <table:table-cell office:value-type="float" office:value="11" table:style-name="ce9">
            <text:p>11</text:p>
          </table:table-cell>
          <table:table-cell office:value-type="float" office:value="2019" table:style-name="ce9">
            <text:p>2019</text:p>
          </table:table-cell>
          <table:table-cell office:value-type="float" office:value="10" table:style-name="ce9">
            <text:p>10</text:p>
          </table:table-cell>
          <table:table-cell office:value-type="float" office:value="2048" table:formula="of:=SUM([.G647]+[.E647])" table:style-name="ce15">
            <text:p>2048</text:p>
          </table:table-cell>
          <table:table-cell office:value-type="float" office:value="1" table:formula="of:=[.F647]-[.H647]" table:style-name="ce15">
            <text:p>1</text:p>
          </table:table-cell>
          <table:table-cell office:value-type="percentage" office:value="3.41796875E-3" table:formula="of:=([.I648]-[.I647])/[.I647]" table:style-name="ce16">
            <text:p>0%</text:p>
          </table:table-cell>
          <table:table-cell office:value-type="string" office:string-value="Valid" table:formula="of:=IF([.F647]&lt;=[.E647]; &quot;Valid&quot;; &quot;Invalid&quot;)" table:style-name="ce17">
            <text:p>Valid</text:p>
          </table:table-cell>
          <table:table-cell office:value-type="string" office:string-value="Valid" table:formula="of:=IF([.H647]&lt;=[.G647]; &quot;Valid&quot;; &quot;Invalid&quot;)" table:style-name="ce17">
            <text:p>Valid</text:p>
          </table:table-cell>
          <table:table-cell office:value-type="string" office:string-value="Increasing Pressure" table:formula="of:=IF([.J647]&gt;0; &quot;Increasing Pressure&quot;; &quot;Stable/Reducing&quot;)" table:style-name="ce18">
            <text:p>Increasing Pressure</text:p>
          </table:table-cell>
          <table:table-cell office:value-type="float" office:value="0.90909090909090906" table:formula="of:=IFERROR([.H647]/[.F647]; 0)" table:style-name="ce17">
            <text:p>0.909090909</text:p>
          </table:table-cell>
          <table:table-cell office:value-type="float" office:value="2060" table:formula="of:=AVERAGE([.I647:.I653])" table:style-name="ce15">
            <text:p>2060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9-04T00:00:00" table:style-name="ce14">
            <text:p>04-09-2025</text:p>
          </table:table-cell>
          <table:table-cell office:value-type="string" office:string-value="September" table:formula="of:=TEXT([.A648]; &quot;mmmm&quot;)" table:style-name="ce14">
            <text:p>September</text:p>
          </table:table-cell>
          <table:table-cell office:value-type="string" office:string-value="2025-09" table:formula="of:=TEXT([.A648]; &quot;yyyy-mm&quot;)" table:style-name="ce14">
            <text:p>2025-09</text:p>
          </table:table-cell>
          <table:table-cell office:value-type="float" office:value="11" table:style-name="ce9">
            <text:p>11</text:p>
          </table:table-cell>
          <table:table-cell office:value-type="float" office:value="40" table:style-name="ce9">
            <text:p>40</text:p>
          </table:table-cell>
          <table:table-cell office:value-type="float" office:value="2" table:style-name="ce9">
            <text:p>2</text:p>
          </table:table-cell>
          <table:table-cell office:value-type="float" office:value="2015" table:style-name="ce9">
            <text:p>2015</text:p>
          </table:table-cell>
          <table:table-cell office:value-type="float" office:value="14" table:style-name="ce9">
            <text:p>14</text:p>
          </table:table-cell>
          <table:table-cell office:value-type="float" office:value="2055" table:formula="of:=SUM([.G648]+[.E648])" table:style-name="ce15">
            <text:p>2055</text:p>
          </table:table-cell>
          <table:table-cell office:value-type="float" office:value="-12" table:formula="of:=[.F648]-[.H648]" table:style-name="ce15">
            <text:p>-12</text:p>
          </table:table-cell>
          <table:table-cell office:value-type="percentage" office:value="-4.8661800486618006E-3" table:formula="of:=([.I649]-[.I648])/[.I648]" table:style-name="ce16">
            <text:p>0%</text:p>
          </table:table-cell>
          <table:table-cell office:value-type="string" office:string-value="Valid" table:formula="of:=IF([.F648]&lt;=[.E648]; &quot;Valid&quot;; &quot;Invalid&quot;)" table:style-name="ce17">
            <text:p>Valid</text:p>
          </table:table-cell>
          <table:table-cell office:value-type="string" office:string-value="Valid" table:formula="of:=IF([.H648]&lt;=[.G648]; &quot;Valid&quot;; &quot;Invalid&quot;)" table:style-name="ce17">
            <text:p>Valid</text:p>
          </table:table-cell>
          <table:table-cell office:value-type="string" office:string-value="Stable/Reducing" table:formula="of:=IF([.J648]&gt;0; &quot;Increasing Pressure&quot;; &quot;Stable/Reducing&quot;)" table:style-name="ce18">
            <text:p>Stable/Reducing</text:p>
          </table:table-cell>
          <table:table-cell office:value-type="float" office:value="7" table:formula="of:=IFERROR([.H648]/[.F648]; 0)" table:style-name="ce17">
            <text:p>7</text:p>
          </table:table-cell>
          <table:table-cell office:value-type="float" office:value="2070.5714285714284" table:formula="of:=AVERAGE([.I648:.I654])" table:style-name="ce15">
            <text:p>2071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9-07T00:00:00" table:style-name="ce14">
            <text:p>07-09-2025</text:p>
          </table:table-cell>
          <table:table-cell office:value-type="string" office:string-value="September" table:formula="of:=TEXT([.A649]; &quot;mmmm&quot;)" table:style-name="ce14">
            <text:p>September</text:p>
          </table:table-cell>
          <table:table-cell office:value-type="string" office:string-value="2025-09" table:formula="of:=TEXT([.A649]; &quot;yyyy-mm&quot;)" table:style-name="ce14">
            <text:p>2025-09</text:p>
          </table:table-cell>
          <table:table-cell office:value-type="float" office:value="4" table:style-name="ce9">
            <text:p>4</text:p>
          </table:table-cell>
          <table:table-cell office:value-type="float" office:value="19" table:style-name="ce9">
            <text:p>19</text:p>
          </table:table-cell>
          <table:table-cell office:value-type="float" office:value="9" table:style-name="ce9">
            <text:p>9</text:p>
          </table:table-cell>
          <table:table-cell office:value-type="float" office:value="2026" table:style-name="ce9">
            <text:p>2026</text:p>
          </table:table-cell>
          <table:table-cell office:value-type="float" office:value="7" table:style-name="ce9">
            <text:p>7</text:p>
          </table:table-cell>
          <table:table-cell office:value-type="float" office:value="2045" table:formula="of:=SUM([.G649]+[.E649])" table:style-name="ce15">
            <text:p>2045</text:p>
          </table:table-cell>
          <table:table-cell office:value-type="float" office:value="2" table:formula="of:=[.F649]-[.H649]" table:style-name="ce15">
            <text:p>2</text:p>
          </table:table-cell>
          <table:table-cell office:value-type="percentage" office:value="2.4449877750611247E-3" table:formula="of:=([.I650]-[.I649])/[.I649]" table:style-name="ce16">
            <text:p>0%</text:p>
          </table:table-cell>
          <table:table-cell office:value-type="string" office:string-value="Valid" table:formula="of:=IF([.F649]&lt;=[.E649]; &quot;Valid&quot;; &quot;Invalid&quot;)" table:style-name="ce17">
            <text:p>Valid</text:p>
          </table:table-cell>
          <table:table-cell office:value-type="string" office:string-value="Valid" table:formula="of:=IF([.H649]&lt;=[.G649]; &quot;Valid&quot;; &quot;Invalid&quot;)" table:style-name="ce17">
            <text:p>Valid</text:p>
          </table:table-cell>
          <table:table-cell office:value-type="string" office:string-value="Increasing Pressure" table:formula="of:=IF([.J649]&gt;0; &quot;Increasing Pressure&quot;; &quot;Stable/Reducing&quot;)" table:style-name="ce18">
            <text:p>Increasing Pressure</text:p>
          </table:table-cell>
          <table:table-cell office:value-type="float" office:value="0.77777777777777779" table:formula="of:=IFERROR([.H649]/[.F649]; 0)" table:style-name="ce17">
            <text:p>0.777777778</text:p>
          </table:table-cell>
          <table:table-cell office:value-type="float" office:value="2081.7142857142858" table:formula="of:=AVERAGE([.I649:.I655])" table:style-name="ce15">
            <text:p>2082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9-08T00:00:00" table:style-name="ce14">
            <text:p>08-09-2025</text:p>
          </table:table-cell>
          <table:table-cell office:value-type="string" office:string-value="September" table:formula="of:=TEXT([.A650]; &quot;mmmm&quot;)" table:style-name="ce14">
            <text:p>September</text:p>
          </table:table-cell>
          <table:table-cell office:value-type="string" office:string-value="2025-09" table:formula="of:=TEXT([.A650]; &quot;yyyy-mm&quot;)" table:style-name="ce14">
            <text:p>2025-09</text:p>
          </table:table-cell>
          <table:table-cell office:value-type="float" office:value="7" table:style-name="ce9">
            <text:p>7</text:p>
          </table:table-cell>
          <table:table-cell office:value-type="float" office:value="25" table:style-name="ce9">
            <text:p>25</text:p>
          </table:table-cell>
          <table:table-cell office:value-type="float" office:value="5" table:style-name="ce9">
            <text:p>5</text:p>
          </table:table-cell>
          <table:table-cell office:value-type="float" office:value="2025" table:style-name="ce9">
            <text:p>2025</text:p>
          </table:table-cell>
          <table:table-cell office:value-type="float" office:value="6" table:style-name="ce9">
            <text:p>6</text:p>
          </table:table-cell>
          <table:table-cell office:value-type="float" office:value="2050" table:formula="of:=SUM([.G650]+[.E650])" table:style-name="ce15">
            <text:p>2050</text:p>
          </table:table-cell>
          <table:table-cell office:value-type="float" office:value="-1" table:formula="of:=[.F650]-[.H650]" table:style-name="ce15">
            <text:p>-1</text:p>
          </table:table-cell>
          <table:table-cell office:value-type="percentage" office:value="7.3170731707317077E-3" table:formula="of:=([.I651]-[.I650])/[.I650]" table:style-name="ce16">
            <text:p>1%</text:p>
          </table:table-cell>
          <table:table-cell office:value-type="string" office:string-value="Valid" table:formula="of:=IF([.F650]&lt;=[.E650]; &quot;Valid&quot;; &quot;Invalid&quot;)" table:style-name="ce17">
            <text:p>Valid</text:p>
          </table:table-cell>
          <table:table-cell office:value-type="string" office:string-value="Valid" table:formula="of:=IF([.H650]&lt;=[.G650]; &quot;Valid&quot;; &quot;Invalid&quot;)" table:style-name="ce17">
            <text:p>Valid</text:p>
          </table:table-cell>
          <table:table-cell office:value-type="string" office:string-value="Stable/Reducing" table:formula="of:=IF([.J650]&gt;0; &quot;Increasing Pressure&quot;; &quot;Stable/Reducing&quot;)" table:style-name="ce18">
            <text:p>Stable/Reducing</text:p>
          </table:table-cell>
          <table:table-cell office:value-type="float" office:value="1.2" table:formula="of:=IFERROR([.H650]/[.F650]; 0)" table:style-name="ce17">
            <text:p>1.2</text:p>
          </table:table-cell>
          <table:table-cell office:value-type="float" office:value="2092.8571428571427" table:formula="of:=AVERAGE([.I650:.I656])" table:style-name="ce15">
            <text:p>2093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9-09T00:00:00" table:style-name="ce14">
            <text:p>09-09-2025</text:p>
          </table:table-cell>
          <table:table-cell office:value-type="string" office:string-value="September" table:formula="of:=TEXT([.A651]; &quot;mmmm&quot;)" table:style-name="ce14">
            <text:p>September</text:p>
          </table:table-cell>
          <table:table-cell office:value-type="string" office:string-value="2025-09" table:formula="of:=TEXT([.A651]; &quot;yyyy-mm&quot;)" table:style-name="ce14">
            <text:p>2025-09</text:p>
          </table:table-cell>
          <table:table-cell office:value-type="float" office:value="18" table:style-name="ce9">
            <text:p>18</text:p>
          </table:table-cell>
          <table:table-cell office:value-type="float" office:value="42" table:style-name="ce9">
            <text:p>42</text:p>
          </table:table-cell>
          <table:table-cell office:value-type="float" office:value="11" table:style-name="ce9">
            <text:p>11</text:p>
          </table:table-cell>
          <table:table-cell office:value-type="float" office:value="2023" table:style-name="ce9">
            <text:p>2023</text:p>
          </table:table-cell>
          <table:table-cell office:value-type="float" office:value="14" table:style-name="ce9">
            <text:p>14</text:p>
          </table:table-cell>
          <table:table-cell office:value-type="float" office:value="2065" table:formula="of:=SUM([.G651]+[.E651])" table:style-name="ce15">
            <text:p>2065</text:p>
          </table:table-cell>
          <table:table-cell office:value-type="float" office:value="-3" table:formula="of:=[.F651]-[.H651]" table:style-name="ce15">
            <text:p>-3</text:p>
          </table:table-cell>
          <table:table-cell office:value-type="percentage" office:value="3.3898305084745762E-3" table:formula="of:=([.I652]-[.I651])/[.I651]" table:style-name="ce16">
            <text:p>0%</text:p>
          </table:table-cell>
          <table:table-cell office:value-type="string" office:string-value="Valid" table:formula="of:=IF([.F651]&lt;=[.E651]; &quot;Valid&quot;; &quot;Invalid&quot;)" table:style-name="ce17">
            <text:p>Valid</text:p>
          </table:table-cell>
          <table:table-cell office:value-type="string" office:string-value="Valid" table:formula="of:=IF([.H651]&lt;=[.G651]; &quot;Valid&quot;; &quot;Invalid&quot;)" table:style-name="ce17">
            <text:p>Valid</text:p>
          </table:table-cell>
          <table:table-cell office:value-type="string" office:string-value="Stable/Reducing" table:formula="of:=IF([.J651]&gt;0; &quot;Increasing Pressure&quot;; &quot;Stable/Reducing&quot;)" table:style-name="ce18">
            <text:p>Stable/Reducing</text:p>
          </table:table-cell>
          <table:table-cell office:value-type="float" office:value="1.2727272727272727" table:formula="of:=IFERROR([.H651]/[.F651]; 0)" table:style-name="ce17">
            <text:p>1.272727273</text:p>
          </table:table-cell>
          <table:table-cell office:value-type="float" office:value="2104.8571428571427" table:formula="of:=AVERAGE([.I651:.I657])" table:style-name="ce15">
            <text:p>2105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9-10T00:00:00" table:style-name="ce14">
            <text:p>10-09-2025</text:p>
          </table:table-cell>
          <table:table-cell office:value-type="string" office:string-value="September" table:formula="of:=TEXT([.A652]; &quot;mmmm&quot;)" table:style-name="ce14">
            <text:p>September</text:p>
          </table:table-cell>
          <table:table-cell office:value-type="string" office:string-value="2025-09" table:formula="of:=TEXT([.A652]; &quot;yyyy-mm&quot;)" table:style-name="ce14">
            <text:p>2025-09</text:p>
          </table:table-cell>
          <table:table-cell office:value-type="float" office:value="10" table:style-name="ce9">
            <text:p>10</text:p>
          </table:table-cell>
          <table:table-cell office:value-type="float" office:value="47" table:style-name="ce9">
            <text:p>47</text:p>
          </table:table-cell>
          <table:table-cell office:value-type="float" office:value="14" table:style-name="ce9">
            <text:p>14</text:p>
          </table:table-cell>
          <table:table-cell office:value-type="float" office:value="2025" table:style-name="ce9">
            <text:p>2025</text:p>
          </table:table-cell>
          <table:table-cell office:value-type="float" office:value="18" table:style-name="ce9">
            <text:p>18</text:p>
          </table:table-cell>
          <table:table-cell office:value-type="float" office:value="2072" table:formula="of:=SUM([.G652]+[.E652])" table:style-name="ce15">
            <text:p>2072</text:p>
          </table:table-cell>
          <table:table-cell office:value-type="float" office:value="-4" table:formula="of:=[.F652]-[.H652]" table:style-name="ce15">
            <text:p>-4</text:p>
          </table:table-cell>
          <table:table-cell office:value-type="percentage" office:value="6.2741312741312737E-3" table:formula="of:=([.I653]-[.I652])/[.I652]" table:style-name="ce16">
            <text:p>1%</text:p>
          </table:table-cell>
          <table:table-cell office:value-type="string" office:string-value="Valid" table:formula="of:=IF([.F652]&lt;=[.E652]; &quot;Valid&quot;; &quot;Invalid&quot;)" table:style-name="ce17">
            <text:p>Valid</text:p>
          </table:table-cell>
          <table:table-cell office:value-type="string" office:string-value="Valid" table:formula="of:=IF([.H652]&lt;=[.G652]; &quot;Valid&quot;; &quot;Invalid&quot;)" table:style-name="ce17">
            <text:p>Valid</text:p>
          </table:table-cell>
          <table:table-cell office:value-type="string" office:string-value="Stable/Reducing" table:formula="of:=IF([.J652]&gt;0; &quot;Increasing Pressure&quot;; &quot;Stable/Reducing&quot;)" table:style-name="ce18">
            <text:p>Stable/Reducing</text:p>
          </table:table-cell>
          <table:table-cell office:value-type="float" office:value="1.2857142857142858" table:formula="of:=IFERROR([.H652]/[.F652]; 0)" table:style-name="ce17">
            <text:p>1.285714286</text:p>
          </table:table-cell>
          <table:table-cell office:value-type="float" office:value="2116.7142857142858" table:formula="of:=AVERAGE([.I652:.I658])" table:style-name="ce15">
            <text:p>2117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9-11T00:00:00" table:style-name="ce14">
            <text:p>11-09-2025</text:p>
          </table:table-cell>
          <table:table-cell office:value-type="string" office:string-value="September" table:formula="of:=TEXT([.A653]; &quot;mmmm&quot;)" table:style-name="ce14">
            <text:p>September</text:p>
          </table:table-cell>
          <table:table-cell office:value-type="string" office:string-value="2025-09" table:formula="of:=TEXT([.A653]; &quot;yyyy-mm&quot;)" table:style-name="ce14">
            <text:p>2025-09</text:p>
          </table:table-cell>
          <table:table-cell office:value-type="float" office:value="12" table:style-name="ce9">
            <text:p>12</text:p>
          </table:table-cell>
          <table:table-cell office:value-type="float" office:value="38" table:style-name="ce9">
            <text:p>38</text:p>
          </table:table-cell>
          <table:table-cell office:value-type="float" office:value="29" table:style-name="ce9">
            <text:p>29</text:p>
          </table:table-cell>
          <table:table-cell office:value-type="float" office:value="2047" table:style-name="ce9">
            <text:p>2047</text:p>
          </table:table-cell>
          <table:table-cell office:value-type="float" office:value="6" table:style-name="ce9">
            <text:p>6</text:p>
          </table:table-cell>
          <table:table-cell office:value-type="float" office:value="2085" table:formula="of:=SUM([.G653]+[.E653])" table:style-name="ce15">
            <text:p>2085</text:p>
          </table:table-cell>
          <table:table-cell office:value-type="float" office:value="23" table:formula="of:=[.F653]-[.H653]" table:style-name="ce15">
            <text:p>23</text:p>
          </table:table-cell>
          <table:table-cell office:value-type="percentage" office:value="1.7745803357314148E-2" table:formula="of:=([.I654]-[.I653])/[.I653]" table:style-name="ce16">
            <text:p>2%</text:p>
          </table:table-cell>
          <table:table-cell office:value-type="string" office:string-value="Valid" table:formula="of:=IF([.F653]&lt;=[.E653]; &quot;Valid&quot;; &quot;Invalid&quot;)" table:style-name="ce17">
            <text:p>Valid</text:p>
          </table:table-cell>
          <table:table-cell office:value-type="string" office:string-value="Valid" table:formula="of:=IF([.H653]&lt;=[.G653]; &quot;Valid&quot;; &quot;Invalid&quot;)" table:style-name="ce17">
            <text:p>Valid</text:p>
          </table:table-cell>
          <table:table-cell office:value-type="string" office:string-value="Increasing Pressure" table:formula="of:=IF([.J653]&gt;0; &quot;Increasing Pressure&quot;; &quot;Stable/Reducing&quot;)" table:style-name="ce18">
            <text:p>Increasing Pressure</text:p>
          </table:table-cell>
          <table:table-cell office:value-type="float" office:value="0.20689655172413793" table:formula="of:=IFERROR([.H653]/[.F653]; 0)" table:style-name="ce17">
            <text:p>0.206896552</text:p>
          </table:table-cell>
          <table:table-cell office:value-type="float" office:value="2130.5714285714284" table:formula="of:=AVERAGE([.I653:.I659])" table:style-name="ce15">
            <text:p>2131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9-14T00:00:00" table:style-name="ce14">
            <text:p>14-09-2025</text:p>
          </table:table-cell>
          <table:table-cell office:value-type="string" office:string-value="September" table:formula="of:=TEXT([.A654]; &quot;mmmm&quot;)" table:style-name="ce14">
            <text:p>September</text:p>
          </table:table-cell>
          <table:table-cell office:value-type="string" office:string-value="2025-09" table:formula="of:=TEXT([.A654]; &quot;yyyy-mm&quot;)" table:style-name="ce14">
            <text:p>2025-09</text:p>
          </table:table-cell>
          <table:table-cell office:value-type="float" office:value="7" table:style-name="ce9">
            <text:p>7</text:p>
          </table:table-cell>
          <table:table-cell office:value-type="float" office:value="39" table:style-name="ce9">
            <text:p>39</text:p>
          </table:table-cell>
          <table:table-cell office:value-type="float" office:value="13" table:style-name="ce9">
            <text:p>13</text:p>
          </table:table-cell>
          <table:table-cell office:value-type="float" office:value="2083" table:style-name="ce9">
            <text:p>2083</text:p>
          </table:table-cell>
          <table:table-cell office:value-type="float" office:value="5" table:style-name="ce9">
            <text:p>5</text:p>
          </table:table-cell>
          <table:table-cell office:value-type="float" office:value="2122" table:formula="of:=SUM([.G654]+[.E654])" table:style-name="ce15">
            <text:p>2122</text:p>
          </table:table-cell>
          <table:table-cell office:value-type="float" office:value="8" table:formula="of:=[.F654]-[.H654]" table:style-name="ce15">
            <text:p>8</text:p>
          </table:table-cell>
          <table:table-cell office:value-type="percentage" office:value="5.1837888784165885E-3" table:formula="of:=([.I655]-[.I654])/[.I654]" table:style-name="ce16">
            <text:p>1%</text:p>
          </table:table-cell>
          <table:table-cell office:value-type="string" office:string-value="Valid" table:formula="of:=IF([.F654]&lt;=[.E654]; &quot;Valid&quot;; &quot;Invalid&quot;)" table:style-name="ce17">
            <text:p>Valid</text:p>
          </table:table-cell>
          <table:table-cell office:value-type="string" office:string-value="Valid" table:formula="of:=IF([.H654]&lt;=[.G654]; &quot;Valid&quot;; &quot;Invalid&quot;)" table:style-name="ce17">
            <text:p>Valid</text:p>
          </table:table-cell>
          <table:table-cell office:value-type="string" office:string-value="Increasing Pressure" table:formula="of:=IF([.J654]&gt;0; &quot;Increasing Pressure&quot;; &quot;Stable/Reducing&quot;)" table:style-name="ce18">
            <text:p>Increasing Pressure</text:p>
          </table:table-cell>
          <table:table-cell office:value-type="float" office:value="0.38461538461538464" table:formula="of:=IFERROR([.H654]/[.F654]; 0)" table:style-name="ce17">
            <text:p>0.384615385</text:p>
          </table:table-cell>
          <table:table-cell office:value-type="float" office:value="2144.2857142857142" table:formula="of:=AVERAGE([.I654:.I660])" table:style-name="ce15">
            <text:p>2144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9-15T00:00:00" table:style-name="ce14">
            <text:p>15-09-2025</text:p>
          </table:table-cell>
          <table:table-cell office:value-type="string" office:string-value="September" table:formula="of:=TEXT([.A655]; &quot;mmmm&quot;)" table:style-name="ce14">
            <text:p>September</text:p>
          </table:table-cell>
          <table:table-cell office:value-type="string" office:string-value="2025-09" table:formula="of:=TEXT([.A655]; &quot;yyyy-mm&quot;)" table:style-name="ce14">
            <text:p>2025-09</text:p>
          </table:table-cell>
          <table:table-cell office:value-type="float" office:value="9" table:style-name="ce9">
            <text:p>9</text:p>
          </table:table-cell>
          <table:table-cell office:value-type="float" office:value="47" table:style-name="ce9">
            <text:p>47</text:p>
          </table:table-cell>
          <table:table-cell office:value-type="float" office:value="10" table:style-name="ce9">
            <text:p>10</text:p>
          </table:table-cell>
          <table:table-cell office:value-type="float" office:value="2086" table:style-name="ce9">
            <text:p>2086</text:p>
          </table:table-cell>
          <table:table-cell office:value-type="float" office:value="10" table:style-name="ce9">
            <text:p>10</text:p>
          </table:table-cell>
          <table:table-cell office:value-type="float" office:value="2133" table:formula="of:=SUM([.G655]+[.E655])" table:style-name="ce15">
            <text:p>2133</text:p>
          </table:table-cell>
          <table:table-cell office:value-type="float" office:value="0" table:formula="of:=[.F655]-[.H655]" table:style-name="ce15">
            <text:p>0</text:p>
          </table:table-cell>
          <table:table-cell office:value-type="percentage" office:value="-4.6882325363338025E-3" table:formula="of:=([.I656]-[.I655])/[.I655]" table:style-name="ce16">
            <text:p>0%</text:p>
          </table:table-cell>
          <table:table-cell office:value-type="string" office:string-value="Valid" table:formula="of:=IF([.F655]&lt;=[.E655]; &quot;Valid&quot;; &quot;Invalid&quot;)" table:style-name="ce17">
            <text:p>Valid</text:p>
          </table:table-cell>
          <table:table-cell office:value-type="string" office:string-value="Valid" table:formula="of:=IF([.H655]&lt;=[.G655]; &quot;Valid&quot;; &quot;Invalid&quot;)" table:style-name="ce17">
            <text:p>Valid</text:p>
          </table:table-cell>
          <table:table-cell office:value-type="string" office:string-value="Stable/Reducing" table:formula="of:=IF([.J655]&gt;0; &quot;Increasing Pressure&quot;; &quot;Stable/Reducing&quot;)" table:style-name="ce18">
            <text:p>Stable/Reducing</text:p>
          </table:table-cell>
          <table:table-cell office:value-type="float" office:value="1" table:formula="of:=IFERROR([.H655]/[.F655]; 0)" table:style-name="ce17">
            <text:p>1</text:p>
          </table:table-cell>
          <table:table-cell office:value-type="float" office:value="2152.7142857142858" table:formula="of:=AVERAGE([.I655:.I661])" table:style-name="ce15">
            <text:p>2153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9-16T00:00:00" table:style-name="ce14">
            <text:p>16-09-2025</text:p>
          </table:table-cell>
          <table:table-cell office:value-type="string" office:string-value="September" table:formula="of:=TEXT([.A656]; &quot;mmmm&quot;)" table:style-name="ce14">
            <text:p>September</text:p>
          </table:table-cell>
          <table:table-cell office:value-type="string" office:string-value="2025-09" table:formula="of:=TEXT([.A656]; &quot;yyyy-mm&quot;)" table:style-name="ce14">
            <text:p>2025-09</text:p>
          </table:table-cell>
          <table:table-cell office:value-type="float" office:value="7" table:style-name="ce9">
            <text:p>7</text:p>
          </table:table-cell>
          <table:table-cell office:value-type="float" office:value="28" table:style-name="ce9">
            <text:p>28</text:p>
          </table:table-cell>
          <table:table-cell office:value-type="float" office:value="17" table:style-name="ce9">
            <text:p>17</text:p>
          </table:table-cell>
          <table:table-cell office:value-type="float" office:value="2095" table:style-name="ce9">
            <text:p>2095</text:p>
          </table:table-cell>
          <table:table-cell office:value-type="float" office:value="12" table:style-name="ce9">
            <text:p>12</text:p>
          </table:table-cell>
          <table:table-cell office:value-type="float" office:value="2123" table:formula="of:=SUM([.G656]+[.E656])" table:style-name="ce15">
            <text:p>2123</text:p>
          </table:table-cell>
          <table:table-cell office:value-type="float" office:value="5" table:formula="of:=[.F656]-[.H656]" table:style-name="ce15">
            <text:p>5</text:p>
          </table:table-cell>
          <table:table-cell office:value-type="percentage" office:value="5.1813471502590676E-3" table:formula="of:=([.I657]-[.I656])/[.I656]" table:style-name="ce16">
            <text:p>1%</text:p>
          </table:table-cell>
          <table:table-cell office:value-type="string" office:string-value="Valid" table:formula="of:=IF([.F656]&lt;=[.E656]; &quot;Valid&quot;; &quot;Invalid&quot;)" table:style-name="ce17">
            <text:p>Valid</text:p>
          </table:table-cell>
          <table:table-cell office:value-type="string" office:string-value="Valid" table:formula="of:=IF([.H656]&lt;=[.G656]; &quot;Valid&quot;; &quot;Invalid&quot;)" table:style-name="ce17">
            <text:p>Valid</text:p>
          </table:table-cell>
          <table:table-cell office:value-type="string" office:string-value="Increasing Pressure" table:formula="of:=IF([.J656]&gt;0; &quot;Increasing Pressure&quot;; &quot;Stable/Reducing&quot;)" table:style-name="ce18">
            <text:p>Increasing Pressure</text:p>
          </table:table-cell>
          <table:table-cell office:value-type="float" office:value="0.70588235294117652" table:formula="of:=IFERROR([.H656]/[.F656]; 0)" table:style-name="ce17">
            <text:p>0.705882353</text:p>
          </table:table-cell>
          <table:table-cell office:value-type="float" office:value="2158.8571428571427" table:formula="of:=AVERAGE([.I656:.I662])" table:style-name="ce15">
            <text:p>2159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9-17T00:00:00" table:style-name="ce14">
            <text:p>17-09-2025</text:p>
          </table:table-cell>
          <table:table-cell office:value-type="string" office:string-value="September" table:formula="of:=TEXT([.A657]; &quot;mmmm&quot;)" table:style-name="ce14">
            <text:p>September</text:p>
          </table:table-cell>
          <table:table-cell office:value-type="string" office:string-value="2025-09" table:formula="of:=TEXT([.A657]; &quot;yyyy-mm&quot;)" table:style-name="ce14">
            <text:p>2025-09</text:p>
          </table:table-cell>
          <table:table-cell office:value-type="float" office:value="7" table:style-name="ce9">
            <text:p>7</text:p>
          </table:table-cell>
          <table:table-cell office:value-type="float" office:value="38" table:style-name="ce9">
            <text:p>38</text:p>
          </table:table-cell>
          <table:table-cell office:value-type="float" office:value="5" table:style-name="ce9">
            <text:p>5</text:p>
          </table:table-cell>
          <table:table-cell office:value-type="float" office:value="2096" table:style-name="ce9">
            <text:p>2096</text:p>
          </table:table-cell>
          <table:table-cell office:value-type="float" office:value="13" table:style-name="ce9">
            <text:p>13</text:p>
          </table:table-cell>
          <table:table-cell office:value-type="float" office:value="2134" table:formula="of:=SUM([.G657]+[.E657])" table:style-name="ce15">
            <text:p>2134</text:p>
          </table:table-cell>
          <table:table-cell office:value-type="float" office:value="-8" table:formula="of:=[.F657]-[.H657]" table:style-name="ce15">
            <text:p>-8</text:p>
          </table:table-cell>
          <table:table-cell office:value-type="percentage" office:value="6.5604498594189313E-3" table:formula="of:=([.I658]-[.I657])/[.I657]" table:style-name="ce16">
            <text:p>1%</text:p>
          </table:table-cell>
          <table:table-cell office:value-type="string" office:string-value="Valid" table:formula="of:=IF([.F657]&lt;=[.E657]; &quot;Valid&quot;; &quot;Invalid&quot;)" table:style-name="ce17">
            <text:p>Valid</text:p>
          </table:table-cell>
          <table:table-cell office:value-type="string" office:string-value="Valid" table:formula="of:=IF([.H657]&lt;=[.G657]; &quot;Valid&quot;; &quot;Invalid&quot;)" table:style-name="ce17">
            <text:p>Valid</text:p>
          </table:table-cell>
          <table:table-cell office:value-type="string" office:string-value="Stable/Reducing" table:formula="of:=IF([.J657]&gt;0; &quot;Increasing Pressure&quot;; &quot;Stable/Reducing&quot;)" table:style-name="ce18">
            <text:p>Stable/Reducing</text:p>
          </table:table-cell>
          <table:table-cell office:value-type="float" office:value="2.6" table:formula="of:=IFERROR([.H657]/[.F657]; 0)" table:style-name="ce17">
            <text:p>2.6</text:p>
          </table:table-cell>
          <table:table-cell office:value-type="float" office:value="2165.1428571428573" table:formula="of:=AVERAGE([.I657:.I663])" table:style-name="ce15">
            <text:p>2165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9-18T00:00:00" table:style-name="ce14">
            <text:p>18-09-2025</text:p>
          </table:table-cell>
          <table:table-cell office:value-type="string" office:string-value="September" table:formula="of:=TEXT([.A658]; &quot;mmmm&quot;)" table:style-name="ce14">
            <text:p>September</text:p>
          </table:table-cell>
          <table:table-cell office:value-type="string" office:string-value="2025-09" table:formula="of:=TEXT([.A658]; &quot;yyyy-mm&quot;)" table:style-name="ce14">
            <text:p>2025-09</text:p>
          </table:table-cell>
          <table:table-cell office:value-type="float" office:value="20" table:style-name="ce9">
            <text:p>20</text:p>
          </table:table-cell>
          <table:table-cell office:value-type="float" office:value="52" table:style-name="ce9">
            <text:p>52</text:p>
          </table:table-cell>
          <table:table-cell office:value-type="float" office:value="11" table:style-name="ce9">
            <text:p>11</text:p>
          </table:table-cell>
          <table:table-cell office:value-type="float" office:value="2096" table:style-name="ce9">
            <text:p>2096</text:p>
          </table:table-cell>
          <table:table-cell office:value-type="float" office:value="14" table:style-name="ce9">
            <text:p>14</text:p>
          </table:table-cell>
          <table:table-cell office:value-type="float" office:value="2148" table:formula="of:=SUM([.G658]+[.E658])" table:style-name="ce15">
            <text:p>2148</text:p>
          </table:table-cell>
          <table:table-cell office:value-type="float" office:value="-3" table:formula="of:=[.F658]-[.H658]" table:style-name="ce15">
            <text:p>-3</text:p>
          </table:table-cell>
          <table:table-cell office:value-type="percentage" office:value="9.7765363128491621E-3" table:formula="of:=([.I659]-[.I658])/[.I658]" table:style-name="ce16">
            <text:p>1%</text:p>
          </table:table-cell>
          <table:table-cell office:value-type="string" office:string-value="Valid" table:formula="of:=IF([.F658]&lt;=[.E658]; &quot;Valid&quot;; &quot;Invalid&quot;)" table:style-name="ce17">
            <text:p>Valid</text:p>
          </table:table-cell>
          <table:table-cell office:value-type="string" office:string-value="Valid" table:formula="of:=IF([.H658]&lt;=[.G658]; &quot;Valid&quot;; &quot;Invalid&quot;)" table:style-name="ce17">
            <text:p>Valid</text:p>
          </table:table-cell>
          <table:table-cell office:value-type="string" office:string-value="Stable/Reducing" table:formula="of:=IF([.J658]&gt;0; &quot;Increasing Pressure&quot;; &quot;Stable/Reducing&quot;)" table:style-name="ce18">
            <text:p>Stable/Reducing</text:p>
          </table:table-cell>
          <table:table-cell office:value-type="float" office:value="1.2727272727272727" table:formula="of:=IFERROR([.H658]/[.F658]; 0)" table:style-name="ce17">
            <text:p>1.272727273</text:p>
          </table:table-cell>
          <table:table-cell office:value-type="float" office:value="2171" table:formula="of:=AVERAGE([.I658:.I664])" table:style-name="ce15">
            <text:p>2171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9-21T00:00:00" table:style-name="ce14">
            <text:p>21-09-2025</text:p>
          </table:table-cell>
          <table:table-cell office:value-type="string" office:string-value="September" table:formula="of:=TEXT([.A659]; &quot;mmmm&quot;)" table:style-name="ce14">
            <text:p>September</text:p>
          </table:table-cell>
          <table:table-cell office:value-type="string" office:string-value="2025-09" table:formula="of:=TEXT([.A659]; &quot;yyyy-mm&quot;)" table:style-name="ce14">
            <text:p>2025-09</text:p>
          </table:table-cell>
          <table:table-cell office:value-type="float" office:value="8" table:style-name="ce9">
            <text:p>8</text:p>
          </table:table-cell>
          <table:table-cell office:value-type="float" office:value="35" table:style-name="ce9">
            <text:p>35</text:p>
          </table:table-cell>
          <table:table-cell office:value-type="float" office:value="13" table:style-name="ce9">
            <text:p>13</text:p>
          </table:table-cell>
          <table:table-cell office:value-type="float" office:value="2134" table:style-name="ce9">
            <text:p>2134</text:p>
          </table:table-cell>
          <table:table-cell office:value-type="float" office:value="5" table:style-name="ce9">
            <text:p>5</text:p>
          </table:table-cell>
          <table:table-cell office:value-type="float" office:value="2169" table:formula="of:=SUM([.G659]+[.E659])" table:style-name="ce15">
            <text:p>2169</text:p>
          </table:table-cell>
          <table:table-cell office:value-type="float" office:value="8" table:formula="of:=[.F659]-[.H659]" table:style-name="ce15">
            <text:p>8</text:p>
          </table:table-cell>
          <table:table-cell office:value-type="percentage" office:value="5.5325034578146614E-3" table:formula="of:=([.I660]-[.I659])/[.I659]" table:style-name="ce16">
            <text:p>1%</text:p>
          </table:table-cell>
          <table:table-cell office:value-type="string" office:string-value="Valid" table:formula="of:=IF([.F659]&lt;=[.E659]; &quot;Valid&quot;; &quot;Invalid&quot;)" table:style-name="ce17">
            <text:p>Valid</text:p>
          </table:table-cell>
          <table:table-cell office:value-type="string" office:string-value="Valid" table:formula="of:=IF([.H659]&lt;=[.G659]; &quot;Valid&quot;; &quot;Invalid&quot;)" table:style-name="ce17">
            <text:p>Valid</text:p>
          </table:table-cell>
          <table:table-cell office:value-type="string" office:string-value="Increasing Pressure" table:formula="of:=IF([.J659]&gt;0; &quot;Increasing Pressure&quot;; &quot;Stable/Reducing&quot;)" table:style-name="ce18">
            <text:p>Increasing Pressure</text:p>
          </table:table-cell>
          <table:table-cell office:value-type="float" office:value="0.38461538461538464" table:formula="of:=IFERROR([.H659]/[.F659]; 0)" table:style-name="ce17">
            <text:p>0.384615385</text:p>
          </table:table-cell>
          <table:table-cell office:value-type="float" office:value="2176" table:formula="of:=AVERAGE([.I659:.I665])" table:style-name="ce15">
            <text:p>2176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9-22T00:00:00" table:style-name="ce14">
            <text:p>22-09-2025</text:p>
          </table:table-cell>
          <table:table-cell office:value-type="string" office:string-value="September" table:formula="of:=TEXT([.A660]; &quot;mmmm&quot;)" table:style-name="ce14">
            <text:p>September</text:p>
          </table:table-cell>
          <table:table-cell office:value-type="string" office:string-value="2025-09" table:formula="of:=TEXT([.A660]; &quot;yyyy-mm&quot;)" table:style-name="ce14">
            <text:p>2025-09</text:p>
          </table:table-cell>
          <table:table-cell office:value-type="float" office:value="17" table:style-name="ce9">
            <text:p>17</text:p>
          </table:table-cell>
          <table:table-cell office:value-type="float" office:value="40" table:style-name="ce9">
            <text:p>40</text:p>
          </table:table-cell>
          <table:table-cell office:value-type="float" office:value="14" table:style-name="ce9">
            <text:p>14</text:p>
          </table:table-cell>
          <table:table-cell office:value-type="float" office:value="2141" table:style-name="ce9">
            <text:p>2141</text:p>
          </table:table-cell>
          <table:table-cell office:value-type="float" office:value="10" table:style-name="ce9">
            <text:p>10</text:p>
          </table:table-cell>
          <table:table-cell office:value-type="float" office:value="2181" table:formula="of:=SUM([.G660]+[.E660])" table:style-name="ce15">
            <text:p>2181</text:p>
          </table:table-cell>
          <table:table-cell office:value-type="float" office:value="4" table:formula="of:=[.F660]-[.H660]" table:style-name="ce15">
            <text:p>4</text:p>
          </table:table-cell>
          <table:table-cell office:value-type="percentage" office:value="0" table:formula="of:=([.I661]-[.I660])/[.I660]" table:style-name="ce16">
            <text:p>0%</text:p>
          </table:table-cell>
          <table:table-cell office:value-type="string" office:string-value="Valid" table:formula="of:=IF([.F660]&lt;=[.E660]; &quot;Valid&quot;; &quot;Invalid&quot;)" table:style-name="ce17">
            <text:p>Valid</text:p>
          </table:table-cell>
          <table:table-cell office:value-type="string" office:string-value="Valid" table:formula="of:=IF([.H660]&lt;=[.G660]; &quot;Valid&quot;; &quot;Invalid&quot;)" table:style-name="ce17">
            <text:p>Valid</text:p>
          </table:table-cell>
          <table:table-cell office:value-type="string" office:string-value="Increasing Pressure" table:formula="of:=IF([.J660]&gt;0; &quot;Increasing Pressure&quot;; &quot;Stable/Reducing&quot;)" table:style-name="ce18">
            <text:p>Increasing Pressure</text:p>
          </table:table-cell>
          <table:table-cell office:value-type="float" office:value="0.7142857142857143" table:formula="of:=IFERROR([.H660]/[.F660]; 0)" table:style-name="ce17">
            <text:p>0.714285714</text:p>
          </table:table-cell>
          <table:table-cell office:value-type="float" office:value="2179.1428571428573" table:formula="of:=AVERAGE([.I660:.I666])" table:style-name="ce15">
            <text:p>2179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9-23T00:00:00" table:style-name="ce14">
            <text:p>23-09-2025</text:p>
          </table:table-cell>
          <table:table-cell office:value-type="string" office:string-value="September" table:formula="of:=TEXT([.A661]; &quot;mmmm&quot;)" table:style-name="ce14">
            <text:p>September</text:p>
          </table:table-cell>
          <table:table-cell office:value-type="string" office:string-value="2025-09" table:formula="of:=TEXT([.A661]; &quot;yyyy-mm&quot;)" table:style-name="ce14">
            <text:p>2025-09</text:p>
          </table:table-cell>
          <table:table-cell office:value-type="float" office:value="11" table:style-name="ce9">
            <text:p>11</text:p>
          </table:table-cell>
          <table:table-cell office:value-type="float" office:value="36" table:style-name="ce9">
            <text:p>36</text:p>
          </table:table-cell>
          <table:table-cell office:value-type="float" office:value="10" table:style-name="ce9">
            <text:p>10</text:p>
          </table:table-cell>
          <table:table-cell office:value-type="float" office:value="2145" table:style-name="ce9">
            <text:p>2145</text:p>
          </table:table-cell>
          <table:table-cell office:value-type="float" office:value="15" table:style-name="ce9">
            <text:p>15</text:p>
          </table:table-cell>
          <table:table-cell office:value-type="float" office:value="2181" table:formula="of:=SUM([.G661]+[.E661])" table:style-name="ce15">
            <text:p>2181</text:p>
          </table:table-cell>
          <table:table-cell office:value-type="float" office:value="-5" table:formula="of:=[.F661]-[.H661]" table:style-name="ce15">
            <text:p>-5</text:p>
          </table:table-cell>
          <table:table-cell office:value-type="percentage" office:value="-2.2925263640531865E-3" table:formula="of:=([.I662]-[.I661])/[.I661]" table:style-name="ce16">
            <text:p>0%</text:p>
          </table:table-cell>
          <table:table-cell office:value-type="string" office:string-value="Valid" table:formula="of:=IF([.F661]&lt;=[.E661]; &quot;Valid&quot;; &quot;Invalid&quot;)" table:style-name="ce17">
            <text:p>Valid</text:p>
          </table:table-cell>
          <table:table-cell office:value-type="string" office:string-value="Valid" table:formula="of:=IF([.H661]&lt;=[.G661]; &quot;Valid&quot;; &quot;Invalid&quot;)" table:style-name="ce17">
            <text:p>Valid</text:p>
          </table:table-cell>
          <table:table-cell office:value-type="string" office:string-value="Stable/Reducing" table:formula="of:=IF([.J661]&gt;0; &quot;Increasing Pressure&quot;; &quot;Stable/Reducing&quot;)" table:style-name="ce18">
            <text:p>Stable/Reducing</text:p>
          </table:table-cell>
          <table:table-cell office:value-type="float" office:value="1.5" table:formula="of:=IFERROR([.H661]/[.F661]; 0)" table:style-name="ce17">
            <text:p>1.5</text:p>
          </table:table-cell>
          <table:table-cell office:value-type="float" office:value="2181.2857142857142" table:formula="of:=AVERAGE([.I661:.I667])" table:style-name="ce15">
            <text:p>2181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9-24T00:00:00" table:style-name="ce14">
            <text:p>24-09-2025</text:p>
          </table:table-cell>
          <table:table-cell office:value-type="string" office:string-value="September" table:formula="of:=TEXT([.A662]; &quot;mmmm&quot;)" table:style-name="ce14">
            <text:p>September</text:p>
          </table:table-cell>
          <table:table-cell office:value-type="string" office:string-value="2025-09" table:formula="of:=TEXT([.A662]; &quot;yyyy-mm&quot;)" table:style-name="ce14">
            <text:p>2025-09</text:p>
          </table:table-cell>
          <table:table-cell office:value-type="float" office:value="3" table:style-name="ce9">
            <text:p>3</text:p>
          </table:table-cell>
          <table:table-cell office:value-type="float" office:value="38" table:style-name="ce9">
            <text:p>38</text:p>
          </table:table-cell>
          <table:table-cell office:value-type="float" office:value="12" table:style-name="ce9">
            <text:p>12</text:p>
          </table:table-cell>
          <table:table-cell office:value-type="float" office:value="2138" table:style-name="ce9">
            <text:p>2138</text:p>
          </table:table-cell>
          <table:table-cell office:value-type="float" office:value="17" table:style-name="ce9">
            <text:p>17</text:p>
          </table:table-cell>
          <table:table-cell office:value-type="float" office:value="2176" table:formula="of:=SUM([.G662]+[.E662])" table:style-name="ce15">
            <text:p>2176</text:p>
          </table:table-cell>
          <table:table-cell office:value-type="float" office:value="-5" table:formula="of:=[.F662]-[.H662]" table:style-name="ce15">
            <text:p>-5</text:p>
          </table:table-cell>
          <table:table-cell office:value-type="percentage" office:value="-4.1360294117647059E-3" table:formula="of:=([.I663]-[.I662])/[.I662]" table:style-name="ce16">
            <text:p>0%</text:p>
          </table:table-cell>
          <table:table-cell office:value-type="string" office:string-value="Valid" table:formula="of:=IF([.F662]&lt;=[.E662]; &quot;Valid&quot;; &quot;Invalid&quot;)" table:style-name="ce17">
            <text:p>Valid</text:p>
          </table:table-cell>
          <table:table-cell office:value-type="string" office:string-value="Valid" table:formula="of:=IF([.H662]&lt;=[.G662]; &quot;Valid&quot;; &quot;Invalid&quot;)" table:style-name="ce17">
            <text:p>Valid</text:p>
          </table:table-cell>
          <table:table-cell office:value-type="string" office:string-value="Stable/Reducing" table:formula="of:=IF([.J662]&gt;0; &quot;Increasing Pressure&quot;; &quot;Stable/Reducing&quot;)" table:style-name="ce18">
            <text:p>Stable/Reducing</text:p>
          </table:table-cell>
          <table:table-cell office:value-type="float" office:value="1.4166666666666667" table:formula="of:=IFERROR([.H662]/[.F662]; 0)" table:style-name="ce17">
            <text:p>1.416666667</text:p>
          </table:table-cell>
          <table:table-cell office:value-type="float" office:value="2186.1428571428573" table:formula="of:=AVERAGE([.I662:.I668])" table:style-name="ce15">
            <text:p>2186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9-25T00:00:00" table:style-name="ce14">
            <text:p>25-09-2025</text:p>
          </table:table-cell>
          <table:table-cell office:value-type="string" office:string-value="September" table:formula="of:=TEXT([.A663]; &quot;mmmm&quot;)" table:style-name="ce14">
            <text:p>September</text:p>
          </table:table-cell>
          <table:table-cell office:value-type="string" office:string-value="2025-09" table:formula="of:=TEXT([.A663]; &quot;yyyy-mm&quot;)" table:style-name="ce14">
            <text:p>2025-09</text:p>
          </table:table-cell>
          <table:table-cell office:value-type="float" office:value="6" table:style-name="ce9">
            <text:p>6</text:p>
          </table:table-cell>
          <table:table-cell office:value-type="float" office:value="35" table:style-name="ce9">
            <text:p>35</text:p>
          </table:table-cell>
          <table:table-cell office:value-type="float" office:value="12" table:style-name="ce9">
            <text:p>12</text:p>
          </table:table-cell>
          <table:table-cell office:value-type="float" office:value="2132" table:style-name="ce9">
            <text:p>2132</text:p>
          </table:table-cell>
          <table:table-cell office:value-type="float" office:value="18" table:style-name="ce9">
            <text:p>18</text:p>
          </table:table-cell>
          <table:table-cell office:value-type="float" office:value="2167" table:formula="of:=SUM([.G663]+[.E663])" table:style-name="ce15">
            <text:p>2167</text:p>
          </table:table-cell>
          <table:table-cell office:value-type="float" office:value="-6" table:formula="of:=[.F663]-[.H663]" table:style-name="ce15">
            <text:p>-6</text:p>
          </table:table-cell>
          <table:table-cell office:value-type="percentage" office:value="3.6917397323488694E-3" table:formula="of:=([.I664]-[.I663])/[.I663]" table:style-name="ce16">
            <text:p>0%</text:p>
          </table:table-cell>
          <table:table-cell office:value-type="string" office:string-value="Valid" table:formula="of:=IF([.F663]&lt;=[.E663]; &quot;Valid&quot;; &quot;Invalid&quot;)" table:style-name="ce17">
            <text:p>Valid</text:p>
          </table:table-cell>
          <table:table-cell office:value-type="string" office:string-value="Valid" table:formula="of:=IF([.H663]&lt;=[.G663]; &quot;Valid&quot;; &quot;Invalid&quot;)" table:style-name="ce17">
            <text:p>Valid</text:p>
          </table:table-cell>
          <table:table-cell office:value-type="string" office:string-value="Stable/Reducing" table:formula="of:=IF([.J663]&gt;0; &quot;Increasing Pressure&quot;; &quot;Stable/Reducing&quot;)" table:style-name="ce18">
            <text:p>Stable/Reducing</text:p>
          </table:table-cell>
          <table:table-cell office:value-type="float" office:value="1.5" table:formula="of:=IFERROR([.H663]/[.F663]; 0)" table:style-name="ce17">
            <text:p>1.5</text:p>
          </table:table-cell>
          <table:table-cell office:value-type="float" office:value="2190.7142857142858" table:formula="of:=AVERAGE([.I663:.I669])" table:style-name="ce15">
            <text:p>2191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9-28T00:00:00" table:style-name="ce14">
            <text:p>28-09-2025</text:p>
          </table:table-cell>
          <table:table-cell office:value-type="string" office:string-value="September" table:formula="of:=TEXT([.A664]; &quot;mmmm&quot;)" table:style-name="ce14">
            <text:p>September</text:p>
          </table:table-cell>
          <table:table-cell office:value-type="string" office:string-value="2025-09" table:formula="of:=TEXT([.A664]; &quot;yyyy-mm&quot;)" table:style-name="ce14">
            <text:p>2025-09</text:p>
          </table:table-cell>
          <table:table-cell office:value-type="float" office:value="11" table:style-name="ce9">
            <text:p>11</text:p>
          </table:table-cell>
          <table:table-cell office:value-type="float" office:value="29" table:style-name="ce9">
            <text:p>29</text:p>
          </table:table-cell>
          <table:table-cell office:value-type="float" office:value="12" table:style-name="ce9">
            <text:p>12</text:p>
          </table:table-cell>
          <table:table-cell office:value-type="float" office:value="2146" table:style-name="ce9">
            <text:p>2146</text:p>
          </table:table-cell>
          <table:table-cell office:value-type="float" office:value="9" table:style-name="ce9">
            <text:p>9</text:p>
          </table:table-cell>
          <table:table-cell office:value-type="float" office:value="2175" table:formula="of:=SUM([.G664]+[.E664])" table:style-name="ce15">
            <text:p>2175</text:p>
          </table:table-cell>
          <table:table-cell office:value-type="float" office:value="3" table:formula="of:=[.F664]-[.H664]" table:style-name="ce15">
            <text:p>3</text:p>
          </table:table-cell>
          <table:table-cell office:value-type="percentage" office:value="3.6781609195402297E-3" table:formula="of:=([.I665]-[.I664])/[.I664]" table:style-name="ce16">
            <text:p>0%</text:p>
          </table:table-cell>
          <table:table-cell office:value-type="string" office:string-value="Valid" table:formula="of:=IF([.F664]&lt;=[.E664]; &quot;Valid&quot;; &quot;Invalid&quot;)" table:style-name="ce17">
            <text:p>Valid</text:p>
          </table:table-cell>
          <table:table-cell office:value-type="string" office:string-value="Valid" table:formula="of:=IF([.H664]&lt;=[.G664]; &quot;Valid&quot;; &quot;Invalid&quot;)" table:style-name="ce17">
            <text:p>Valid</text:p>
          </table:table-cell>
          <table:table-cell office:value-type="string" office:string-value="Increasing Pressure" table:formula="of:=IF([.J664]&gt;0; &quot;Increasing Pressure&quot;; &quot;Stable/Reducing&quot;)" table:style-name="ce18">
            <text:p>Increasing Pressure</text:p>
          </table:table-cell>
          <table:table-cell office:value-type="float" office:value="0.75" table:formula="of:=IFERROR([.H664]/[.F664]; 0)" table:style-name="ce17">
            <text:p>0.75</text:p>
          </table:table-cell>
          <table:table-cell office:value-type="float" office:value="2198.2857142857142" table:formula="of:=AVERAGE([.I664:.I670])" table:style-name="ce15">
            <text:p>2198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9-29T00:00:00" table:style-name="ce14">
            <text:p>29-09-2025</text:p>
          </table:table-cell>
          <table:table-cell office:value-type="string" office:string-value="September" table:formula="of:=TEXT([.A665]; &quot;mmmm&quot;)" table:style-name="ce14">
            <text:p>September</text:p>
          </table:table-cell>
          <table:table-cell office:value-type="string" office:string-value="2025-09" table:formula="of:=TEXT([.A665]; &quot;yyyy-mm&quot;)" table:style-name="ce14">
            <text:p>2025-09</text:p>
          </table:table-cell>
          <table:table-cell office:value-type="float" office:value="8" table:style-name="ce9">
            <text:p>8</text:p>
          </table:table-cell>
          <table:table-cell office:value-type="float" office:value="35" table:style-name="ce9">
            <text:p>35</text:p>
          </table:table-cell>
          <table:table-cell office:value-type="float" office:value="12" table:style-name="ce9">
            <text:p>12</text:p>
          </table:table-cell>
          <table:table-cell office:value-type="float" office:value="2148" table:style-name="ce9">
            <text:p>2148</text:p>
          </table:table-cell>
          <table:table-cell office:value-type="float" office:value="13" table:style-name="ce9">
            <text:p>13</text:p>
          </table:table-cell>
          <table:table-cell office:value-type="float" office:value="2183" table:formula="of:=SUM([.G665]+[.E665])" table:style-name="ce15">
            <text:p>2183</text:p>
          </table:table-cell>
          <table:table-cell office:value-type="float" office:value="-1" table:formula="of:=[.F665]-[.H665]" table:style-name="ce15">
            <text:p>-1</text:p>
          </table:table-cell>
          <table:table-cell office:value-type="percentage" office:value="3.6646816307833257E-3" table:formula="of:=([.I666]-[.I665])/[.I665]" table:style-name="ce16">
            <text:p>0%</text:p>
          </table:table-cell>
          <table:table-cell office:value-type="string" office:string-value="Valid" table:formula="of:=IF([.F665]&lt;=[.E665]; &quot;Valid&quot;; &quot;Invalid&quot;)" table:style-name="ce17">
            <text:p>Valid</text:p>
          </table:table-cell>
          <table:table-cell office:value-type="string" office:string-value="Valid" table:formula="of:=IF([.H665]&lt;=[.G665]; &quot;Valid&quot;; &quot;Invalid&quot;)" table:style-name="ce17">
            <text:p>Valid</text:p>
          </table:table-cell>
          <table:table-cell office:value-type="string" office:string-value="Stable/Reducing" table:formula="of:=IF([.J665]&gt;0; &quot;Increasing Pressure&quot;; &quot;Stable/Reducing&quot;)" table:style-name="ce18">
            <text:p>Stable/Reducing</text:p>
          </table:table-cell>
          <table:table-cell office:value-type="float" office:value="1.0833333333333333" table:formula="of:=IFERROR([.H665]/[.F665]; 0)" table:style-name="ce17">
            <text:p>1.083333333</text:p>
          </table:table-cell>
          <table:table-cell office:value-type="float" office:value="2206.7142857142858" table:formula="of:=AVERAGE([.I665:.I671])" table:style-name="ce15">
            <text:p>2207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09-30T00:00:00" table:style-name="ce14">
            <text:p>30-09-2025</text:p>
          </table:table-cell>
          <table:table-cell office:value-type="string" office:string-value="September" table:formula="of:=TEXT([.A666]; &quot;mmmm&quot;)" table:style-name="ce14">
            <text:p>September</text:p>
          </table:table-cell>
          <table:table-cell office:value-type="string" office:string-value="2025-09" table:formula="of:=TEXT([.A666]; &quot;yyyy-mm&quot;)" table:style-name="ce14">
            <text:p>2025-09</text:p>
          </table:table-cell>
          <table:table-cell office:value-type="float" office:value="8" table:style-name="ce9">
            <text:p>8</text:p>
          </table:table-cell>
          <table:table-cell office:value-type="float" office:value="32" table:style-name="ce9">
            <text:p>32</text:p>
          </table:table-cell>
          <table:table-cell office:value-type="float" office:value="12" table:style-name="ce9">
            <text:p>12</text:p>
          </table:table-cell>
          <table:table-cell office:value-type="float" office:value="2159" table:style-name="ce9">
            <text:p>2159</text:p>
          </table:table-cell>
          <table:table-cell office:value-type="float" office:value="7" table:style-name="ce9">
            <text:p>7</text:p>
          </table:table-cell>
          <table:table-cell office:value-type="float" office:value="2191" table:formula="of:=SUM([.G666]+[.E666])" table:style-name="ce15">
            <text:p>2191</text:p>
          </table:table-cell>
          <table:table-cell office:value-type="float" office:value="5" table:formula="of:=[.F666]-[.H666]" table:style-name="ce15">
            <text:p>5</text:p>
          </table:table-cell>
          <table:table-cell office:value-type="percentage" office:value="2.2820629849383844E-3" table:formula="of:=([.I667]-[.I666])/[.I666]" table:style-name="ce16">
            <text:p>0%</text:p>
          </table:table-cell>
          <table:table-cell office:value-type="string" office:string-value="Valid" table:formula="of:=IF([.F666]&lt;=[.E666]; &quot;Valid&quot;; &quot;Invalid&quot;)" table:style-name="ce17">
            <text:p>Valid</text:p>
          </table:table-cell>
          <table:table-cell office:value-type="string" office:string-value="Valid" table:formula="of:=IF([.H666]&lt;=[.G666]; &quot;Valid&quot;; &quot;Invalid&quot;)" table:style-name="ce17">
            <text:p>Valid</text:p>
          </table:table-cell>
          <table:table-cell office:value-type="string" office:string-value="Increasing Pressure" table:formula="of:=IF([.J666]&gt;0; &quot;Increasing Pressure&quot;; &quot;Stable/Reducing&quot;)" table:style-name="ce18">
            <text:p>Increasing Pressure</text:p>
          </table:table-cell>
          <table:table-cell office:value-type="float" office:value="0.58333333333333337" table:formula="of:=IFERROR([.H666]/[.F666]; 0)" table:style-name="ce17">
            <text:p>0.583333333</text:p>
          </table:table-cell>
          <table:table-cell office:value-type="float" office:value="2215" table:formula="of:=AVERAGE([.I666:.I672])" table:style-name="ce15">
            <text:p>2215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10-01T00:00:00" table:style-name="ce14">
            <text:p>01-10-2025</text:p>
          </table:table-cell>
          <table:table-cell office:value-type="string" office:string-value="October" table:formula="of:=TEXT([.A667]; &quot;mmmm&quot;)" table:style-name="ce14">
            <text:p>October</text:p>
          </table:table-cell>
          <table:table-cell office:value-type="string" office:string-value="2025-10" table:formula="of:=TEXT([.A667]; &quot;yyyy-mm&quot;)" table:style-name="ce14">
            <text:p>2025-10</text:p>
          </table:table-cell>
          <table:table-cell office:value-type="float" office:value="4" table:style-name="ce9">
            <text:p>4</text:p>
          </table:table-cell>
          <table:table-cell office:value-type="float" office:value="33" table:style-name="ce9">
            <text:p>33</text:p>
          </table:table-cell>
          <table:table-cell office:value-type="float" office:value="12" table:style-name="ce9">
            <text:p>12</text:p>
          </table:table-cell>
          <table:table-cell office:value-type="float" office:value="2163" table:style-name="ce9">
            <text:p>2163</text:p>
          </table:table-cell>
          <table:table-cell office:value-type="float" office:value="14" table:style-name="ce9">
            <text:p>14</text:p>
          </table:table-cell>
          <table:table-cell office:value-type="float" office:value="2196" table:formula="of:=SUM([.G667]+[.E667])" table:style-name="ce15">
            <text:p>2196</text:p>
          </table:table-cell>
          <table:table-cell office:value-type="float" office:value="-2" table:formula="of:=[.F667]-[.H667]" table:style-name="ce15">
            <text:p>-2</text:p>
          </table:table-cell>
          <table:table-cell office:value-type="percentage" office:value="8.6520947176684879E-3" table:formula="of:=([.I668]-[.I667])/[.I667]" table:style-name="ce16">
            <text:p>1%</text:p>
          </table:table-cell>
          <table:table-cell office:value-type="string" office:string-value="Valid" table:formula="of:=IF([.F667]&lt;=[.E667]; &quot;Valid&quot;; &quot;Invalid&quot;)" table:style-name="ce17">
            <text:p>Valid</text:p>
          </table:table-cell>
          <table:table-cell office:value-type="string" office:string-value="Valid" table:formula="of:=IF([.H667]&lt;=[.G667]; &quot;Valid&quot;; &quot;Invalid&quot;)" table:style-name="ce17">
            <text:p>Valid</text:p>
          </table:table-cell>
          <table:table-cell office:value-type="string" office:string-value="Stable/Reducing" table:formula="of:=IF([.J667]&gt;0; &quot;Increasing Pressure&quot;; &quot;Stable/Reducing&quot;)" table:style-name="ce18">
            <text:p>Stable/Reducing</text:p>
          </table:table-cell>
          <table:table-cell office:value-type="float" office:value="1.1666666666666667" table:formula="of:=IFERROR([.H667]/[.F667]; 0)" table:style-name="ce17">
            <text:p>1.166666667</text:p>
          </table:table-cell>
          <table:table-cell office:value-type="float" office:value="2223" table:formula="of:=AVERAGE([.I667:.I673])" table:style-name="ce15">
            <text:p>2223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10-02T00:00:00" table:style-name="ce14">
            <text:p>02-10-2025</text:p>
          </table:table-cell>
          <table:table-cell office:value-type="string" office:string-value="October" table:formula="of:=TEXT([.A668]; &quot;mmmm&quot;)" table:style-name="ce14">
            <text:p>October</text:p>
          </table:table-cell>
          <table:table-cell office:value-type="string" office:string-value="2025-10" table:formula="of:=TEXT([.A668]; &quot;yyyy-mm&quot;)" table:style-name="ce14">
            <text:p>2025-10</text:p>
          </table:table-cell>
          <table:table-cell office:value-type="float" office:value="20" table:style-name="ce9">
            <text:p>20</text:p>
          </table:table-cell>
          <table:table-cell office:value-type="float" office:value="51" table:style-name="ce9">
            <text:p>51</text:p>
          </table:table-cell>
          <table:table-cell office:value-type="float" office:value="15" table:style-name="ce9">
            <text:p>15</text:p>
          </table:table-cell>
          <table:table-cell office:value-type="float" office:value="2164" table:style-name="ce9">
            <text:p>2164</text:p>
          </table:table-cell>
          <table:table-cell office:value-type="float" office:value="16" table:style-name="ce9">
            <text:p>16</text:p>
          </table:table-cell>
          <table:table-cell office:value-type="float" office:value="2215" table:formula="of:=SUM([.G668]+[.E668])" table:style-name="ce15">
            <text:p>2215</text:p>
          </table:table-cell>
          <table:table-cell office:value-type="float" office:value="-1" table:formula="of:=[.F668]-[.H668]" table:style-name="ce15">
            <text:p>-1</text:p>
          </table:table-cell>
          <table:table-cell office:value-type="percentage" office:value="-3.1602708803611739E-3" table:formula="of:=([.I669]-[.I668])/[.I668]" table:style-name="ce16">
            <text:p>0%</text:p>
          </table:table-cell>
          <table:table-cell office:value-type="string" office:string-value="Valid" table:formula="of:=IF([.F668]&lt;=[.E668]; &quot;Valid&quot;; &quot;Invalid&quot;)" table:style-name="ce17">
            <text:p>Valid</text:p>
          </table:table-cell>
          <table:table-cell office:value-type="string" office:string-value="Valid" table:formula="of:=IF([.H668]&lt;=[.G668]; &quot;Valid&quot;; &quot;Invalid&quot;)" table:style-name="ce17">
            <text:p>Valid</text:p>
          </table:table-cell>
          <table:table-cell office:value-type="string" office:string-value="Stable/Reducing" table:formula="of:=IF([.J668]&gt;0; &quot;Increasing Pressure&quot;; &quot;Stable/Reducing&quot;)" table:style-name="ce18">
            <text:p>Stable/Reducing</text:p>
          </table:table-cell>
          <table:table-cell office:value-type="float" office:value="1.0666666666666667" table:formula="of:=IFERROR([.H668]/[.F668]; 0)" table:style-name="ce17">
            <text:p>1.066666667</text:p>
          </table:table-cell>
          <table:table-cell office:value-type="float" office:value="2230.2857142857142" table:formula="of:=AVERAGE([.I668:.I674])" table:style-name="ce15">
            <text:p>2230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10-05T00:00:00" table:style-name="ce14">
            <text:p>05-10-2025</text:p>
          </table:table-cell>
          <table:table-cell office:value-type="string" office:string-value="October" table:formula="of:=TEXT([.A669]; &quot;mmmm&quot;)" table:style-name="ce14">
            <text:p>October</text:p>
          </table:table-cell>
          <table:table-cell office:value-type="string" office:string-value="2025-10" table:formula="of:=TEXT([.A669]; &quot;yyyy-mm&quot;)" table:style-name="ce14">
            <text:p>2025-10</text:p>
          </table:table-cell>
          <table:table-cell office:value-type="float" office:value="8" table:style-name="ce9">
            <text:p>8</text:p>
          </table:table-cell>
          <table:table-cell office:value-type="float" office:value="28" table:style-name="ce9">
            <text:p>28</text:p>
          </table:table-cell>
          <table:table-cell office:value-type="float" office:value="13" table:style-name="ce9">
            <text:p>13</text:p>
          </table:table-cell>
          <table:table-cell office:value-type="float" office:value="2180" table:style-name="ce9">
            <text:p>2180</text:p>
          </table:table-cell>
          <table:table-cell office:value-type="float" office:value="16" table:style-name="ce9">
            <text:p>16</text:p>
          </table:table-cell>
          <table:table-cell office:value-type="float" office:value="2208" table:formula="of:=SUM([.G669]+[.E669])" table:style-name="ce15">
            <text:p>2208</text:p>
          </table:table-cell>
          <table:table-cell office:value-type="float" office:value="-3" table:formula="of:=[.F669]-[.H669]" table:style-name="ce15">
            <text:p>-3</text:p>
          </table:table-cell>
          <table:table-cell office:value-type="percentage" office:value="5.434782608695652E-3" table:formula="of:=([.I670]-[.I669])/[.I669]" table:style-name="ce16">
            <text:p>1%</text:p>
          </table:table-cell>
          <table:table-cell office:value-type="string" office:string-value="Valid" table:formula="of:=IF([.F669]&lt;=[.E669]; &quot;Valid&quot;; &quot;Invalid&quot;)" table:style-name="ce17">
            <text:p>Valid</text:p>
          </table:table-cell>
          <table:table-cell office:value-type="string" office:string-value="Valid" table:formula="of:=IF([.H669]&lt;=[.G669]; &quot;Valid&quot;; &quot;Invalid&quot;)" table:style-name="ce17">
            <text:p>Valid</text:p>
          </table:table-cell>
          <table:table-cell office:value-type="string" office:string-value="Stable/Reducing" table:formula="of:=IF([.J669]&gt;0; &quot;Increasing Pressure&quot;; &quot;Stable/Reducing&quot;)" table:style-name="ce18">
            <text:p>Stable/Reducing</text:p>
          </table:table-cell>
          <table:table-cell office:value-type="float" office:value="1.2307692307692308" table:formula="of:=IFERROR([.H669]/[.F669]; 0)" table:style-name="ce17">
            <text:p>1.230769231</text:p>
          </table:table-cell>
          <table:table-cell office:value-type="float" office:value="2237.4285714285716" table:formula="of:=AVERAGE([.I669:.I675])" table:style-name="ce15">
            <text:p>2237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10-06T00:00:00" table:style-name="ce14">
            <text:p>06-10-2025</text:p>
          </table:table-cell>
          <table:table-cell office:value-type="string" office:string-value="October" table:formula="of:=TEXT([.A670]; &quot;mmmm&quot;)" table:style-name="ce14">
            <text:p>October</text:p>
          </table:table-cell>
          <table:table-cell office:value-type="string" office:string-value="2025-10" table:formula="of:=TEXT([.A670]; &quot;yyyy-mm&quot;)" table:style-name="ce14">
            <text:p>2025-10</text:p>
          </table:table-cell>
          <table:table-cell office:value-type="float" office:value="5" table:style-name="ce9">
            <text:p>5</text:p>
          </table:table-cell>
          <table:table-cell office:value-type="float" office:value="33" table:style-name="ce9">
            <text:p>33</text:p>
          </table:table-cell>
          <table:table-cell office:value-type="float" office:value="15" table:style-name="ce9">
            <text:p>15</text:p>
          </table:table-cell>
          <table:table-cell office:value-type="float" office:value="2187" table:style-name="ce9">
            <text:p>2187</text:p>
          </table:table-cell>
          <table:table-cell office:value-type="float" office:value="10" table:style-name="ce9">
            <text:p>10</text:p>
          </table:table-cell>
          <table:table-cell office:value-type="float" office:value="2220" table:formula="of:=SUM([.G670]+[.E670])" table:style-name="ce15">
            <text:p>2220</text:p>
          </table:table-cell>
          <table:table-cell office:value-type="float" office:value="5" table:formula="of:=[.F670]-[.H670]" table:style-name="ce15">
            <text:p>5</text:p>
          </table:table-cell>
          <table:table-cell office:value-type="percentage" office:value="6.3063063063063061E-3" table:formula="of:=([.I671]-[.I670])/[.I670]" table:style-name="ce16">
            <text:p>1%</text:p>
          </table:table-cell>
          <table:table-cell office:value-type="string" office:string-value="Valid" table:formula="of:=IF([.F670]&lt;=[.E670]; &quot;Valid&quot;; &quot;Invalid&quot;)" table:style-name="ce17">
            <text:p>Valid</text:p>
          </table:table-cell>
          <table:table-cell office:value-type="string" office:string-value="Valid" table:formula="of:=IF([.H670]&lt;=[.G670]; &quot;Valid&quot;; &quot;Invalid&quot;)" table:style-name="ce17">
            <text:p>Valid</text:p>
          </table:table-cell>
          <table:table-cell office:value-type="string" office:string-value="Increasing Pressure" table:formula="of:=IF([.J670]&gt;0; &quot;Increasing Pressure&quot;; &quot;Stable/Reducing&quot;)" table:style-name="ce18">
            <text:p>Increasing Pressure</text:p>
          </table:table-cell>
          <table:table-cell office:value-type="float" office:value="0.66666666666666663" table:formula="of:=IFERROR([.H670]/[.F670]; 0)" table:style-name="ce17">
            <text:p>0.666666667</text:p>
          </table:table-cell>
          <table:table-cell office:value-type="float" office:value="2244" table:formula="of:=AVERAGE([.I670:.I676])" table:style-name="ce15">
            <text:p>2244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10-07T00:00:00" table:style-name="ce14">
            <text:p>07-10-2025</text:p>
          </table:table-cell>
          <table:table-cell office:value-type="string" office:string-value="October" table:formula="of:=TEXT([.A671]; &quot;mmmm&quot;)" table:style-name="ce14">
            <text:p>October</text:p>
          </table:table-cell>
          <table:table-cell office:value-type="string" office:string-value="2025-10" table:formula="of:=TEXT([.A671]; &quot;yyyy-mm&quot;)" table:style-name="ce14">
            <text:p>2025-10</text:p>
          </table:table-cell>
          <table:table-cell office:value-type="float" office:value="11" table:style-name="ce9">
            <text:p>11</text:p>
          </table:table-cell>
          <table:table-cell office:value-type="float" office:value="45" table:style-name="ce9">
            <text:p>45</text:p>
          </table:table-cell>
          <table:table-cell office:value-type="float" office:value="4" table:style-name="ce9">
            <text:p>4</text:p>
          </table:table-cell>
          <table:table-cell office:value-type="float" office:value="2189" table:style-name="ce9">
            <text:p>2189</text:p>
          </table:table-cell>
          <table:table-cell office:value-type="float" office:value="10" table:style-name="ce9">
            <text:p>10</text:p>
          </table:table-cell>
          <table:table-cell office:value-type="float" office:value="2234" table:formula="of:=SUM([.G671]+[.E671])" table:style-name="ce15">
            <text:p>2234</text:p>
          </table:table-cell>
          <table:table-cell office:value-type="float" office:value="-6" table:formula="of:=[.F671]-[.H671]" table:style-name="ce15">
            <text:p>-6</text:p>
          </table:table-cell>
          <table:table-cell office:value-type="percentage" office:value="3.1333930170098479E-3" table:formula="of:=([.I672]-[.I671])/[.I671]" table:style-name="ce16">
            <text:p>0%</text:p>
          </table:table-cell>
          <table:table-cell office:value-type="string" office:string-value="Valid" table:formula="of:=IF([.F671]&lt;=[.E671]; &quot;Valid&quot;; &quot;Invalid&quot;)" table:style-name="ce17">
            <text:p>Valid</text:p>
          </table:table-cell>
          <table:table-cell office:value-type="string" office:string-value="Valid" table:formula="of:=IF([.H671]&lt;=[.G671]; &quot;Valid&quot;; &quot;Invalid&quot;)" table:style-name="ce17">
            <text:p>Valid</text:p>
          </table:table-cell>
          <table:table-cell office:value-type="string" office:string-value="Stable/Reducing" table:formula="of:=IF([.J671]&gt;0; &quot;Increasing Pressure&quot;; &quot;Stable/Reducing&quot;)" table:style-name="ce18">
            <text:p>Stable/Reducing</text:p>
          </table:table-cell>
          <table:table-cell office:value-type="float" office:value="2.5" table:formula="of:=IFERROR([.H671]/[.F671]; 0)" table:style-name="ce17">
            <text:p>2.5</text:p>
          </table:table-cell>
          <table:table-cell office:value-type="float" office:value="2250.5714285714284" table:formula="of:=AVERAGE([.I671:.I677])" table:style-name="ce15">
            <text:p>2251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10-08T00:00:00" table:style-name="ce14">
            <text:p>08-10-2025</text:p>
          </table:table-cell>
          <table:table-cell office:value-type="string" office:string-value="October" table:formula="of:=TEXT([.A672]; &quot;mmmm&quot;)" table:style-name="ce14">
            <text:p>October</text:p>
          </table:table-cell>
          <table:table-cell office:value-type="string" office:string-value="2025-10" table:formula="of:=TEXT([.A672]; &quot;yyyy-mm&quot;)" table:style-name="ce14">
            <text:p>2025-10</text:p>
          </table:table-cell>
          <table:table-cell office:value-type="float" office:value="8" table:style-name="ce9">
            <text:p>8</text:p>
          </table:table-cell>
          <table:table-cell office:value-type="float" office:value="49" table:style-name="ce9">
            <text:p>49</text:p>
          </table:table-cell>
          <table:table-cell office:value-type="float" office:value="15" table:style-name="ce9">
            <text:p>15</text:p>
          </table:table-cell>
          <table:table-cell office:value-type="float" office:value="2192" table:style-name="ce9">
            <text:p>2192</text:p>
          </table:table-cell>
          <table:table-cell office:value-type="float" office:value="17" table:style-name="ce9">
            <text:p>17</text:p>
          </table:table-cell>
          <table:table-cell office:value-type="float" office:value="2241" table:formula="of:=SUM([.G672]+[.E672])" table:style-name="ce15">
            <text:p>2241</text:p>
          </table:table-cell>
          <table:table-cell office:value-type="float" office:value="-2" table:formula="of:=[.F672]-[.H672]" table:style-name="ce15">
            <text:p>-2</text:p>
          </table:table-cell>
          <table:table-cell office:value-type="percentage" office:value="2.6773761713520749E-3" table:formula="of:=([.I673]-[.I672])/[.I672]" table:style-name="ce16">
            <text:p>0%</text:p>
          </table:table-cell>
          <table:table-cell office:value-type="string" office:string-value="Valid" table:formula="of:=IF([.F672]&lt;=[.E672]; &quot;Valid&quot;; &quot;Invalid&quot;)" table:style-name="ce17">
            <text:p>Valid</text:p>
          </table:table-cell>
          <table:table-cell office:value-type="string" office:string-value="Valid" table:formula="of:=IF([.H672]&lt;=[.G672]; &quot;Valid&quot;; &quot;Invalid&quot;)" table:style-name="ce17">
            <text:p>Valid</text:p>
          </table:table-cell>
          <table:table-cell office:value-type="string" office:string-value="Stable/Reducing" table:formula="of:=IF([.J672]&gt;0; &quot;Increasing Pressure&quot;; &quot;Stable/Reducing&quot;)" table:style-name="ce18">
            <text:p>Stable/Reducing</text:p>
          </table:table-cell>
          <table:table-cell office:value-type="float" office:value="1.1333333333333333" table:formula="of:=IFERROR([.H672]/[.F672]; 0)" table:style-name="ce17">
            <text:p>1.133333333</text:p>
          </table:table-cell>
          <table:table-cell office:value-type="float" office:value="2255.8571428571427" table:formula="of:=AVERAGE([.I672:.I678])" table:style-name="ce15">
            <text:p>2256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10-09T00:00:00" table:style-name="ce14">
            <text:p>09-10-2025</text:p>
          </table:table-cell>
          <table:table-cell office:value-type="string" office:string-value="October" table:formula="of:=TEXT([.A673]; &quot;mmmm&quot;)" table:style-name="ce14">
            <text:p>October</text:p>
          </table:table-cell>
          <table:table-cell office:value-type="string" office:string-value="2025-10" table:formula="of:=TEXT([.A673]; &quot;yyyy-mm&quot;)" table:style-name="ce14">
            <text:p>2025-10</text:p>
          </table:table-cell>
          <table:table-cell office:value-type="float" office:value="11" table:style-name="ce9">
            <text:p>11</text:p>
          </table:table-cell>
          <table:table-cell office:value-type="float" office:value="55" table:style-name="ce9">
            <text:p>55</text:p>
          </table:table-cell>
          <table:table-cell office:value-type="float" office:value="13" table:style-name="ce9">
            <text:p>13</text:p>
          </table:table-cell>
          <table:table-cell office:value-type="float" office:value="2192" table:style-name="ce9">
            <text:p>2192</text:p>
          </table:table-cell>
          <table:table-cell office:value-type="float" office:value="12" table:style-name="ce9">
            <text:p>12</text:p>
          </table:table-cell>
          <table:table-cell office:value-type="float" office:value="2247" table:formula="of:=SUM([.G673]+[.E673])" table:style-name="ce15">
            <text:p>2247</text:p>
          </table:table-cell>
          <table:table-cell office:value-type="float" office:value="1" table:formula="of:=[.F673]-[.H673]" table:style-name="ce15">
            <text:p>1</text:p>
          </table:table-cell>
          <table:table-cell office:value-type="percentage" office:value="0" table:formula="of:=([.I674]-[.I673])/[.I673]" table:style-name="ce16">
            <text:p>0%</text:p>
          </table:table-cell>
          <table:table-cell office:value-type="string" office:string-value="Valid" table:formula="of:=IF([.F673]&lt;=[.E673]; &quot;Valid&quot;; &quot;Invalid&quot;)" table:style-name="ce17">
            <text:p>Valid</text:p>
          </table:table-cell>
          <table:table-cell office:value-type="string" office:string-value="Valid" table:formula="of:=IF([.H673]&lt;=[.G673]; &quot;Valid&quot;; &quot;Invalid&quot;)" table:style-name="ce17">
            <text:p>Valid</text:p>
          </table:table-cell>
          <table:table-cell office:value-type="string" office:string-value="Increasing Pressure" table:formula="of:=IF([.J673]&gt;0; &quot;Increasing Pressure&quot;; &quot;Stable/Reducing&quot;)" table:style-name="ce18">
            <text:p>Increasing Pressure</text:p>
          </table:table-cell>
          <table:table-cell office:value-type="float" office:value="0.92307692307692313" table:formula="of:=IFERROR([.H673]/[.F673]; 0)" table:style-name="ce17">
            <text:p>0.923076923</text:p>
          </table:table-cell>
          <table:table-cell office:value-type="float" office:value="2261.7142857142858" table:formula="of:=AVERAGE([.I673:.I679])" table:style-name="ce15">
            <text:p>2262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10-13T00:00:00" table:style-name="ce14">
            <text:p>13-10-2025</text:p>
          </table:table-cell>
          <table:table-cell office:value-type="string" office:string-value="October" table:formula="of:=TEXT([.A674]; &quot;mmmm&quot;)" table:style-name="ce14">
            <text:p>October</text:p>
          </table:table-cell>
          <table:table-cell office:value-type="string" office:string-value="2025-10" table:formula="of:=TEXT([.A674]; &quot;yyyy-mm&quot;)" table:style-name="ce14">
            <text:p>2025-10</text:p>
          </table:table-cell>
          <table:table-cell office:value-type="float" office:value="8" table:style-name="ce9">
            <text:p>8</text:p>
          </table:table-cell>
          <table:table-cell office:value-type="float" office:value="24" table:style-name="ce9">
            <text:p>24</text:p>
          </table:table-cell>
          <table:table-cell office:value-type="float" office:value="7" table:style-name="ce9">
            <text:p>7</text:p>
          </table:table-cell>
          <table:table-cell office:value-type="float" office:value="2223" table:style-name="ce9">
            <text:p>2223</text:p>
          </table:table-cell>
          <table:table-cell office:value-type="float" office:value="6" table:style-name="ce9">
            <text:p>6</text:p>
          </table:table-cell>
          <table:table-cell office:value-type="float" office:value="2247" table:formula="of:=SUM([.G674]+[.E674])" table:style-name="ce15">
            <text:p>2247</text:p>
          </table:table-cell>
          <table:table-cell office:value-type="float" office:value="1" table:formula="of:=[.F674]-[.H674]" table:style-name="ce15">
            <text:p>1</text:p>
          </table:table-cell>
          <table:table-cell office:value-type="percentage" office:value="8.0106809078771702E-3" table:formula="of:=([.I675]-[.I674])/[.I674]" table:style-name="ce16">
            <text:p>1%</text:p>
          </table:table-cell>
          <table:table-cell office:value-type="string" office:string-value="Valid" table:formula="of:=IF([.F674]&lt;=[.E674]; &quot;Valid&quot;; &quot;Invalid&quot;)" table:style-name="ce17">
            <text:p>Valid</text:p>
          </table:table-cell>
          <table:table-cell office:value-type="string" office:string-value="Valid" table:formula="of:=IF([.H674]&lt;=[.G674]; &quot;Valid&quot;; &quot;Invalid&quot;)" table:style-name="ce17">
            <text:p>Valid</text:p>
          </table:table-cell>
          <table:table-cell office:value-type="string" office:string-value="Increasing Pressure" table:formula="of:=IF([.J674]&gt;0; &quot;Increasing Pressure&quot;; &quot;Stable/Reducing&quot;)" table:style-name="ce18">
            <text:p>Increasing Pressure</text:p>
          </table:table-cell>
          <table:table-cell office:value-type="float" office:value="0.8571428571428571" table:formula="of:=IFERROR([.H674]/[.F674]; 0)" table:style-name="ce17">
            <text:p>0.857142857</text:p>
          </table:table-cell>
          <table:table-cell office:value-type="float" office:value="2267.8571428571427" table:formula="of:=AVERAGE([.I674:.I680])" table:style-name="ce15">
            <text:p>2268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10-14T00:00:00" table:style-name="ce14">
            <text:p>14-10-2025</text:p>
          </table:table-cell>
          <table:table-cell office:value-type="string" office:string-value="October" table:formula="of:=TEXT([.A675]; &quot;mmmm&quot;)" table:style-name="ce14">
            <text:p>October</text:p>
          </table:table-cell>
          <table:table-cell office:value-type="string" office:string-value="2025-10" table:formula="of:=TEXT([.A675]; &quot;yyyy-mm&quot;)" table:style-name="ce14">
            <text:p>2025-10</text:p>
          </table:table-cell>
          <table:table-cell office:value-type="float" office:value="7" table:style-name="ce9">
            <text:p>7</text:p>
          </table:table-cell>
          <table:table-cell office:value-type="float" office:value="30" table:style-name="ce9">
            <text:p>30</text:p>
          </table:table-cell>
          <table:table-cell office:value-type="float" office:value="16" table:style-name="ce9">
            <text:p>16</text:p>
          </table:table-cell>
          <table:table-cell office:value-type="float" office:value="2235" table:style-name="ce9">
            <text:p>2235</text:p>
          </table:table-cell>
          <table:table-cell office:value-type="float" office:value="8" table:style-name="ce9">
            <text:p>8</text:p>
          </table:table-cell>
          <table:table-cell office:value-type="float" office:value="2265" table:formula="of:=SUM([.G675]+[.E675])" table:style-name="ce15">
            <text:p>2265</text:p>
          </table:table-cell>
          <table:table-cell office:value-type="float" office:value="8" table:formula="of:=[.F675]-[.H675]" table:style-name="ce15">
            <text:p>8</text:p>
          </table:table-cell>
          <table:table-cell office:value-type="percentage" office:value="-4.8565121412803532E-3" table:formula="of:=([.I676]-[.I675])/[.I675]" table:style-name="ce16">
            <text:p>0%</text:p>
          </table:table-cell>
          <table:table-cell office:value-type="string" office:string-value="Valid" table:formula="of:=IF([.F675]&lt;=[.E675]; &quot;Valid&quot;; &quot;Invalid&quot;)" table:style-name="ce17">
            <text:p>Valid</text:p>
          </table:table-cell>
          <table:table-cell office:value-type="string" office:string-value="Valid" table:formula="of:=IF([.H675]&lt;=[.G675]; &quot;Valid&quot;; &quot;Invalid&quot;)" table:style-name="ce17">
            <text:p>Valid</text:p>
          </table:table-cell>
          <table:table-cell office:value-type="string" office:string-value="Increasing Pressure" table:formula="of:=IF([.J675]&gt;0; &quot;Increasing Pressure&quot;; &quot;Stable/Reducing&quot;)" table:style-name="ce18">
            <text:p>Increasing Pressure</text:p>
          </table:table-cell>
          <table:table-cell office:value-type="float" office:value="0.5" table:formula="of:=IFERROR([.H675]/[.F675]; 0)" table:style-name="ce17">
            <text:p>0.5</text:p>
          </table:table-cell>
          <table:table-cell office:value-type="float" office:value="2275.8571428571427" table:formula="of:=AVERAGE([.I675:.I681])" table:style-name="ce15">
            <text:p>2276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10-15T00:00:00" table:style-name="ce14">
            <text:p>15-10-2025</text:p>
          </table:table-cell>
          <table:table-cell office:value-type="string" office:string-value="October" table:formula="of:=TEXT([.A676]; &quot;mmmm&quot;)" table:style-name="ce14">
            <text:p>October</text:p>
          </table:table-cell>
          <table:table-cell office:value-type="string" office:string-value="2025-10" table:formula="of:=TEXT([.A676]; &quot;yyyy-mm&quot;)" table:style-name="ce14">
            <text:p>2025-10</text:p>
          </table:table-cell>
          <table:table-cell office:value-type="float" office:value="8" table:style-name="ce9">
            <text:p>8</text:p>
          </table:table-cell>
          <table:table-cell office:value-type="float" office:value="29" table:style-name="ce9">
            <text:p>29</text:p>
          </table:table-cell>
          <table:table-cell office:value-type="float" office:value="10" table:style-name="ce9">
            <text:p>10</text:p>
          </table:table-cell>
          <table:table-cell office:value-type="float" office:value="2225" table:style-name="ce9">
            <text:p>2225</text:p>
          </table:table-cell>
          <table:table-cell office:value-type="float" office:value="15" table:style-name="ce9">
            <text:p>15</text:p>
          </table:table-cell>
          <table:table-cell office:value-type="float" office:value="2254" table:formula="of:=SUM([.G676]+[.E676])" table:style-name="ce15">
            <text:p>2254</text:p>
          </table:table-cell>
          <table:table-cell office:value-type="float" office:value="-5" table:formula="of:=[.F676]-[.H676]" table:style-name="ce15">
            <text:p>-5</text:p>
          </table:table-cell>
          <table:table-cell office:value-type="percentage" office:value="5.3238686779059448E-3" table:formula="of:=([.I677]-[.I676])/[.I676]" table:style-name="ce16">
            <text:p>1%</text:p>
          </table:table-cell>
          <table:table-cell office:value-type="string" office:string-value="Valid" table:formula="of:=IF([.F676]&lt;=[.E676]; &quot;Valid&quot;; &quot;Invalid&quot;)" table:style-name="ce17">
            <text:p>Valid</text:p>
          </table:table-cell>
          <table:table-cell office:value-type="string" office:string-value="Valid" table:formula="of:=IF([.H676]&lt;=[.G676]; &quot;Valid&quot;; &quot;Invalid&quot;)" table:style-name="ce17">
            <text:p>Valid</text:p>
          </table:table-cell>
          <table:table-cell office:value-type="string" office:string-value="Stable/Reducing" table:formula="of:=IF([.J676]&gt;0; &quot;Increasing Pressure&quot;; &quot;Stable/Reducing&quot;)" table:style-name="ce18">
            <text:p>Stable/Reducing</text:p>
          </table:table-cell>
          <table:table-cell office:value-type="float" office:value="1.5" table:formula="of:=IFERROR([.H676]/[.F676]; 0)" table:style-name="ce17">
            <text:p>1.5</text:p>
          </table:table-cell>
          <table:table-cell office:value-type="float" office:value="2279.8571428571427" table:formula="of:=AVERAGE([.I676:.I682])" table:style-name="ce15">
            <text:p>2280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10-16T00:00:00" table:style-name="ce14">
            <text:p>16-10-2025</text:p>
          </table:table-cell>
          <table:table-cell office:value-type="string" office:string-value="October" table:formula="of:=TEXT([.A677]; &quot;mmmm&quot;)" table:style-name="ce14">
            <text:p>October</text:p>
          </table:table-cell>
          <table:table-cell office:value-type="string" office:string-value="2025-10" table:formula="of:=TEXT([.A677]; &quot;yyyy-mm&quot;)" table:style-name="ce14">
            <text:p>2025-10</text:p>
          </table:table-cell>
          <table:table-cell office:value-type="float" office:value="9" table:style-name="ce9">
            <text:p>9</text:p>
          </table:table-cell>
          <table:table-cell office:value-type="float" office:value="33" table:style-name="ce9">
            <text:p>33</text:p>
          </table:table-cell>
          <table:table-cell office:value-type="float" office:value="15" table:style-name="ce9">
            <text:p>15</text:p>
          </table:table-cell>
          <table:table-cell office:value-type="float" office:value="2233" table:style-name="ce9">
            <text:p>2233</text:p>
          </table:table-cell>
          <table:table-cell office:value-type="float" office:value="9" table:style-name="ce9">
            <text:p>9</text:p>
          </table:table-cell>
          <table:table-cell office:value-type="float" office:value="2266" table:formula="of:=SUM([.G677]+[.E677])" table:style-name="ce15">
            <text:p>2266</text:p>
          </table:table-cell>
          <table:table-cell office:value-type="float" office:value="6" table:formula="of:=[.F677]-[.H677]" table:style-name="ce15">
            <text:p>6</text:p>
          </table:table-cell>
          <table:table-cell office:value-type="percentage" office:value="2.2065313327449248E-3" table:formula="of:=([.I678]-[.I677])/[.I677]" table:style-name="ce16">
            <text:p>0%</text:p>
          </table:table-cell>
          <table:table-cell office:value-type="string" office:string-value="Valid" table:formula="of:=IF([.F677]&lt;=[.E677]; &quot;Valid&quot;; &quot;Invalid&quot;)" table:style-name="ce17">
            <text:p>Valid</text:p>
          </table:table-cell>
          <table:table-cell office:value-type="string" office:string-value="Valid" table:formula="of:=IF([.H677]&lt;=[.G677]; &quot;Valid&quot;; &quot;Invalid&quot;)" table:style-name="ce17">
            <text:p>Valid</text:p>
          </table:table-cell>
          <table:table-cell office:value-type="string" office:string-value="Increasing Pressure" table:formula="of:=IF([.J677]&gt;0; &quot;Increasing Pressure&quot;; &quot;Stable/Reducing&quot;)" table:style-name="ce18">
            <text:p>Increasing Pressure</text:p>
          </table:table-cell>
          <table:table-cell office:value-type="float" office:value="0.6" table:formula="of:=IFERROR([.H677]/[.F677]; 0)" table:style-name="ce17">
            <text:p>0.6</text:p>
          </table:table-cell>
          <table:table-cell office:value-type="float" office:value="2288" table:formula="of:=AVERAGE([.I677:.I683])" table:style-name="ce15">
            <text:p>2288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10-19T00:00:00" table:style-name="ce14">
            <text:p>19-10-2025</text:p>
          </table:table-cell>
          <table:table-cell office:value-type="string" office:string-value="October" table:formula="of:=TEXT([.A678]; &quot;mmmm&quot;)" table:style-name="ce14">
            <text:p>October</text:p>
          </table:table-cell>
          <table:table-cell office:value-type="string" office:string-value="2025-10" table:formula="of:=TEXT([.A678]; &quot;yyyy-mm&quot;)" table:style-name="ce14">
            <text:p>2025-10</text:p>
          </table:table-cell>
          <table:table-cell office:value-type="float" office:value="9" table:style-name="ce9">
            <text:p>9</text:p>
          </table:table-cell>
          <table:table-cell office:value-type="float" office:value="34" table:style-name="ce9">
            <text:p>34</text:p>
          </table:table-cell>
          <table:table-cell office:value-type="float" office:value="17" table:style-name="ce9">
            <text:p>17</text:p>
          </table:table-cell>
          <table:table-cell office:value-type="float" office:value="2237" table:style-name="ce9">
            <text:p>2237</text:p>
          </table:table-cell>
          <table:table-cell office:value-type="float" office:value="7" table:style-name="ce9">
            <text:p>7</text:p>
          </table:table-cell>
          <table:table-cell office:value-type="float" office:value="2271" table:formula="of:=SUM([.G678]+[.E678])" table:style-name="ce15">
            <text:p>2271</text:p>
          </table:table-cell>
          <table:table-cell office:value-type="float" office:value="10" table:formula="of:=[.F678]-[.H678]" table:style-name="ce15">
            <text:p>10</text:p>
          </table:table-cell>
          <table:table-cell office:value-type="percentage" office:value="4.8436811977102595E-3" table:formula="of:=([.I679]-[.I678])/[.I678]" table:style-name="ce16">
            <text:p>0%</text:p>
          </table:table-cell>
          <table:table-cell office:value-type="string" office:string-value="Valid" table:formula="of:=IF([.F678]&lt;=[.E678]; &quot;Valid&quot;; &quot;Invalid&quot;)" table:style-name="ce17">
            <text:p>Valid</text:p>
          </table:table-cell>
          <table:table-cell office:value-type="string" office:string-value="Valid" table:formula="of:=IF([.H678]&lt;=[.G678]; &quot;Valid&quot;; &quot;Invalid&quot;)" table:style-name="ce17">
            <text:p>Valid</text:p>
          </table:table-cell>
          <table:table-cell office:value-type="string" office:string-value="Increasing Pressure" table:formula="of:=IF([.J678]&gt;0; &quot;Increasing Pressure&quot;; &quot;Stable/Reducing&quot;)" table:style-name="ce18">
            <text:p>Increasing Pressure</text:p>
          </table:table-cell>
          <table:table-cell office:value-type="float" office:value="0.41176470588235292" table:formula="of:=IFERROR([.H678]/[.F678]; 0)" table:style-name="ce17">
            <text:p>0.411764706</text:p>
          </table:table-cell>
          <table:table-cell office:value-type="float" office:value="2294.7142857142858" table:formula="of:=AVERAGE([.I678:.I684])" table:style-name="ce15">
            <text:p>2295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10-20T00:00:00" table:style-name="ce14">
            <text:p>20-10-2025</text:p>
          </table:table-cell>
          <table:table-cell office:value-type="string" office:string-value="October" table:formula="of:=TEXT([.A679]; &quot;mmmm&quot;)" table:style-name="ce14">
            <text:p>October</text:p>
          </table:table-cell>
          <table:table-cell office:value-type="string" office:string-value="2025-10" table:formula="of:=TEXT([.A679]; &quot;yyyy-mm&quot;)" table:style-name="ce14">
            <text:p>2025-10</text:p>
          </table:table-cell>
          <table:table-cell office:value-type="float" office:value="10" table:style-name="ce9">
            <text:p>10</text:p>
          </table:table-cell>
          <table:table-cell office:value-type="float" office:value="39" table:style-name="ce9">
            <text:p>39</text:p>
          </table:table-cell>
          <table:table-cell office:value-type="float" office:value="6" table:style-name="ce9">
            <text:p>6</text:p>
          </table:table-cell>
          <table:table-cell office:value-type="float" office:value="2243" table:style-name="ce9">
            <text:p>2243</text:p>
          </table:table-cell>
          <table:table-cell office:value-type="float" office:value="7" table:style-name="ce9">
            <text:p>7</text:p>
          </table:table-cell>
          <table:table-cell office:value-type="float" office:value="2282" table:formula="of:=SUM([.G679]+[.E679])" table:style-name="ce15">
            <text:p>2282</text:p>
          </table:table-cell>
          <table:table-cell office:value-type="float" office:value="-1" table:formula="of:=[.F679]-[.H679]" table:style-name="ce15">
            <text:p>-1</text:p>
          </table:table-cell>
          <table:table-cell office:value-type="percentage" office:value="3.5056967572304996E-3" table:formula="of:=([.I680]-[.I679])/[.I679]" table:style-name="ce16">
            <text:p>0%</text:p>
          </table:table-cell>
          <table:table-cell office:value-type="string" office:string-value="Valid" table:formula="of:=IF([.F679]&lt;=[.E679]; &quot;Valid&quot;; &quot;Invalid&quot;)" table:style-name="ce17">
            <text:p>Valid</text:p>
          </table:table-cell>
          <table:table-cell office:value-type="string" office:string-value="Valid" table:formula="of:=IF([.H679]&lt;=[.G679]; &quot;Valid&quot;; &quot;Invalid&quot;)" table:style-name="ce17">
            <text:p>Valid</text:p>
          </table:table-cell>
          <table:table-cell office:value-type="string" office:string-value="Stable/Reducing" table:formula="of:=IF([.J679]&gt;0; &quot;Increasing Pressure&quot;; &quot;Stable/Reducing&quot;)" table:style-name="ce18">
            <text:p>Stable/Reducing</text:p>
          </table:table-cell>
          <table:table-cell office:value-type="float" office:value="1.1666666666666667" table:formula="of:=IFERROR([.H679]/[.F679]; 0)" table:style-name="ce17">
            <text:p>1.166666667</text:p>
          </table:table-cell>
          <table:table-cell office:value-type="float" office:value="2300" table:formula="of:=AVERAGE([.I679:.I685])" table:style-name="ce15">
            <text:p>2300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10-21T00:00:00" table:style-name="ce14">
            <text:p>21-10-2025</text:p>
          </table:table-cell>
          <table:table-cell office:value-type="string" office:string-value="October" table:formula="of:=TEXT([.A680]; &quot;mmmm&quot;)" table:style-name="ce14">
            <text:p>October</text:p>
          </table:table-cell>
          <table:table-cell office:value-type="string" office:string-value="2025-10" table:formula="of:=TEXT([.A680]; &quot;yyyy-mm&quot;)" table:style-name="ce14">
            <text:p>2025-10</text:p>
          </table:table-cell>
          <table:table-cell office:value-type="float" office:value="13" table:style-name="ce9">
            <text:p>13</text:p>
          </table:table-cell>
          <table:table-cell office:value-type="float" office:value="39" table:style-name="ce9">
            <text:p>39</text:p>
          </table:table-cell>
          <table:table-cell office:value-type="float" office:value="17" table:style-name="ce9">
            <text:p>17</text:p>
          </table:table-cell>
          <table:table-cell office:value-type="float" office:value="2251" table:style-name="ce9">
            <text:p>2251</text:p>
          </table:table-cell>
          <table:table-cell office:value-type="float" office:value="9" table:style-name="ce9">
            <text:p>9</text:p>
          </table:table-cell>
          <table:table-cell office:value-type="float" office:value="2290" table:formula="of:=SUM([.G680]+[.E680])" table:style-name="ce15">
            <text:p>2290</text:p>
          </table:table-cell>
          <table:table-cell office:value-type="float" office:value="8" table:formula="of:=[.F680]-[.H680]" table:style-name="ce15">
            <text:p>8</text:p>
          </table:table-cell>
          <table:table-cell office:value-type="percentage" office:value="5.6768558951965069E-3" table:formula="of:=([.I681]-[.I680])/[.I680]" table:style-name="ce16">
            <text:p>1%</text:p>
          </table:table-cell>
          <table:table-cell office:value-type="string" office:string-value="Valid" table:formula="of:=IF([.F680]&lt;=[.E680]; &quot;Valid&quot;; &quot;Invalid&quot;)" table:style-name="ce17">
            <text:p>Valid</text:p>
          </table:table-cell>
          <table:table-cell office:value-type="string" office:string-value="Valid" table:formula="of:=IF([.H680]&lt;=[.G680]; &quot;Valid&quot;; &quot;Invalid&quot;)" table:style-name="ce17">
            <text:p>Valid</text:p>
          </table:table-cell>
          <table:table-cell office:value-type="string" office:string-value="Increasing Pressure" table:formula="of:=IF([.J680]&gt;0; &quot;Increasing Pressure&quot;; &quot;Stable/Reducing&quot;)" table:style-name="ce18">
            <text:p>Increasing Pressure</text:p>
          </table:table-cell>
          <table:table-cell office:value-type="float" office:value="0.52941176470588236" table:formula="of:=IFERROR([.H680]/[.F680]; 0)" table:style-name="ce17">
            <text:p>0.529411765</text:p>
          </table:table-cell>
          <table:table-cell office:value-type="float" office:value="2303.2857142857142" table:formula="of:=AVERAGE([.I680:.I686])" table:style-name="ce15">
            <text:p>2303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10-22T00:00:00" table:style-name="ce14">
            <text:p>22-10-2025</text:p>
          </table:table-cell>
          <table:table-cell office:value-type="string" office:string-value="October" table:formula="of:=TEXT([.A681]; &quot;mmmm&quot;)" table:style-name="ce14">
            <text:p>October</text:p>
          </table:table-cell>
          <table:table-cell office:value-type="string" office:string-value="2025-10" table:formula="of:=TEXT([.A681]; &quot;yyyy-mm&quot;)" table:style-name="ce14">
            <text:p>2025-10</text:p>
          </table:table-cell>
          <table:table-cell office:value-type="float" office:value="12" table:style-name="ce9">
            <text:p>12</text:p>
          </table:table-cell>
          <table:table-cell office:value-type="float" office:value="42" table:style-name="ce9">
            <text:p>42</text:p>
          </table:table-cell>
          <table:table-cell office:value-type="float" office:value="13" table:style-name="ce9">
            <text:p>13</text:p>
          </table:table-cell>
          <table:table-cell office:value-type="float" office:value="2261" table:style-name="ce9">
            <text:p>2261</text:p>
          </table:table-cell>
          <table:table-cell office:value-type="float" office:value="12" table:style-name="ce9">
            <text:p>12</text:p>
          </table:table-cell>
          <table:table-cell office:value-type="float" office:value="2303" table:formula="of:=SUM([.G681]+[.E681])" table:style-name="ce15">
            <text:p>2303</text:p>
          </table:table-cell>
          <table:table-cell office:value-type="float" office:value="1" table:formula="of:=[.F681]-[.H681]" table:style-name="ce15">
            <text:p>1</text:p>
          </table:table-cell>
          <table:table-cell office:value-type="percentage" office:value="-4.3421623968736434E-3" table:formula="of:=([.I682]-[.I681])/[.I681]" table:style-name="ce16">
            <text:p>0%</text:p>
          </table:table-cell>
          <table:table-cell office:value-type="string" office:string-value="Valid" table:formula="of:=IF([.F681]&lt;=[.E681]; &quot;Valid&quot;; &quot;Invalid&quot;)" table:style-name="ce17">
            <text:p>Valid</text:p>
          </table:table-cell>
          <table:table-cell office:value-type="string" office:string-value="Valid" table:formula="of:=IF([.H681]&lt;=[.G681]; &quot;Valid&quot;; &quot;Invalid&quot;)" table:style-name="ce17">
            <text:p>Valid</text:p>
          </table:table-cell>
          <table:table-cell office:value-type="string" office:string-value="Increasing Pressure" table:formula="of:=IF([.J681]&gt;0; &quot;Increasing Pressure&quot;; &quot;Stable/Reducing&quot;)" table:style-name="ce18">
            <text:p>Increasing Pressure</text:p>
          </table:table-cell>
          <table:table-cell office:value-type="float" office:value="0.92307692307692313" table:formula="of:=IFERROR([.H681]/[.F681]; 0)" table:style-name="ce17">
            <text:p>0.923076923</text:p>
          </table:table-cell>
          <table:table-cell office:value-type="float" office:value="2305.2857142857142" table:formula="of:=AVERAGE([.I681:.I687])" table:style-name="ce15">
            <text:p>2305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10-23T00:00:00" table:style-name="ce14">
            <text:p>23-10-2025</text:p>
          </table:table-cell>
          <table:table-cell office:value-type="string" office:string-value="October" table:formula="of:=TEXT([.A682]; &quot;mmmm&quot;)" table:style-name="ce14">
            <text:p>October</text:p>
          </table:table-cell>
          <table:table-cell office:value-type="string" office:string-value="2025-10" table:formula="of:=TEXT([.A682]; &quot;yyyy-mm&quot;)" table:style-name="ce14">
            <text:p>2025-10</text:p>
          </table:table-cell>
          <table:table-cell office:value-type="float" office:value="4" table:style-name="ce9">
            <text:p>4</text:p>
          </table:table-cell>
          <table:table-cell office:value-type="float" office:value="27" table:style-name="ce9">
            <text:p>27</text:p>
          </table:table-cell>
          <table:table-cell office:value-type="float" office:value="26" table:style-name="ce9">
            <text:p>26</text:p>
          </table:table-cell>
          <table:table-cell office:value-type="float" office:value="2266" table:style-name="ce9">
            <text:p>2266</text:p>
          </table:table-cell>
          <table:table-cell office:value-type="float" office:value="18" table:style-name="ce9">
            <text:p>18</text:p>
          </table:table-cell>
          <table:table-cell office:value-type="float" office:value="2293" table:formula="of:=SUM([.G682]+[.E682])" table:style-name="ce15">
            <text:p>2293</text:p>
          </table:table-cell>
          <table:table-cell office:value-type="float" office:value="8" table:formula="of:=[.F682]-[.H682]" table:style-name="ce15">
            <text:p>8</text:p>
          </table:table-cell>
          <table:table-cell office:value-type="percentage" office:value="7.849978194505015E-3" table:formula="of:=([.I683]-[.I682])/[.I682]" table:style-name="ce16">
            <text:p>1%</text:p>
          </table:table-cell>
          <table:table-cell office:value-type="string" office:string-value="Valid" table:formula="of:=IF([.F682]&lt;=[.E682]; &quot;Valid&quot;; &quot;Invalid&quot;)" table:style-name="ce17">
            <text:p>Valid</text:p>
          </table:table-cell>
          <table:table-cell office:value-type="string" office:string-value="Valid" table:formula="of:=IF([.H682]&lt;=[.G682]; &quot;Valid&quot;; &quot;Invalid&quot;)" table:style-name="ce17">
            <text:p>Valid</text:p>
          </table:table-cell>
          <table:table-cell office:value-type="string" office:string-value="Increasing Pressure" table:formula="of:=IF([.J682]&gt;0; &quot;Increasing Pressure&quot;; &quot;Stable/Reducing&quot;)" table:style-name="ce18">
            <text:p>Increasing Pressure</text:p>
          </table:table-cell>
          <table:table-cell office:value-type="float" office:value="0.69230769230769229" table:formula="of:=IFERROR([.H682]/[.F682]; 0)" table:style-name="ce17">
            <text:p>0.692307692</text:p>
          </table:table-cell>
          <table:table-cell office:value-type="float" office:value="2304.5714285714284" table:formula="of:=AVERAGE([.I682:.I688])" table:style-name="ce15">
            <text:p>2305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10-26T00:00:00" table:style-name="ce14">
            <text:p>26-10-2025</text:p>
          </table:table-cell>
          <table:table-cell office:value-type="string" office:string-value="October" table:formula="of:=TEXT([.A683]; &quot;mmmm&quot;)" table:style-name="ce14">
            <text:p>October</text:p>
          </table:table-cell>
          <table:table-cell office:value-type="string" office:string-value="2025-10" table:formula="of:=TEXT([.A683]; &quot;yyyy-mm&quot;)" table:style-name="ce14">
            <text:p>2025-10</text:p>
          </table:table-cell>
          <table:table-cell office:value-type="float" office:value="4" table:style-name="ce9">
            <text:p>4</text:p>
          </table:table-cell>
          <table:table-cell office:value-type="float" office:value="35" table:style-name="ce9">
            <text:p>35</text:p>
          </table:table-cell>
          <table:table-cell office:value-type="float" office:value="12" table:style-name="ce9">
            <text:p>12</text:p>
          </table:table-cell>
          <table:table-cell office:value-type="float" office:value="2276" table:style-name="ce9">
            <text:p>2276</text:p>
          </table:table-cell>
          <table:table-cell office:value-type="float" office:value="10" table:style-name="ce9">
            <text:p>10</text:p>
          </table:table-cell>
          <table:table-cell office:value-type="float" office:value="2311" table:formula="of:=SUM([.G683]+[.E683])" table:style-name="ce15">
            <text:p>2311</text:p>
          </table:table-cell>
          <table:table-cell office:value-type="float" office:value="2" table:formula="of:=[.F683]-[.H683]" table:style-name="ce15">
            <text:p>2</text:p>
          </table:table-cell>
          <table:table-cell office:value-type="percentage" office:value="8.6542622241453913E-4" table:formula="of:=([.I684]-[.I683])/[.I683]" table:style-name="ce16">
            <text:p>0%</text:p>
          </table:table-cell>
          <table:table-cell office:value-type="string" office:string-value="Valid" table:formula="of:=IF([.F683]&lt;=[.E683]; &quot;Valid&quot;; &quot;Invalid&quot;)" table:style-name="ce17">
            <text:p>Valid</text:p>
          </table:table-cell>
          <table:table-cell office:value-type="string" office:string-value="Valid" table:formula="of:=IF([.H683]&lt;=[.G683]; &quot;Valid&quot;; &quot;Invalid&quot;)" table:style-name="ce17">
            <text:p>Valid</text:p>
          </table:table-cell>
          <table:table-cell office:value-type="string" office:string-value="Increasing Pressure" table:formula="of:=IF([.J683]&gt;0; &quot;Increasing Pressure&quot;; &quot;Stable/Reducing&quot;)" table:style-name="ce18">
            <text:p>Increasing Pressure</text:p>
          </table:table-cell>
          <table:table-cell office:value-type="float" office:value="0.83333333333333337" table:formula="of:=IFERROR([.H683]/[.F683]; 0)" table:style-name="ce17">
            <text:p>0.833333333</text:p>
          </table:table-cell>
          <table:table-cell office:value-type="float" office:value="2305.1428571428573" table:formula="of:=AVERAGE([.I683:.I689])" table:style-name="ce15">
            <text:p>2305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10-27T00:00:00" table:style-name="ce14">
            <text:p>27-10-2025</text:p>
          </table:table-cell>
          <table:table-cell office:value-type="string" office:string-value="October" table:formula="of:=TEXT([.A684]; &quot;mmmm&quot;)" table:style-name="ce14">
            <text:p>October</text:p>
          </table:table-cell>
          <table:table-cell office:value-type="string" office:string-value="2025-10" table:formula="of:=TEXT([.A684]; &quot;yyyy-mm&quot;)" table:style-name="ce14">
            <text:p>2025-10</text:p>
          </table:table-cell>
          <table:table-cell office:value-type="float" office:value="2" table:style-name="ce9">
            <text:p>2</text:p>
          </table:table-cell>
          <table:table-cell office:value-type="float" office:value="31" table:style-name="ce9">
            <text:p>31</text:p>
          </table:table-cell>
          <table:table-cell office:value-type="float" office:value="8" table:style-name="ce9">
            <text:p>8</text:p>
          </table:table-cell>
          <table:table-cell office:value-type="float" office:value="2282" table:style-name="ce9">
            <text:p>2282</text:p>
          </table:table-cell>
          <table:table-cell office:value-type="float" office:value="11" table:style-name="ce9">
            <text:p>11</text:p>
          </table:table-cell>
          <table:table-cell office:value-type="float" office:value="2313" table:formula="of:=SUM([.G684]+[.E684])" table:style-name="ce15">
            <text:p>2313</text:p>
          </table:table-cell>
          <table:table-cell office:value-type="float" office:value="-3" table:formula="of:=[.F684]-[.H684]" table:style-name="ce15">
            <text:p>-3</text:p>
          </table:table-cell>
          <table:table-cell office:value-type="percentage" office:value="-2.1616947686986599E-3" table:formula="of:=([.I685]-[.I684])/[.I684]" table:style-name="ce16">
            <text:p>0%</text:p>
          </table:table-cell>
          <table:table-cell office:value-type="string" office:string-value="Valid" table:formula="of:=IF([.F684]&lt;=[.E684]; &quot;Valid&quot;; &quot;Invalid&quot;)" table:style-name="ce17">
            <text:p>Valid</text:p>
          </table:table-cell>
          <table:table-cell office:value-type="string" office:string-value="Valid" table:formula="of:=IF([.H684]&lt;=[.G684]; &quot;Valid&quot;; &quot;Invalid&quot;)" table:style-name="ce17">
            <text:p>Valid</text:p>
          </table:table-cell>
          <table:table-cell office:value-type="string" office:string-value="Stable/Reducing" table:formula="of:=IF([.J684]&gt;0; &quot;Increasing Pressure&quot;; &quot;Stable/Reducing&quot;)" table:style-name="ce18">
            <text:p>Stable/Reducing</text:p>
          </table:table-cell>
          <table:table-cell office:value-type="float" office:value="1.375" table:formula="of:=IFERROR([.H684]/[.F684]; 0)" table:style-name="ce17">
            <text:p>1.375</text:p>
          </table:table-cell>
          <table:table-cell office:value-type="float" office:value="2304" table:formula="of:=AVERAGE([.I684:.I690])" table:style-name="ce15">
            <text:p>2304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10-28T00:00:00" table:style-name="ce14">
            <text:p>28-10-2025</text:p>
          </table:table-cell>
          <table:table-cell office:value-type="string" office:string-value="October" table:formula="of:=TEXT([.A685]; &quot;mmmm&quot;)" table:style-name="ce14">
            <text:p>October</text:p>
          </table:table-cell>
          <table:table-cell office:value-type="string" office:string-value="2025-10" table:formula="of:=TEXT([.A685]; &quot;yyyy-mm&quot;)" table:style-name="ce14">
            <text:p>2025-10</text:p>
          </table:table-cell>
          <table:table-cell office:value-type="float" office:value="6" table:style-name="ce9">
            <text:p>6</text:p>
          </table:table-cell>
          <table:table-cell office:value-type="float" office:value="22" table:style-name="ce9">
            <text:p>22</text:p>
          </table:table-cell>
          <table:table-cell office:value-type="float" office:value="11" table:style-name="ce9">
            <text:p>11</text:p>
          </table:table-cell>
          <table:table-cell office:value-type="float" office:value="2286" table:style-name="ce9">
            <text:p>2286</text:p>
          </table:table-cell>
          <table:table-cell office:value-type="float" office:value="6" table:style-name="ce9">
            <text:p>6</text:p>
          </table:table-cell>
          <table:table-cell office:value-type="float" office:value="2308" table:formula="of:=SUM([.G685]+[.E685])" table:style-name="ce15">
            <text:p>2308</text:p>
          </table:table-cell>
          <table:table-cell office:value-type="float" office:value="5" table:formula="of:=[.F685]-[.H685]" table:style-name="ce15">
            <text:p>5</text:p>
          </table:table-cell>
          <table:table-cell office:value-type="percentage" office:value="-1.2998266897746968E-3" table:formula="of:=([.I686]-[.I685])/[.I685]" table:style-name="ce16">
            <text:p>0%</text:p>
          </table:table-cell>
          <table:table-cell office:value-type="string" office:string-value="Valid" table:formula="of:=IF([.F685]&lt;=[.E685]; &quot;Valid&quot;; &quot;Invalid&quot;)" table:style-name="ce17">
            <text:p>Valid</text:p>
          </table:table-cell>
          <table:table-cell office:value-type="string" office:string-value="Valid" table:formula="of:=IF([.H685]&lt;=[.G685]; &quot;Valid&quot;; &quot;Invalid&quot;)" table:style-name="ce17">
            <text:p>Valid</text:p>
          </table:table-cell>
          <table:table-cell office:value-type="string" office:string-value="Increasing Pressure" table:formula="of:=IF([.J685]&gt;0; &quot;Increasing Pressure&quot;; &quot;Stable/Reducing&quot;)" table:style-name="ce18">
            <text:p>Increasing Pressure</text:p>
          </table:table-cell>
          <table:table-cell office:value-type="float" office:value="0.54545454545454541" table:formula="of:=IFERROR([.H685]/[.F685]; 0)" table:style-name="ce17">
            <text:p>0.545454545</text:p>
          </table:table-cell>
          <table:table-cell office:value-type="float" office:value="2304" table:formula="of:=AVERAGE([.I685:.I691])" table:style-name="ce15">
            <text:p>2304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10-29T00:00:00" table:style-name="ce14">
            <text:p>29-10-2025</text:p>
          </table:table-cell>
          <table:table-cell office:value-type="string" office:string-value="October" table:formula="of:=TEXT([.A686]; &quot;mmmm&quot;)" table:style-name="ce14">
            <text:p>October</text:p>
          </table:table-cell>
          <table:table-cell office:value-type="string" office:string-value="2025-10" table:formula="of:=TEXT([.A686]; &quot;yyyy-mm&quot;)" table:style-name="ce14">
            <text:p>2025-10</text:p>
          </table:table-cell>
          <table:table-cell office:value-type="float" office:value="6" table:style-name="ce9">
            <text:p>6</text:p>
          </table:table-cell>
          <table:table-cell office:value-type="float" office:value="25" table:style-name="ce9">
            <text:p>25</text:p>
          </table:table-cell>
          <table:table-cell office:value-type="float" office:value="4" table:style-name="ce9">
            <text:p>4</text:p>
          </table:table-cell>
          <table:table-cell office:value-type="float" office:value="2280" table:style-name="ce9">
            <text:p>2280</text:p>
          </table:table-cell>
          <table:table-cell office:value-type="float" office:value="17" table:style-name="ce9">
            <text:p>17</text:p>
          </table:table-cell>
          <table:table-cell office:value-type="float" office:value="2305" table:formula="of:=SUM([.G686]+[.E686])" table:style-name="ce15">
            <text:p>2305</text:p>
          </table:table-cell>
          <table:table-cell office:value-type="float" office:value="-13" table:formula="of:=[.F686]-[.H686]" table:style-name="ce15">
            <text:p>-13</text:p>
          </table:table-cell>
          <table:table-cell office:value-type="percentage" office:value="-4.3383947939262471E-4" table:formula="of:=([.I687]-[.I686])/[.I686]" table:style-name="ce16">
            <text:p>0%</text:p>
          </table:table-cell>
          <table:table-cell office:value-type="string" office:string-value="Valid" table:formula="of:=IF([.F686]&lt;=[.E686]; &quot;Valid&quot;; &quot;Invalid&quot;)" table:style-name="ce17">
            <text:p>Valid</text:p>
          </table:table-cell>
          <table:table-cell office:value-type="string" office:string-value="Valid" table:formula="of:=IF([.H686]&lt;=[.G686]; &quot;Valid&quot;; &quot;Invalid&quot;)" table:style-name="ce17">
            <text:p>Valid</text:p>
          </table:table-cell>
          <table:table-cell office:value-type="string" office:string-value="Stable/Reducing" table:formula="of:=IF([.J686]&gt;0; &quot;Increasing Pressure&quot;; &quot;Stable/Reducing&quot;)" table:style-name="ce18">
            <text:p>Stable/Reducing</text:p>
          </table:table-cell>
          <table:table-cell office:value-type="float" office:value="4.25" table:formula="of:=IFERROR([.H686]/[.F686]; 0)" table:style-name="ce17">
            <text:p>4.25</text:p>
          </table:table-cell>
          <table:table-cell office:value-type="float" office:value="2302.4285714285716" table:formula="of:=AVERAGE([.I686:.I692])" table:style-name="ce15">
            <text:p>2302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10-30T00:00:00" table:style-name="ce14">
            <text:p>30-10-2025</text:p>
          </table:table-cell>
          <table:table-cell office:value-type="string" office:string-value="October" table:formula="of:=TEXT([.A687]; &quot;mmmm&quot;)" table:style-name="ce14">
            <text:p>October</text:p>
          </table:table-cell>
          <table:table-cell office:value-type="string" office:string-value="2025-10" table:formula="of:=TEXT([.A687]; &quot;yyyy-mm&quot;)" table:style-name="ce14">
            <text:p>2025-10</text:p>
          </table:table-cell>
          <table:table-cell office:value-type="float" office:value="3" table:style-name="ce9">
            <text:p>3</text:p>
          </table:table-cell>
          <table:table-cell office:value-type="float" office:value="17" table:style-name="ce9">
            <text:p>17</text:p>
          </table:table-cell>
          <table:table-cell office:value-type="float" office:value="14" table:style-name="ce9">
            <text:p>14</text:p>
          </table:table-cell>
          <table:table-cell office:value-type="float" office:value="2287" table:style-name="ce9">
            <text:p>2287</text:p>
          </table:table-cell>
          <table:table-cell office:value-type="float" office:value="12" table:style-name="ce9">
            <text:p>12</text:p>
          </table:table-cell>
          <table:table-cell office:value-type="float" office:value="2304" table:formula="of:=SUM([.G687]+[.E687])" table:style-name="ce15">
            <text:p>2304</text:p>
          </table:table-cell>
          <table:table-cell office:value-type="float" office:value="2" table:formula="of:=[.F687]-[.H687]" table:style-name="ce15">
            <text:p>2</text:p>
          </table:table-cell>
          <table:table-cell office:value-type="percentage" office:value="-2.6041666666666665E-3" table:formula="of:=([.I688]-[.I687])/[.I687]" table:style-name="ce16">
            <text:p>0%</text:p>
          </table:table-cell>
          <table:table-cell office:value-type="string" office:string-value="Valid" table:formula="of:=IF([.F687]&lt;=[.E687]; &quot;Valid&quot;; &quot;Invalid&quot;)" table:style-name="ce17">
            <text:p>Valid</text:p>
          </table:table-cell>
          <table:table-cell office:value-type="string" office:string-value="Valid" table:formula="of:=IF([.H687]&lt;=[.G687]; &quot;Valid&quot;; &quot;Invalid&quot;)" table:style-name="ce17">
            <text:p>Valid</text:p>
          </table:table-cell>
          <table:table-cell office:value-type="string" office:string-value="Increasing Pressure" table:formula="of:=IF([.J687]&gt;0; &quot;Increasing Pressure&quot;; &quot;Stable/Reducing&quot;)" table:style-name="ce18">
            <text:p>Increasing Pressure</text:p>
          </table:table-cell>
          <table:table-cell office:value-type="float" office:value="0.8571428571428571" table:formula="of:=IFERROR([.H687]/[.F687]; 0)" table:style-name="ce17">
            <text:p>0.857142857</text:p>
          </table:table-cell>
          <table:table-cell office:value-type="float" office:value="2305.5714285714284" table:formula="of:=AVERAGE([.I687:.I693])" table:style-name="ce15">
            <text:p>2306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11-02T00:00:00" table:style-name="ce14">
            <text:p>02-11-2025</text:p>
          </table:table-cell>
          <table:table-cell office:value-type="string" office:string-value="November" table:formula="of:=TEXT([.A688]; &quot;mmmm&quot;)" table:style-name="ce14">
            <text:p>November</text:p>
          </table:table-cell>
          <table:table-cell office:value-type="string" office:string-value="2025-11" table:formula="of:=TEXT([.A688]; &quot;yyyy-mm&quot;)" table:style-name="ce14">
            <text:p>2025-11</text:p>
          </table:table-cell>
          <table:table-cell office:value-type="float" office:value="5" table:style-name="ce9">
            <text:p>5</text:p>
          </table:table-cell>
          <table:table-cell office:value-type="float" office:value="21" table:style-name="ce9">
            <text:p>21</text:p>
          </table:table-cell>
          <table:table-cell office:value-type="float" office:value="10" table:style-name="ce9">
            <text:p>10</text:p>
          </table:table-cell>
          <table:table-cell office:value-type="float" office:value="2277" table:style-name="ce9">
            <text:p>2277</text:p>
          </table:table-cell>
          <table:table-cell office:value-type="float" office:value="7" table:style-name="ce9">
            <text:p>7</text:p>
          </table:table-cell>
          <table:table-cell office:value-type="float" office:value="2298" table:formula="of:=SUM([.G688]+[.E688])" table:style-name="ce15">
            <text:p>2298</text:p>
          </table:table-cell>
          <table:table-cell office:value-type="float" office:value="3" table:formula="of:=[.F688]-[.H688]" table:style-name="ce15">
            <text:p>3</text:p>
          </table:table-cell>
          <table:table-cell office:value-type="percentage" office:value="-4.351610095735422E-4" table:formula="of:=([.I689]-[.I688])/[.I688]" table:style-name="ce16">
            <text:p>0%</text:p>
          </table:table-cell>
          <table:table-cell office:value-type="string" office:string-value="Valid" table:formula="of:=IF([.F688]&lt;=[.E688]; &quot;Valid&quot;; &quot;Invalid&quot;)" table:style-name="ce17">
            <text:p>Valid</text:p>
          </table:table-cell>
          <table:table-cell office:value-type="string" office:string-value="Valid" table:formula="of:=IF([.H688]&lt;=[.G688]; &quot;Valid&quot;; &quot;Invalid&quot;)" table:style-name="ce17">
            <text:p>Valid</text:p>
          </table:table-cell>
          <table:table-cell office:value-type="string" office:string-value="Increasing Pressure" table:formula="of:=IF([.J688]&gt;0; &quot;Increasing Pressure&quot;; &quot;Stable/Reducing&quot;)" table:style-name="ce18">
            <text:p>Increasing Pressure</text:p>
          </table:table-cell>
          <table:table-cell office:value-type="float" office:value="0.7" table:formula="of:=IFERROR([.H688]/[.F688]; 0)" table:style-name="ce17">
            <text:p>0.7</text:p>
          </table:table-cell>
          <table:table-cell office:value-type="float" office:value="2309.7142857142858" table:formula="of:=AVERAGE([.I688:.I694])" table:style-name="ce15">
            <text:p>2310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11-03T00:00:00" table:style-name="ce14">
            <text:p>03-11-2025</text:p>
          </table:table-cell>
          <table:table-cell office:value-type="string" office:string-value="November" table:formula="of:=TEXT([.A689]; &quot;mmmm&quot;)" table:style-name="ce14">
            <text:p>November</text:p>
          </table:table-cell>
          <table:table-cell office:value-type="string" office:string-value="2025-11" table:formula="of:=TEXT([.A689]; &quot;yyyy-mm&quot;)" table:style-name="ce14">
            <text:p>2025-11</text:p>
          </table:table-cell>
          <table:table-cell office:value-type="float" office:value="3" table:style-name="ce9">
            <text:p>3</text:p>
          </table:table-cell>
          <table:table-cell office:value-type="float" office:value="28" table:style-name="ce9">
            <text:p>28</text:p>
          </table:table-cell>
          <table:table-cell office:value-type="float" office:value="5" table:style-name="ce9">
            <text:p>5</text:p>
          </table:table-cell>
          <table:table-cell office:value-type="float" office:value="2269" table:style-name="ce9">
            <text:p>2269</text:p>
          </table:table-cell>
          <table:table-cell office:value-type="float" office:value="12" table:style-name="ce9">
            <text:p>12</text:p>
          </table:table-cell>
          <table:table-cell office:value-type="float" office:value="2297" table:formula="of:=SUM([.G689]+[.E689])" table:style-name="ce15">
            <text:p>2297</text:p>
          </table:table-cell>
          <table:table-cell office:value-type="float" office:value="-7" table:formula="of:=[.F689]-[.H689]" table:style-name="ce15">
            <text:p>-7</text:p>
          </table:table-cell>
          <table:table-cell office:value-type="percentage" office:value="2.6121027427078798E-3" table:formula="of:=([.I690]-[.I689])/[.I689]" table:style-name="ce16">
            <text:p>0%</text:p>
          </table:table-cell>
          <table:table-cell office:value-type="string" office:string-value="Valid" table:formula="of:=IF([.F689]&lt;=[.E689]; &quot;Valid&quot;; &quot;Invalid&quot;)" table:style-name="ce17">
            <text:p>Valid</text:p>
          </table:table-cell>
          <table:table-cell office:value-type="string" office:string-value="Valid" table:formula="of:=IF([.H689]&lt;=[.G689]; &quot;Valid&quot;; &quot;Invalid&quot;)" table:style-name="ce17">
            <text:p>Valid</text:p>
          </table:table-cell>
          <table:table-cell office:value-type="string" office:string-value="Stable/Reducing" table:formula="of:=IF([.J689]&gt;0; &quot;Increasing Pressure&quot;; &quot;Stable/Reducing&quot;)" table:style-name="ce18">
            <text:p>Stable/Reducing</text:p>
          </table:table-cell>
          <table:table-cell office:value-type="float" office:value="2.4" table:formula="of:=IFERROR([.H689]/[.F689]; 0)" table:style-name="ce17">
            <text:p>2.4</text:p>
          </table:table-cell>
          <table:table-cell office:value-type="float" office:value="2317.1428571428573" table:formula="of:=AVERAGE([.I689:.I695])" table:style-name="ce15">
            <text:p>2317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11-04T00:00:00" table:style-name="ce14">
            <text:p>04-11-2025</text:p>
          </table:table-cell>
          <table:table-cell office:value-type="string" office:string-value="November" table:formula="of:=TEXT([.A690]; &quot;mmmm&quot;)" table:style-name="ce14">
            <text:p>November</text:p>
          </table:table-cell>
          <table:table-cell office:value-type="string" office:string-value="2025-11" table:formula="of:=TEXT([.A690]; &quot;yyyy-mm&quot;)" table:style-name="ce14">
            <text:p>2025-11</text:p>
          </table:table-cell>
          <table:table-cell office:value-type="float" office:value="6" table:style-name="ce9">
            <text:p>6</text:p>
          </table:table-cell>
          <table:table-cell office:value-type="float" office:value="33" table:style-name="ce9">
            <text:p>33</text:p>
          </table:table-cell>
          <table:table-cell office:value-type="float" office:value="6" table:style-name="ce9">
            <text:p>6</text:p>
          </table:table-cell>
          <table:table-cell office:value-type="float" office:value="2270" table:style-name="ce9">
            <text:p>2270</text:p>
          </table:table-cell>
          <table:table-cell office:value-type="float" office:value="8" table:style-name="ce9">
            <text:p>8</text:p>
          </table:table-cell>
          <table:table-cell office:value-type="float" office:value="2303" table:formula="of:=SUM([.G690]+[.E690])" table:style-name="ce15">
            <text:p>2303</text:p>
          </table:table-cell>
          <table:table-cell office:value-type="float" office:value="-2" table:formula="of:=[.F690]-[.H690]" table:style-name="ce15">
            <text:p>-2</text:p>
          </table:table-cell>
          <table:table-cell office:value-type="percentage" office:value="4.3421623968736434E-3" table:formula="of:=([.I691]-[.I690])/[.I690]" table:style-name="ce16">
            <text:p>0%</text:p>
          </table:table-cell>
          <table:table-cell office:value-type="string" office:string-value="Valid" table:formula="of:=IF([.F690]&lt;=[.E690]; &quot;Valid&quot;; &quot;Invalid&quot;)" table:style-name="ce17">
            <text:p>Valid</text:p>
          </table:table-cell>
          <table:table-cell office:value-type="string" office:string-value="Valid" table:formula="of:=IF([.H690]&lt;=[.G690]; &quot;Valid&quot;; &quot;Invalid&quot;)" table:style-name="ce17">
            <text:p>Valid</text:p>
          </table:table-cell>
          <table:table-cell office:value-type="string" office:string-value="Stable/Reducing" table:formula="of:=IF([.J690]&gt;0; &quot;Increasing Pressure&quot;; &quot;Stable/Reducing&quot;)" table:style-name="ce18">
            <text:p>Stable/Reducing</text:p>
          </table:table-cell>
          <table:table-cell office:value-type="float" office:value="1.3333333333333333" table:formula="of:=IFERROR([.H690]/[.F690]; 0)" table:style-name="ce17">
            <text:p>1.333333333</text:p>
          </table:table-cell>
          <table:table-cell office:value-type="float" office:value="2323.7142857142858" table:formula="of:=AVERAGE([.I690:.I696])" table:style-name="ce15">
            <text:p>2324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11-05T00:00:00" table:style-name="ce14">
            <text:p>05-11-2025</text:p>
          </table:table-cell>
          <table:table-cell office:value-type="string" office:string-value="November" table:formula="of:=TEXT([.A691]; &quot;mmmm&quot;)" table:style-name="ce14">
            <text:p>November</text:p>
          </table:table-cell>
          <table:table-cell office:value-type="string" office:string-value="2025-11" table:formula="of:=TEXT([.A691]; &quot;yyyy-mm&quot;)" table:style-name="ce14">
            <text:p>2025-11</text:p>
          </table:table-cell>
          <table:table-cell office:value-type="float" office:value="8" table:style-name="ce9">
            <text:p>8</text:p>
          </table:table-cell>
          <table:table-cell office:value-type="float" office:value="41" table:style-name="ce9">
            <text:p>41</text:p>
          </table:table-cell>
          <table:table-cell office:value-type="float" office:value="8" table:style-name="ce9">
            <text:p>8</text:p>
          </table:table-cell>
          <table:table-cell office:value-type="float" office:value="2272" table:style-name="ce9">
            <text:p>2272</text:p>
          </table:table-cell>
          <table:table-cell office:value-type="float" office:value="7" table:style-name="ce9">
            <text:p>7</text:p>
          </table:table-cell>
          <table:table-cell office:value-type="float" office:value="2313" table:formula="of:=SUM([.G691]+[.E691])" table:style-name="ce15">
            <text:p>2313</text:p>
          </table:table-cell>
          <table:table-cell office:value-type="float" office:value="1" table:formula="of:=[.F691]-[.H691]" table:style-name="ce15">
            <text:p>1</text:p>
          </table:table-cell>
          <table:table-cell office:value-type="percentage" office:value="-6.9174232598357109E-3" table:formula="of:=([.I692]-[.I691])/[.I691]" table:style-name="ce16">
            <text:p>-1%</text:p>
          </table:table-cell>
          <table:table-cell office:value-type="string" office:string-value="Valid" table:formula="of:=IF([.F691]&lt;=[.E691]; &quot;Valid&quot;; &quot;Invalid&quot;)" table:style-name="ce17">
            <text:p>Valid</text:p>
          </table:table-cell>
          <table:table-cell office:value-type="string" office:string-value="Valid" table:formula="of:=IF([.H691]&lt;=[.G691]; &quot;Valid&quot;; &quot;Invalid&quot;)" table:style-name="ce17">
            <text:p>Valid</text:p>
          </table:table-cell>
          <table:table-cell office:value-type="string" office:string-value="Increasing Pressure" table:formula="of:=IF([.J691]&gt;0; &quot;Increasing Pressure&quot;; &quot;Stable/Reducing&quot;)" table:style-name="ce18">
            <text:p>Increasing Pressure</text:p>
          </table:table-cell>
          <table:table-cell office:value-type="float" office:value="0.875" table:formula="of:=IFERROR([.H691]/[.F691]; 0)" table:style-name="ce17">
            <text:p>0.875</text:p>
          </table:table-cell>
          <table:table-cell office:value-type="float" office:value="2332.1428571428573" table:formula="of:=AVERAGE([.I691:.I697])" table:style-name="ce15">
            <text:p>2332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11-06T00:00:00" table:style-name="ce14">
            <text:p>06-11-2025</text:p>
          </table:table-cell>
          <table:table-cell office:value-type="string" office:string-value="November" table:formula="of:=TEXT([.A692]; &quot;mmmm&quot;)" table:style-name="ce14">
            <text:p>November</text:p>
          </table:table-cell>
          <table:table-cell office:value-type="string" office:string-value="2025-11" table:formula="of:=TEXT([.A692]; &quot;yyyy-mm&quot;)" table:style-name="ce14">
            <text:p>2025-11</text:p>
          </table:table-cell>
          <table:table-cell office:value-type="float" office:value="6" table:style-name="ce9">
            <text:p>6</text:p>
          </table:table-cell>
          <table:table-cell office:value-type="float" office:value="33" table:style-name="ce9">
            <text:p>33</text:p>
          </table:table-cell>
          <table:table-cell office:value-type="float" office:value="9" table:style-name="ce9">
            <text:p>9</text:p>
          </table:table-cell>
          <table:table-cell office:value-type="float" office:value="2264" table:style-name="ce9">
            <text:p>2264</text:p>
          </table:table-cell>
          <table:table-cell office:value-type="float" office:value="19" table:style-name="ce9">
            <text:p>19</text:p>
          </table:table-cell>
          <table:table-cell office:value-type="float" office:value="2297" table:formula="of:=SUM([.G692]+[.E692])" table:style-name="ce15">
            <text:p>2297</text:p>
          </table:table-cell>
          <table:table-cell office:value-type="float" office:value="-10" table:formula="of:=[.F692]-[.H692]" table:style-name="ce15">
            <text:p>-10</text:p>
          </table:table-cell>
          <table:table-cell office:value-type="percentage" office:value="1.3060513713539399E-2" table:formula="of:=([.I693]-[.I692])/[.I692]" table:style-name="ce16">
            <text:p>1%</text:p>
          </table:table-cell>
          <table:table-cell office:value-type="string" office:string-value="Valid" table:formula="of:=IF([.F692]&lt;=[.E692]; &quot;Valid&quot;; &quot;Invalid&quot;)" table:style-name="ce17">
            <text:p>Valid</text:p>
          </table:table-cell>
          <table:table-cell office:value-type="string" office:string-value="Valid" table:formula="of:=IF([.H692]&lt;=[.G692]; &quot;Valid&quot;; &quot;Invalid&quot;)" table:style-name="ce17">
            <text:p>Valid</text:p>
          </table:table-cell>
          <table:table-cell office:value-type="string" office:string-value="Stable/Reducing" table:formula="of:=IF([.J692]&gt;0; &quot;Increasing Pressure&quot;; &quot;Stable/Reducing&quot;)" table:style-name="ce18">
            <text:p>Stable/Reducing</text:p>
          </table:table-cell>
          <table:table-cell office:value-type="float" office:value="2.1111111111111112" table:formula="of:=IFERROR([.H692]/[.F692]; 0)" table:style-name="ce17">
            <text:p>2.111111111</text:p>
          </table:table-cell>
          <table:table-cell office:value-type="float" office:value="2341.4285714285716" table:formula="of:=AVERAGE([.I692:.I698])" table:style-name="ce15">
            <text:p>2341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11-09T00:00:00" table:style-name="ce14">
            <text:p>09-11-2025</text:p>
          </table:table-cell>
          <table:table-cell office:value-type="string" office:string-value="November" table:formula="of:=TEXT([.A693]; &quot;mmmm&quot;)" table:style-name="ce14">
            <text:p>November</text:p>
          </table:table-cell>
          <table:table-cell office:value-type="string" office:string-value="2025-11" table:formula="of:=TEXT([.A693]; &quot;yyyy-mm&quot;)" table:style-name="ce14">
            <text:p>2025-11</text:p>
          </table:table-cell>
          <table:table-cell office:value-type="float" office:value="11" table:style-name="ce9">
            <text:p>11</text:p>
          </table:table-cell>
          <table:table-cell office:value-type="float" office:value="33" table:style-name="ce9">
            <text:p>33</text:p>
          </table:table-cell>
          <table:table-cell office:value-type="float" office:value="5" table:style-name="ce9">
            <text:p>5</text:p>
          </table:table-cell>
          <table:table-cell office:value-type="float" office:value="2294" table:style-name="ce9">
            <text:p>2294</text:p>
          </table:table-cell>
          <table:table-cell office:value-type="float" office:value="4" table:style-name="ce9">
            <text:p>4</text:p>
          </table:table-cell>
          <table:table-cell office:value-type="float" office:value="2327" table:formula="of:=SUM([.G693]+[.E693])" table:style-name="ce15">
            <text:p>2327</text:p>
          </table:table-cell>
          <table:table-cell office:value-type="float" office:value="1" table:formula="of:=[.F693]-[.H693]" table:style-name="ce15">
            <text:p>1</text:p>
          </table:table-cell>
          <table:table-cell office:value-type="percentage" office:value="2.578427159432746E-3" table:formula="of:=([.I694]-[.I693])/[.I693]" table:style-name="ce16">
            <text:p>0%</text:p>
          </table:table-cell>
          <table:table-cell office:value-type="string" office:string-value="Valid" table:formula="of:=IF([.F693]&lt;=[.E693]; &quot;Valid&quot;; &quot;Invalid&quot;)" table:style-name="ce17">
            <text:p>Valid</text:p>
          </table:table-cell>
          <table:table-cell office:value-type="string" office:string-value="Valid" table:formula="of:=IF([.H693]&lt;=[.G693]; &quot;Valid&quot;; &quot;Invalid&quot;)" table:style-name="ce17">
            <text:p>Valid</text:p>
          </table:table-cell>
          <table:table-cell office:value-type="string" office:string-value="Increasing Pressure" table:formula="of:=IF([.J693]&gt;0; &quot;Increasing Pressure&quot;; &quot;Stable/Reducing&quot;)" table:style-name="ce18">
            <text:p>Increasing Pressure</text:p>
          </table:table-cell>
          <table:table-cell office:value-type="float" office:value="0.8" table:formula="of:=IFERROR([.H693]/[.F693]; 0)" table:style-name="ce17">
            <text:p>0.8</text:p>
          </table:table-cell>
          <table:table-cell office:value-type="float" office:value="2353.7142857142858" table:formula="of:=AVERAGE([.I693:.I699])" table:style-name="ce15">
            <text:p>2354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11-11T00:00:00" table:style-name="ce14">
            <text:p>11-11-2025</text:p>
          </table:table-cell>
          <table:table-cell office:value-type="string" office:string-value="November" table:formula="of:=TEXT([.A694]; &quot;mmmm&quot;)" table:style-name="ce14">
            <text:p>November</text:p>
          </table:table-cell>
          <table:table-cell office:value-type="string" office:string-value="2025-11" table:formula="of:=TEXT([.A694]; &quot;yyyy-mm&quot;)" table:style-name="ce14">
            <text:p>2025-11</text:p>
          </table:table-cell>
          <table:table-cell office:value-type="float" office:value="11" table:style-name="ce9">
            <text:p>11</text:p>
          </table:table-cell>
          <table:table-cell office:value-type="float" office:value="39" table:style-name="ce9">
            <text:p>39</text:p>
          </table:table-cell>
          <table:table-cell office:value-type="float" office:value="12" table:style-name="ce9">
            <text:p>12</text:p>
          </table:table-cell>
          <table:table-cell office:value-type="float" office:value="2294" table:style-name="ce9">
            <text:p>2294</text:p>
          </table:table-cell>
          <table:table-cell office:value-type="float" office:value="14" table:style-name="ce9">
            <text:p>14</text:p>
          </table:table-cell>
          <table:table-cell office:value-type="float" office:value="2333" table:formula="of:=SUM([.G694]+[.E694])" table:style-name="ce15">
            <text:p>2333</text:p>
          </table:table-cell>
          <table:table-cell office:value-type="float" office:value="-2" table:formula="of:=[.F694]-[.H694]" table:style-name="ce15">
            <text:p>-2</text:p>
          </table:table-cell>
          <table:table-cell office:value-type="percentage" office:value="7.2867552507501071E-3" table:formula="of:=([.I695]-[.I694])/[.I694]" table:style-name="ce16">
            <text:p>1%</text:p>
          </table:table-cell>
          <table:table-cell office:value-type="string" office:string-value="Valid" table:formula="of:=IF([.F694]&lt;=[.E694]; &quot;Valid&quot;; &quot;Invalid&quot;)" table:style-name="ce17">
            <text:p>Valid</text:p>
          </table:table-cell>
          <table:table-cell office:value-type="string" office:string-value="Valid" table:formula="of:=IF([.H694]&lt;=[.G694]; &quot;Valid&quot;; &quot;Invalid&quot;)" table:style-name="ce17">
            <text:p>Valid</text:p>
          </table:table-cell>
          <table:table-cell office:value-type="string" office:string-value="Stable/Reducing" table:formula="of:=IF([.J694]&gt;0; &quot;Increasing Pressure&quot;; &quot;Stable/Reducing&quot;)" table:style-name="ce18">
            <text:p>Stable/Reducing</text:p>
          </table:table-cell>
          <table:table-cell office:value-type="float" office:value="1.1666666666666667" table:formula="of:=IFERROR([.H694]/[.F694]; 0)" table:style-name="ce17">
            <text:p>1.166666667</text:p>
          </table:table-cell>
          <table:table-cell office:value-type="float" office:value="2360.1428571428573" table:formula="of:=AVERAGE([.I694:.I700])" table:style-name="ce15">
            <text:p>2360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11-12T00:00:00" table:style-name="ce14">
            <text:p>12-11-2025</text:p>
          </table:table-cell>
          <table:table-cell office:value-type="string" office:string-value="November" table:formula="of:=TEXT([.A695]; &quot;mmmm&quot;)" table:style-name="ce14">
            <text:p>November</text:p>
          </table:table-cell>
          <table:table-cell office:value-type="string" office:string-value="2025-11" table:formula="of:=TEXT([.A695]; &quot;yyyy-mm&quot;)" table:style-name="ce14">
            <text:p>2025-11</text:p>
          </table:table-cell>
          <table:table-cell office:value-type="float" office:value="14" table:style-name="ce9">
            <text:p>14</text:p>
          </table:table-cell>
          <table:table-cell office:value-type="float" office:value="48" table:style-name="ce9">
            <text:p>48</text:p>
          </table:table-cell>
          <table:table-cell office:value-type="float" office:value="20" table:style-name="ce9">
            <text:p>20</text:p>
          </table:table-cell>
          <table:table-cell office:value-type="float" office:value="2302" table:style-name="ce9">
            <text:p>2302</text:p>
          </table:table-cell>
          <table:table-cell office:value-type="float" office:value="7" table:style-name="ce9">
            <text:p>7</text:p>
          </table:table-cell>
          <table:table-cell office:value-type="float" office:value="2350" table:formula="of:=SUM([.G695]+[.E695])" table:style-name="ce15">
            <text:p>2350</text:p>
          </table:table-cell>
          <table:table-cell office:value-type="float" office:value="13" table:formula="of:=[.F695]-[.H695]" table:style-name="ce15">
            <text:p>13</text:p>
          </table:table-cell>
          <table:table-cell office:value-type="percentage" office:value="-2.9787234042553193E-3" table:formula="of:=([.I696]-[.I695])/[.I695]" table:style-name="ce16">
            <text:p>0%</text:p>
          </table:table-cell>
          <table:table-cell office:value-type="string" office:string-value="Valid" table:formula="of:=IF([.F695]&lt;=[.E695]; &quot;Valid&quot;; &quot;Invalid&quot;)" table:style-name="ce17">
            <text:p>Valid</text:p>
          </table:table-cell>
          <table:table-cell office:value-type="string" office:string-value="Valid" table:formula="of:=IF([.H695]&lt;=[.G695]; &quot;Valid&quot;; &quot;Invalid&quot;)" table:style-name="ce17">
            <text:p>Valid</text:p>
          </table:table-cell>
          <table:table-cell office:value-type="string" office:string-value="Increasing Pressure" table:formula="of:=IF([.J695]&gt;0; &quot;Increasing Pressure&quot;; &quot;Stable/Reducing&quot;)" table:style-name="ce18">
            <text:p>Increasing Pressure</text:p>
          </table:table-cell>
          <table:table-cell office:value-type="float" office:value="0.35" table:formula="of:=IFERROR([.H695]/[.F695]; 0)" table:style-name="ce17">
            <text:p>0.35</text:p>
          </table:table-cell>
          <table:table-cell office:value-type="float" office:value="2369.2857142857142" table:formula="of:=AVERAGE([.I695:.I701])" table:style-name="ce15">
            <text:p>2369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11-13T00:00:00" table:style-name="ce14">
            <text:p>13-11-2025</text:p>
          </table:table-cell>
          <table:table-cell office:value-type="string" office:string-value="November" table:formula="of:=TEXT([.A696]; &quot;mmmm&quot;)" table:style-name="ce14">
            <text:p>November</text:p>
          </table:table-cell>
          <table:table-cell office:value-type="string" office:string-value="2025-11" table:formula="of:=TEXT([.A696]; &quot;yyyy-mm&quot;)" table:style-name="ce14">
            <text:p>2025-11</text:p>
          </table:table-cell>
          <table:table-cell office:value-type="float" office:value="6" table:style-name="ce9">
            <text:p>6</text:p>
          </table:table-cell>
          <table:table-cell office:value-type="float" office:value="26" table:style-name="ce9">
            <text:p>26</text:p>
          </table:table-cell>
          <table:table-cell office:value-type="float" office:value="16" table:style-name="ce9">
            <text:p>16</text:p>
          </table:table-cell>
          <table:table-cell office:value-type="float" office:value="2317" table:style-name="ce9">
            <text:p>2317</text:p>
          </table:table-cell>
          <table:table-cell office:value-type="float" office:value="5" table:style-name="ce9">
            <text:p>5</text:p>
          </table:table-cell>
          <table:table-cell office:value-type="float" office:value="2343" table:formula="of:=SUM([.G696]+[.E696])" table:style-name="ce15">
            <text:p>2343</text:p>
          </table:table-cell>
          <table:table-cell office:value-type="float" office:value="11" table:formula="of:=[.F696]-[.H696]" table:style-name="ce15">
            <text:p>11</text:p>
          </table:table-cell>
          <table:table-cell office:value-type="percentage" office:value="8.1092616303883903E-3" table:formula="of:=([.I697]-[.I696])/[.I696]" table:style-name="ce16">
            <text:p>1%</text:p>
          </table:table-cell>
          <table:table-cell office:value-type="string" office:string-value="Valid" table:formula="of:=IF([.F696]&lt;=[.E696]; &quot;Valid&quot;; &quot;Invalid&quot;)" table:style-name="ce17">
            <text:p>Valid</text:p>
          </table:table-cell>
          <table:table-cell office:value-type="string" office:string-value="Valid" table:formula="of:=IF([.H696]&lt;=[.G696]; &quot;Valid&quot;; &quot;Invalid&quot;)" table:style-name="ce17">
            <text:p>Valid</text:p>
          </table:table-cell>
          <table:table-cell office:value-type="string" office:string-value="Increasing Pressure" table:formula="of:=IF([.J696]&gt;0; &quot;Increasing Pressure&quot;; &quot;Stable/Reducing&quot;)" table:style-name="ce18">
            <text:p>Increasing Pressure</text:p>
          </table:table-cell>
          <table:table-cell office:value-type="float" office:value="0.3125" table:formula="of:=IFERROR([.H696]/[.F696]; 0)" table:style-name="ce17">
            <text:p>0.3125</text:p>
          </table:table-cell>
          <table:table-cell office:value-type="float" office:value="2379.4285714285716" table:formula="of:=AVERAGE([.I696:.I702])" table:style-name="ce15">
            <text:p>2379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11-16T00:00:00" table:style-name="ce14">
            <text:p>16-11-2025</text:p>
          </table:table-cell>
          <table:table-cell office:value-type="string" office:string-value="November" table:formula="of:=TEXT([.A697]; &quot;mmmm&quot;)" table:style-name="ce14">
            <text:p>November</text:p>
          </table:table-cell>
          <table:table-cell office:value-type="string" office:string-value="2025-11" table:formula="of:=TEXT([.A697]; &quot;yyyy-mm&quot;)" table:style-name="ce14">
            <text:p>2025-11</text:p>
          </table:table-cell>
          <table:table-cell office:value-type="float" office:value="5" table:style-name="ce9">
            <text:p>5</text:p>
          </table:table-cell>
          <table:table-cell office:value-type="float" office:value="22" table:style-name="ce9">
            <text:p>22</text:p>
          </table:table-cell>
          <table:table-cell office:value-type="float" office:value="3" table:style-name="ce9">
            <text:p>3</text:p>
          </table:table-cell>
          <table:table-cell office:value-type="float" office:value="2340" table:style-name="ce9">
            <text:p>2340</text:p>
          </table:table-cell>
          <table:table-cell office:value-type="float" office:value="5" table:style-name="ce9">
            <text:p>5</text:p>
          </table:table-cell>
          <table:table-cell office:value-type="float" office:value="2362" table:formula="of:=SUM([.G697]+[.E697])" table:style-name="ce15">
            <text:p>2362</text:p>
          </table:table-cell>
          <table:table-cell office:value-type="float" office:value="-2" table:formula="of:=[.F697]-[.H697]" table:style-name="ce15">
            <text:p>-2</text:p>
          </table:table-cell>
          <table:table-cell office:value-type="percentage" office:value="6.7739204064352241E-3" table:formula="of:=([.I698]-[.I697])/[.I697]" table:style-name="ce16">
            <text:p>1%</text:p>
          </table:table-cell>
          <table:table-cell office:value-type="string" office:string-value="Valid" table:formula="of:=IF([.F697]&lt;=[.E697]; &quot;Valid&quot;; &quot;Invalid&quot;)" table:style-name="ce17">
            <text:p>Valid</text:p>
          </table:table-cell>
          <table:table-cell office:value-type="string" office:string-value="Valid" table:formula="of:=IF([.H697]&lt;=[.G697]; &quot;Valid&quot;; &quot;Invalid&quot;)" table:style-name="ce17">
            <text:p>Valid</text:p>
          </table:table-cell>
          <table:table-cell office:value-type="string" office:string-value="Stable/Reducing" table:formula="of:=IF([.J697]&gt;0; &quot;Increasing Pressure&quot;; &quot;Stable/Reducing&quot;)" table:style-name="ce18">
            <text:p>Stable/Reducing</text:p>
          </table:table-cell>
          <table:table-cell office:value-type="float" office:value="1.6666666666666667" table:formula="of:=IFERROR([.H697]/[.F697]; 0)" table:style-name="ce17">
            <text:p>1.666666667</text:p>
          </table:table-cell>
          <table:table-cell office:value-type="float" office:value="2389.1428571428573" table:formula="of:=AVERAGE([.I697:.I703])" table:style-name="ce15">
            <text:p>2389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11-17T00:00:00" table:style-name="ce14">
            <text:p>17-11-2025</text:p>
          </table:table-cell>
          <table:table-cell office:value-type="string" office:string-value="November" table:formula="of:=TEXT([.A698]; &quot;mmmm&quot;)" table:style-name="ce14">
            <text:p>November</text:p>
          </table:table-cell>
          <table:table-cell office:value-type="string" office:string-value="2025-11" table:formula="of:=TEXT([.A698]; &quot;yyyy-mm&quot;)" table:style-name="ce14">
            <text:p>2025-11</text:p>
          </table:table-cell>
          <table:table-cell office:value-type="float" office:value="1" table:style-name="ce9">
            <text:p>1</text:p>
          </table:table-cell>
          <table:table-cell office:value-type="float" office:value="35" table:style-name="ce9">
            <text:p>35</text:p>
          </table:table-cell>
          <table:table-cell office:value-type="float" office:value="6" table:style-name="ce9">
            <text:p>6</text:p>
          </table:table-cell>
          <table:table-cell office:value-type="float" office:value="2343" table:style-name="ce9">
            <text:p>2343</text:p>
          </table:table-cell>
          <table:table-cell office:value-type="float" office:value="8" table:style-name="ce9">
            <text:p>8</text:p>
          </table:table-cell>
          <table:table-cell office:value-type="float" office:value="2378" table:formula="of:=SUM([.G698]+[.E698])" table:style-name="ce15">
            <text:p>2378</text:p>
          </table:table-cell>
          <table:table-cell office:value-type="float" office:value="-2" table:formula="of:=[.F698]-[.H698]" table:style-name="ce15">
            <text:p>-2</text:p>
          </table:table-cell>
          <table:table-cell office:value-type="percentage" office:value="2.1026072329688814E-3" table:formula="of:=([.I699]-[.I698])/[.I698]" table:style-name="ce16">
            <text:p>0%</text:p>
          </table:table-cell>
          <table:table-cell office:value-type="string" office:string-value="Valid" table:formula="of:=IF([.F698]&lt;=[.E698]; &quot;Valid&quot;; &quot;Invalid&quot;)" table:style-name="ce17">
            <text:p>Valid</text:p>
          </table:table-cell>
          <table:table-cell office:value-type="string" office:string-value="Valid" table:formula="of:=IF([.H698]&lt;=[.G698]; &quot;Valid&quot;; &quot;Invalid&quot;)" table:style-name="ce17">
            <text:p>Valid</text:p>
          </table:table-cell>
          <table:table-cell office:value-type="string" office:string-value="Stable/Reducing" table:formula="of:=IF([.J698]&gt;0; &quot;Increasing Pressure&quot;; &quot;Stable/Reducing&quot;)" table:style-name="ce18">
            <text:p>Stable/Reducing</text:p>
          </table:table-cell>
          <table:table-cell office:value-type="float" office:value="1.3333333333333333" table:formula="of:=IFERROR([.H698]/[.F698]; 0)" table:style-name="ce17">
            <text:p>1.333333333</text:p>
          </table:table-cell>
          <table:table-cell office:value-type="float" office:value="2397.7142857142858" table:formula="of:=AVERAGE([.I698:.I704])" table:style-name="ce15">
            <text:p>2398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11-18T00:00:00" table:style-name="ce14">
            <text:p>18-11-2025</text:p>
          </table:table-cell>
          <table:table-cell office:value-type="string" office:string-value="November" table:formula="of:=TEXT([.A699]; &quot;mmmm&quot;)" table:style-name="ce14">
            <text:p>November</text:p>
          </table:table-cell>
          <table:table-cell office:value-type="string" office:string-value="2025-11" table:formula="of:=TEXT([.A699]; &quot;yyyy-mm&quot;)" table:style-name="ce14">
            <text:p>2025-11</text:p>
          </table:table-cell>
          <table:table-cell office:value-type="float" office:value="2" table:style-name="ce9">
            <text:p>2</text:p>
          </table:table-cell>
          <table:table-cell office:value-type="float" office:value="38" table:style-name="ce9">
            <text:p>38</text:p>
          </table:table-cell>
          <table:table-cell office:value-type="float" office:value="8" table:style-name="ce9">
            <text:p>8</text:p>
          </table:table-cell>
          <table:table-cell office:value-type="float" office:value="2345" table:style-name="ce9">
            <text:p>2345</text:p>
          </table:table-cell>
          <table:table-cell office:value-type="float" office:value="12" table:style-name="ce9">
            <text:p>12</text:p>
          </table:table-cell>
          <table:table-cell office:value-type="float" office:value="2383" table:formula="of:=SUM([.G699]+[.E699])" table:style-name="ce15">
            <text:p>2383</text:p>
          </table:table-cell>
          <table:table-cell office:value-type="float" office:value="-4" table:formula="of:=[.F699]-[.H699]" table:style-name="ce15">
            <text:p>-4</text:p>
          </table:table-cell>
          <table:table-cell office:value-type="percentage" office:value="-4.6160302140159466E-3" table:formula="of:=([.I700]-[.I699])/[.I699]" table:style-name="ce16">
            <text:p>0%</text:p>
          </table:table-cell>
          <table:table-cell office:value-type="string" office:string-value="Valid" table:formula="of:=IF([.F699]&lt;=[.E699]; &quot;Valid&quot;; &quot;Invalid&quot;)" table:style-name="ce17">
            <text:p>Valid</text:p>
          </table:table-cell>
          <table:table-cell office:value-type="string" office:string-value="Valid" table:formula="of:=IF([.H699]&lt;=[.G699]; &quot;Valid&quot;; &quot;Invalid&quot;)" table:style-name="ce17">
            <text:p>Valid</text:p>
          </table:table-cell>
          <table:table-cell office:value-type="string" office:string-value="Stable/Reducing" table:formula="of:=IF([.J699]&gt;0; &quot;Increasing Pressure&quot;; &quot;Stable/Reducing&quot;)" table:style-name="ce18">
            <text:p>Stable/Reducing</text:p>
          </table:table-cell>
          <table:table-cell office:value-type="float" office:value="1.5" table:formula="of:=IFERROR([.H699]/[.F699]; 0)" table:style-name="ce17">
            <text:p>1.5</text:p>
          </table:table-cell>
          <table:table-cell office:value-type="float" office:value="2402.7142857142858" table:formula="of:=AVERAGE([.I699:.I705])" table:style-name="ce15">
            <text:p>2403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11-19T00:00:00" table:style-name="ce14">
            <text:p>19-11-2025</text:p>
          </table:table-cell>
          <table:table-cell office:value-type="string" office:string-value="November" table:formula="of:=TEXT([.A700]; &quot;mmmm&quot;)" table:style-name="ce14">
            <text:p>November</text:p>
          </table:table-cell>
          <table:table-cell office:value-type="string" office:string-value="2025-11" table:formula="of:=TEXT([.A700]; &quot;yyyy-mm&quot;)" table:style-name="ce14">
            <text:p>2025-11</text:p>
          </table:table-cell>
          <table:table-cell office:value-type="float" office:value="7" table:style-name="ce9">
            <text:p>7</text:p>
          </table:table-cell>
          <table:table-cell office:value-type="float" office:value="32" table:style-name="ce9">
            <text:p>32</text:p>
          </table:table-cell>
          <table:table-cell office:value-type="float" office:value="3" table:style-name="ce9">
            <text:p>3</text:p>
          </table:table-cell>
          <table:table-cell office:value-type="float" office:value="2340" table:style-name="ce9">
            <text:p>2340</text:p>
          </table:table-cell>
          <table:table-cell office:value-type="float" office:value="10" table:style-name="ce9">
            <text:p>10</text:p>
          </table:table-cell>
          <table:table-cell office:value-type="float" office:value="2372" table:formula="of:=SUM([.G700]+[.E700])" table:style-name="ce15">
            <text:p>2372</text:p>
          </table:table-cell>
          <table:table-cell office:value-type="float" office:value="-7" table:formula="of:=[.F700]-[.H700]" table:style-name="ce15">
            <text:p>-7</text:p>
          </table:table-cell>
          <table:table-cell office:value-type="percentage" office:value="1.0539629005059023E-2" table:formula="of:=([.I701]-[.I700])/[.I700]" table:style-name="ce16">
            <text:p>1%</text:p>
          </table:table-cell>
          <table:table-cell office:value-type="string" office:string-value="Valid" table:formula="of:=IF([.F700]&lt;=[.E700]; &quot;Valid&quot;; &quot;Invalid&quot;)" table:style-name="ce17">
            <text:p>Valid</text:p>
          </table:table-cell>
          <table:table-cell office:value-type="string" office:string-value="Valid" table:formula="of:=IF([.H700]&lt;=[.G700]; &quot;Valid&quot;; &quot;Invalid&quot;)" table:style-name="ce17">
            <text:p>Valid</text:p>
          </table:table-cell>
          <table:table-cell office:value-type="string" office:string-value="Stable/Reducing" table:formula="of:=IF([.J700]&gt;0; &quot;Increasing Pressure&quot;; &quot;Stable/Reducing&quot;)" table:style-name="ce18">
            <text:p>Stable/Reducing</text:p>
          </table:table-cell>
          <table:table-cell office:value-type="float" office:value="3.3333333333333335" table:formula="of:=IFERROR([.H700]/[.F700]; 0)" table:style-name="ce17">
            <text:p>3.333333333</text:p>
          </table:table-cell>
          <table:table-cell office:value-type="float" office:value="2409.8571428571427" table:formula="of:=AVERAGE([.I700:.I706])" table:style-name="ce15">
            <text:p>2410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11-20T00:00:00" table:style-name="ce14">
            <text:p>20-11-2025</text:p>
          </table:table-cell>
          <table:table-cell office:value-type="string" office:string-value="November" table:formula="of:=TEXT([.A701]; &quot;mmmm&quot;)" table:style-name="ce14">
            <text:p>November</text:p>
          </table:table-cell>
          <table:table-cell office:value-type="string" office:string-value="2025-11" table:formula="of:=TEXT([.A701]; &quot;yyyy-mm&quot;)" table:style-name="ce14">
            <text:p>2025-11</text:p>
          </table:table-cell>
          <table:table-cell office:value-type="float" office:value="18" table:style-name="ce9">
            <text:p>18</text:p>
          </table:table-cell>
          <table:table-cell office:value-type="float" office:value="57" table:style-name="ce9">
            <text:p>57</text:p>
          </table:table-cell>
          <table:table-cell office:value-type="float" office:value="8" table:style-name="ce9">
            <text:p>8</text:p>
          </table:table-cell>
          <table:table-cell office:value-type="float" office:value="2340" table:style-name="ce9">
            <text:p>2340</text:p>
          </table:table-cell>
          <table:table-cell office:value-type="float" office:value="9" table:style-name="ce9">
            <text:p>9</text:p>
          </table:table-cell>
          <table:table-cell office:value-type="float" office:value="2397" table:formula="of:=SUM([.G701]+[.E701])" table:style-name="ce15">
            <text:p>2397</text:p>
          </table:table-cell>
          <table:table-cell office:value-type="float" office:value="-1" table:formula="of:=[.F701]-[.H701]" table:style-name="ce15">
            <text:p>-1</text:p>
          </table:table-cell>
          <table:table-cell office:value-type="percentage" office:value="1.0012515644555695E-2" table:formula="of:=([.I702]-[.I701])/[.I701]" table:style-name="ce16">
            <text:p>1%</text:p>
          </table:table-cell>
          <table:table-cell office:value-type="string" office:string-value="Valid" table:formula="of:=IF([.F701]&lt;=[.E701]; &quot;Valid&quot;; &quot;Invalid&quot;)" table:style-name="ce17">
            <text:p>Valid</text:p>
          </table:table-cell>
          <table:table-cell office:value-type="string" office:string-value="Valid" table:formula="of:=IF([.H701]&lt;=[.G701]; &quot;Valid&quot;; &quot;Invalid&quot;)" table:style-name="ce17">
            <text:p>Valid</text:p>
          </table:table-cell>
          <table:table-cell office:value-type="string" office:string-value="Stable/Reducing" table:formula="of:=IF([.J701]&gt;0; &quot;Increasing Pressure&quot;; &quot;Stable/Reducing&quot;)" table:style-name="ce18">
            <text:p>Stable/Reducing</text:p>
          </table:table-cell>
          <table:table-cell office:value-type="float" office:value="1.125" table:formula="of:=IFERROR([.H701]/[.F701]; 0)" table:style-name="ce17">
            <text:p>1.125</text:p>
          </table:table-cell>
          <table:table-cell office:value-type="float" office:value="2419" table:formula="of:=AVERAGE([.I701:.I707])" table:style-name="ce15">
            <text:p>2419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11-23T00:00:00" table:style-name="ce14">
            <text:p>23-11-2025</text:p>
          </table:table-cell>
          <table:table-cell office:value-type="string" office:string-value="November" table:formula="of:=TEXT([.A702]; &quot;mmmm&quot;)" table:style-name="ce14">
            <text:p>November</text:p>
          </table:table-cell>
          <table:table-cell office:value-type="string" office:string-value="2025-11" table:formula="of:=TEXT([.A702]; &quot;yyyy-mm&quot;)" table:style-name="ce14">
            <text:p>2025-11</text:p>
          </table:table-cell>
          <table:table-cell office:value-type="float" office:value="3" table:style-name="ce9">
            <text:p>3</text:p>
          </table:table-cell>
          <table:table-cell office:value-type="float" office:value="46" table:style-name="ce9">
            <text:p>46</text:p>
          </table:table-cell>
          <table:table-cell office:value-type="float" office:value="22" table:style-name="ce9">
            <text:p>22</text:p>
          </table:table-cell>
          <table:table-cell office:value-type="float" office:value="2375" table:style-name="ce9">
            <text:p>2375</text:p>
          </table:table-cell>
          <table:table-cell office:value-type="float" office:value="1" table:style-name="ce9">
            <text:p>1</text:p>
          </table:table-cell>
          <table:table-cell office:value-type="float" office:value="2421" table:formula="of:=SUM([.G702]+[.E702])" table:style-name="ce15">
            <text:p>2421</text:p>
          </table:table-cell>
          <table:table-cell office:value-type="float" office:value="21" table:formula="of:=[.F702]-[.H702]" table:style-name="ce15">
            <text:p>21</text:p>
          </table:table-cell>
          <table:table-cell office:value-type="percentage" office:value="-4.1305245766212308E-3" table:formula="of:=([.I703]-[.I702])/[.I702]" table:style-name="ce16">
            <text:p>0%</text:p>
          </table:table-cell>
          <table:table-cell office:value-type="string" office:string-value="Valid" table:formula="of:=IF([.F702]&lt;=[.E702]; &quot;Valid&quot;; &quot;Invalid&quot;)" table:style-name="ce17">
            <text:p>Valid</text:p>
          </table:table-cell>
          <table:table-cell office:value-type="string" office:string-value="Valid" table:formula="of:=IF([.H702]&lt;=[.G702]; &quot;Valid&quot;; &quot;Invalid&quot;)" table:style-name="ce17">
            <text:p>Valid</text:p>
          </table:table-cell>
          <table:table-cell office:value-type="string" office:string-value="Increasing Pressure" table:formula="of:=IF([.J702]&gt;0; &quot;Increasing Pressure&quot;; &quot;Stable/Reducing&quot;)" table:style-name="ce18">
            <text:p>Increasing Pressure</text:p>
          </table:table-cell>
          <table:table-cell office:value-type="float" office:value="4.5454545454545456E-2" table:formula="of:=IFERROR([.H702]/[.F702]; 0)" table:style-name="ce17">
            <text:p>0.045454545</text:p>
          </table:table-cell>
          <table:table-cell office:value-type="float" office:value="2425.2857142857142" table:formula="of:=AVERAGE([.I702:.I708])" table:style-name="ce15">
            <text:p>2425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11-24T00:00:00" table:style-name="ce14">
            <text:p>24-11-2025</text:p>
          </table:table-cell>
          <table:table-cell office:value-type="string" office:string-value="November" table:formula="of:=TEXT([.A703]; &quot;mmmm&quot;)" table:style-name="ce14">
            <text:p>November</text:p>
          </table:table-cell>
          <table:table-cell office:value-type="string" office:string-value="2025-11" table:formula="of:=TEXT([.A703]; &quot;yyyy-mm&quot;)" table:style-name="ce14">
            <text:p>2025-11</text:p>
          </table:table-cell>
          <table:table-cell office:value-type="float" office:value="9" table:style-name="ce9">
            <text:p>9</text:p>
          </table:table-cell>
          <table:table-cell office:value-type="float" office:value="40" table:style-name="ce9">
            <text:p>40</text:p>
          </table:table-cell>
          <table:table-cell office:value-type="float" office:value="9" table:style-name="ce9">
            <text:p>9</text:p>
          </table:table-cell>
          <table:table-cell office:value-type="float" office:value="2371" table:style-name="ce9">
            <text:p>2371</text:p>
          </table:table-cell>
          <table:table-cell office:value-type="float" office:value="13" table:style-name="ce9">
            <text:p>13</text:p>
          </table:table-cell>
          <table:table-cell office:value-type="float" office:value="2411" table:formula="of:=SUM([.G703]+[.E703])" table:style-name="ce15">
            <text:p>2411</text:p>
          </table:table-cell>
          <table:table-cell office:value-type="float" office:value="-4" table:formula="of:=[.F703]-[.H703]" table:style-name="ce15">
            <text:p>-4</text:p>
          </table:table-cell>
          <table:table-cell office:value-type="percentage" office:value="4.5624222314392367E-3" table:formula="of:=([.I704]-[.I703])/[.I703]" table:style-name="ce16">
            <text:p>0%</text:p>
          </table:table-cell>
          <table:table-cell office:value-type="string" office:string-value="Valid" table:formula="of:=IF([.F703]&lt;=[.E703]; &quot;Valid&quot;; &quot;Invalid&quot;)" table:style-name="ce17">
            <text:p>Valid</text:p>
          </table:table-cell>
          <table:table-cell office:value-type="string" office:string-value="Valid" table:formula="of:=IF([.H703]&lt;=[.G703]; &quot;Valid&quot;; &quot;Invalid&quot;)" table:style-name="ce17">
            <text:p>Valid</text:p>
          </table:table-cell>
          <table:table-cell office:value-type="string" office:string-value="Stable/Reducing" table:formula="of:=IF([.J703]&gt;0; &quot;Increasing Pressure&quot;; &quot;Stable/Reducing&quot;)" table:style-name="ce18">
            <text:p>Stable/Reducing</text:p>
          </table:table-cell>
          <table:table-cell office:value-type="float" office:value="1.4444444444444444" table:formula="of:=IFERROR([.H703]/[.F703]; 0)" table:style-name="ce17">
            <text:p>1.444444444</text:p>
          </table:table-cell>
          <table:table-cell office:value-type="float" office:value="2429.5714285714284" table:formula="of:=AVERAGE([.I703:.I709])" table:style-name="ce15">
            <text:p>2430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11-25T00:00:00" table:style-name="ce14">
            <text:p>25-11-2025</text:p>
          </table:table-cell>
          <table:table-cell office:value-type="string" office:string-value="November" table:formula="of:=TEXT([.A704]; &quot;mmmm&quot;)" table:style-name="ce14">
            <text:p>November</text:p>
          </table:table-cell>
          <table:table-cell office:value-type="string" office:string-value="2025-11" table:formula="of:=TEXT([.A704]; &quot;yyyy-mm&quot;)" table:style-name="ce14">
            <text:p>2025-11</text:p>
          </table:table-cell>
          <table:table-cell office:value-type="float" office:value="6" table:style-name="ce9">
            <text:p>6</text:p>
          </table:table-cell>
          <table:table-cell office:value-type="float" office:value="47" table:style-name="ce9">
            <text:p>47</text:p>
          </table:table-cell>
          <table:table-cell office:value-type="float" office:value="14" table:style-name="ce9">
            <text:p>14</text:p>
          </table:table-cell>
          <table:table-cell office:value-type="float" office:value="2375" table:style-name="ce9">
            <text:p>2375</text:p>
          </table:table-cell>
          <table:table-cell office:value-type="float" office:value="11" table:style-name="ce9">
            <text:p>11</text:p>
          </table:table-cell>
          <table:table-cell office:value-type="float" office:value="2422" table:formula="of:=SUM([.G704]+[.E704])" table:style-name="ce15">
            <text:p>2422</text:p>
          </table:table-cell>
          <table:table-cell office:value-type="float" office:value="3" table:formula="of:=[.F704]-[.H704]" table:style-name="ce15">
            <text:p>3</text:p>
          </table:table-cell>
          <table:table-cell office:value-type="percentage" office:value="-3.7159372419488025E-3" table:formula="of:=([.I705]-[.I704])/[.I704]" table:style-name="ce16">
            <text:p>0%</text:p>
          </table:table-cell>
          <table:table-cell office:value-type="string" office:string-value="Valid" table:formula="of:=IF([.F704]&lt;=[.E704]; &quot;Valid&quot;; &quot;Invalid&quot;)" table:style-name="ce17">
            <text:p>Valid</text:p>
          </table:table-cell>
          <table:table-cell office:value-type="string" office:string-value="Valid" table:formula="of:=IF([.H704]&lt;=[.G704]; &quot;Valid&quot;; &quot;Invalid&quot;)" table:style-name="ce17">
            <text:p>Valid</text:p>
          </table:table-cell>
          <table:table-cell office:value-type="string" office:string-value="Increasing Pressure" table:formula="of:=IF([.J704]&gt;0; &quot;Increasing Pressure&quot;; &quot;Stable/Reducing&quot;)" table:style-name="ce18">
            <text:p>Increasing Pressure</text:p>
          </table:table-cell>
          <table:table-cell office:value-type="float" office:value="0.7857142857142857" table:formula="of:=IFERROR([.H704]/[.F704]; 0)" table:style-name="ce17">
            <text:p>0.785714286</text:p>
          </table:table-cell>
          <table:table-cell office:value-type="float" office:value="2436.1428571428573" table:formula="of:=AVERAGE([.I704:.I710])" table:style-name="ce15">
            <text:p>2436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11-27T00:00:00" table:style-name="ce14">
            <text:p>27-11-2025</text:p>
          </table:table-cell>
          <table:table-cell office:value-type="string" office:string-value="November" table:formula="of:=TEXT([.A705]; &quot;mmmm&quot;)" table:style-name="ce14">
            <text:p>November</text:p>
          </table:table-cell>
          <table:table-cell office:value-type="string" office:string-value="2025-11" table:formula="of:=TEXT([.A705]; &quot;yyyy-mm&quot;)" table:style-name="ce14">
            <text:p>2025-11</text:p>
          </table:table-cell>
          <table:table-cell office:value-type="float" office:value="4" table:style-name="ce9">
            <text:p>4</text:p>
          </table:table-cell>
          <table:table-cell office:value-type="float" office:value="24" table:style-name="ce9">
            <text:p>24</text:p>
          </table:table-cell>
          <table:table-cell office:value-type="float" office:value="8" table:style-name="ce9">
            <text:p>8</text:p>
          </table:table-cell>
          <table:table-cell office:value-type="float" office:value="2389" table:style-name="ce9">
            <text:p>2389</text:p>
          </table:table-cell>
          <table:table-cell office:value-type="float" office:value="7" table:style-name="ce9">
            <text:p>7</text:p>
          </table:table-cell>
          <table:table-cell office:value-type="float" office:value="2413" table:formula="of:=SUM([.G705]+[.E705])" table:style-name="ce15">
            <text:p>2413</text:p>
          </table:table-cell>
          <table:table-cell office:value-type="float" office:value="1" table:formula="of:=[.F705]-[.H705]" table:style-name="ce15">
            <text:p>1</text:p>
          </table:table-cell>
          <table:table-cell office:value-type="percentage" office:value="8.2884376295068382E-3" table:formula="of:=([.I706]-[.I705])/[.I705]" table:style-name="ce16">
            <text:p>1%</text:p>
          </table:table-cell>
          <table:table-cell office:value-type="string" office:string-value="Valid" table:formula="of:=IF([.F705]&lt;=[.E705]; &quot;Valid&quot;; &quot;Invalid&quot;)" table:style-name="ce17">
            <text:p>Valid</text:p>
          </table:table-cell>
          <table:table-cell office:value-type="string" office:string-value="Valid" table:formula="of:=IF([.H705]&lt;=[.G705]; &quot;Valid&quot;; &quot;Invalid&quot;)" table:style-name="ce17">
            <text:p>Valid</text:p>
          </table:table-cell>
          <table:table-cell office:value-type="string" office:string-value="Increasing Pressure" table:formula="of:=IF([.J705]&gt;0; &quot;Increasing Pressure&quot;; &quot;Stable/Reducing&quot;)" table:style-name="ce18">
            <text:p>Increasing Pressure</text:p>
          </table:table-cell>
          <table:table-cell office:value-type="float" office:value="0.875" table:formula="of:=IFERROR([.H705]/[.F705]; 0)" table:style-name="ce17">
            <text:p>0.875</text:p>
          </table:table-cell>
          <table:table-cell office:value-type="float" office:value="2440.5714285714284" table:formula="of:=AVERAGE([.I705:.I711])" table:style-name="ce15">
            <text:p>2441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11-30T00:00:00" table:style-name="ce14">
            <text:p>30-11-2025</text:p>
          </table:table-cell>
          <table:table-cell office:value-type="string" office:string-value="November" table:formula="of:=TEXT([.A706]; &quot;mmmm&quot;)" table:style-name="ce14">
            <text:p>November</text:p>
          </table:table-cell>
          <table:table-cell office:value-type="string" office:string-value="2025-11" table:formula="of:=TEXT([.A706]; &quot;yyyy-mm&quot;)" table:style-name="ce14">
            <text:p>2025-11</text:p>
          </table:table-cell>
          <table:table-cell office:value-type="float" office:value="4" table:style-name="ce9">
            <text:p>4</text:p>
          </table:table-cell>
          <table:table-cell office:value-type="float" office:value="18" table:style-name="ce9">
            <text:p>18</text:p>
          </table:table-cell>
          <table:table-cell office:value-type="float" office:value="10" table:style-name="ce9">
            <text:p>10</text:p>
          </table:table-cell>
          <table:table-cell office:value-type="float" office:value="2415" table:style-name="ce9">
            <text:p>2415</text:p>
          </table:table-cell>
          <table:table-cell office:value-type="float" office:value="0" table:style-name="ce9">
            <text:p>0</text:p>
          </table:table-cell>
          <table:table-cell office:value-type="float" office:value="2433" table:formula="of:=SUM([.G706]+[.E706])" table:style-name="ce15">
            <text:p>2433</text:p>
          </table:table-cell>
          <table:table-cell office:value-type="float" office:value="10" table:formula="of:=[.F706]-[.H706]" table:style-name="ce15">
            <text:p>10</text:p>
          </table:table-cell>
          <table:table-cell office:value-type="percentage" office:value="1.2330456226880395E-3" table:formula="of:=([.I707]-[.I706])/[.I706]" table:style-name="ce16">
            <text:p>0%</text:p>
          </table:table-cell>
          <table:table-cell office:value-type="string" office:string-value="Valid" table:formula="of:=IF([.F706]&lt;=[.E706]; &quot;Valid&quot;; &quot;Invalid&quot;)" table:style-name="ce17">
            <text:p>Valid</text:p>
          </table:table-cell>
          <table:table-cell office:value-type="string" office:string-value="Valid" table:formula="of:=IF([.H706]&lt;=[.G706]; &quot;Valid&quot;; &quot;Invalid&quot;)" table:style-name="ce17">
            <text:p>Valid</text:p>
          </table:table-cell>
          <table:table-cell office:value-type="string" office:string-value="Increasing Pressure" table:formula="of:=IF([.J706]&gt;0; &quot;Increasing Pressure&quot;; &quot;Stable/Reducing&quot;)" table:style-name="ce18">
            <text:p>Increasing Pressure</text:p>
          </table:table-cell>
          <table:table-cell office:value-type="float" office:value="0" table:formula="of:=IFERROR([.H706]/[.F706]; 0)" table:style-name="ce17">
            <text:p>0</text:p>
          </table:table-cell>
          <table:table-cell office:value-type="float" office:value="2448.2857142857142" table:formula="of:=AVERAGE([.I706:.I712])" table:style-name="ce15">
            <text:p>2448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12-01T00:00:00" table:style-name="ce14">
            <text:p>01-12-2025</text:p>
          </table:table-cell>
          <table:table-cell office:value-type="string" office:string-value="December" table:formula="of:=TEXT([.A707]; &quot;mmmm&quot;)" table:style-name="ce14">
            <text:p>December</text:p>
          </table:table-cell>
          <table:table-cell office:value-type="string" office:string-value="2025-12" table:formula="of:=TEXT([.A707]; &quot;yyyy-mm&quot;)" table:style-name="ce14">
            <text:p>2025-12</text:p>
          </table:table-cell>
          <table:table-cell office:value-type="float" office:value="4" table:style-name="ce9">
            <text:p>4</text:p>
          </table:table-cell>
          <table:table-cell office:value-type="float" office:value="26" table:style-name="ce9">
            <text:p>26</text:p>
          </table:table-cell>
          <table:table-cell office:value-type="float" office:value="4" table:style-name="ce9">
            <text:p>4</text:p>
          </table:table-cell>
          <table:table-cell office:value-type="float" office:value="2410" table:style-name="ce9">
            <text:p>2410</text:p>
          </table:table-cell>
          <table:table-cell office:value-type="float" office:value="9" table:style-name="ce9">
            <text:p>9</text:p>
          </table:table-cell>
          <table:table-cell office:value-type="float" office:value="2436" table:formula="of:=SUM([.G707]+[.E707])" table:style-name="ce15">
            <text:p>2436</text:p>
          </table:table-cell>
          <table:table-cell office:value-type="float" office:value="-5" table:formula="of:=[.F707]-[.H707]" table:style-name="ce15">
            <text:p>-5</text:p>
          </table:table-cell>
          <table:table-cell office:value-type="percentage" office:value="2.052545155993432E-3" table:formula="of:=([.I708]-[.I707])/[.I707]" table:style-name="ce16">
            <text:p>0%</text:p>
          </table:table-cell>
          <table:table-cell office:value-type="string" office:string-value="Valid" table:formula="of:=IF([.F707]&lt;=[.E707]; &quot;Valid&quot;; &quot;Invalid&quot;)" table:style-name="ce17">
            <text:p>Valid</text:p>
          </table:table-cell>
          <table:table-cell office:value-type="string" office:string-value="Valid" table:formula="of:=IF([.H707]&lt;=[.G707]; &quot;Valid&quot;; &quot;Invalid&quot;)" table:style-name="ce17">
            <text:p>Valid</text:p>
          </table:table-cell>
          <table:table-cell office:value-type="string" office:string-value="Stable/Reducing" table:formula="of:=IF([.J707]&gt;0; &quot;Increasing Pressure&quot;; &quot;Stable/Reducing&quot;)" table:style-name="ce18">
            <text:p>Stable/Reducing</text:p>
          </table:table-cell>
          <table:table-cell office:value-type="float" office:value="2.25" table:formula="of:=IFERROR([.H707]/[.F707]; 0)" table:style-name="ce17">
            <text:p>2.25</text:p>
          </table:table-cell>
          <table:table-cell office:value-type="float" office:value="2454" table:formula="of:=AVERAGE([.I707:.I713])" table:style-name="ce15">
            <text:p>2454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12-02T00:00:00" table:style-name="ce14">
            <text:p>02-12-2025</text:p>
          </table:table-cell>
          <table:table-cell office:value-type="string" office:string-value="December" table:formula="of:=TEXT([.A708]; &quot;mmmm&quot;)" table:style-name="ce14">
            <text:p>December</text:p>
          </table:table-cell>
          <table:table-cell office:value-type="string" office:string-value="2025-12" table:formula="of:=TEXT([.A708]; &quot;yyyy-mm&quot;)" table:style-name="ce14">
            <text:p>2025-12</text:p>
          </table:table-cell>
          <table:table-cell office:value-type="float" office:value="7" table:style-name="ce9">
            <text:p>7</text:p>
          </table:table-cell>
          <table:table-cell office:value-type="float" office:value="34" table:style-name="ce9">
            <text:p>34</text:p>
          </table:table-cell>
          <table:table-cell office:value-type="float" office:value="6" table:style-name="ce9">
            <text:p>6</text:p>
          </table:table-cell>
          <table:table-cell office:value-type="float" office:value="2407" table:style-name="ce9">
            <text:p>2407</text:p>
          </table:table-cell>
          <table:table-cell office:value-type="float" office:value="8" table:style-name="ce9">
            <text:p>8</text:p>
          </table:table-cell>
          <table:table-cell office:value-type="float" office:value="2441" table:formula="of:=SUM([.G708]+[.E708])" table:style-name="ce15">
            <text:p>2441</text:p>
          </table:table-cell>
          <table:table-cell office:value-type="float" office:value="-2" table:formula="of:=[.F708]-[.H708]" table:style-name="ce15">
            <text:p>-2</text:p>
          </table:table-cell>
          <table:table-cell office:value-type="percentage" office:value="4.0966816878328554E-3" table:formula="of:=([.I709]-[.I708])/[.I708]" table:style-name="ce16">
            <text:p>0%</text:p>
          </table:table-cell>
          <table:table-cell office:value-type="string" office:string-value="Valid" table:formula="of:=IF([.F708]&lt;=[.E708]; &quot;Valid&quot;; &quot;Invalid&quot;)" table:style-name="ce17">
            <text:p>Valid</text:p>
          </table:table-cell>
          <table:table-cell office:value-type="string" office:string-value="Valid" table:formula="of:=IF([.H708]&lt;=[.G708]; &quot;Valid&quot;; &quot;Invalid&quot;)" table:style-name="ce17">
            <text:p>Valid</text:p>
          </table:table-cell>
          <table:table-cell office:value-type="string" office:string-value="Stable/Reducing" table:formula="of:=IF([.J708]&gt;0; &quot;Increasing Pressure&quot;; &quot;Stable/Reducing&quot;)" table:style-name="ce18">
            <text:p>Stable/Reducing</text:p>
          </table:table-cell>
          <table:table-cell office:value-type="float" office:value="1.3333333333333333" table:formula="of:=IFERROR([.H708]/[.F708]; 0)" table:style-name="ce17">
            <text:p>1.333333333</text:p>
          </table:table-cell>
          <table:table-cell office:value-type="float" office:value="2462.1428571428573" table:formula="of:=AVERAGE([.I708:.I714])" table:style-name="ce15">
            <text:p>2462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12-03T00:00:00" table:style-name="ce14">
            <text:p>03-12-2025</text:p>
          </table:table-cell>
          <table:table-cell office:value-type="string" office:string-value="December" table:formula="of:=TEXT([.A709]; &quot;mmmm&quot;)" table:style-name="ce14">
            <text:p>December</text:p>
          </table:table-cell>
          <table:table-cell office:value-type="string" office:string-value="2025-12" table:formula="of:=TEXT([.A709]; &quot;yyyy-mm&quot;)" table:style-name="ce14">
            <text:p>2025-12</text:p>
          </table:table-cell>
          <table:table-cell office:value-type="float" office:value="4" table:style-name="ce9">
            <text:p>4</text:p>
          </table:table-cell>
          <table:table-cell office:value-type="float" office:value="32" table:style-name="ce9">
            <text:p>32</text:p>
          </table:table-cell>
          <table:table-cell office:value-type="float" office:value="8" table:style-name="ce9">
            <text:p>8</text:p>
          </table:table-cell>
          <table:table-cell office:value-type="float" office:value="2419" table:style-name="ce9">
            <text:p>2419</text:p>
          </table:table-cell>
          <table:table-cell office:value-type="float" office:value="7" table:style-name="ce9">
            <text:p>7</text:p>
          </table:table-cell>
          <table:table-cell office:value-type="float" office:value="2451" table:formula="of:=SUM([.G709]+[.E709])" table:style-name="ce15">
            <text:p>2451</text:p>
          </table:table-cell>
          <table:table-cell office:value-type="float" office:value="1" table:formula="of:=[.F709]-[.H709]" table:style-name="ce15">
            <text:p>1</text:p>
          </table:table-cell>
          <table:table-cell office:value-type="percentage" office:value="2.4479804161566705E-3" table:formula="of:=([.I710]-[.I709])/[.I709]" table:style-name="ce16">
            <text:p>0%</text:p>
          </table:table-cell>
          <table:table-cell office:value-type="string" office:string-value="Valid" table:formula="of:=IF([.F709]&lt;=[.E709]; &quot;Valid&quot;; &quot;Invalid&quot;)" table:style-name="ce17">
            <text:p>Valid</text:p>
          </table:table-cell>
          <table:table-cell office:value-type="string" office:string-value="Valid" table:formula="of:=IF([.H709]&lt;=[.G709]; &quot;Valid&quot;; &quot;Invalid&quot;)" table:style-name="ce17">
            <text:p>Valid</text:p>
          </table:table-cell>
          <table:table-cell office:value-type="string" office:string-value="Increasing Pressure" table:formula="of:=IF([.J709]&gt;0; &quot;Increasing Pressure&quot;; &quot;Stable/Reducing&quot;)" table:style-name="ce18">
            <text:p>Increasing Pressure</text:p>
          </table:table-cell>
          <table:table-cell office:value-type="float" office:value="0.875" table:formula="of:=IFERROR([.H709]/[.F709]; 0)" table:style-name="ce17">
            <text:p>0.875</text:p>
          </table:table-cell>
          <table:table-cell office:value-type="float" office:value="2468.2857142857142" table:formula="of:=AVERAGE([.I709:.I715])" table:style-name="ce15">
            <text:p>2468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12-04T00:00:00" table:style-name="ce14">
            <text:p>04-12-2025</text:p>
          </table:table-cell>
          <table:table-cell office:value-type="string" office:string-value="December" table:formula="of:=TEXT([.A710]; &quot;mmmm&quot;)" table:style-name="ce14">
            <text:p>December</text:p>
          </table:table-cell>
          <table:table-cell office:value-type="string" office:string-value="2025-12" table:formula="of:=TEXT([.A710]; &quot;yyyy-mm&quot;)" table:style-name="ce14">
            <text:p>2025-12</text:p>
          </table:table-cell>
          <table:table-cell office:value-type="float" office:value="16" table:style-name="ce9">
            <text:p>16</text:p>
          </table:table-cell>
          <table:table-cell office:value-type="float" office:value="39" table:style-name="ce9">
            <text:p>39</text:p>
          </table:table-cell>
          <table:table-cell office:value-type="float" office:value="7" table:style-name="ce9">
            <text:p>7</text:p>
          </table:table-cell>
          <table:table-cell office:value-type="float" office:value="2418" table:style-name="ce9">
            <text:p>2418</text:p>
          </table:table-cell>
          <table:table-cell office:value-type="float" office:value="13" table:style-name="ce9">
            <text:p>13</text:p>
          </table:table-cell>
          <table:table-cell office:value-type="float" office:value="2457" table:formula="of:=SUM([.G710]+[.E710])" table:style-name="ce15">
            <text:p>2457</text:p>
          </table:table-cell>
          <table:table-cell office:value-type="float" office:value="-6" table:formula="of:=[.F710]-[.H710]" table:style-name="ce15">
            <text:p>-6</text:p>
          </table:table-cell>
          <table:table-cell office:value-type="percentage" office:value="-1.6280016280016279E-3" table:formula="of:=([.I711]-[.I710])/[.I710]" table:style-name="ce16">
            <text:p>0%</text:p>
          </table:table-cell>
          <table:table-cell office:value-type="string" office:string-value="Valid" table:formula="of:=IF([.F710]&lt;=[.E710]; &quot;Valid&quot;; &quot;Invalid&quot;)" table:style-name="ce17">
            <text:p>Valid</text:p>
          </table:table-cell>
          <table:table-cell office:value-type="string" office:string-value="Valid" table:formula="of:=IF([.H710]&lt;=[.G710]; &quot;Valid&quot;; &quot;Invalid&quot;)" table:style-name="ce17">
            <text:p>Valid</text:p>
          </table:table-cell>
          <table:table-cell office:value-type="string" office:string-value="Stable/Reducing" table:formula="of:=IF([.J710]&gt;0; &quot;Increasing Pressure&quot;; &quot;Stable/Reducing&quot;)" table:style-name="ce18">
            <text:p>Stable/Reducing</text:p>
          </table:table-cell>
          <table:table-cell office:value-type="float" office:value="1.8571428571428572" table:formula="of:=IFERROR([.H710]/[.F710]; 0)" table:style-name="ce17">
            <text:p>1.857142857</text:p>
          </table:table-cell>
          <table:table-cell office:value-type="float" office:value="2474.8571428571427" table:formula="of:=AVERAGE([.I710:.I716])" table:style-name="ce15">
            <text:p>2475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12-07T00:00:00" table:style-name="ce14">
            <text:p>07-12-2025</text:p>
          </table:table-cell>
          <table:table-cell office:value-type="string" office:string-value="December" table:formula="of:=TEXT([.A711]; &quot;mmmm&quot;)" table:style-name="ce14">
            <text:p>December</text:p>
          </table:table-cell>
          <table:table-cell office:value-type="string" office:string-value="2025-12" table:formula="of:=TEXT([.A711]; &quot;yyyy-mm&quot;)" table:style-name="ce14">
            <text:p>2025-12</text:p>
          </table:table-cell>
          <table:table-cell office:value-type="float" office:value="4" table:style-name="ce9">
            <text:p>4</text:p>
          </table:table-cell>
          <table:table-cell office:value-type="float" office:value="24" table:style-name="ce9">
            <text:p>24</text:p>
          </table:table-cell>
          <table:table-cell office:value-type="float" office:value="13" table:style-name="ce9">
            <text:p>13</text:p>
          </table:table-cell>
          <table:table-cell office:value-type="float" office:value="2429" table:style-name="ce9">
            <text:p>2429</text:p>
          </table:table-cell>
          <table:table-cell office:value-type="float" office:value="12" table:style-name="ce9">
            <text:p>12</text:p>
          </table:table-cell>
          <table:table-cell office:value-type="float" office:value="2453" table:formula="of:=SUM([.G711]+[.E711])" table:style-name="ce15">
            <text:p>2453</text:p>
          </table:table-cell>
          <table:table-cell office:value-type="float" office:value="1" table:formula="of:=[.F711]-[.H711]" table:style-name="ce15">
            <text:p>1</text:p>
          </table:table-cell>
          <table:table-cell office:value-type="percentage" office:value="5.7072971871178152E-3" table:formula="of:=([.I712]-[.I711])/[.I711]" table:style-name="ce16">
            <text:p>1%</text:p>
          </table:table-cell>
          <table:table-cell office:value-type="string" office:string-value="Valid" table:formula="of:=IF([.F711]&lt;=[.E711]; &quot;Valid&quot;; &quot;Invalid&quot;)" table:style-name="ce17">
            <text:p>Valid</text:p>
          </table:table-cell>
          <table:table-cell office:value-type="string" office:string-value="Valid" table:formula="of:=IF([.H711]&lt;=[.G711]; &quot;Valid&quot;; &quot;Invalid&quot;)" table:style-name="ce17">
            <text:p>Valid</text:p>
          </table:table-cell>
          <table:table-cell office:value-type="string" office:string-value="Increasing Pressure" table:formula="of:=IF([.J711]&gt;0; &quot;Increasing Pressure&quot;; &quot;Stable/Reducing&quot;)" table:style-name="ce18">
            <text:p>Increasing Pressure</text:p>
          </table:table-cell>
          <table:table-cell office:value-type="float" office:value="0.92307692307692313" table:formula="of:=IFERROR([.H711]/[.F711]; 0)" table:style-name="ce17">
            <text:p>0.923076923</text:p>
          </table:table-cell>
          <table:table-cell office:value-type="float" office:value="2482.7142857142858" table:formula="of:=AVERAGE([.I711:.I717])" table:style-name="ce15">
            <text:p>2483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12-08T00:00:00" table:style-name="ce14">
            <text:p>08-12-2025</text:p>
          </table:table-cell>
          <table:table-cell office:value-type="string" office:string-value="December" table:formula="of:=TEXT([.A712]; &quot;mmmm&quot;)" table:style-name="ce14">
            <text:p>December</text:p>
          </table:table-cell>
          <table:table-cell office:value-type="string" office:string-value="2025-12" table:formula="of:=TEXT([.A712]; &quot;yyyy-mm&quot;)" table:style-name="ce14">
            <text:p>2025-12</text:p>
          </table:table-cell>
          <table:table-cell office:value-type="float" office:value="9" table:style-name="ce9">
            <text:p>9</text:p>
          </table:table-cell>
          <table:table-cell office:value-type="float" office:value="27" table:style-name="ce9">
            <text:p>27</text:p>
          </table:table-cell>
          <table:table-cell office:value-type="float" office:value="9" table:style-name="ce9">
            <text:p>9</text:p>
          </table:table-cell>
          <table:table-cell office:value-type="float" office:value="2440" table:style-name="ce9">
            <text:p>2440</text:p>
          </table:table-cell>
          <table:table-cell office:value-type="float" office:value="4" table:style-name="ce9">
            <text:p>4</text:p>
          </table:table-cell>
          <table:table-cell office:value-type="float" office:value="2467" table:formula="of:=SUM([.G712]+[.E712])" table:style-name="ce15">
            <text:p>2467</text:p>
          </table:table-cell>
          <table:table-cell office:value-type="float" office:value="5" table:formula="of:=[.F712]-[.H712]" table:style-name="ce15">
            <text:p>5</text:p>
          </table:table-cell>
          <table:table-cell office:value-type="percentage" office:value="2.4321037697608433E-3" table:formula="of:=([.I713]-[.I712])/[.I712]" table:style-name="ce16">
            <text:p>0%</text:p>
          </table:table-cell>
          <table:table-cell office:value-type="string" office:string-value="Valid" table:formula="of:=IF([.F712]&lt;=[.E712]; &quot;Valid&quot;; &quot;Invalid&quot;)" table:style-name="ce17">
            <text:p>Valid</text:p>
          </table:table-cell>
          <table:table-cell office:value-type="string" office:string-value="Valid" table:formula="of:=IF([.H712]&lt;=[.G712]; &quot;Valid&quot;; &quot;Invalid&quot;)" table:style-name="ce17">
            <text:p>Valid</text:p>
          </table:table-cell>
          <table:table-cell office:value-type="string" office:string-value="Increasing Pressure" table:formula="of:=IF([.J712]&gt;0; &quot;Increasing Pressure&quot;; &quot;Stable/Reducing&quot;)" table:style-name="ce18">
            <text:p>Increasing Pressure</text:p>
          </table:table-cell>
          <table:table-cell office:value-type="float" office:value="0.44444444444444442" table:formula="of:=IFERROR([.H712]/[.F712]; 0)" table:style-name="ce17">
            <text:p>0.444444444</text:p>
          </table:table-cell>
          <table:table-cell office:value-type="float" office:value="2492.5714285714284" table:formula="of:=AVERAGE([.I712:.I718])" table:style-name="ce15">
            <text:p>2493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12-09T00:00:00" table:style-name="ce14">
            <text:p>09-12-2025</text:p>
          </table:table-cell>
          <table:table-cell office:value-type="string" office:string-value="December" table:formula="of:=TEXT([.A713]; &quot;mmmm&quot;)" table:style-name="ce14">
            <text:p>December</text:p>
          </table:table-cell>
          <table:table-cell office:value-type="string" office:string-value="2025-12" table:formula="of:=TEXT([.A713]; &quot;yyyy-mm&quot;)" table:style-name="ce14">
            <text:p>2025-12</text:p>
          </table:table-cell>
          <table:table-cell office:value-type="float" office:value="4" table:style-name="ce9">
            <text:p>4</text:p>
          </table:table-cell>
          <table:table-cell office:value-type="float" office:value="30" table:style-name="ce9">
            <text:p>30</text:p>
          </table:table-cell>
          <table:table-cell office:value-type="float" office:value="7" table:style-name="ce9">
            <text:p>7</text:p>
          </table:table-cell>
          <table:table-cell office:value-type="float" office:value="2443" table:style-name="ce9">
            <text:p>2443</text:p>
          </table:table-cell>
          <table:table-cell office:value-type="float" office:value="8" table:style-name="ce9">
            <text:p>8</text:p>
          </table:table-cell>
          <table:table-cell office:value-type="float" office:value="2473" table:formula="of:=SUM([.G713]+[.E713])" table:style-name="ce15">
            <text:p>2473</text:p>
          </table:table-cell>
          <table:table-cell office:value-type="float" office:value="-1" table:formula="of:=[.F713]-[.H713]" table:style-name="ce15">
            <text:p>-1</text:p>
          </table:table-cell>
          <table:table-cell office:value-type="percentage" office:value="8.087343307723413E-3" table:formula="of:=([.I714]-[.I713])/[.I713]" table:style-name="ce16">
            <text:p>1%</text:p>
          </table:table-cell>
          <table:table-cell office:value-type="string" office:string-value="Valid" table:formula="of:=IF([.F713]&lt;=[.E713]; &quot;Valid&quot;; &quot;Invalid&quot;)" table:style-name="ce17">
            <text:p>Valid</text:p>
          </table:table-cell>
          <table:table-cell office:value-type="string" office:string-value="Valid" table:formula="of:=IF([.H713]&lt;=[.G713]; &quot;Valid&quot;; &quot;Invalid&quot;)" table:style-name="ce17">
            <text:p>Valid</text:p>
          </table:table-cell>
          <table:table-cell office:value-type="string" office:string-value="Stable/Reducing" table:formula="of:=IF([.J713]&gt;0; &quot;Increasing Pressure&quot;; &quot;Stable/Reducing&quot;)" table:style-name="ce18">
            <text:p>Stable/Reducing</text:p>
          </table:table-cell>
          <table:table-cell office:value-type="float" office:value="1.1428571428571428" table:formula="of:=IFERROR([.H713]/[.F713]; 0)" table:style-name="ce17">
            <text:p>1.142857143</text:p>
          </table:table-cell>
          <table:table-cell office:value-type="float" office:value="2499" table:formula="of:=AVERAGE([.I713:.I719])" table:style-name="ce15">
            <text:p>2499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12-10T00:00:00" table:style-name="ce14">
            <text:p>10-12-2025</text:p>
          </table:table-cell>
          <table:table-cell office:value-type="string" office:string-value="December" table:formula="of:=TEXT([.A714]; &quot;mmmm&quot;)" table:style-name="ce14">
            <text:p>December</text:p>
          </table:table-cell>
          <table:table-cell office:value-type="string" office:string-value="2025-12" table:formula="of:=TEXT([.A714]; &quot;yyyy-mm&quot;)" table:style-name="ce14">
            <text:p>2025-12</text:p>
          </table:table-cell>
          <table:table-cell office:value-type="float" office:value="10" table:style-name="ce9">
            <text:p>10</text:p>
          </table:table-cell>
          <table:table-cell office:value-type="float" office:value="54" table:style-name="ce9">
            <text:p>54</text:p>
          </table:table-cell>
          <table:table-cell office:value-type="float" office:value="5" table:style-name="ce9">
            <text:p>5</text:p>
          </table:table-cell>
          <table:table-cell office:value-type="float" office:value="2439" table:style-name="ce9">
            <text:p>2439</text:p>
          </table:table-cell>
          <table:table-cell office:value-type="float" office:value="9" table:style-name="ce9">
            <text:p>9</text:p>
          </table:table-cell>
          <table:table-cell office:value-type="float" office:value="2493" table:formula="of:=SUM([.G714]+[.E714])" table:style-name="ce15">
            <text:p>2493</text:p>
          </table:table-cell>
          <table:table-cell office:value-type="float" office:value="-4" table:formula="of:=[.F714]-[.H714]" table:style-name="ce15">
            <text:p>-4</text:p>
          </table:table-cell>
          <table:table-cell office:value-type="percentage" office:value="-3.6101083032490976E-3" table:formula="of:=([.I715]-[.I714])/[.I714]" table:style-name="ce16">
            <text:p>0%</text:p>
          </table:table-cell>
          <table:table-cell office:value-type="string" office:string-value="Valid" table:formula="of:=IF([.F714]&lt;=[.E714]; &quot;Valid&quot;; &quot;Invalid&quot;)" table:style-name="ce17">
            <text:p>Valid</text:p>
          </table:table-cell>
          <table:table-cell office:value-type="string" office:string-value="Valid" table:formula="of:=IF([.H714]&lt;=[.G714]; &quot;Valid&quot;; &quot;Invalid&quot;)" table:style-name="ce17">
            <text:p>Valid</text:p>
          </table:table-cell>
          <table:table-cell office:value-type="string" office:string-value="Stable/Reducing" table:formula="of:=IF([.J714]&gt;0; &quot;Increasing Pressure&quot;; &quot;Stable/Reducing&quot;)" table:style-name="ce18">
            <text:p>Stable/Reducing</text:p>
          </table:table-cell>
          <table:table-cell office:value-type="float" office:value="1.8" table:formula="of:=IFERROR([.H714]/[.F714]; 0)" table:style-name="ce17">
            <text:p>1.8</text:p>
          </table:table-cell>
          <table:table-cell office:value-type="float" office:value="2506" table:formula="of:=AVERAGE([.I714:.I720])" table:style-name="ce15">
            <text:p>2506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12-11T00:00:00" table:style-name="ce14">
            <text:p>11-12-2025</text:p>
          </table:table-cell>
          <table:table-cell office:value-type="string" office:string-value="December" table:formula="of:=TEXT([.A715]; &quot;mmmm&quot;)" table:style-name="ce14">
            <text:p>December</text:p>
          </table:table-cell>
          <table:table-cell office:value-type="string" office:string-value="2025-12" table:formula="of:=TEXT([.A715]; &quot;yyyy-mm&quot;)" table:style-name="ce14">
            <text:p>2025-12</text:p>
          </table:table-cell>
          <table:table-cell office:value-type="float" office:value="7" table:style-name="ce9">
            <text:p>7</text:p>
          </table:table-cell>
          <table:table-cell office:value-type="float" office:value="47" table:style-name="ce9">
            <text:p>47</text:p>
          </table:table-cell>
          <table:table-cell office:value-type="float" office:value="9" table:style-name="ce9">
            <text:p>9</text:p>
          </table:table-cell>
          <table:table-cell office:value-type="float" office:value="2437" table:style-name="ce9">
            <text:p>2437</text:p>
          </table:table-cell>
          <table:table-cell office:value-type="float" office:value="10" table:style-name="ce9">
            <text:p>10</text:p>
          </table:table-cell>
          <table:table-cell office:value-type="float" office:value="2484" table:formula="of:=SUM([.G715]+[.E715])" table:style-name="ce15">
            <text:p>2484</text:p>
          </table:table-cell>
          <table:table-cell office:value-type="float" office:value="-1" table:formula="of:=[.F715]-[.H715]" table:style-name="ce15">
            <text:p>-1</text:p>
          </table:table-cell>
          <table:table-cell office:value-type="percentage" office:value="5.2334943639291464E-3" table:formula="of:=([.I716]-[.I715])/[.I715]" table:style-name="ce16">
            <text:p>1%</text:p>
          </table:table-cell>
          <table:table-cell office:value-type="string" office:string-value="Valid" table:formula="of:=IF([.F715]&lt;=[.E715]; &quot;Valid&quot;; &quot;Invalid&quot;)" table:style-name="ce17">
            <text:p>Valid</text:p>
          </table:table-cell>
          <table:table-cell office:value-type="string" office:string-value="Valid" table:formula="of:=IF([.H715]&lt;=[.G715]; &quot;Valid&quot;; &quot;Invalid&quot;)" table:style-name="ce17">
            <text:p>Valid</text:p>
          </table:table-cell>
          <table:table-cell office:value-type="string" office:string-value="Stable/Reducing" table:formula="of:=IF([.J715]&gt;0; &quot;Increasing Pressure&quot;; &quot;Stable/Reducing&quot;)" table:style-name="ce18">
            <text:p>Stable/Reducing</text:p>
          </table:table-cell>
          <table:table-cell office:value-type="float" office:value="1.1111111111111112" table:formula="of:=IFERROR([.H715]/[.F715]; 0)" table:style-name="ce17">
            <text:p>1.111111111</text:p>
          </table:table-cell>
          <table:table-cell office:value-type="float" office:value="2507.2857142857142" table:formula="of:=AVERAGE([.I715:.I721])" table:style-name="ce15">
            <text:p>2507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12-14T00:00:00" table:style-name="ce14">
            <text:p>14-12-2025</text:p>
          </table:table-cell>
          <table:table-cell office:value-type="string" office:string-value="December" table:formula="of:=TEXT([.A716]; &quot;mmmm&quot;)" table:style-name="ce14">
            <text:p>December</text:p>
          </table:table-cell>
          <table:table-cell office:value-type="string" office:string-value="2025-12" table:formula="of:=TEXT([.A716]; &quot;yyyy-mm&quot;)" table:style-name="ce14">
            <text:p>2025-12</text:p>
          </table:table-cell>
          <table:table-cell office:value-type="float" office:value="8" table:style-name="ce9">
            <text:p>8</text:p>
          </table:table-cell>
          <table:table-cell office:value-type="float" office:value="35" table:style-name="ce9">
            <text:p>35</text:p>
          </table:table-cell>
          <table:table-cell office:value-type="float" office:value="4" table:style-name="ce9">
            <text:p>4</text:p>
          </table:table-cell>
          <table:table-cell office:value-type="float" office:value="2462" table:style-name="ce9">
            <text:p>2462</text:p>
          </table:table-cell>
          <table:table-cell office:value-type="float" office:value="8" table:style-name="ce9">
            <text:p>8</text:p>
          </table:table-cell>
          <table:table-cell office:value-type="float" office:value="2497" table:formula="of:=SUM([.G716]+[.E716])" table:style-name="ce15">
            <text:p>2497</text:p>
          </table:table-cell>
          <table:table-cell office:value-type="float" office:value="-4" table:formula="of:=[.F716]-[.H716]" table:style-name="ce15">
            <text:p>-4</text:p>
          </table:table-cell>
          <table:table-cell office:value-type="percentage" office:value="6.0072086503804569E-3" table:formula="of:=([.I717]-[.I716])/[.I716]" table:style-name="ce16">
            <text:p>1%</text:p>
          </table:table-cell>
          <table:table-cell office:value-type="string" office:string-value="Valid" table:formula="of:=IF([.F716]&lt;=[.E716]; &quot;Valid&quot;; &quot;Invalid&quot;)" table:style-name="ce17">
            <text:p>Valid</text:p>
          </table:table-cell>
          <table:table-cell office:value-type="string" office:string-value="Valid" table:formula="of:=IF([.H716]&lt;=[.G716]; &quot;Valid&quot;; &quot;Invalid&quot;)" table:style-name="ce17">
            <text:p>Valid</text:p>
          </table:table-cell>
          <table:table-cell office:value-type="string" office:string-value="Stable/Reducing" table:formula="of:=IF([.J716]&gt;0; &quot;Increasing Pressure&quot;; &quot;Stable/Reducing&quot;)" table:style-name="ce18">
            <text:p>Stable/Reducing</text:p>
          </table:table-cell>
          <table:table-cell office:value-type="float" office:value="2" table:formula="of:=IFERROR([.H716]/[.F716]; 0)" table:style-name="ce17">
            <text:p>2</text:p>
          </table:table-cell>
          <table:table-cell office:value-type="float" office:value="2511.1666666666665" table:formula="of:=AVERAGE([.I716:.I722])" table:style-name="ce15">
            <text:p>2511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12-15T00:00:00" table:style-name="ce14">
            <text:p>15-12-2025</text:p>
          </table:table-cell>
          <table:table-cell office:value-type="string" office:string-value="December" table:formula="of:=TEXT([.A717]; &quot;mmmm&quot;)" table:style-name="ce14">
            <text:p>December</text:p>
          </table:table-cell>
          <table:table-cell office:value-type="string" office:string-value="2025-12" table:formula="of:=TEXT([.A717]; &quot;yyyy-mm&quot;)" table:style-name="ce14">
            <text:p>2025-12</text:p>
          </table:table-cell>
          <table:table-cell office:value-type="float" office:value="11" table:style-name="ce9">
            <text:p>11</text:p>
          </table:table-cell>
          <table:table-cell office:value-type="float" office:value="42" table:style-name="ce9">
            <text:p>42</text:p>
          </table:table-cell>
          <table:table-cell office:value-type="float" office:value="9" table:style-name="ce9">
            <text:p>9</text:p>
          </table:table-cell>
          <table:table-cell office:value-type="float" office:value="2470" table:style-name="ce9">
            <text:p>2470</text:p>
          </table:table-cell>
          <table:table-cell office:value-type="float" office:value="7" table:style-name="ce9">
            <text:p>7</text:p>
          </table:table-cell>
          <table:table-cell office:value-type="float" office:value="2512" table:formula="of:=SUM([.G717]+[.E717])" table:style-name="ce15">
            <text:p>2512</text:p>
          </table:table-cell>
          <table:table-cell office:value-type="float" office:value="2" table:formula="of:=[.F717]-[.H717]" table:style-name="ce15">
            <text:p>2</text:p>
          </table:table-cell>
          <table:table-cell office:value-type="percentage" office:value="3.9808917197452229E-3" table:formula="of:=([.I718]-[.I717])/[.I717]" table:style-name="ce16">
            <text:p>0%</text:p>
          </table:table-cell>
          <table:table-cell office:value-type="string" office:string-value="Valid" table:formula="of:=IF([.F717]&lt;=[.E717]; &quot;Valid&quot;; &quot;Invalid&quot;)" table:style-name="ce17">
            <text:p>Valid</text:p>
          </table:table-cell>
          <table:table-cell office:value-type="string" office:string-value="Valid" table:formula="of:=IF([.H717]&lt;=[.G717]; &quot;Valid&quot;; &quot;Invalid&quot;)" table:style-name="ce17">
            <text:p>Valid</text:p>
          </table:table-cell>
          <table:table-cell office:value-type="string" office:string-value="Increasing Pressure" table:formula="of:=IF([.J717]&gt;0; &quot;Increasing Pressure&quot;; &quot;Stable/Reducing&quot;)" table:style-name="ce18">
            <text:p>Increasing Pressure</text:p>
          </table:table-cell>
          <table:table-cell office:value-type="float" office:value="0.77777777777777779" table:formula="of:=IFERROR([.H717]/[.F717]; 0)" table:style-name="ce17">
            <text:p>0.777777778</text:p>
          </table:table-cell>
          <table:table-cell office:value-type="float" office:value="2514" table:formula="of:=AVERAGE([.I717:.I723])" table:style-name="ce15">
            <text:p>2514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12-16T00:00:00" table:style-name="ce14">
            <text:p>16-12-2025</text:p>
          </table:table-cell>
          <table:table-cell office:value-type="string" office:string-value="December" table:formula="of:=TEXT([.A718]; &quot;mmmm&quot;)" table:style-name="ce14">
            <text:p>December</text:p>
          </table:table-cell>
          <table:table-cell office:value-type="string" office:string-value="2025-12" table:formula="of:=TEXT([.A718]; &quot;yyyy-mm&quot;)" table:style-name="ce14">
            <text:p>2025-12</text:p>
          </table:table-cell>
          <table:table-cell office:value-type="float" office:value="8" table:style-name="ce9">
            <text:p>8</text:p>
          </table:table-cell>
          <table:table-cell office:value-type="float" office:value="54" table:style-name="ce9">
            <text:p>54</text:p>
          </table:table-cell>
          <table:table-cell office:value-type="float" office:value="15" table:style-name="ce9">
            <text:p>15</text:p>
          </table:table-cell>
          <table:table-cell office:value-type="float" office:value="2468" table:style-name="ce9">
            <text:p>2468</text:p>
          </table:table-cell>
          <table:table-cell office:value-type="float" office:value="9" table:style-name="ce9">
            <text:p>9</text:p>
          </table:table-cell>
          <table:table-cell office:value-type="float" office:value="2522" table:formula="of:=SUM([.G718]+[.E718])" table:style-name="ce15">
            <text:p>2522</text:p>
          </table:table-cell>
          <table:table-cell office:value-type="float" office:value="6" table:formula="of:=[.F718]-[.H718]" table:style-name="ce15">
            <text:p>6</text:p>
          </table:table-cell>
          <table:table-cell office:value-type="percentage" office:value="-3.9651070578905628E-3" table:formula="of:=([.I719]-[.I718])/[.I718]" table:style-name="ce16">
            <text:p>0%</text:p>
          </table:table-cell>
          <table:table-cell office:value-type="string" office:string-value="Valid" table:formula="of:=IF([.F718]&lt;=[.E718]; &quot;Valid&quot;; &quot;Invalid&quot;)" table:style-name="ce17">
            <text:p>Valid</text:p>
          </table:table-cell>
          <table:table-cell office:value-type="string" office:string-value="Valid" table:formula="of:=IF([.H718]&lt;=[.G718]; &quot;Valid&quot;; &quot;Invalid&quot;)" table:style-name="ce17">
            <text:p>Valid</text:p>
          </table:table-cell>
          <table:table-cell office:value-type="string" office:string-value="Increasing Pressure" table:formula="of:=IF([.J718]&gt;0; &quot;Increasing Pressure&quot;; &quot;Stable/Reducing&quot;)" table:style-name="ce18">
            <text:p>Increasing Pressure</text:p>
          </table:table-cell>
          <table:table-cell office:value-type="float" office:value="0.6" table:formula="of:=IFERROR([.H718]/[.F718]; 0)" table:style-name="ce17">
            <text:p>0.6</text:p>
          </table:table-cell>
          <table:table-cell office:value-type="float" office:value="2514.5" table:formula="of:=AVERAGE([.I718:.I724])" table:style-name="ce15">
            <text:p>2515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12-17T00:00:00" table:style-name="ce14">
            <text:p>17-12-2025</text:p>
          </table:table-cell>
          <table:table-cell office:value-type="string" office:string-value="December" table:formula="of:=TEXT([.A719]; &quot;mmmm&quot;)" table:style-name="ce14">
            <text:p>December</text:p>
          </table:table-cell>
          <table:table-cell office:value-type="string" office:string-value="2025-12" table:formula="of:=TEXT([.A719]; &quot;yyyy-mm&quot;)" table:style-name="ce14">
            <text:p>2025-12</text:p>
          </table:table-cell>
          <table:table-cell office:value-type="float" office:value="7" table:style-name="ce9">
            <text:p>7</text:p>
          </table:table-cell>
          <table:table-cell office:value-type="float" office:value="31" table:style-name="ce9">
            <text:p>31</text:p>
          </table:table-cell>
          <table:table-cell office:value-type="float" office:value="11" table:style-name="ce9">
            <text:p>11</text:p>
          </table:table-cell>
          <table:table-cell office:value-type="float" office:value="2481" table:style-name="ce9">
            <text:p>2481</text:p>
          </table:table-cell>
          <table:table-cell office:value-type="float" office:value="10" table:style-name="ce9">
            <text:p>10</text:p>
          </table:table-cell>
          <table:table-cell office:value-type="float" office:value="2512" table:formula="of:=SUM([.G719]+[.E719])" table:style-name="ce15">
            <text:p>2512</text:p>
          </table:table-cell>
          <table:table-cell office:value-type="float" office:value="1" table:formula="of:=[.F719]-[.H719]" table:style-name="ce15">
            <text:p>1</text:p>
          </table:table-cell>
          <table:table-cell office:value-type="percentage" office:value="3.9808917197452229E-3" table:formula="of:=([.I720]-[.I719])/[.I719]" table:style-name="ce16">
            <text:p>0%</text:p>
          </table:table-cell>
          <table:table-cell office:value-type="string" office:string-value="Valid" table:formula="of:=IF([.F719]&lt;=[.E719]; &quot;Valid&quot;; &quot;Invalid&quot;)" table:style-name="ce17">
            <text:p>Valid</text:p>
          </table:table-cell>
          <table:table-cell office:value-type="string" office:string-value="Valid" table:formula="of:=IF([.H719]&lt;=[.G719]; &quot;Valid&quot;; &quot;Invalid&quot;)" table:style-name="ce17">
            <text:p>Valid</text:p>
          </table:table-cell>
          <table:table-cell office:value-type="string" office:string-value="Increasing Pressure" table:formula="of:=IF([.J719]&gt;0; &quot;Increasing Pressure&quot;; &quot;Stable/Reducing&quot;)" table:style-name="ce18">
            <text:p>Increasing Pressure</text:p>
          </table:table-cell>
          <table:table-cell office:value-type="float" office:value="0.90909090909090906" table:formula="of:=IFERROR([.H719]/[.F719]; 0)" table:style-name="ce17">
            <text:p>0.909090909</text:p>
          </table:table-cell>
          <table:table-cell office:value-type="float" office:value="2512" table:formula="of:=AVERAGE([.I719:.I725])" table:style-name="ce15">
            <text:p>2512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12-18T00:00:00" table:style-name="ce14">
            <text:p>18-12-2025</text:p>
          </table:table-cell>
          <table:table-cell office:value-type="string" office:string-value="December" table:formula="of:=TEXT([.A720]; &quot;mmmm&quot;)" table:style-name="ce14">
            <text:p>December</text:p>
          </table:table-cell>
          <table:table-cell office:value-type="string" office:string-value="2025-12" table:formula="of:=TEXT([.A720]; &quot;yyyy-mm&quot;)" table:style-name="ce14">
            <text:p>2025-12</text:p>
          </table:table-cell>
          <table:table-cell office:value-type="float" office:value="11" table:style-name="ce9">
            <text:p>11</text:p>
          </table:table-cell>
          <table:table-cell office:value-type="float" office:value="50" table:style-name="ce9">
            <text:p>50</text:p>
          </table:table-cell>
          <table:table-cell office:value-type="float" office:value="6" table:style-name="ce9">
            <text:p>6</text:p>
          </table:table-cell>
          <table:table-cell office:value-type="float" office:value="2472" table:style-name="ce9">
            <text:p>2472</text:p>
          </table:table-cell>
          <table:table-cell office:value-type="float" office:value="16" table:style-name="ce9">
            <text:p>16</text:p>
          </table:table-cell>
          <table:table-cell office:value-type="float" office:value="2522" table:formula="of:=SUM([.G720]+[.E720])" table:style-name="ce15">
            <text:p>2522</text:p>
          </table:table-cell>
          <table:table-cell office:value-type="float" office:value="-10" table:formula="of:=[.F720]-[.H720]" table:style-name="ce15">
            <text:p>-10</text:p>
          </table:table-cell>
          <table:table-cell office:value-type="percentage" office:value="-7.9302141157811257E-3" table:formula="of:=([.I721]-[.I720])/[.I720]" table:style-name="ce16">
            <text:p>-1%</text:p>
          </table:table-cell>
          <table:table-cell office:value-type="string" office:string-value="Valid" table:formula="of:=IF([.F720]&lt;=[.E720]; &quot;Valid&quot;; &quot;Invalid&quot;)" table:style-name="ce17">
            <text:p>Valid</text:p>
          </table:table-cell>
          <table:table-cell office:value-type="string" office:string-value="Valid" table:formula="of:=IF([.H720]&lt;=[.G720]; &quot;Valid&quot;; &quot;Invalid&quot;)" table:style-name="ce17">
            <text:p>Valid</text:p>
          </table:table-cell>
          <table:table-cell office:value-type="string" office:string-value="Stable/Reducing" table:formula="of:=IF([.J720]&gt;0; &quot;Increasing Pressure&quot;; &quot;Stable/Reducing&quot;)" table:style-name="ce18">
            <text:p>Stable/Reducing</text:p>
          </table:table-cell>
          <table:table-cell office:value-type="float" office:value="2.6666666666666665" table:formula="of:=IFERROR([.H720]/[.F720]; 0)" table:style-name="ce17">
            <text:p>2.666666667</text:p>
          </table:table-cell>
          <table:table-cell office:value-type="float" office:value="2512" table:formula="of:=AVERAGE([.I720:.I726])" table:style-name="ce15">
            <text:p>2512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style-name="ro1">
          <table:table-cell office:value-type="date" office:date-value="2025-12-21T00:00:00" table:style-name="ce14">
            <text:p>21-12-2025</text:p>
          </table:table-cell>
          <table:table-cell office:value-type="string" office:string-value="December" table:formula="of:=TEXT([.A721]; &quot;mmmm&quot;)" table:style-name="ce14">
            <text:p>December</text:p>
          </table:table-cell>
          <table:table-cell office:value-type="string" office:string-value="2025-12" table:formula="of:=TEXT([.A721]; &quot;yyyy-mm&quot;)" table:style-name="ce14">
            <text:p>2025-12</text:p>
          </table:table-cell>
          <table:table-cell office:value-type="float" office:value="6" table:style-name="ce9">
            <text:p>6</text:p>
          </table:table-cell>
          <table:table-cell office:value-type="float" office:value="18" table:style-name="ce9">
            <text:p>18</text:p>
          </table:table-cell>
          <table:table-cell office:value-type="float" office:value="11" table:style-name="ce9">
            <text:p>11</text:p>
          </table:table-cell>
          <table:table-cell office:value-type="float" office:value="2484" table:style-name="ce9">
            <text:p>2484</text:p>
          </table:table-cell>
          <table:table-cell office:value-type="float" office:value="14" table:style-name="ce9">
            <text:p>14</text:p>
          </table:table-cell>
          <table:table-cell office:value-type="float" office:value="2502" table:formula="of:=SUM([.G721]+[.E721])" table:style-name="ce15">
            <text:p>2502</text:p>
          </table:table-cell>
          <table:table-cell office:value-type="float" office:value="-3" table:formula="of:=[.F721]-[.H721]" table:style-name="ce15">
            <text:p>-3</text:p>
          </table:table-cell>
          <table:table-cell office:value-type="percentage" office:value="-1" table:formula="of:=([.I722]-[.I721])/[.I721]" table:style-name="ce16">
            <text:p>-100%</text:p>
          </table:table-cell>
          <table:table-cell office:value-type="string" office:string-value="Valid" table:formula="of:=IF([.F721]&lt;=[.E721]; &quot;Valid&quot;; &quot;Invalid&quot;)" table:style-name="ce17">
            <text:p>Valid</text:p>
          </table:table-cell>
          <table:table-cell office:value-type="string" office:string-value="Valid" table:formula="of:=IF([.H721]&lt;=[.G721]; &quot;Valid&quot;; &quot;Invalid&quot;)" table:style-name="ce17">
            <text:p>Valid</text:p>
          </table:table-cell>
          <table:table-cell office:value-type="string" office:string-value="Stable/Reducing" table:formula="of:=IF([.J721]&gt;0; &quot;Increasing Pressure&quot;; &quot;Stable/Reducing&quot;)" table:style-name="ce18">
            <text:p>Stable/Reducing</text:p>
          </table:table-cell>
          <table:table-cell office:value-type="float" office:value="1.2727272727272727" table:formula="of:=IFERROR([.H721]/[.F721]; 0)" table:style-name="ce17">
            <text:p>1.272727273</text:p>
          </table:table-cell>
          <table:table-cell office:value-type="float" office:value="2502" table:formula="of:=AVERAGE([.I721:.I727])" table:style-name="ce15">
            <text:p>2502</text:p>
          </table:table-cell>
          <table:table-cell office:value-type="float" office:value="2918.4580782596145" table:formula="of:=STDEV([.I:.I])" table:style-name="ce17">
            <text:p>2918.458078</text:p>
          </table:table-cell>
          <table:table-cell table:number-columns-repeated="16367"/>
        </table:table-row>
        <table:table-row table:number-rows-repeated="15" table:style-name="ro1">
          <table:table-cell table:number-columns-repeated="3" table:style-name="ce19"/>
          <table:table-cell table:number-columns-repeated="5" table:style-name="ce1"/>
          <table:table-cell table:number-columns-repeated="2" table:style-name="ce20"/>
          <table:table-cell table:number-columns-repeated="4" table:style-name="ce1"/>
          <table:table-cell table:style-name="ce17"/>
          <table:table-cell table:style-name="ce20"/>
          <table:table-cell table:number-columns-repeated="16368" table:style-name="ce1"/>
        </table:table-row>
        <table:table-row table:number-rows-repeated="435" table:style-name="ro1">
          <table:table-cell table:number-columns-repeated="3" table:style-name="ce19"/>
          <table:table-cell table:number-columns-repeated="5" table:style-name="ce1"/>
          <table:table-cell table:number-columns-repeated="2" table:style-name="ce20"/>
          <table:table-cell table:number-columns-repeated="4" table:style-name="ce1"/>
          <table:table-cell table:style-name="ce17"/>
          <table:table-cell table:style-name="ce20"/>
          <table:table-cell table:number-columns-repeated="16368"/>
        </table:table-row>
        <table:table-row table:number-rows-repeated="1047405" table:style-name="ro1">
          <table:table-cell table:number-columns-repeated="16384"/>
        </table:table-row>
      </table:table>
      <table:table table:name="KPIs" table:style-name="ta2">
        <table:table-column table:style-name="co3" table:number-columns-repeated="2" table:default-cell-style-name="ce1"/>
        <table:table-column table:style-name="co24" table:default-cell-style-name="ce1"/>
        <table:table-column table:style-name="co25" table:default-cell-style-name="ce1"/>
        <table:table-column table:style-name="co3" table:number-columns-repeated="16380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number-columns-spanned="2" table:number-rows-spanned="1" table:style-name="ce23">
            <text:p>Important KPIs</text:p>
          </table:table-cell>
          <table:covered-table-cell/>
          <table:table-cell table:number-columns-repeated="4" table:style-name="ce20"/>
          <table:table-cell table:number-columns-repeated="16376"/>
        </table:table-row>
        <table:table-row table:style-name="ro1">
          <table:table-cell table:number-columns-repeated="2"/>
          <table:table-cell office:value-type="string" table:style-name="ce21">
            <text:p>Average Total System Load</text:p>
          </table:table-cell>
          <table:table-cell office:value-type="float" office:value="6232.7694444444442" table:formula="of:=AVERAGE([HHS_Unaccompanied_Alien_Childre.I:.I])" table:style-name="ce22">
            <text:p>6233</text:p>
          </table:table-cell>
          <table:table-cell table:number-columns-repeated="4" table:style-name="ce20"/>
          <table:table-cell table:number-columns-repeated="16376"/>
        </table:table-row>
        <table:table-row table:style-name="ro1">
          <table:table-cell table:number-columns-repeated="2"/>
          <table:table-cell office:value-type="string" table:style-name="ce21">
            <text:p>Maximum Total System Load</text:p>
          </table:table-cell>
          <table:table-cell office:value-type="float" office:value="11762" table:formula="of:=MAX([HHS_Unaccompanied_Alien_Childre.I:.I])" table:style-name="ce22">
            <text:p>11762</text:p>
          </table:table-cell>
          <table:table-cell table:number-columns-repeated="4" table:style-name="ce20"/>
          <table:table-cell table:number-columns-repeated="16376"/>
        </table:table-row>
        <table:table-row table:style-name="ro1">
          <table:table-cell table:number-columns-repeated="2"/>
          <table:table-cell office:value-type="string" table:style-name="ce21">
            <text:p>Maximum HHS Care Load</text:p>
          </table:table-cell>
          <table:table-cell office:value-type="float" office:value="11516" table:formula="of:=MAX([HHS_Unaccompanied_Alien_Childre.G:.G])" table:style-name="ce22">
            <text:p>11516</text:p>
          </table:table-cell>
          <table:table-cell table:number-columns-repeated="4" table:style-name="ce20"/>
          <table:table-cell table:number-columns-repeated="16376"/>
        </table:table-row>
        <table:table-row table:style-name="ro1">
          <table:table-cell table:number-columns-repeated="2"/>
          <table:table-cell office:value-type="string" table:style-name="ce21">
            <text:p>Average Net Intake Pressure</text:p>
          </table:table-cell>
          <table:table-cell office:value-type="float" office:value="-44.738888888888887" table:formula="of:=AVERAGE([HHS_Unaccompanied_Alien_Childre.J:.J])" table:style-name="ce22">
            <text:p>-45</text:p>
          </table:table-cell>
          <table:table-cell table:number-columns-repeated="4" table:style-name="ce20"/>
          <table:table-cell table:number-columns-repeated="16376"/>
        </table:table-row>
        <table:table-row table:style-name="ro1">
          <table:table-cell table:number-columns-repeated="2"/>
          <table:table-cell office:value-type="string" table:style-name="ce21">
            <text:p>Highest Net Intake Pressure</text:p>
          </table:table-cell>
          <table:table-cell office:value-type="float" office:value="206" table:formula="of:=MAX([HHS_Unaccompanied_Alien_Childre.J:.J])" table:style-name="ce22">
            <text:p>206</text:p>
          </table:table-cell>
          <table:table-cell table:number-columns-repeated="4" table:style-name="ce20"/>
          <table:table-cell table:number-columns-repeated="16376"/>
        </table:table-row>
        <table:table-row table:style-name="ro1">
          <table:table-cell table:number-columns-repeated="2"/>
          <table:table-cell office:value-type="string" table:style-name="ce21">
            <text:p>Average Discharge Offset Ratio</text:p>
          </table:table-cell>
          <table:table-cell office:value-type="float" office:value="2.0051227419064195" table:formula="of:=AVERAGE([HHS_Unaccompanied_Alien_Childre.O2:.O1171])" table:style-name="ce22">
            <text:p>2</text:p>
          </table:table-cell>
          <table:table-cell table:number-columns-repeated="4" table:style-name="ce20"/>
          <table:table-cell table:number-columns-repeated="16376"/>
        </table:table-row>
        <table:table-row table:number-rows-repeated="8" table:style-name="ro1">
          <table:table-cell table:number-columns-repeated="2"/>
          <table:table-cell table:style-name="ce1"/>
          <table:table-cell table:number-columns-repeated="5" table:style-name="ce20"/>
          <table:table-cell table:number-columns-repeated="16376"/>
        </table:table-row>
        <table:table-row table:number-rows-repeated="705" table:style-name="ro1">
          <table:table-cell table:number-columns-repeated="3"/>
          <table:table-cell table:number-columns-repeated="5" table:style-name="ce20"/>
          <table:table-cell table:number-columns-repeated="16376"/>
        </table:table-row>
        <table:table-row table:number-rows-repeated="1047855" table:style-name="ro1">
          <table:table-cell table:number-columns-repeated="16384"/>
        </table:table-row>
      </table:table>
      <table:database-ranges>
        <table:database-range table:target-range-address="HHS_Unaccompanied_Alien_Childre.A1:HHS_Unaccompanied_Alien_Childre.Q1171" table:name="HHS_Unaccompanied_Alien_Children_Program" table:display-filter-buttons="true" table:on-update-keep-size="false" table:on-update-keep-styles="true" table:refresh-delay="false">
          <table:database-source-sql table:database-name="Provider=Microsoft.Mashup.OleDb.1;Data Source=$Workbook$;Location=HHS_Unaccompanied_Alien_Children_Program;Extended Properties=&quot;&quot;" table:sql-statement="SELECT * FROM [HHS_Unaccompanied_Alien_Children_Program]"/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13">
      <number:number number:decimal-places="0" number:min-integer-digits="1"/>
      <number:text>%</number:text>
    </number:percentage-style>
    <number:date-style style:name="N36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ercent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701</meta:generator>
    <meta:initial-creator>Tushar Mehta</meta:initial-creator>
    <dc:creator>Tushar Mehta</dc:creator>
    <meta:creation-date>2026-05-14T07:18:31Z</meta:creation-date>
    <dc:date>2026-05-23T17:30:36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regression-type="linear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amed-symbol" chart:symbol-name="circle" chart:symbol-width="0.06944in" chart:symbol-height="0.06944in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0" text:class-names="" text:cond-style-name="">,<text:s text:c="1"/></text:p>
        </chart:label-separator>
      </style:chart-properties>
      <style:graphic-properties draw:fill="none" draw:stroke="solid" svg:stroke-width="0.03125in" svg:stroke-color="#4472c4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00">
      <style:graphic-properties draw:fill="none" draw:stroke="dash" draw:stroke-dash="a1" svg:stroke-width="0.02083in" svg:stroke-color="#4472c4" svg:stroke-opacity="100%" draw:stroke-linejoin="round" svg:stroke-linecap="round"/>
    </style: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541.2002362204724pt" chart:style-name="Crt0"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7"/>
          </chart:axis>
          <chart:series chart:label-cell-address="local-table.$B$1" chart:values-cell-range-address="local-table.$B$2:.$B$37" chart:class="chart:line" chart:attached-axis="primary-y" chart:style-name="G0S0">
            <chart:regression-curve chart:style-name="T000">
              <chart:equation chart:automatic-content="true" chart:display-equation="false" chart:display-r-square="false" chart:style-name="TL000"/>
            </chart:regression-curve>
            <chart:data-label chart:style-name="DL00"/>
            <chart:data-point chart:repeated="3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2023-01</text:p>
            </table:table-cell>
            <table:table-cell office:value-type="float" office:value="7413.5"/>
          </table:table-row>
          <table:table-row>
            <table:table-cell office:value-type="string">
              <text:p>2023-02</text:p>
            </table:table-cell>
            <table:table-cell office:value-type="float" office:value="7967.105263157895"/>
          </table:table-row>
          <table:table-row>
            <table:table-cell office:value-type="string">
              <text:p>2023-03</text:p>
            </table:table-cell>
            <table:table-cell office:value-type="float" office:value="8190.4736842105267"/>
          </table:table-row>
          <table:table-row>
            <table:table-cell office:value-type="string">
              <text:p>2023-04</text:p>
            </table:table-cell>
            <table:table-cell office:value-type="float" office:value="8092.8571428571431"/>
          </table:table-row>
          <table:table-row>
            <table:table-cell office:value-type="string">
              <text:p>2023-05</text:p>
            </table:table-cell>
            <table:table-cell office:value-type="float" office:value="8404.0909090909099"/>
          </table:table-row>
          <table:table-row>
            <table:table-cell office:value-type="string">
              <text:p>2023-06</text:p>
            </table:table-cell>
            <table:table-cell office:value-type="float" office:value="6282.1"/>
          </table:table-row>
          <table:table-row>
            <table:table-cell office:value-type="string">
              <text:p>2023-07</text:p>
            </table:table-cell>
            <table:table-cell office:value-type="float" office:value="7073.3809523809523"/>
          </table:table-row>
          <table:table-row>
            <table:table-cell office:value-type="string">
              <text:p>2023-08</text:p>
            </table:table-cell>
            <table:table-cell office:value-type="float" office:value="9585.1"/>
          </table:table-row>
          <table:table-row>
            <table:table-cell office:value-type="string">
              <text:p>2023-09</text:p>
            </table:table-cell>
            <table:table-cell office:value-type="float" office:value="10992.368421052632"/>
          </table:table-row>
          <table:table-row>
            <table:table-cell office:value-type="string">
              <text:p>2023-10</text:p>
            </table:table-cell>
            <table:table-cell office:value-type="float" office:value="10308.227272727272"/>
          </table:table-row>
          <table:table-row>
            <table:table-cell office:value-type="string">
              <text:p>2023-11</text:p>
            </table:table-cell>
            <table:table-cell office:value-type="float" office:value="9909.6"/>
          </table:table-row>
          <table:table-row>
            <table:table-cell office:value-type="string">
              <text:p>2023-12</text:p>
            </table:table-cell>
            <table:table-cell office:value-type="float" office:value="11255.263157894737"/>
          </table:table-row>
          <table:table-row>
            <table:table-cell office:value-type="string">
              <text:p>2024-01</text:p>
            </table:table-cell>
            <table:table-cell office:value-type="float" office:value="9021.636363636364"/>
          </table:table-row>
          <table:table-row>
            <table:table-cell office:value-type="string">
              <text:p>2024-02</text:p>
            </table:table-cell>
            <table:table-cell office:value-type="float" office:value="8766.7999999999993"/>
          </table:table-row>
          <table:table-row>
            <table:table-cell office:value-type="string">
              <text:p>2024-03</text:p>
            </table:table-cell>
            <table:table-cell office:value-type="float" office:value="8703.8571428571431"/>
          </table:table-row>
          <table:table-row>
            <table:table-cell office:value-type="string">
              <text:p>2024-04</text:p>
            </table:table-cell>
            <table:table-cell office:value-type="float" office:value="7336.318181818182"/>
          </table:table-row>
          <table:table-row>
            <table:table-cell office:value-type="string">
              <text:p>2024-05</text:p>
            </table:table-cell>
            <table:table-cell office:value-type="float" office:value="7836.0476190476193"/>
          </table:table-row>
          <table:table-row>
            <table:table-cell office:value-type="string">
              <text:p>2024-06</text:p>
            </table:table-cell>
            <table:table-cell office:value-type="float" office:value="7691.4761904761908"/>
          </table:table-row>
          <table:table-row>
            <table:table-cell office:value-type="string">
              <text:p>2024-07</text:p>
            </table:table-cell>
            <table:table-cell office:value-type="float" office:value="6498.7619047619046"/>
          </table:table-row>
          <table:table-row>
            <table:table-cell office:value-type="string">
              <text:p>2024-08</text:p>
            </table:table-cell>
            <table:table-cell office:value-type="float" office:value="6258.7368421052633"/>
          </table:table-row>
          <table:table-row>
            <table:table-cell office:value-type="string">
              <text:p>2024-09</text:p>
            </table:table-cell>
            <table:table-cell office:value-type="float" office:value="6452.636363636364"/>
          </table:table-row>
          <table:table-row>
            <table:table-cell office:value-type="string">
              <text:p>2024-10</text:p>
            </table:table-cell>
            <table:table-cell office:value-type="float" office:value="6276.2857142857147"/>
          </table:table-row>
          <table:table-row>
            <table:table-cell office:value-type="string">
              <text:p>2024-11</text:p>
            </table:table-cell>
            <table:table-cell office:value-type="float" office:value="6151.4210526315792"/>
          </table:table-row>
          <table:table-row>
            <table:table-cell office:value-type="string">
              <text:p>2024-12</text:p>
            </table:table-cell>
            <table:table-cell office:value-type="float" office:value="6690.409090909091"/>
          </table:table-row>
          <table:table-row>
            <table:table-cell office:value-type="string">
              <text:p>2025-01</text:p>
            </table:table-cell>
            <table:table-cell office:value-type="float" office:value="5080.045454545455"/>
          </table:table-row>
          <table:table-row>
            <table:table-cell office:value-type="string">
              <text:p>2025-02</text:p>
            </table:table-cell>
            <table:table-cell office:value-type="float" office:value="2804.2105263157896"/>
          </table:table-row>
          <table:table-row>
            <table:table-cell office:value-type="string">
              <text:p>2025-03</text:p>
            </table:table-cell>
            <table:table-cell office:value-type="float" office:value="2185.909090909091"/>
          </table:table-row>
          <table:table-row>
            <table:table-cell office:value-type="string">
              <text:p>2025-04</text:p>
            </table:table-cell>
            <table:table-cell office:value-type="float" office:value="2298"/>
          </table:table-row>
          <table:table-row>
            <table:table-cell office:value-type="string">
              <text:p>2025-05</text:p>
            </table:table-cell>
            <table:table-cell office:value-type="float" office:value="2439.7777777777778"/>
          </table:table-row>
          <table:table-row>
            <table:table-cell office:value-type="string">
              <text:p>2025-06</text:p>
            </table:table-cell>
            <table:table-cell office:value-type="float" office:value="2511.4705882352941"/>
          </table:table-row>
          <table:table-row>
            <table:table-cell office:value-type="string">
              <text:p>2025-07</text:p>
            </table:table-cell>
            <table:table-cell office:value-type="float" office:value="2201.1428571428573"/>
          </table:table-row>
          <table:table-row>
            <table:table-cell office:value-type="string">
              <text:p>2025-08</text:p>
            </table:table-cell>
            <table:table-cell office:value-type="float" office:value="2026.9"/>
          </table:table-row>
          <table:table-row>
            <table:table-cell office:value-type="string">
              <text:p>2025-09</text:p>
            </table:table-cell>
            <table:table-cell office:value-type="float" office:value="2118.0454545454545"/>
          </table:table-row>
          <table:table-row>
            <table:table-cell office:value-type="string">
              <text:p>2025-10</text:p>
            </table:table-cell>
            <table:table-cell office:value-type="float" office:value="2265.3809523809523"/>
          </table:table-row>
          <table:table-row>
            <table:table-cell office:value-type="string">
              <text:p>2025-11</text:p>
            </table:table-cell>
            <table:table-cell office:value-type="float" office:value="2360.6842105263158"/>
          </table:table-row>
          <table:table-row>
            <table:table-cell office:value-type="string">
              <text:p>2025-12</text:p>
            </table:table-cell>
            <table:table-cell office:value-type="float" office:value="2481.4666666666667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1" draw:style="rect" draw:dots1="1" draw:dots1-length="0.02083in" draw:distance="0.02083in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T000">
      <style:graphic-properties draw:fill="none" draw:stroke="dash" draw:stroke-dash="a1" svg:stroke-width="0.02083in" svg:stroke-color="#4472c4" svg:stroke-opacity="100%" draw:stroke-linejoin="round" svg:stroke-linecap="round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06944in" chart:symbol-height="0.06944in" chart:connect-bars="false" chart:solid-type="cuboid" chart:stacked="false" chart:percentage="false" chart:link-data-style-to-source="true" chart:data-label-number="none" chart:data-label-text="false" chart:data-label-symbol="false" chart:regression-type="linear">
        <chart:label-separator>
          <text:p text:style-name="a0" text:class-names="" text:cond-style-name="">,<text:s text:c="1"/></text:p>
        </chart:label-separator>
      </style:chart-properties>
      <style:graphic-properties draw:fill="none" draw:stroke="solid" svg:stroke-width="0.03125in" svg:stroke-color="#4472c4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06944in" chart:symbol-height="0.06944in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" text:class-names="" text:cond-style-name="">,<text:s text:c="1"/></text:p>
        </chart:label-separator>
      </style:chart-properties>
      <style:graphic-properties draw:fill="none" draw:stroke="solid" svg:stroke-width="0.0312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7"/>
          </chart:axis>
          <chart:series chart:label-cell-address="local-table.$B$1" chart:values-cell-range-address="local-table.$B$2:.$B$37" chart:class="chart:line" chart:attached-axis="primary-y" chart:style-name="G0S0">
            <chart:regression-curve chart:style-name="T000">
              <chart:equation chart:automatic-content="true" chart:display-equation="false" chart:display-r-square="false" chart:style-name="TL000"/>
            </chart:regression-curve>
            <chart:data-label chart:style-name="DL00"/>
            <chart:data-point chart:repeated="36"/>
          </chart:series>
          <chart:series chart:label-cell-address="local-table.$C$1" chart:values-cell-range-address="local-table.$C$2:.$C$37" chart:class="chart:line" chart:attached-axis="primary-y" chart:style-name="G0S1">
            <chart:data-label chart:style-name="DL01"/>
            <chart:data-point chart:repeated="3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Average of Children transferred out of CBP custody</text:p>
              </table:table-cell>
              <table:table-cell office:value-type="string">
                <text:p>Average of Children discharged from HHS Care</text:p>
              </table:table-cell>
            </table:table-row>
          </table:table-header-rows>
          <table:table-row>
            <table:table-cell office:value-type="string">
              <text:p>2023-01</text:p>
            </table:table-cell>
            <table:table-cell office:value-type="float" office:value="34.5"/>
            <table:table-cell office:value-type="float" office:value="232"/>
          </table:table-row>
          <table:table-row>
            <table:table-cell office:value-type="string">
              <text:p>2023-02</text:p>
            </table:table-cell>
            <table:table-cell office:value-type="float" office:value="138.78947368421052"/>
            <table:table-cell office:value-type="float" office:value="272.78947368421052"/>
          </table:table-row>
          <table:table-row>
            <table:table-cell office:value-type="string">
              <text:p>2023-03</text:p>
            </table:table-cell>
            <table:table-cell office:value-type="float" office:value="178.89473684210526"/>
            <table:table-cell office:value-type="float" office:value="282.89473684210526"/>
          </table:table-row>
          <table:table-row>
            <table:table-cell office:value-type="string">
              <text:p>2023-04</text:p>
            </table:table-cell>
            <table:table-cell office:value-type="float" office:value="188.9047619047619"/>
            <table:table-cell office:value-type="float" office:value="269.90476190476193"/>
          </table:table-row>
          <table:table-row>
            <table:table-cell office:value-type="string">
              <text:p>2023-05</text:p>
            </table:table-cell>
            <table:table-cell office:value-type="float" office:value="164.63636363636363"/>
            <table:table-cell office:value-type="float" office:value="284.36363636363637"/>
          </table:table-row>
          <table:table-row>
            <table:table-cell office:value-type="string">
              <text:p>2023-06</text:p>
            </table:table-cell>
            <table:table-cell office:value-type="float" office:value="120.8"/>
            <table:table-cell office:value-type="float" office:value="201.45"/>
          </table:table-row>
          <table:table-row>
            <table:table-cell office:value-type="string">
              <text:p>2023-07</text:p>
            </table:table-cell>
            <table:table-cell office:value-type="float" office:value="185.57142857142858"/>
            <table:table-cell office:value-type="float" office:value="209.85714285714286"/>
          </table:table-row>
          <table:table-row>
            <table:table-cell office:value-type="string">
              <text:p>2023-08</text:p>
            </table:table-cell>
            <table:table-cell office:value-type="float" office:value="179.35"/>
            <table:table-cell office:value-type="float" office:value="323.5"/>
          </table:table-row>
          <table:table-row>
            <table:table-cell office:value-type="string">
              <text:p>2023-09</text:p>
            </table:table-cell>
            <table:table-cell office:value-type="float" office:value="209"/>
            <table:table-cell office:value-type="float" office:value="344.5263157894737"/>
          </table:table-row>
          <table:table-row>
            <table:table-cell office:value-type="string">
              <text:p>2023-10</text:p>
            </table:table-cell>
            <table:table-cell office:value-type="float" office:value="93.13636363636364"/>
            <table:table-cell office:value-type="float" office:value="348.09090909090907"/>
          </table:table-row>
          <table:table-row>
            <table:table-cell office:value-type="string">
              <text:p>2023-11</text:p>
            </table:table-cell>
            <table:table-cell office:value-type="float" office:value="159.9"/>
            <table:table-cell office:value-type="float" office:value="299.60000000000002"/>
          </table:table-row>
          <table:table-row>
            <table:table-cell office:value-type="string">
              <text:p>2023-12</text:p>
            </table:table-cell>
            <table:table-cell office:value-type="float" office:value="163.42105263157896"/>
            <table:table-cell office:value-type="float" office:value="358.10526315789474"/>
          </table:table-row>
          <table:table-row>
            <table:table-cell office:value-type="string">
              <text:p>2024-01</text:p>
            </table:table-cell>
            <table:table-cell office:value-type="float" office:value="129.54545454545453"/>
            <table:table-cell office:value-type="float" office:value="295.27272727272725"/>
          </table:table-row>
          <table:table-row>
            <table:table-cell office:value-type="string">
              <text:p>2024-02</text:p>
            </table:table-cell>
            <table:table-cell office:value-type="float" office:value="316.60000000000002"/>
            <table:table-cell office:value-type="float" office:value="263.64999999999998"/>
          </table:table-row>
          <table:table-row>
            <table:table-cell office:value-type="string">
              <text:p>2024-03</text:p>
            </table:table-cell>
            <table:table-cell office:value-type="float" office:value="248.04761904761904"/>
            <table:table-cell office:value-type="float" office:value="270.38095238095241"/>
          </table:table-row>
          <table:table-row>
            <table:table-cell office:value-type="string">
              <text:p>2024-04</text:p>
            </table:table-cell>
            <table:table-cell office:value-type="float" office:value="235.36363636363637"/>
            <table:table-cell office:value-type="float" office:value="203.36363636363637"/>
          </table:table-row>
          <table:table-row>
            <table:table-cell office:value-type="string">
              <text:p>2024-05</text:p>
            </table:table-cell>
            <table:table-cell office:value-type="float" office:value="247.33333333333334"/>
            <table:table-cell office:value-type="float" office:value="206.47619047619048"/>
          </table:table-row>
          <table:table-row>
            <table:table-cell office:value-type="string">
              <text:p>2024-06</text:p>
            </table:table-cell>
            <table:table-cell office:value-type="float" office:value="232.47619047619048"/>
            <table:table-cell office:value-type="float" office:value="233.85714285714286"/>
          </table:table-row>
          <table:table-row>
            <table:table-cell office:value-type="string">
              <text:p>2024-07</text:p>
            </table:table-cell>
            <table:table-cell office:value-type="float" office:value="175.1904761904762"/>
            <table:table-cell office:value-type="float" office:value="185.66666666666666"/>
          </table:table-row>
          <table:table-row>
            <table:table-cell office:value-type="string">
              <text:p>2024-08</text:p>
            </table:table-cell>
            <table:table-cell office:value-type="float" office:value="186.63157894736841"/>
            <table:table-cell office:value-type="float" office:value="161.73684210526315"/>
          </table:table-row>
          <table:table-row>
            <table:table-cell office:value-type="string">
              <text:p>2024-09</text:p>
            </table:table-cell>
            <table:table-cell office:value-type="float" office:value="181.22727272727272"/>
            <table:table-cell office:value-type="float" office:value="167.81818181818181"/>
          </table:table-row>
          <table:table-row>
            <table:table-cell office:value-type="string">
              <text:p>2024-10</text:p>
            </table:table-cell>
            <table:table-cell office:value-type="float" office:value="185.04761904761904"/>
            <table:table-cell office:value-type="float" office:value="152.0952380952381"/>
          </table:table-row>
          <table:table-row>
            <table:table-cell office:value-type="string">
              <text:p>2024-11</text:p>
            </table:table-cell>
            <table:table-cell office:value-type="float" office:value="179.68421052631578"/>
            <table:table-cell office:value-type="float" office:value="157.94736842105263"/>
          </table:table-row>
          <table:table-row>
            <table:table-cell office:value-type="string">
              <text:p>2024-12</text:p>
            </table:table-cell>
            <table:table-cell office:value-type="float" office:value="199.77272727272728"/>
            <table:table-cell office:value-type="float" office:value="166.45454545454547"/>
          </table:table-row>
          <table:table-row>
            <table:table-cell office:value-type="string">
              <text:p>2025-01</text:p>
            </table:table-cell>
            <table:table-cell office:value-type="float" office:value="79.545454545454547"/>
            <table:table-cell office:value-type="float" office:value="151.36363636363637"/>
          </table:table-row>
          <table:table-row>
            <table:table-cell office:value-type="string">
              <text:p>2025-02</text:p>
            </table:table-cell>
            <table:table-cell office:value-type="float" office:value="17.94736842105263"/>
            <table:table-cell office:value-type="float" office:value="61.05263157894737"/>
          </table:table-row>
          <table:table-row>
            <table:table-cell office:value-type="string">
              <text:p>2025-03</text:p>
            </table:table-cell>
            <table:table-cell office:value-type="float" office:value="8.6363636363636367"/>
            <table:table-cell office:value-type="float" office:value="14.045454545454545"/>
          </table:table-row>
          <table:table-row>
            <table:table-cell office:value-type="string">
              <text:p>2025-04</text:p>
            </table:table-cell>
            <table:table-cell office:value-type="float" office:value="10"/>
            <table:table-cell office:value-type="float" office:value="8.8260869565217384"/>
          </table:table-row>
          <table:table-row>
            <table:table-cell office:value-type="string">
              <text:p>2025-05</text:p>
            </table:table-cell>
            <table:table-cell office:value-type="float" office:value="14"/>
            <table:table-cell office:value-type="float" office:value="11.388888888888889"/>
          </table:table-row>
          <table:table-row>
            <table:table-cell office:value-type="string">
              <text:p>2025-06</text:p>
            </table:table-cell>
            <table:table-cell office:value-type="float" office:value="8.117647058823529"/>
            <table:table-cell office:value-type="float" office:value="16.529411764705884"/>
          </table:table-row>
          <table:table-row>
            <table:table-cell office:value-type="string">
              <text:p>2025-07</text:p>
            </table:table-cell>
            <table:table-cell office:value-type="float" office:value="4.1904761904761907"/>
            <table:table-cell office:value-type="float" office:value="18.857142857142858"/>
          </table:table-row>
          <table:table-row>
            <table:table-cell office:value-type="string">
              <text:p>2025-08</text:p>
            </table:table-cell>
            <table:table-cell office:value-type="float" office:value="7.35"/>
            <table:table-cell office:value-type="float" office:value="12.7"/>
          </table:table-row>
          <table:table-row>
            <table:table-cell office:value-type="string">
              <text:p>2025-09</text:p>
            </table:table-cell>
            <table:table-cell office:value-type="float" office:value="11.818181818181818"/>
            <table:table-cell office:value-type="float" office:value="10.772727272727273"/>
          </table:table-row>
          <table:table-row>
            <table:table-cell office:value-type="string">
              <text:p>2025-10</text:p>
            </table:table-cell>
            <table:table-cell office:value-type="float" office:value="12.523809523809524"/>
            <table:table-cell office:value-type="float" office:value="11.523809523809524"/>
          </table:table-row>
          <table:table-row>
            <table:table-cell office:value-type="string">
              <text:p>2025-11</text:p>
            </table:table-cell>
            <table:table-cell office:value-type="float" office:value="9.5789473684210531"/>
            <table:table-cell office:value-type="float" office:value="8.3684210526315788"/>
          </table:table-row>
          <table:table-row>
            <table:table-cell office:value-type="string">
              <text:p>2025-12</text:p>
            </table:table-cell>
            <table:table-cell office:value-type="float" office:value="8.2666666666666675"/>
            <table:table-cell office:value-type="float" office:value="9.6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1" draw:style="rect" draw:dots1="1" draw:dots1-length="0.02083in" draw:distance="0.02083in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true" chart:percentage="false" chart:include-hidden-cells="false" chart:treat-empty-cells="use-zero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06944in" chart:symbol-height="0.06944in" chart:connect-bars="false" chart:solid-type="cuboid" chart:stacked="true" chart:percentage="false" chart:link-data-style-to-source="true" chart:data-label-number="none" chart:data-label-text="false" chart:data-label-symbol="false">
        <chart:label-separator>
          <text:p text:style-name="a0" text:class-names="" text:cond-style-name="">,<text:s text:c="1"/></text:p>
        </chart:label-separator>
      </style:chart-properties>
      <style:graphic-properties draw:fill="none" draw:stroke="solid" svg:stroke-width="0.03125in" svg:stroke-color="#4472c4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90.6999212598425pt" svg:width="498.6pt" chart:style-name="Crt0"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7"/>
          </chart:axis>
          <chart:series chart:label-cell-address="local-table.$B$1" chart:values-cell-range-address="local-table.$B$2:.$B$37" chart:class="chart:line" chart:attached-axis="primary-y" chart:style-name="G0S0">
            <chart:data-label chart:style-name="DL00"/>
            <chart:data-point chart:repeated="3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2023-01</text:p>
            </table:table-cell>
            <table:table-cell office:value-type="float" office:value="-197.5"/>
          </table:table-row>
          <table:table-row>
            <table:table-cell office:value-type="string">
              <text:p>2023-02</text:p>
            </table:table-cell>
            <table:table-cell office:value-type="float" office:value="-134"/>
          </table:table-row>
          <table:table-row>
            <table:table-cell office:value-type="string">
              <text:p>2023-03</text:p>
            </table:table-cell>
            <table:table-cell office:value-type="float" office:value="-104"/>
          </table:table-row>
          <table:table-row>
            <table:table-cell office:value-type="string">
              <text:p>2023-04</text:p>
            </table:table-cell>
            <table:table-cell office:value-type="float" office:value="-81"/>
          </table:table-row>
          <table:table-row>
            <table:table-cell office:value-type="string">
              <text:p>2023-05</text:p>
            </table:table-cell>
            <table:table-cell office:value-type="float" office:value="-119.72727272727273"/>
          </table:table-row>
          <table:table-row>
            <table:table-cell office:value-type="string">
              <text:p>2023-06</text:p>
            </table:table-cell>
            <table:table-cell office:value-type="float" office:value="-80.650000000000006"/>
          </table:table-row>
          <table:table-row>
            <table:table-cell office:value-type="string">
              <text:p>2023-07</text:p>
            </table:table-cell>
            <table:table-cell office:value-type="float" office:value="-24.285714285714285"/>
          </table:table-row>
          <table:table-row>
            <table:table-cell office:value-type="string">
              <text:p>2023-08</text:p>
            </table:table-cell>
            <table:table-cell office:value-type="float" office:value="-144.15"/>
          </table:table-row>
          <table:table-row>
            <table:table-cell office:value-type="string">
              <text:p>2023-09</text:p>
            </table:table-cell>
            <table:table-cell office:value-type="float" office:value="-135.52631578947367"/>
          </table:table-row>
          <table:table-row>
            <table:table-cell office:value-type="string">
              <text:p>2023-10</text:p>
            </table:table-cell>
            <table:table-cell office:value-type="float" office:value="-254.95454545454547"/>
          </table:table-row>
          <table:table-row>
            <table:table-cell office:value-type="string">
              <text:p>2023-11</text:p>
            </table:table-cell>
            <table:table-cell office:value-type="float" office:value="-139.69999999999999"/>
          </table:table-row>
          <table:table-row>
            <table:table-cell office:value-type="string">
              <text:p>2023-12</text:p>
            </table:table-cell>
            <table:table-cell office:value-type="float" office:value="-194.68421052631578"/>
          </table:table-row>
          <table:table-row>
            <table:table-cell office:value-type="string">
              <text:p>2024-01</text:p>
            </table:table-cell>
            <table:table-cell office:value-type="float" office:value="-165.72727272727272"/>
          </table:table-row>
          <table:table-row>
            <table:table-cell office:value-type="string">
              <text:p>2024-02</text:p>
            </table:table-cell>
            <table:table-cell office:value-type="float" office:value="52.95"/>
          </table:table-row>
          <table:table-row>
            <table:table-cell office:value-type="string">
              <text:p>2024-03</text:p>
            </table:table-cell>
            <table:table-cell office:value-type="float" office:value="-22.333333333333332"/>
          </table:table-row>
          <table:table-row>
            <table:table-cell office:value-type="string">
              <text:p>2024-04</text:p>
            </table:table-cell>
            <table:table-cell office:value-type="float" office:value="32"/>
          </table:table-row>
          <table:table-row>
            <table:table-cell office:value-type="string">
              <text:p>2024-05</text:p>
            </table:table-cell>
            <table:table-cell office:value-type="float" office:value="40.857142857142854"/>
          </table:table-row>
          <table:table-row>
            <table:table-cell office:value-type="string">
              <text:p>2024-06</text:p>
            </table:table-cell>
            <table:table-cell office:value-type="float" office:value="-1.3809523809523809"/>
          </table:table-row>
          <table:table-row>
            <table:table-cell office:value-type="string">
              <text:p>2024-07</text:p>
            </table:table-cell>
            <table:table-cell office:value-type="float" office:value="-10.476190476190476"/>
          </table:table-row>
          <table:table-row>
            <table:table-cell office:value-type="string">
              <text:p>2024-08</text:p>
            </table:table-cell>
            <table:table-cell office:value-type="float" office:value="24.894736842105264"/>
          </table:table-row>
          <table:table-row>
            <table:table-cell office:value-type="string">
              <text:p>2024-09</text:p>
            </table:table-cell>
            <table:table-cell office:value-type="float" office:value="13.409090909090908"/>
          </table:table-row>
          <table:table-row>
            <table:table-cell office:value-type="string">
              <text:p>2024-10</text:p>
            </table:table-cell>
            <table:table-cell office:value-type="float" office:value="32.952380952380949"/>
          </table:table-row>
          <table:table-row>
            <table:table-cell office:value-type="string">
              <text:p>2024-11</text:p>
            </table:table-cell>
            <table:table-cell office:value-type="float" office:value="21.736842105263158"/>
          </table:table-row>
          <table:table-row>
            <table:table-cell office:value-type="string">
              <text:p>2024-12</text:p>
            </table:table-cell>
            <table:table-cell office:value-type="float" office:value="33.31818181818182"/>
          </table:table-row>
          <table:table-row>
            <table:table-cell office:value-type="string">
              <text:p>2025-01</text:p>
            </table:table-cell>
            <table:table-cell office:value-type="float" office:value="-71.818181818181813"/>
          </table:table-row>
          <table:table-row>
            <table:table-cell office:value-type="string">
              <text:p>2025-02</text:p>
            </table:table-cell>
            <table:table-cell office:value-type="float" office:value="-43.10526315789474"/>
          </table:table-row>
          <table:table-row>
            <table:table-cell office:value-type="string">
              <text:p>2025-03</text:p>
            </table:table-cell>
            <table:table-cell office:value-type="float" office:value="-5.4090909090909092"/>
          </table:table-row>
          <table:table-row>
            <table:table-cell office:value-type="string">
              <text:p>2025-04</text:p>
            </table:table-cell>
            <table:table-cell office:value-type="float" office:value="1.173913043478261"/>
          </table:table-row>
          <table:table-row>
            <table:table-cell office:value-type="string">
              <text:p>2025-05</text:p>
            </table:table-cell>
            <table:table-cell office:value-type="float" office:value="2.6111111111111112"/>
          </table:table-row>
          <table:table-row>
            <table:table-cell office:value-type="string">
              <text:p>2025-06</text:p>
            </table:table-cell>
            <table:table-cell office:value-type="float" office:value="-8.4117647058823533"/>
          </table:table-row>
          <table:table-row>
            <table:table-cell office:value-type="string">
              <text:p>2025-07</text:p>
            </table:table-cell>
            <table:table-cell office:value-type="float" office:value="-14.666666666666666"/>
          </table:table-row>
          <table:table-row>
            <table:table-cell office:value-type="string">
              <text:p>2025-08</text:p>
            </table:table-cell>
            <table:table-cell office:value-type="float" office:value="-5.35"/>
          </table:table-row>
          <table:table-row>
            <table:table-cell office:value-type="string">
              <text:p>2025-09</text:p>
            </table:table-cell>
            <table:table-cell office:value-type="float" office:value="1.0454545454545454"/>
          </table:table-row>
          <table:table-row>
            <table:table-cell office:value-type="string">
              <text:p>2025-10</text:p>
            </table:table-cell>
            <table:table-cell office:value-type="float" office:value="1"/>
          </table:table-row>
          <table:table-row>
            <table:table-cell office:value-type="string">
              <text:p>2025-11</text:p>
            </table:table-cell>
            <table:table-cell office:value-type="float" office:value="1.2105263157894737"/>
          </table:table-row>
          <table:table-row>
            <table:table-cell office:value-type="string">
              <text:p>2025-12</text:p>
            </table:table-cell>
            <table:table-cell office:value-type="float" office:value="-1.3333333333333333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T000">
      <style:graphic-properties draw:fill="none" draw:stroke="dash" draw:stroke-dash="a1" svg:stroke-width="0.02083in" svg:stroke-color="#4472c4" svg:stroke-opacity="100%" draw:stroke-linejoin="round" svg:stroke-linecap="round"/>
    </style:style>
    <style:style style:family="chart" style:name="Axs0" style:data-style-name="N1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inear" chart:auto-position="true"/>
      <style:graphic-properties draw:fill="none" draw:stroke="none"/>
    </style:style>
  </office:automatic-styles>
  <office:body>
    <office:chart>
      <chart:chart chart:class="chart:line" svg:height="216.0pt" svg:width="493.7996850393701pt" chart:style-name="Crt0">
        <chart:title chart:style-name="CT00">
          <text:p text:style-name="a0" text:class-names="" text:cond-style-name=""><text:s text:c="1"/>Moving/Rolling Averages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HHS_Unaccompanied_Alien_Childre.$P$2:.$P$1171" chart:class="chart:line" chart:attached-axis="primary-y" chart:style-name="G0S0"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1170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1" draw:style="rect" draw:dots1="1" draw:dots1-length="0.02083in" draw:distance="0.02083in"/>
  </office:styles>
</office:document-styles>
</file>